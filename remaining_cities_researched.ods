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Plumbing_20_Companies_20__3e_50K_20_Citie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Plumbing Companies &gt;50K Citie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16373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ontact Phone</text:p>
          </table:table-cell>
          <table:table-cell office:value-type="string" calcext:value-type="string">
            <text:p>Contact Email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tar Rating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mily Run Owner</text:p>
          </table:table-cell>
          <table:table-cell table:style-name="Default" office:value-type="string" calcext:value-type="string">
            <text:p>Company Webpage</text:p>
          </table:table-cell>
          <table:table-cell office:value-type="string" calcext:value-type="string">
            <text:p>Largest Social Platform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Bentonvill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mith Bros. Plumbing</text:p>
          </table:table-cell>
          <table:table-cell office:value-type="string" calcext:value-type="string">
            <text:p>(479) 877-5803</text:p>
          </table:table-cell>
          <table:table-cell/>
          <table:table-cell office:value-type="string" calcext:value-type="string">
            <text:p>8816 W McNelly Rd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formula="of:=HYPERLINK(&quot;https://www.callsmith.com/&quot;;&quot;https://www.callsmith.com/&quot;)" office:value-type="string" office:string-value="https://www.callsmith.com/" calcext:value-type="string">
            <text:p>https://www.callsmith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Fayettevill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ayetteville Plumbing Services</text:p>
          </table:table-cell>
          <table:table-cell office:value-type="string" calcext:value-type="string">
            <text:p>(479) 888-5522</text:p>
          </table:table-cell>
          <table:table-cell/>
          <table:table-cell office:value-type="string" calcext:value-type="string">
            <text:p>34 E Center St #4</text:p>
          </table:table-cell>
          <table:table-cell office:value-type="string" calcext:value-type="string">
            <text:p>5.0</text:p>
          </table:table-cell>
          <table:table-cell table:number-columns-repeated="2"/>
          <table:table-cell table:formula="of:=HYPERLINK(&quot;https://www.plumbingfayettevillear.com/&quot;;&quot;https://www.plumbingfayettevillear.com/&quot;)" office:value-type="string" office:string-value="https://www.plumbingfayettevillear.com/" calcext:value-type="string">
            <text:p>https://www.plumbingfayettevillear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Rog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Kinty Jones Plumbing</text:p>
          </table:table-cell>
          <table:table-cell office:value-type="string" calcext:value-type="string">
            <text:p>(479) 925-4186</text:p>
          </table:table-cell>
          <table:table-cell/>
          <table:table-cell office:value-type="string" calcext:value-type="string">
            <text:p>4530 NE Hudson Rd</text:p>
          </table:table-cell>
          <table:table-cell office:value-type="string" calcext:value-type="string">
            <text:p>5.0</text:p>
          </table:table-cell>
          <table:table-cell table:number-columns-repeated="2"/>
          <table:table-cell table:formula="of:=HYPERLINK(&quot;https://kintyjonesplumbing.com/&quot;;&quot;https://kintyjonesplumbing.com/&quot;)" office:value-type="string" office:string-value="https://kintyjonesplumbing.com/" calcext:value-type="string">
            <text:p>https://kintyjonesplumbing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Springdal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 Plus Plumbing of NWA</text:p>
          </table:table-cell>
          <table:table-cell office:value-type="string" calcext:value-type="string">
            <text:p>(479) 408-4845</text:p>
          </table:table-cell>
          <table:table-cell/>
          <table:table-cell office:value-type="string" calcext:value-type="string">
            <text:p>284 Ranalli Ave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formula="of:=HYPERLINK(&quot;https://aplusplumbingofnwa.com/&quot;;&quot;https://aplusplumbingofnwa.com/&quot;)" office:value-type="string" office:string-value="https://aplusplumbingofnwa.com/" calcext:value-type="string">
            <text:p>https://aplusplumbingofnwa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enjamin Franklin Plumbing of Wilmington DE</text:p>
          </table:table-cell>
          <table:table-cell office:value-type="string" calcext:value-type="string">
            <text:p>(302) 524-7437</text:p>
          </table:table-cell>
          <table:table-cell/>
          <table:table-cell office:value-type="string" calcext:value-type="string">
            <text:p>410 Meco Dr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formula="of:=HYPERLINK(&quot;https://benjaminfranklinplumbing.com/wilmington-de/&quot;;&quot;https://benjaminfranklinplumbing.com/wilmington-de/&quot;)" office:value-type="string" office:string-value="https://benjaminfranklinplumbing.com/wilmington-de/" calcext:value-type="string">
            <text:p>https://benjaminfranklinplumbing.com/wilmington-de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Bois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oise Family Plumbing LLC</text:p>
          </table:table-cell>
          <table:table-cell office:value-type="string" calcext:value-type="string">
            <text:p>(208) 949-3307</text:p>
          </table:table-cell>
          <table:table-cell/>
          <table:table-cell office:value-type="string" calcext:value-type="string">
            <text:p>210 E 37th St #3, Boise, ID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formula="of:=HYPERLINK(&quot;https://boisefamilyplumbing.com&quot;;&quot;boisefamilyplumbing.com&quot;)" office:value-type="string" office:string-value="boisefamilyplumbing.com" calcext:value-type="string">
            <text:p>boisefamilyplumbing.com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Namp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illon Plumbing</text:p>
          </table:table-cell>
          <table:table-cell office:value-type="string" calcext:value-type="string">
            <text:p>(208) 466-3707</text:p>
          </table:table-cell>
          <table:table-cell/>
          <table:table-cell office:value-type="string" calcext:value-type="string">
            <text:p>605 E Hawaii Ave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formula="of:=HYPERLINK(&quot;http://www.dillonplumbing.com/&quot;;&quot;http://www.dillonplumbing.com/&quot;)" office:value-type="string" office:string-value="http://www.dillonplumbing.com/" calcext:value-type="string">
            <text:p>http://www.dillonplumbing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Portland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Heritage Home Service</text:p>
          </table:table-cell>
          <table:table-cell office:value-type="string" calcext:value-type="string">
            <text:p>(207) 370-9533</text:p>
          </table:table-cell>
          <table:table-cell/>
          <table:table-cell office:value-type="string" calcext:value-type="string">
            <text:p>72 City Line Dr</text:p>
          </table:table-cell>
          <table:table-cell office:value-type="string" calcext:value-type="string">
            <text:p>4.8</text:p>
          </table:table-cell>
          <table:table-cell table:number-columns-repeated="2"/>
          <table:table-cell table:formula="of:=HYPERLINK(&quot;https://justcallheritage.com/service-area/portland-me/&quot;;&quot;https://justcallheritage.com/service-area/portland-me/&quot;)" office:value-type="string" office:string-value="https://justcallheritage.com/service-area/portland-me/" calcext:value-type="string">
            <text:p>https://justcallheritage.com/service-area/portland-me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Columbi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Brian Wear Plumbing &amp; Restoration</text:p>
          </table:table-cell>
          <table:table-cell office:value-type="string" calcext:value-type="string">
            <text:p>(573) 864-4463</text:p>
          </table:table-cell>
          <table:table-cell/>
          <table:table-cell office:value-type="string" calcext:value-type="string">
            <text:p>2501 Rangeline St Suite B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formula="of:=HYPERLINK(&quot;https://brianwearplumbing.com/&quot;;&quot;https://brianwearplumbing.com/&quot;)" office:value-type="string" office:string-value="https://brianwearplumbing.com/" calcext:value-type="string">
            <text:p>https://brianwearplumbing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Jopli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Next Generation Gaylen Plumbing</text:p>
          </table:table-cell>
          <table:table-cell office:value-type="string" calcext:value-type="string">
            <text:p>(417) 781-5136</text:p>
          </table:table-cell>
          <table:table-cell/>
          <table:table-cell office:value-type="string" calcext:value-type="string">
            <text:p>2030 S Main St</text:p>
          </table:table-cell>
          <table:table-cell office:value-type="string" calcext:value-type="string">
            <text:p>4.6</text:p>
          </table:table-cell>
          <table:table-cell table:number-columns-repeated="2"/>
          <table:table-cell table:formula="of:=HYPERLINK(&quot;http://www.nextgenerationgaylen.com/&quot;;&quot;http://www.nextgenerationgaylen.com/&quot;)" office:value-type="string" office:string-value="http://www.nextgenerationgaylen.com/" calcext:value-type="string">
            <text:p>http://www.nextgenerationgaylen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Springfiel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Junior's Plumbing LLC</text:p>
          </table:table-cell>
          <table:table-cell office:value-type="string" calcext:value-type="string">
            <text:p>(417) 655-0536</text:p>
          </table:table-cell>
          <table:table-cell/>
          <table:table-cell office:value-type="string" calcext:value-type="string">
            <text:p>7325 E Division St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formula="of:=HYPERLINK(&quot;https://juniorsplumbingmo.com/&quot;;&quot;https://juniorsplumbingmo.com/&quot;)" office:value-type="string" office:string-value="https://juniorsplumbingmo.com/" calcext:value-type="string">
            <text:p>https://juniorsplumbingmo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St. Charle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ierson Plumbing Sewer &amp; Drain L.L.C</text:p>
          </table:table-cell>
          <table:table-cell office:value-type="string" calcext:value-type="string">
            <text:p>(314) 691-8066</text:p>
          </table:table-cell>
          <table:table-cell/>
          <table:table-cell office:value-type="string" calcext:value-type="string">
            <text:p>500 Boone's Lick Rd Suite C Upper</text:p>
          </table:table-cell>
          <table:table-cell office:value-type="string" calcext:value-type="string">
            <text:p>4.8</text:p>
          </table:table-cell>
          <table:table-cell table:number-columns-repeated="2"/>
          <table:table-cell table:formula="of:=HYPERLINK(&quot;http://www.piersonplumbingstl.com/&quot;;&quot;http://www.piersonplumbingstl.com/&quot;)" office:value-type="string" office:string-value="http://www.piersonplumbingstl.com/" calcext:value-type="string">
            <text:p>http://www.piersonplumbingstl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Gulfpor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 Royal Flush Plumbing Company</text:p>
          </table:table-cell>
          <table:table-cell office:value-type="string" calcext:value-type="string">
            <text:p>(228) 867-9944</text:p>
          </table:table-cell>
          <table:table-cell/>
          <table:table-cell office:value-type="string" calcext:value-type="string">
            <text:p>12453 Canal Rd</text:p>
          </table:table-cell>
          <table:table-cell office:value-type="string" calcext:value-type="string">
            <text:p>4.7</text:p>
          </table:table-cell>
          <table:table-cell table:number-columns-repeated="2"/>
          <table:table-cell table:formula="of:=HYPERLINK(&quot;https://arfplumbing.com/&quot;;&quot;https://arfplumbing.com/&quot;)" office:value-type="string" office:string-value="https://arfplumbing.com/" calcext:value-type="string">
            <text:p>https://arfplumbing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ississippi Plumbing Solutions - Formerly Reid Plumbing</text:p>
          </table:table-cell>
          <table:table-cell office:value-type="string" calcext:value-type="string">
            <text:p>(601) 850-1828</text:p>
          </table:table-cell>
          <table:table-cell/>
          <table:table-cell office:value-type="string" calcext:value-type="string">
            <text:p>1775 Lelia Dr A</text:p>
          </table:table-cell>
          <table:table-cell office:value-type="string" calcext:value-type="string">
            <text:p>5.0</text:p>
          </table:table-cell>
          <table:table-cell table:number-columns-repeated="2"/>
          <table:table-cell table:formula="of:=HYPERLINK(&quot;http://msplumbingsolutions.com/&quot;;&quot;http://msplumbingsolutions.com/&quot;)" office:value-type="string" office:string-value="http://msplumbingsolutions.com/" calcext:value-type="string">
            <text:p>http://msplumbingsolutions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Billing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Rimrock Plumbing</text:p>
          </table:table-cell>
          <table:table-cell office:value-type="string" calcext:value-type="string">
            <text:p>(406) 855-7131</text:p>
          </table:table-cell>
          <table:table-cell/>
          <table:table-cell office:value-type="string" calcext:value-type="string">
            <text:p>3419 Central Ave Suite C</text:p>
          </table:table-cell>
          <table:table-cell office:value-type="string" calcext:value-type="string">
            <text:p>5.0</text:p>
          </table:table-cell>
          <table:table-cell table:number-columns-repeated="2"/>
          <table:table-cell table:formula="of:=HYPERLINK(&quot;http://rimrockplumbing.com/&quot;;&quot;http://rimrockplumbing.com/&quot;)" office:value-type="string" office:string-value="http://rimrockplumbing.com/" calcext:value-type="string">
            <text:p>http://rimrockplumbing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Missoul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lumb-Tech Plumbing, Heating &amp; Drain Missoula</text:p>
          </table:table-cell>
          <table:table-cell office:value-type="string" calcext:value-type="string">
            <text:p>(406) 233-0662</text:p>
          </table:table-cell>
          <table:table-cell/>
          <table:table-cell office:value-type="string" calcext:value-type="string">
            <text:p>1530 Livingston Ave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formula="of:=HYPERLINK(&quot;https://plumbtechmt.com/&quot;;&quot;https://plumbtechmt.com/&quot;)" office:value-type="string" office:string-value="https://plumbtechmt.com/" calcext:value-type="string">
            <text:p>https://plumbtechmt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Bismarck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Timber Ridge Plumbing &amp; Heating</text:p>
          </table:table-cell>
          <table:table-cell office:value-type="string" calcext:value-type="string">
            <text:p>(701) 289-3106</text:p>
          </table:table-cell>
          <table:table-cell/>
          <table:table-cell office:value-type="string" calcext:value-type="string">
            <text:p>1512 Basin Ave</text:p>
          </table:table-cell>
          <table:table-cell office:value-type="string" calcext:value-type="string">
            <text:p>5.0</text:p>
          </table:table-cell>
          <table:table-cell table:number-columns-repeated="2"/>
          <table:table-cell table:formula="of:=HYPERLINK(&quot;https://www.timberridgephnd.com/&quot;;&quot;https://www.timberridgephnd.com/&quot;)" office:value-type="string" office:string-value="https://www.timberridgephnd.com/" calcext:value-type="string">
            <text:p>https://www.timberridgephnd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Fargo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EGACY PLUMBING &amp; HEATING</text:p>
          </table:table-cell>
          <table:table-cell office:value-type="string" calcext:value-type="string">
            <text:p>(701) 306-3375</text:p>
          </table:table-cell>
          <table:table-cell/>
          <table:table-cell office:value-type="string" calcext:value-type="string">
            <text:p>3522 4th Ave S</text:p>
          </table:table-cell>
          <table:table-cell office:value-type="string" calcext:value-type="string">
            <text:p>5.0</text:p>
          </table:table-cell>
          <table:table-cell table:number-columns-repeated="2"/>
          <table:table-cell table:formula="of:=HYPERLINK(&quot;https://www.legacyplumbingfm.com/&quot;;&quot;https://www.legacyplumbingfm.com/&quot;)" office:value-type="string" office:string-value="https://www.legacyplumbingfm.com/" calcext:value-type="string">
            <text:p>https://www.legacyplumbingfm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Paul The Plumber - Manchester</text:p>
          </table:table-cell>
          <table:table-cell office:value-type="string" calcext:value-type="string">
            <text:p>(603) 437-7039</text:p>
          </table:table-cell>
          <table:table-cell/>
          <table:table-cell office:value-type="string" calcext:value-type="string">
            <text:p>1087 Elm St Suite 406</text:p>
          </table:table-cell>
          <table:table-cell office:value-type="string" calcext:value-type="string">
            <text:p>4.8</text:p>
          </table:table-cell>
          <table:table-cell table:number-columns-repeated="2"/>
          <table:table-cell table:formula="of:=HYPERLINK(&quot;https://www.paultheplumbernh.com/&quot;;&quot;https://www.paultheplumbernh.com/&quot;)" office:value-type="string" office:string-value="https://www.paultheplumbernh.com/" calcext:value-type="string">
            <text:p>https://www.paultheplumbernh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Nashua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Fagundes Plumbing Heating AC</text:p>
          </table:table-cell>
          <table:table-cell office:value-type="string" calcext:value-type="string">
            <text:p>(603) 605-1919</text:p>
          </table:table-cell>
          <table:table-cell/>
          <table:table-cell office:value-type="string" calcext:value-type="string">
            <text:p>230 Amherst St Unit 103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formula="of:=HYPERLINK(&quot;https://www.afphpro.com/&quot;;&quot;https://www.afphpro.com/&quot;)" office:value-type="string" office:string-value="https://www.afphpro.com/" calcext:value-type="string">
            <text:p>https://www.afphpro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Jersey City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M&amp;A Plumbing &amp; Heating</text:p>
          </table:table-cell>
          <table:table-cell office:value-type="string" calcext:value-type="string">
            <text:p>(551) 208-8366</text:p>
          </table:table-cell>
          <table:table-cell/>
          <table:table-cell office:value-type="string" calcext:value-type="string">
            <text:p>257 Dwight St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formula="of:=HYPERLINK(&quot;https://business.google.com/v/m-a-plumbing-heating/0322610284500796106/8434/_?&quot;;&quot;https://business.google.com/v/m-a-plumbing-heating/0322610284500796106/8434/_?&quot;)" office:value-type="string" office:string-value="https://business.google.com/v/m-a-plumbing-heating/0322610284500796106/8434/_?" calcext:value-type="string">
            <text:p>https://business.google.com/v/m-a-plumbing-heating/0322610284500796106/8434/_?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Newark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Friends &amp; Family Plumbing and Heating</text:p>
          </table:table-cell>
          <table:table-cell office:value-type="string" calcext:value-type="string">
            <text:p>(973) 955-6903</text:p>
          </table:table-cell>
          <table:table-cell/>
          <table:table-cell office:value-type="string" calcext:value-type="string">
            <text:p>28 Samuel Ave, Newark, NJ</text:p>
          </table:table-cell>
          <table:table-cell office:value-type="string" calcext:value-type="string">
            <text:p>5.0</text:p>
          </table:table-cell>
          <table:table-cell table:number-columns-repeated="2"/>
          <table:table-cell table:formula="of:=HYPERLINK(&quot;https://ffheatingplumbing.com&quot;;&quot;ffheatingplumbing.com&quot;)" office:value-type="string" office:string-value="ffheatingplumbing.com" calcext:value-type="string">
            <text:p>ffheatingplumbing.com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TLC Plumbing Heating Cooling Electrical</text:p>
          </table:table-cell>
          <table:table-cell office:value-type="string" calcext:value-type="string">
            <text:p>(505) 761-9644</text:p>
          </table:table-cell>
          <table:table-cell/>
          <table:table-cell office:value-type="string" calcext:value-type="string">
            <text:p>5000 Edith Blvd NE, Albuquerque, NM</text:p>
          </table:table-cell>
          <table:table-cell office:value-type="string" calcext:value-type="string">
            <text:p>4.8</text:p>
          </table:table-cell>
          <table:table-cell table:number-columns-repeated="2"/>
          <table:table-cell table:formula="of:=HYPERLINK(&quot;https://tlcnm.com&quot;;&quot;tlcnm.com&quot;)" office:value-type="string" office:string-value="tlcnm.com" calcext:value-type="string">
            <text:p>tlcnm.com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Rio Rancho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TLC Plumbing Heating Cooling Electrical</text:p>
          </table:table-cell>
          <table:table-cell office:value-type="string" calcext:value-type="string">
            <text:p>(505) 891-2962</text:p>
          </table:table-cell>
          <table:table-cell/>
          <table:table-cell office:value-type="string" calcext:value-type="string">
            <text:p>506 Frontage Rd NE</text:p>
          </table:table-cell>
          <table:table-cell office:value-type="string" calcext:value-type="string">
            <text:p>5.0</text:p>
          </table:table-cell>
          <table:table-cell table:number-columns-repeated="2"/>
          <table:table-cell table:formula="of:=HYPERLINK(&quot;https://www.tlcplumbing.com/rio-rancho&quot;;&quot;https://www.tlcplumbing.com/rio-rancho&quot;)" office:value-type="string" office:string-value="https://www.tlcplumbing.com/rio-rancho" calcext:value-type="string">
            <text:p>https://www.tlcplumbing.com/rio-rancho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Santa F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James Plumbing and Heating</text:p>
          </table:table-cell>
          <table:table-cell office:value-type="string" calcext:value-type="string">
            <text:p>(505) 473-7148</text:p>
          </table:table-cell>
          <table:table-cell/>
          <table:table-cell office:value-type="string" calcext:value-type="string">
            <text:p>1159 Coriander Rd, Santa Fe, NM</text:p>
          </table:table-cell>
          <table:table-cell office:value-type="string" calcext:value-type="string">
            <text:p>4.8</text:p>
          </table:table-cell>
          <table:table-cell table:number-columns-repeated="2"/>
          <table:table-cell table:formula="of:=HYPERLINK(&quot;https://jamesplumbingandheating.com&quot;;&quot;jamesplumbingandheating.com&quot;)" office:value-type="string" office:string-value="jamesplumbingandheating.com" calcext:value-type="string">
            <text:p>jamesplumbingandheating.com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Charlesto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lumb Easy</text:p>
          </table:table-cell>
          <table:table-cell office:value-type="string" calcext:value-type="string">
            <text:p>(843) 270-3983</text:p>
          </table:table-cell>
          <table:table-cell/>
          <table:table-cell office:value-type="string" calcext:value-type="string">
            <text:p>1212 Wappoo Rd</text:p>
          </table:table-cell>
          <table:table-cell office:value-type="string" calcext:value-type="string">
            <text:p>5.0</text:p>
          </table:table-cell>
          <table:table-cell table:number-columns-repeated="2"/>
          <table:table-cell table:formula="of:=HYPERLINK(&quot;https://plumbeasy.com/&quot;;&quot;https://plumbeasy.com/&quot;)" office:value-type="string" office:string-value="https://plumbeasy.com/" calcext:value-type="string">
            <text:p>https://plumbeasy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Columbi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ranklin Plumbing &amp; Drain Cleaning</text:p>
          </table:table-cell>
          <table:table-cell office:value-type="string" calcext:value-type="string">
            <text:p>(803) 515-7753</text:p>
          </table:table-cell>
          <table:table-cell/>
          <table:table-cell office:value-type="string" calcext:value-type="string">
            <text:p>3004 Millwood Ave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formula="of:=HYPERLINK(&quot;https://www.franklinplumbingsc.com/&quot;;&quot;https://www.franklinplumbingsc.com/&quot;)" office:value-type="string" office:string-value="https://www.franklinplumbingsc.com/" calcext:value-type="string">
            <text:p>https://www.franklinplumbingsc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Rapid City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yal Plumbing Heating and Cooling</text:p>
          </table:table-cell>
          <table:table-cell office:value-type="string" calcext:value-type="string">
            <text:p>(605) 315-3683</text:p>
          </table:table-cell>
          <table:table-cell/>
          <table:table-cell office:value-type="string" calcext:value-type="string">
            <text:p>814 E Omaha St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formula="of:=HYPERLINK(&quot;https://www.loyalplumbing.com/&quot;;&quot;https://www.loyalplumbing.com/&quot;)" office:value-type="string" office:string-value="https://www.loyalplumbing.com/" calcext:value-type="string">
            <text:p>https://www.loyalplumbing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Sioux Falls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ioux Falls Plumbing LLC.</text:p>
          </table:table-cell>
          <table:table-cell office:value-type="string" calcext:value-type="string">
            <text:p>(605) 800-6537</text:p>
          </table:table-cell>
          <table:table-cell/>
          <table:table-cell office:value-type="string" calcext:value-type="string">
            <text:p>1508 E 32nd St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formula="of:=HYPERLINK(&quot;http://siouxfalls-plumbing.com/&quot;;&quot;http://siouxfalls-plumbing.com/&quot;)" office:value-type="string" office:string-value="http://siouxfalls-plumbing.com/" calcext:value-type="string">
            <text:p>http://siouxfalls-plumbing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Cheyenne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Aspen Mountain Plumbing</text:p>
          </table:table-cell>
          <table:table-cell office:value-type="string" calcext:value-type="string">
            <text:p>(307) 202-8919</text:p>
          </table:table-cell>
          <table:table-cell/>
          <table:table-cell office:value-type="string" calcext:value-type="string">
            <text:p>2404 E Lincolnway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formula="of:=HYPERLINK(&quot;https://www.aspenmtnplumbing.com/plumbers-cheyenne-wy&quot;;&quot;https://www.aspenmtnplumbing.com/plumbers-cheyenne-wy&quot;)" office:value-type="string" office:string-value="https://www.aspenmtnplumbing.com/plumbers-cheyenne-wy" calcext:value-type="string">
            <text:p>https://www.aspenmtnplumbing.com/plumbers-cheyenne-wy</text:p>
          </table:table-cell>
          <table:table-cell/>
          <table:table-cell table:style-name="Default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umbing_20_Companies_20__3e_50K_20_Cities" style:display-name="PageStyle_Plumbing Companies &gt;50K Cit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221" meta:object-count="0"/>
    <meta:generator>LibreOffice/26.2.3.2$Linux_X86_64 LibreOffice_project/70e089b17412e4cb7773e41413306b17a2328c34</meta:generator>
  </office:meta>
</office:document-meta>
</file>