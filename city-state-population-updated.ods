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>Plumbing Installs</text:p>
          </table:table-cell>
          <table:table-cell>
            <text:p>(714) 455-9346</text:p>
          </table:table-cell>
          <table:table-cell>
            <text:p/>
          </table:table-cell>
          <table:table-cell>
            <text:p><text:a xlink:href="http://www.plumbinginstalls.com/" xlink:type="simple" xlink:actuate="onRequest" office:target-frame="_blank" text:style-name="InternetLink">http://www.plumbinginstalls.com/</text:a></text:p>
          </table:table-cell>
          <table:table-cell>
            <text:p>6291 Iroquois Rd, Westminster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>Paul C. Scott &amp; Sons Plumbing, Inc.</text:p>
          </table:table-cell>
          <table:table-cell>
            <text:p>(248) 547-9334</text:p>
          </table:table-cell>
          <table:table-cell>
            <text:p/>
          </table:table-cell>
          <table:table-cell>
            <text:p><text:a xlink:href="http://www.paulscottplumbing.com/" xlink:type="simple" xlink:actuate="onRequest" office:target-frame="_blank" text:style-name="InternetLink">http://www.paulscottplumbing.com/</text:a></text:p>
          </table:table-cell>
          <table:table-cell>
            <text:p>2722 Elliott Ave, Troy, MI</text:p>
          </table:table-cell>
          <table:table-cell>
            <text:p>4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>Daytona Plumbing</text:p>
          </table:table-cell>
          <table:table-cell>
            <text:p>(386) 253-7674</text:p>
          </table:table-cell>
          <table:table-cell>
            <text:p/>
          </table:table-cell>
          <table:table-cell>
            <text:p><text:a xlink:href="http://www.daytonaplumb.com/" xlink:type="simple" xlink:actuate="onRequest" office:target-frame="_blank" text:style-name="InternetLink">http://www.daytonaplumb.com/</text:a></text:p>
          </table:table-cell>
          <table:table-cell>
            <text:p>500 Walker St, Daytona Beach, FL</text:p>
          </table:table-cell>
          <table:table-cell>
            <text:p>4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>William J. Riley Plumbing &amp; Heating Co Inc</text:p>
          </table:table-cell>
          <table:table-cell>
            <text:p>(401) 738-1688</text:p>
          </table:table-cell>
          <table:table-cell>
            <text:p/>
          </table:table-cell>
          <table:table-cell>
            <text:p><text:a xlink:href="https://www.rileyplumbing.com/" xlink:type="simple" xlink:actuate="onRequest" office:target-frame="_blank" text:style-name="InternetLink">https://www.rileyplumbing.com/</text:a></text:p>
          </table:table-cell>
          <table:table-cell>
            <text:p>15 New England Way, Warwick, RI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>Jones Family Plumbing &amp; HVAC</text:p>
          </table:table-cell>
          <table:table-cell>
            <text:p>(720) 500-6890</text:p>
          </table:table-cell>
          <table:table-cell>
            <text:p/>
          </table:table-cell>
          <table:table-cell>
            <text:p><text:a xlink:href="https://jonesplumbinghvac.site/castle-rock" xlink:type="simple" xlink:actuate="onRequest" office:target-frame="_blank" text:style-name="InternetLink">https://jonesplumbinghvac.site/castle-rock</text:a></text:p>
          </table:table-cell>
          <table:table-cell>
            <text:p>2278 Manatt Ct, Castle Rock, CO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>Sabastian and Sons Plumbing Service LLC</text:p>
          </table:table-cell>
          <table:table-cell>
            <text:p>(763) 657-9821</text:p>
          </table:table-cell>
          <table:table-cell>
            <text:p/>
          </table:table-cell>
          <table:table-cell>
            <text:p><text:a xlink:href="https://snsplumbing.net/" xlink:type="simple" xlink:actuate="onRequest" office:target-frame="_blank" text:style-name="InternetLink">https://snsplumbing.net/</text:a></text:p>
          </table:table-cell>
          <table:table-cell>
            <text:p>3300 County Rd 10 Ste 500i, Brooklyn Park, MN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>Barnett Plumbing &amp; Water Heaters</text:p>
          </table:table-cell>
          <table:table-cell>
            <text:p>(925) 872-0805</text:p>
          </table:table-cell>
          <table:table-cell>
            <text:p/>
          </table:table-cell>
          <table:table-cell>
            <text:p><text:a xlink:href="https://barnettplumbing.com/" xlink:type="simple" xlink:actuate="onRequest" office:target-frame="_blank" text:style-name="InternetLink">https://barnettplumbing.com/</text:a></text:p>
          </table:table-cell>
          <table:table-cell>
            <text:p>780 E Airway Blvd, Livermor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