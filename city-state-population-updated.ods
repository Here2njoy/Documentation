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xmlns:xlink="http://www.w3.org/1999/xlink" office:version="1.2">
  <office:automatic-styles>
    <ns1:style ns1:name="InternetLink" ns1:family="text">
      <ns1:text-properties ns2:color="#0563C1" ns2:underline="single" ns2:underline-color="#0563C1"/>
    </ns1:style>
    <ns1:style ns1:name="VisitedInternetLink" ns1:family="text">
      <ns1:text-properties ns2:color="#800080" ns2:underline="single"/>
    </ns1:style>
  </office:automatic-styles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<text:a xlink:href="https://agoodplumber.com" xlink:type="simple" xlink:actuate="onRequest" office:target-frame="_blank" text:style-name="InternetLink">agoodplumber.com</text:a>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<text:a xlink:href="https://advantageplumbingrooter.com" xlink:type="simple" xlink:actuate="onRequest" office:target-frame="_blank" text:style-name="InternetLink">advantageplumbingrooter.com</text:a>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<text:a xlink:href="https://jimwagnerplumbing.com" xlink:type="simple" xlink:actuate="onRequest" office:target-frame="_blank" text:style-name="InternetLink">jimwagnerplumbing.com</text:a>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<text:a xlink:href="https://texasqualityplumbing.com" xlink:type="simple" xlink:actuate="onRequest" office:target-frame="_blank" text:style-name="InternetLink">texasqualityplumbing.com</text:a>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<text:a xlink:href="https://lawsonfamilyplumbing.com" xlink:type="simple" xlink:actuate="onRequest" office:target-frame="_blank" text:style-name="InternetLink">lawsonfamilyplumbing.com</text:a>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<text:a xlink:href="https://goodmanplumbers.com" xlink:type="simple" xlink:actuate="onRequest" office:target-frame="_blank" text:style-name="InternetLink">goodmanplumbers.com</text:a>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<text:a xlink:href="https://chamblissplumbing.com" xlink:type="simple" xlink:actuate="onRequest" office:target-frame="_blank" text:style-name="InternetLink">chamblissplumbing.com</text:a>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<text:a xlink:href="https://plumbersandiegoonline.com" xlink:type="simple" xlink:actuate="onRequest" office:target-frame="_blank" text:style-name="InternetLink">plumbersandiegoonline.com</text:a>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<text:a xlink:href="https://bakerbrothersplumbing.com" xlink:type="simple" xlink:actuate="onRequest" office:target-frame="_blank" text:style-name="InternetLink">bakerbrothersplumbing.com</text:a>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<text:a xlink:href="https://larrystinson.com" xlink:type="simple" xlink:actuate="onRequest" office:target-frame="_blank" text:style-name="InternetLink">larrystinson.com</text:a>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<text:a xlink:href="https://austinsgreatestplumbing.com" xlink:type="simple" xlink:actuate="onRequest" office:target-frame="_blank" text:style-name="InternetLink">austinsgreatestplumbing.com</text:a>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<text:a xlink:href="https://sanjoseplumbinginc.com" xlink:type="simple" xlink:actuate="onRequest" office:target-frame="_blank" text:style-name="InternetLink">sanjoseplumbinginc.com</text:a>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<text:a xlink:href="https://wyattworksplumbing.com" xlink:type="simple" xlink:actuate="onRequest" office:target-frame="_blank" text:style-name="InternetLink">wyattworksplumbing.com</text:a>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<text:a xlink:href="https://bryantsplumbingandwaterheaters.com" xlink:type="simple" xlink:actuate="onRequest" office:target-frame="_blank" text:style-name="InternetLink">bryantsplumbingandwaterheaters.com</text:a>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ballardplumbing.com" xlink:type="simple" xlink:actuate="onRequest" office:target-frame="_blank" text:style-name="InternetLink">ballardplumbing.com</text:a>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<text:a xlink:href="https://southernplumbingworks.com" xlink:type="simple" xlink:actuate="onRequest" office:target-frame="_blank" text:style-name="InternetLink">southernplumbingworks.com</text:a>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applewoodfixit.com" xlink:type="simple" xlink:actuate="onRequest" office:target-frame="_blank" text:style-name="InternetLink">applewoodfixit.com</text:a>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<text:a xlink:href="https://vegasvalley.com" xlink:type="simple" xlink:actuate="onRequest" office:target-frame="_blank" text:style-name="InternetLink">vegasvalley.com</text:a>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<text:a xlink:href="https://vaughanplumbing.com" xlink:type="simple" xlink:actuate="onRequest" office:target-frame="_blank" text:style-name="InternetLink">vaughanplumbing.com</text:a>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<text:a xlink:href="https://serviceplusplumbing.com" xlink:type="simple" xlink:actuate="onRequest" office:target-frame="_blank" text:style-name="InternetLink">serviceplusplumbing.com</text:a>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<text:a xlink:href="https://lyonsplumbing.com" xlink:type="simple" xlink:actuate="onRequest" office:target-frame="_blank" text:style-name="InternetLink">lyonsplumbing.com</text:a>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<text:a xlink:href="https://jjsplumbing.com" xlink:type="simple" xlink:actuate="onRequest" office:target-frame="_blank" text:style-name="InternetLink">jjsplumbing.com</text:a>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<text:a xlink:href="https://tlcnm.com" xlink:type="simple" xlink:actuate="onRequest" office:target-frame="_blank" text:style-name="InternetLink">tlcnm.com</text:a>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<text:a xlink:href="https://jobeandsonsplumbing.com" xlink:type="simple" xlink:actuate="onRequest" office:target-frame="_blank" text:style-name="InternetLink">jobeandsonsplumbing.com</text:a>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<text:a xlink:href="https://allsacramento.com" xlink:type="simple" xlink:actuate="onRequest" office:target-frame="_blank" text:style-name="InternetLink">allsacramento.com</text:a>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<text:a xlink:href="https://headsplumbing.com" xlink:type="simple" xlink:actuate="onRequest" office:target-frame="_blank" text:style-name="InternetLink">headsplumbing.com</text:a>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<text:a xlink:href="https://stinenichols.com" xlink:type="simple" xlink:actuate="onRequest" office:target-frame="_blank" text:style-name="InternetLink">stinenichols.com</text:a>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goettl.com" xlink:type="simple" xlink:actuate="onRequest" office:target-frame="_blank" text:style-name="InternetLink">goettl.com</text:a>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<text:a xlink:href="https://williamparrishplumbing.com" xlink:type="simple" xlink:actuate="onRequest" office:target-frame="_blank" text:style-name="InternetLink">williamparrishplumbing.com</text:a>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<text:a xlink:href="https://miamidadeplumbing.com" xlink:type="simple" xlink:actuate="onRequest" office:target-frame="_blank" text:style-name="InternetLink">miamidadeplumbing.com</text:a>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<text:a xlink:href="https://thefamilyplumber.com" xlink:type="simple" xlink:actuate="onRequest" office:target-frame="_blank" text:style-name="InternetLink">thefamilyplumber.com</text:a>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<text:a xlink:href="https://cisnerosbrothersplumbing.com" xlink:type="simple" xlink:actuate="onRequest" office:target-frame="_blank" text:style-name="InternetLink">cisnerosbrothersplumbing.com</text:a>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<text:a xlink:href="https://williamsplumbing.com" xlink:type="simple" xlink:actuate="onRequest" office:target-frame="_blank" text:style-name="InternetLink">williamsplumbing.com</text:a>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<text:a xlink:href="https://olinplumbing.com" xlink:type="simple" xlink:actuate="onRequest" office:target-frame="_blank" text:style-name="InternetLink">olinplumbing.com</text:a>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<text:a xlink:href="https://auroraplumbing.com" xlink:type="simple" xlink:actuate="onRequest" office:target-frame="_blank" text:style-name="InternetLink">auroraplumbing.com</text:a>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<text:a xlink:href="https://familyfriends.com" xlink:type="simple" xlink:actuate="onRequest" office:target-frame="_blank" text:style-name="InternetLink">familyfriends.com</text:a>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<text:a xlink:href="https://robinsonfamilyplumbinghvac.com" xlink:type="simple" xlink:actuate="onRequest" office:target-frame="_blank" text:style-name="InternetLink">robinsonfamilyplumbinghvac.com</text:a>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<text:a xlink:href="https://allensplumbinghi.com" xlink:type="simple" xlink:actuate="onRequest" office:target-frame="_blank" text:style-name="InternetLink">allensplumbinghi.com</text:a>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<text:a xlink:href="https://barkerandsonsplumbing.com" xlink:type="simple" xlink:actuate="onRequest" office:target-frame="_blank" text:style-name="InternetLink">barkerandsonsplumbing.com</text:a>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<text:a xlink:href="https://choiceplumbingorlando.com" xlink:type="simple" xlink:actuate="onRequest" office:target-frame="_blank" text:style-name="InternetLink">choiceplumbingorlando.com</text:a>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<text:a xlink:href="https://tonysplumbing.com" xlink:type="simple" xlink:actuate="onRequest" office:target-frame="_blank" text:style-name="InternetLink">tonysplumbing.com</text:a>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<text:a xlink:href="https://ffheatingplumbing.com" xlink:type="simple" xlink:actuate="onRequest" office:target-frame="_blank" text:style-name="InternetLink">ffheatingplumbing.com</text:a>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<text:a xlink:href="https://irvineplumbing.com" xlink:type="simple" xlink:actuate="onRequest" office:target-frame="_blank" text:style-name="InternetLink">irvine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<text:a xlink:href="https://dwainmccainplumbing.com" xlink:type="simple" xlink:actuate="onRequest" office:target-frame="_blank" text:style-name="InternetLink">dwainmccainplumbing.com</text:a>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<text:a xlink:href="https://doitrightplumbers.com" xlink:type="simple" xlink:actuate="onRequest" office:target-frame="_blank" text:style-name="InternetLink">doitrightplumbers.com</text:a>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<text:a xlink:href="https://halpinplumbing.com" xlink:type="simple" xlink:actuate="onRequest" office:target-frame="_blank" text:style-name="InternetLink">halpinplumbing.com</text:a>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<text:a xlink:href="https://owensplumbingcompany.com" xlink:type="simple" xlink:actuate="onRequest" office:target-frame="_blank" text:style-name="InternetLink">owensplumbingcompany.com</text:a>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<text:a xlink:href="https://brownbrothers.com" xlink:type="simple" xlink:actuate="onRequest" office:target-frame="_blank" text:style-name="InternetLink">brownbrothers.com</text:a>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<text:a xlink:href="https://business.google.com/v/m-a-plumbing-heating/0322610284500796106/8434/_?" xlink:type="simple" xlink:actuate="onRequest" office:target-frame="_blank" text:style-name="InternetLink">https://business.google.com/v/m-a-plumbing-heating/0322610284500796106/8434/_?</text:a>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<text:a xlink:href="https://travisandsonsplumbing.com" xlink:type="simple" xlink:actuate="onRequest" office:target-frame="_blank" text:style-name="InternetLink">travisandsonsplumbing.com</text:a>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<text:a xlink:href="https://bobthe.com" xlink:type="simple" xlink:actuate="onRequest" office:target-frame="_blank" text:style-name="InternetLink">bobthe.com</text:a>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<text:a xlink:href="https://ahattersley.com" xlink:type="simple" xlink:actuate="onRequest" office:target-frame="_blank" text:style-name="InternetLink">ahattersley.com</text:a>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<text:a xlink:href="https://southtexas.com" xlink:type="simple" xlink:actuate="onRequest" office:target-frame="_blank" text:style-name="InternetLink">southtexas.com</text:a>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<text:a xlink:href="https://firstchoice.com" xlink:type="simple" xlink:actuate="onRequest" office:target-frame="_blank" text:style-name="InternetLink">firstchoice.com</text:a>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reevesfamily.com" xlink:type="simple" xlink:actuate="onRequest" office:target-frame="_blank" text:style-name="InternetLink">reevesfamily.com</text:a>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" xlink:type="simple" xlink:actuate="onRequest" office:target-frame="_blank" text:style-name="InternetLink">dcfamilyplumbing.com</text:a>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>The Plumbing Officials</text:p>
          </table:table-cell>
          <table:table-cell>
            <text:p>(804) 502-6116</text:p>
          </table:table-cell>
          <table:table-cell>
            <text:p/>
          </table:table-cell>
          <table:table-cell>
            <text:p><text:a xlink:href="https://theplumbingofficials.com/" xlink:type="simple" xlink:actuate="onRequest" office:target-frame="_blank" text:style-name="InternetLink">https://theplumbingofficials.com/</text:a></text:p>
          </table:table-cell>
          <table:table-cell>
            <text:p>2407 Lamb Ave, Richmond, VA 2322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<text:a xlink:href="https://deanplumbing.com" xlink:type="simple" xlink:actuate="onRequest" office:target-frame="_blank" text:style-name="InternetLink">deanplumbing.com</text:a>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<text:a xlink:href="https://eatonfamily.com" xlink:type="simple" xlink:actuate="onRequest" office:target-frame="_blank" text:style-name="InternetLink">eatonfamily.com</text:a>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<text:a xlink:href="https://hernandezplumbing.com" xlink:type="simple" xlink:actuate="onRequest" office:target-frame="_blank" text:style-name="InternetLink">hernandezplumbing.com</text:a>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<text:a xlink:href="https://shawplumbing.com" xlink:type="simple" xlink:actuate="onRequest" office:target-frame="_blank" text:style-name="InternetLink">shawplumbing.com</text:a>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<text:a xlink:href="https://trinityplumbingla.com" xlink:type="simple" xlink:actuate="onRequest" office:target-frame="_blank" text:style-name="InternetLink">trinityplumbingla.com</text:a>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<text:a xlink:href="https://thompsonfamily.com" xlink:type="simple" xlink:actuate="onRequest" office:target-frame="_blank" text:style-name="InternetLink">thompsonfamily.com</text:a>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<text:a xlink:href="https://familytiesair.com" xlink:type="simple" xlink:actuate="onRequest" office:target-frame="_blank" text:style-name="InternetLink">familytiesair.com</text:a>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<text:a xlink:href="https://herksplumbing.com" xlink:type="simple" xlink:actuate="onRequest" office:target-frame="_blank" text:style-name="InternetLink">herksplumbing.com</text:a>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<text:a xlink:href="https://mcphersonbros.com" xlink:type="simple" xlink:actuate="onRequest" office:target-frame="_blank" text:style-name="InternetLink">mcphersonbros.com</text:a>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<text:a xlink:href="http://siouxfalls-plumbing.com/" xlink:type="simple" xlink:actuate="onRequest" office:target-frame="_blank" text:style-name="InternetLink">http://siouxfalls-plumbing.com/</text:a>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<text:a xlink:href="https://jpplumbingandsewer.com" xlink:type="simple" xlink:actuate="onRequest" office:target-frame="_blank" text:style-name="InternetLink">jpplumbingandsewer.com</text:a>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<text:a xlink:href="https://woodsplumbing.com" xlink:type="simple" xlink:actuate="onRequest" office:target-frame="_blank" text:style-name="InternetLink">woodsplumbing.com</text:a>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>Smith Family Plumbing</text:p>
          </table:table-cell>
          <table:table-cell>
            <text:p>(501) 515-1876</text:p>
          </table:table-cell>
          <table:table-cell>
            <text:p/>
          </table:table-cell>
          <table:table-cell>
            <text:p><text:a xlink:href="http://www.sfplumb.com/" xlink:type="simple" xlink:actuate="onRequest" office:target-frame="_blank" text:style-name="InternetLink">http://www.sfplumb.com/</text:a></text:p>
          </table:table-cell>
          <table:table-cell>
            <text:p>Little Rock, AR, US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>Wischmeyer's Plumbing Plus</text:p>
          </table:table-cell>
          <table:table-cell>
            <text:p>(585) 252-9251</text:p>
          </table:table-cell>
          <table:table-cell>
            <text:p/>
          </table:table-cell>
          <table:table-cell>
            <text:p><text:a xlink:href="https://www.plumbingplusny.com/" xlink:type="simple" xlink:actuate="onRequest" office:target-frame="_blank" text:style-name="InternetLink">https://www.plumbingplusny.com/</text:a></text:p>
          </table:table-cell>
          <table:table-cell>
            <text:p>528 Hollenbeck St, Rochester, NY 1462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>Frank's Repair Plumbing Inc.</text:p>
          </table:table-cell>
          <table:table-cell>
            <text:p>(806) 545-8565</text:p>
          </table:table-cell>
          <table:table-cell>
            <text:p/>
          </table:table-cell>
          <table:table-cell>
            <text:p><text:a xlink:href="https://www.franksrepairplumbing.com/" xlink:type="simple" xlink:actuate="onRequest" office:target-frame="_blank" text:style-name="InternetLink">https://www.franksrepairplumbing.com/</text:a></text:p>
          </table:table-cell>
          <table:table-cell>
            <text:p>4112 NW 10th Ave, Amarillo, TX 7910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<text:a xlink:href="https://whitesplumbing.com" xlink:type="simple" xlink:actuate="onRequest" office:target-frame="_blank" text:style-name="InternetLink">whitesplumbing.com</text:a>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>Bright Side Plumbing</text:p>
          </table:table-cell>
          <table:table-cell>
            <text:p>(913) 963-1029</text:p>
          </table:table-cell>
          <table:table-cell>
            <text:p/>
          </table:table-cell>
          <table:table-cell>
            <text:p><text:a xlink:href="https://www.callbrightside.com/" xlink:type="simple" xlink:actuate="onRequest" office:target-frame="_blank" text:style-name="InternetLink">https://www.callbrightside.com/</text:a></text:p>
          </table:table-cell>
          <table:table-cell>
            <text:p>12022 Blue Valley Pkwy, Overland Park, KS 6621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>Clearwater Plumbing</text:p>
          </table:table-cell>
          <table:table-cell>
            <text:p>(706) 577-3361</text:p>
          </table:table-cell>
          <table:table-cell>
            <text:p/>
          </table:table-cell>
          <table:table-cell>
            <text:p><text:a xlink:href="https://www.clearwaterplumb.com/" xlink:type="simple" xlink:actuate="onRequest" office:target-frame="_blank" text:style-name="InternetLink">https://www.clearwaterplumb.com/</text:a></text:p>
          </table:table-cell>
          <table:table-cell>
            <text:p>5750 Miller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>Tennessee Standard Plumbing and Drain</text:p>
          </table:table-cell>
          <table:table-cell>
            <text:p>(865) 263-1352</text:p>
          </table:table-cell>
          <table:table-cell>
            <text:p/>
          </table:table-cell>
          <table:table-cell>
            <text:p><text:a xlink:href="https://www.tnstandard.com/knoxville-tn/plumbing-west-knoxville/" xlink:type="simple" xlink:actuate="onRequest" office:target-frame="_blank" text:style-name="InternetLink">https://www.tnstandard.com/knoxville-tn/plumbing-west-knoxville/</text:a></text:p>
          </table:table-cell>
          <table:table-cell>
            <text:p>10805 Kingston Pike #1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>McDonald Plumbing</text:p>
          </table:table-cell>
          <table:table-cell>
            <text:p>(616) 698-6771</text:p>
          </table:table-cell>
          <table:table-cell>
            <text:p/>
          </table:table-cell>
          <table:table-cell>
            <text:p><text:a xlink:href="http://www.mcdonaldplumbing.com/" xlink:type="simple" xlink:actuate="onRequest" office:target-frame="_blank" text:style-name="InternetLink">http://www.mcdonaldplumbing.com/</text:a></text:p>
          </table:table-cell>
          <table:table-cell>
            <text:p>7791 Eastern Ave S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>Flow Tech Plumbing</text:p>
          </table:table-cell>
          <table:table-cell>
            <text:p>(623) 303-7736</text:p>
          </table:table-cell>
          <table:table-cell>
            <text:p/>
          </table:table-cell>
          <table:table-cell>
            <text:p><text:a xlink:href="https://www.flowtechplumbingaz.com/peoria-plumbing-services" xlink:type="simple" xlink:actuate="onRequest" office:target-frame="_blank" text:style-name="InternetLink">https://www.flowtechplumbingaz.com/peoria-plumbing-services</text:a></text:p>
          </table:table-cell>
          <table:table-cell>
            <text:p>10530 W Sands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>Dyson Plumbing</text:p>
          </table:table-cell>
          <table:table-cell>
            <text:p>(251) 476-6512</text:p>
          </table:table-cell>
          <table:table-cell>
            <text:p/>
          </table:table-cell>
          <table:table-cell>
            <text:p><text:a xlink:href="http://www.dysonplumbing.com/" xlink:type="simple" xlink:actuate="onRequest" office:target-frame="_blank" text:style-name="InternetLink">http://www.dysonplumbing.com/</text:a></text:p>
          </table:table-cell>
          <table:table-cell>
            <text:p>119 Abrams St, Mobile, AL 36607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>Go With The Flow Plumbing</text:p>
          </table:table-cell>
          <table:table-cell>
            <text:p>(360) 921-6731</text:p>
          </table:table-cell>
          <table:table-cell>
            <text:p/>
          </table:table-cell>
          <table:table-cell>
            <text:p><text:a xlink:href="https://gowiththeflowplumbing.com/" xlink:type="simple" xlink:actuate="onRequest" office:target-frame="_blank" text:style-name="InternetLink">https://gowiththeflowplumbing.com/</text:a></text:p>
          </table:table-cell>
          <table:table-cell>
            <text:p>2402 NE 96th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>P. Webb Plumbing, LLC</text:p>
          </table:table-cell>
          <table:table-cell>
            <text:p>(205) 499-7400</text:p>
          </table:table-cell>
          <table:table-cell>
            <text:p/>
          </table:table-cell>
          <table:table-cell>
            <text:p><text:a xlink:href="https://pwebbplumbingllc.com/" xlink:type="simple" xlink:actuate="onRequest" office:target-frame="_blank" text:style-name="InternetLink">https://pwebbplumbingllc.com/</text:a></text:p>
          </table:table-cell>
          <table:table-cell>
            <text:p>5225 Kisk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>Driver's Plumbing &amp; Mechanical Inc.</text:p>
          </table:table-cell>
          <table:table-cell>
            <text:p>(401) 272-5851</text:p>
          </table:table-cell>
          <table:table-cell>
            <text:p/>
          </table:table-cell>
          <table:table-cell>
            <text:p><text:a xlink:href="http://www.driversplumbing.com/" xlink:type="simple" xlink:actuate="onRequest" office:target-frame="_blank" text:style-name="InternetLink">http://www.driversplumbing.com/</text:a></text:p>
          </table:table-cell>
          <table:table-cell>
            <text:p>77 W Park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>Edwards Plumbing and Heating</text:p>
          </table:table-cell>
          <table:table-cell>
            <text:p>(334) 834-6120</text:p>
          </table:table-cell>
          <table:table-cell>
            <text:p/>
          </table:table-cell>
          <table:table-cell>
            <text:p><text:a xlink:href="https://edwardsplumbing.com/" xlink:type="simple" xlink:actuate="onRequest" office:target-frame="_blank" text:style-name="InternetLink">https://edwardsplumbing.com/</text:a></text:p>
          </table:table-cell>
          <table:table-cell>
            <text:p>1540 Jean St, Montgomery, AL 36107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>Scenic City Plumbing</text:p>
          </table:table-cell>
          <table:table-cell>
            <text:p>(423) 870-0075</text:p>
          </table:table-cell>
          <table:table-cell>
            <text:p/>
          </table:table-cell>
          <table:table-cell>
            <text:p><text:a xlink:href="https://www.sceniccityplumbing.com/" xlink:type="simple" xlink:actuate="onRequest" office:target-frame="_blank" text:style-name="InternetLink">https://www.sceniccityplumbing.com/</text:a></text:p>
          </table:table-cell>
          <table:table-cell>
            <text:p>6148 Dayton Blvd, Hixson, TN 3734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<text:a xlink:href="https://robertsrepair.com" xlink:type="simple" xlink:actuate="onRequest" office:target-frame="_blank" text:style-name="InternetLink">robertsrepair.com</text:a>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<text:a xlink:href="https://devinneyplumbing.com" xlink:type="simple" xlink:actuate="onRequest" office:target-frame="_blank" text:style-name="InternetLink">devinneyplumbing.com</text:a>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<text:a xlink:href="https://jandjplumbing.com" xlink:type="simple" xlink:actuate="onRequest" office:target-frame="_blank" text:style-name="InternetLink">jandjplumbing.com</text:a>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<text:a xlink:href="https://morrisseyfamily.com" xlink:type="simple" xlink:actuate="onRequest" office:target-frame="_blank" text:style-name="InternetLink">morrisseyfamily.com</text:a>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<text:a xlink:href="https://blairsplumbingrepair.com" xlink:type="simple" xlink:actuate="onRequest" office:target-frame="_blank" text:style-name="InternetLink">blairsplumbingrepair.com</text:a>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<text:a xlink:href="https://michelsplumbing.com" xlink:type="simple" xlink:actuate="onRequest" office:target-frame="_blank" text:style-name="InternetLink">michelsplumbing.com</text:a>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<text:a xlink:href="https://parmleyplumbing.com" xlink:type="simple" xlink:actuate="onRequest" office:target-frame="_blank" text:style-name="InternetLink">parmleyplumbing.com</text:a>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>Patriot Plumbing</text:p>
          </table:table-cell>
          <table:table-cell>
            <text:p>(661) 949-1200</text:p>
          </table:table-cell>
          <table:table-cell>
            <text:p/>
          </table:table-cell>
          <table:table-cell>
            <text:p><text:a xlink:href="https://www.patriotplumbingav.com/" xlink:type="simple" xlink:actuate="onRequest" office:target-frame="_blank" text:style-name="InternetLink">https://www.patriotplumbingav.com/</text:a></text:p>
          </table:table-cell>
          <table:table-cell>
            <text:p>42559 6th St E #22, Lancaster, CA 93535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<text:a xlink:href="https://juniorsplumbingmo.com/" xlink:type="simple" xlink:actuate="onRequest" office:target-frame="_blank" text:style-name="InternetLink">https://juniorsplumbingmo.com/</text:a>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>Brown and Son's Plumbing</text:p>
          </table:table-cell>
          <table:table-cell>
            <text:p>(940) 435-2532</text:p>
          </table:table-cell>
          <table:table-cell>
            <text:p/>
          </table:table-cell>
          <table:table-cell>
            <text:p><text:a xlink:href="https://www.brownandsonsplumbing.com/" xlink:type="simple" xlink:actuate="onRequest" office:target-frame="_blank" text:style-name="InternetLink">https://www.brownandsonsplumbing.com/</text:a></text:p>
          </table:table-cell>
          <table:table-cell>
            <text:p>414 W Parkway St 1st floor, Denton, TX 76201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>New Flow Plumbing</text:p>
          </table:table-cell>
          <table:table-cell>
            <text:p>(916) 527-8885</text:p>
          </table:table-cell>
          <table:table-cell>
            <text:p/>
          </table:table-cell>
          <table:table-cell>
            <text:p><text:a xlink:href="https://plumbersacramento247.com/" xlink:type="simple" xlink:actuate="onRequest" office:target-frame="_blank" text:style-name="InternetLink">https://plumbersacramento247.com/</text:a></text:p>
          </table:table-cell>
          <table:table-cell>
            <text:p>622 Whyte Ave, Roseville, CA 9566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>Mr. Rooter Plumbing of Killeen, TX</text:p>
          </table:table-cell>
          <table:table-cell>
            <text:p>(254) 781-4568</text:p>
          </table:table-cell>
          <table:table-cell>
            <text:p/>
          </table:table-cell>
          <table:table-cell>
            <text:p><text:a xlink:href="https://www.mrrooter.com/killeen" xlink:type="simple" xlink:actuate="onRequest" office:target-frame="_blank" text:style-name="InternetLink">https://www.mrrooter.com/killeen</text:a></text:p>
          </table:table-cell>
          <table:table-cell>
            <text:p>2201 S W S Young Dr Suite 115A, Kille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>Favian's Plumbing, Inc.</text:p>
          </table:table-cell>
          <table:table-cell>
            <text:p>(661) 305-4423</text:p>
          </table:table-cell>
          <table:table-cell>
            <text:p/>
          </table:table-cell>
          <table:table-cell>
            <text:p/>
          </table:table-cell>
          <table:table-cell>
            <text:p>Palmdale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/>
          </table:table-cell>
          <table:table-cell>
            <text:p>28 Samuel Ave, Paterson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>HMS Plumbing &amp; Construction</text:p>
          </table:table-cell>
          <table:table-cell>
            <text:p>(951) 818-0246</text:p>
          </table:table-cell>
          <table:table-cell>
            <text:p/>
          </table:table-cell>
          <table:table-cell>
            <text:p/>
          </table:table-cell>
          <table:table-cell>
            <text:p>1697 Laurel Canyon Way, Cor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>Cardinal Plumbing Heating &amp; Air Inc</text:p>
          </table:table-cell>
          <table:table-cell>
            <text:p>(703) 718-5399</text:p>
          </table:table-cell>
          <table:table-cell>
            <text:p/>
          </table:table-cell>
          <table:table-cell>
            <text:p/>
          </table:table-cell>
          <table:table-cell>
            <text:p>1727 King St Ste 123, Alexandria, V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<text:a xlink:href="https://plumbeasy.com/" xlink:type="simple" xlink:actuate="onRequest" office:target-frame="_blank" text:style-name="InternetLink">https://plumbeasy.com/</text:a>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>My Plumber Inc.</text:p>
          </table:table-cell>
          <table:table-cell>
            <text:p>(831) 682-1934</text:p>
          </table:table-cell>
          <table:table-cell>
            <text:p/>
          </table:table-cell>
          <table:table-cell>
            <text:p/>
          </table:table-cell>
          <table:table-cell>
            <text:p>115 Nissen Rd, Salinas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>Stine-Nichols Plumbing Inc.</text:p>
          </table:table-cell>
          <table:table-cell>
            <text:p>(816) 348-3481</text:p>
          </table:table-cell>
          <table:table-cell>
            <text:p/>
          </table:table-cell>
          <table:table-cell>
            <text:p/>
          </table:table-cell>
          <table:table-cell>
            <text:p>318 East 16th Avenue, Kansas City, KS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>Ricky Heath Plumbing, Heating, &amp; Cooling</text:p>
          </table:table-cell>
          <table:table-cell>
            <text:p>(478) 312-6655</text:p>
          </table:table-cell>
          <table:table-cell>
            <text:p/>
          </table:table-cell>
          <table:table-cell>
            <text:p><text:a xlink:href="https://rickyheathplumbing.com" xlink:type="simple" xlink:actuate="onRequest" office:target-frame="_blank" text:style-name="InternetLink">https://rickyheathplumbing.com</text:a></text:p>
          </table:table-cell>
          <table:table-cell>
            <text:p>505 Hillcrest Industrial Blvd, Macon, GA 31204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>Wave Plumbing &amp; Heating-Hayward Plumber</text:p>
          </table:table-cell>
          <table:table-cell>
            <text:p>(510) 513-2215</text:p>
          </table:table-cell>
          <table:table-cell>
            <text:p/>
          </table:table-cell>
          <table:table-cell>
            <text:p><text:a xlink:href="https://www.waveplumbing-heating.com/" xlink:type="simple" xlink:actuate="onRequest" office:target-frame="_blank" text:style-name="InternetLink">https://www.waveplumbing-heating.com/</text:a></text:p>
          </table:table-cell>
          <table:table-cell>
            <text:p>2416 W Tennyson Rd #258, Haywar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>Ocean Plumbing and Air</text:p>
          </table:table-cell>
          <table:table-cell>
            <text:p>(786) 977-5407</text:p>
          </table:table-cell>
          <table:table-cell>
            <text:p/>
          </table:table-cell>
          <table:table-cell>
            <text:p><text:a xlink:href="https://oceanplumbingandair.com/hollywood-plumber-and-ac-repair/" xlink:type="simple" xlink:actuate="onRequest" office:target-frame="_blank" text:style-name="InternetLink">https://oceanplumbingandair.com/hollywood-plumber-and-ac-repair/</text:a></text:p>
          </table:table-cell>
          <table:table-cell>
            <text:p>3220 Stirling Rd, Hollywood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>Applewood Plumbing Heating &amp; Electric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www.applewoodfixit.com/" xlink:type="simple" xlink:actuate="onRequest" office:target-frame="_blank" text:style-name="InternetLink">https://www.applewoodfixit.com/</text:a></text:p>
          </table:table-cell>
          <table:table-cell>
            <text:p>5000 W 29th Ave, Lakewood, CO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>MTZ Plumbing inc</text:p>
          </table:table-cell>
          <table:table-cell>
            <text:p>(669) 214-1535</text:p>
          </table:table-cell>
          <table:table-cell>
            <text:p/>
          </table:table-cell>
          <table:table-cell>
            <text:p><text:a xlink:href="https://www.mtzplumbing.org/" xlink:type="simple" xlink:actuate="onRequest" office:target-frame="_blank" text:style-name="InternetLink">https://www.mtzplumbing.org/</text:a></text:p>
          </table:table-cell>
          <table:table-cell>
            <text:p>480 E McKinley Ave, Sunnyvale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>Steve's Plumbing &amp; Heating LLC</text:p>
          </table:table-cell>
          <table:table-cell>
            <text:p>(413) 736-4306</text:p>
          </table:table-cell>
          <table:table-cell>
            <text:p/>
          </table:table-cell>
          <table:table-cell>
            <text:p><text:a xlink:href="https://www.stevesplumbing.co/" xlink:type="simple" xlink:actuate="onRequest" office:target-frame="_blank" text:style-name="InternetLink">https://www.stevesplumbing.co/</text:a></text:p>
          </table:table-cell>
          <table:table-cell>
            <text:p>11 Hall St, Springfield, M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>Steve's Plumbing, LLC</text:p>
          </table:table-cell>
          <table:table-cell>
            <text:p>(425) 451-2444</text:p>
          </table:table-cell>
          <table:table-cell>
            <text:p/>
          </table:table-cell>
          <table:table-cell>
            <text:p><text:a xlink:href="https://www.callstevesplumbing.com/" xlink:type="simple" xlink:actuate="onRequest" office:target-frame="_blank" text:style-name="InternetLink">https://www.callstevesplumbing.com/</text:a></text:p>
          </table:table-cell>
          <table:table-cell>
            <text:p>2018 156th Ave NE Bldg f, Bellevue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>Bee Quick Plumbing &amp; Sewer - Naperville</text:p>
          </table:table-cell>
          <table:table-cell>
            <text:p>(630) 923-1942</text:p>
          </table:table-cell>
          <table:table-cell>
            <text:p/>
          </table:table-cell>
          <table:table-cell>
            <text:p><text:a xlink:href="https://beequickplumbingsewersinc.com/" xlink:type="simple" xlink:actuate="onRequest" office:target-frame="_blank" text:style-name="InternetLink">https://beequickplumbingsewersinc.com/</text:a></text:p>
          </table:table-cell>
          <table:table-cell>
            <text:p>1133 Elizabeth Ave, Naperville, I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>Bria Plumbing &amp; Heating</text:p>
          </table:table-cell>
          <table:table-cell>
            <text:p>(203) 583-8783</text:p>
          </table:table-cell>
          <table:table-cell>
            <text:p/>
          </table:table-cell>
          <table:table-cell>
            <text:p><text:a xlink:href="http://briaplumbing.com/" xlink:type="simple" xlink:actuate="onRequest" office:target-frame="_blank" text:style-name="InternetLink">http://briaplumbing.com/</text:a></text:p>
          </table:table-cell>
          <table:table-cell>
            <text:p>150 Victory St, Bridgeport,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>Owens Family Plumbing, Boilers &amp; Heating</text:p>
          </table:table-cell>
          <table:table-cell>
            <text:p>(815) 641-7392</text:p>
          </table:table-cell>
          <table:table-cell>
            <text:p/>
          </table:table-cell>
          <table:table-cell>
            <text:p><text:a xlink:href="https://owensfamilyplumbing.com" xlink:type="simple" xlink:actuate="onRequest" office:target-frame="_blank" text:style-name="InternetLink">https://owensfamilyplumbing.com</text:a></text:p>
          </table:table-cell>
          <table:table-cell>
            <text:p>1403 N William St, Joliet, I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>Plumber True Services of Mesquite, TX</text:p>
          </table:table-cell>
          <table:table-cell>
            <text:p>(469) 887-5912</text:p>
          </table:table-cell>
          <table:table-cell>
            <text:p/>
          </table:table-cell>
          <table:table-cell>
            <text:p><text:a xlink:href="https://plumbertrueservices.com/mesquite" xlink:type="simple" xlink:actuate="onRequest" office:target-frame="_blank" text:style-name="InternetLink">https://plumbertrueservices.com/mesquite</text:a></text:p>
          </table:table-cell>
          <table:table-cell>
            <text:p>300 W Main St Suite 231, Mesquit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>Mr. Rooter Plumbing of McAllen</text:p>
          </table:table-cell>
          <table:table-cell>
            <text:p>(254) 249-5308</text:p>
          </table:table-cell>
          <table:table-cell>
            <text:p/>
          </table:table-cell>
          <table:table-cell>
            <text:p><text:a xlink:href="https://www.mrrooter.com/emergency/plumbing" xlink:type="simple" xlink:actuate="onRequest" office:target-frame="_blank" text:style-name="InternetLink">https://www.mrrooter.com/emergency/plumbing</text:a></text:p>
          </table:table-cell>
          <table:table-cell>
            <text:p>824 East Hackberry Avenue, McAll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>J F Denney, Inc.</text:p>
          </table:table-cell>
          <table:table-cell>
            <text:p>(913) 772-8994</text:p>
          </table:table-cell>
          <table:table-cell>
            <text:p/>
          </table:table-cell>
          <table:table-cell>
            <text:p><text:a xlink:href="https://www.jfdenney.com/" xlink:type="simple" xlink:actuate="onRequest" office:target-frame="_blank" text:style-name="InternetLink">https://www.jfdenney.com/</text:a></text:p>
          </table:table-cell>
          <table:table-cell>
            <text:p>2024 E Spruce Cir, Olathe, K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>Putts Plumbing</text:p>
          </table:table-cell>
          <table:table-cell>
            <text:p>(912) 798-1791</text:p>
          </table:table-cell>
          <table:table-cell>
            <text:p/>
          </table:table-cell>
          <table:table-cell>
            <text:p><text:a xlink:href="https://puttsplumbing.org/" xlink:type="simple" xlink:actuate="onRequest" office:target-frame="_blank" text:style-name="InternetLink">https://puttsplumbing.org/</text:a></text:p>
          </table:table-cell>
          <table:table-cell>
            <text:p>131 Van Nuys Blvd, Savannah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>J.W. Freeman Plumbing</text:p>
          </table:table-cell>
          <table:table-cell>
            <text:p>(352) 316-3229</text:p>
          </table:table-cell>
          <table:table-cell>
            <text:p/>
          </table:table-cell>
          <table:table-cell>
            <text:p><text:a xlink:href="https://jwfreemanplumbing.com/" xlink:type="simple" xlink:actuate="onRequest" office:target-frame="_blank" text:style-name="InternetLink">https://jwfreemanplumbing.com/</text:a></text:p>
          </table:table-cell>
          <table:table-cell>
            <text:p>4637 NW 6th St, Gainesville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>Pasadena Plumbing Services Inc</text:p>
          </table:table-cell>
          <table:table-cell>
            <text:p>(281) 487-4688</text:p>
          </table:table-cell>
          <table:table-cell>
            <text:p/>
          </table:table-cell>
          <table:table-cell>
            <text:p><text:a xlink:href="http://www.pasadenaplumbingservices.com/" xlink:type="simple" xlink:actuate="onRequest" office:target-frame="_blank" text:style-name="InternetLink">http://www.pasadenaplumbingservices.com/</text:a></text:p>
          </table:table-cell>
          <table:table-cell>
            <text:p>505 Illinois St, Pasadena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>Auger's Plumbing</text:p>
          </table:table-cell>
          <table:table-cell>
            <text:p>(321) 724-9174</text:p>
          </table:table-cell>
          <table:table-cell>
            <text:p/>
          </table:table-cell>
          <table:table-cell>
            <text:p><text:a xlink:href="http://augersplumbinginc.com/" xlink:type="simple" xlink:actuate="onRequest" office:target-frame="_blank" text:style-name="InternetLink">http://augersplumbinginc.com/</text:a></text:p>
          </table:table-cell>
          <table:table-cell>
            <text:p>130 Enterprise Ave, Palm Bay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>Sierra Plumbing &amp; Drain Cleaning</text:p>
          </table:table-cell>
          <table:table-cell>
            <text:p>(909) 868-8396</text:p>
          </table:table-cell>
          <table:table-cell>
            <text:p/>
          </table:table-cell>
          <table:table-cell>
            <text:p><text:a xlink:href="http://www.sierraplumbingpro.com/" xlink:type="simple" xlink:actuate="onRequest" office:target-frame="_blank" text:style-name="InternetLink">http://www.sierraplumbingpro.com/</text:a></text:p>
          </table:table-cell>
          <table:table-cell>
            <text:p>2479 Alder St, Pom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>Mackenzy's Plumbing &amp; Drain</text:p>
          </table:table-cell>
          <table:table-cell>
            <text:p>(254) 581-5181</text:p>
          </table:table-cell>
          <table:table-cell>
            <text:p/>
          </table:table-cell>
          <table:table-cell>
            <text:p><text:a xlink:href="http://www.mackenzysplumbing.com/" xlink:type="simple" xlink:actuate="onRequest" office:target-frame="_blank" text:style-name="InternetLink">http://www.mackenzysplumbing.com/</text:a></text:p>
          </table:table-cell>
          <table:table-cell>
            <text:p>5900 Franklin Ave, Waco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<text:a xlink:href="https://www.franklinplumbingsc.com/" xlink:type="simple" xlink:actuate="onRequest" office:target-frame="_blank" text:style-name="InternetLink">https://www.franklinplumbingsc.com/</text:a>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>New Level Plumbing LLC</text:p>
          </table:table-cell>
          <table:table-cell>
            <text:p>(954) 860-9927</text:p>
          </table:table-cell>
          <table:table-cell>
            <text:p/>
          </table:table-cell>
          <table:table-cell>
            <text:p><text:a xlink:href="https://www.newlevelplumbingservices.com/" xlink:type="simple" xlink:actuate="onRequest" office:target-frame="_blank" text:style-name="InternetLink">https://www.newlevelplumbingservices.com/</text:a></text:p>
          </table:table-cell>
          <table:table-cell>
            <text:p>Miramar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>Grand Plumber Elizabeth</text:p>
          </table:table-cell>
          <table:table-cell>
            <text:p>(908) 201-1371</text:p>
          </table:table-cell>
          <table:table-cell>
            <text:p/>
          </table:table-cell>
          <table:table-cell>
            <text:p><text:a xlink:href="http://grandplumberselizabeth.com/" xlink:type="simple" xlink:actuate="onRequest" office:target-frame="_blank" text:style-name="InternetLink">http://grandplumberselizabeth.com/</text:a></text:p>
          </table:table-cell>
          <table:table-cell>
            <text:p>1157 Elizabeth Ave, Elizabeth, NJ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>CH Plumbing Services</text:p>
          </table:table-cell>
          <table:table-cell>
            <text:p>(877) 233-1033</text:p>
          </table:table-cell>
          <table:table-cell>
            <text:p/>
          </table:table-cell>
          <table:table-cell>
            <text:p><text:a xlink:href="https://www.chplumbingservices.com/" xlink:type="simple" xlink:actuate="onRequest" office:target-frame="_blank" text:style-name="InternetLink">https://www.chplumbingservices.com/</text:a></text:p>
          </table:table-cell>
          <table:table-cell>
            <text:p>Victorville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>Beyond Wow Plumbing &amp; Drains</text:p>
          </table:table-cell>
          <table:table-cell>
            <text:p>(512) 598-5905</text:p>
          </table:table-cell>
          <table:table-cell>
            <text:p/>
          </table:table-cell>
          <table:table-cell>
            <text:p><text:a xlink:href="https://beyondwow.com/" xlink:type="simple" xlink:actuate="onRequest" office:target-frame="_blank" text:style-name="InternetLink">https://beyondwow.com/</text:a></text:p>
          </table:table-cell>
          <table:table-cell>
            <text:p>310 W Main St Ste. 104, Round Rock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<text:a xlink:href="http://msplumbingsolutions.com/" xlink:type="simple" xlink:actuate="onRequest" office:target-frame="_blank" text:style-name="InternetLink">http://msplumbingsolutions.com/</text:a>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>FAIRCONN Plumbing and Heating LLC</text:p>
          </table:table-cell>
          <table:table-cell>
            <text:p>(203) 428-1748</text:p>
          </table:table-cell>
          <table:table-cell>
            <text:p/>
          </table:table-cell>
          <table:table-cell>
            <text:p><text:a xlink:href="http://www.fairconn.com/" xlink:type="simple" xlink:actuate="onRequest" office:target-frame="_blank" text:style-name="InternetLink">http://www.fairconn.com/</text:a></text:p>
          </table:table-cell>
          <table:table-cell>
            <text:p>96 Culloden Rd, Stamford, C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>All Metroplex Plumbing</text:p>
          </table:table-cell>
          <table:table-cell>
            <text:p>(214) 717-9911</text:p>
          </table:table-cell>
          <table:table-cell>
            <text:p/>
          </table:table-cell>
          <table:table-cell>
            <text:p><text:a xlink:href="http://allmetroplexplumbing.com/" xlink:type="simple" xlink:actuate="onRequest" office:target-frame="_blank" text:style-name="InternetLink">http://allmetroplexplumbing.com/</text:a></text:p>
          </table:table-cell>
          <table:table-cell>
            <text:p>2038 Devin Ln, Lewisvill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>Mayor Plumbing Services</text:p>
          </table:table-cell>
          <table:table-cell>
            <text:p>(954) 669-4955</text:p>
          </table:table-cell>
          <table:table-cell>
            <text:p/>
          </table:table-cell>
          <table:table-cell>
            <text:p><text:a xlink:href="https://www.mayorplumbingservices.com/" xlink:type="simple" xlink:actuate="onRequest" office:target-frame="_blank" text:style-name="InternetLink">https://www.mayorplumbingservices.com/</text:a></text:p>
          </table:table-cell>
          <table:table-cell>
            <text:p>Coral Springs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>Jackson Family Plumbing &amp; HVAC</text:p>
          </table:table-cell>
          <table:table-cell>
            <text:p>(385) 595-5700</text:p>
          </table:table-cell>
          <table:table-cell>
            <text:p/>
          </table:table-cell>
          <table:table-cell>
            <text:p><text:a xlink:href="https://jacksonplumbinghvac.com/west-jordan" xlink:type="simple" xlink:actuate="onRequest" office:target-frame="_blank" text:style-name="InternetLink">https://jacksonplumbinghvac.com/west-jordan</text:a></text:p>
          </table:table-cell>
          <table:table-cell>
            <text:p>6959 W 7800 S, West Valley City, UT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>Stemmle Plumbing of Hampton Roads</text:p>
          </table:table-cell>
          <table:table-cell>
            <text:p>(757) 283-2564</text:p>
          </table:table-cell>
          <table:table-cell>
            <text:p/>
          </table:table-cell>
          <table:table-cell>
            <text:p><text:a xlink:href="https://stemmleplumbing.com/newport-news/" xlink:type="simple" xlink:actuate="onRequest" office:target-frame="_blank" text:style-name="InternetLink">https://stemmleplumbing.com/newport-news/</text:a></text:p>
          </table:table-cell>
          <table:table-cell>
            <text:p>5706 Jefferson Ave, Hampton, V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>H2O Plumbing, Sewer and Drain</text:p>
          </table:table-cell>
          <table:table-cell>
            <text:p>(586) 746-8741</text:p>
          </table:table-cell>
          <table:table-cell>
            <text:p/>
          </table:table-cell>
          <table:table-cell>
            <text:p><text:a xlink:href="https://h2oplumbingmi.com/" xlink:type="simple" xlink:actuate="onRequest" office:target-frame="_blank" text:style-name="InternetLink">https://h2oplumbingmi.com/</text:a></text:p>
          </table:table-cell>
          <table:table-cell>
            <text:p>25530 Schoenherr Rd, Warren, MI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>1-Tom-Plumber</text:p>
          </table:table-cell>
          <table:table-cell>
            <text:p>(937) 203-8499</text:p>
          </table:table-cell>
          <table:table-cell>
            <text:p/>
          </table:table-cell>
          <table:table-cell>
            <text:p><text:a xlink:href="https://www.1tomplumber.com/dayton/" xlink:type="simple" xlink:actuate="onRequest" office:target-frame="_blank" text:style-name="InternetLink">https://www.1tomplumber.com/dayton/</text:a></text:p>
          </table:table-cell>
          <table:table-cell>
            <text:p>2034 S Alex Rd A, Dayton, OH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<text:a xlink:href="https://www.legacyplumbingfm.com/" xlink:type="simple" xlink:actuate="onRequest" office:target-frame="_blank" text:style-name="InternetLink">https://www.legacyplumbingfm.com/</text:a>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>VHM Plumbing</text:p>
          </table:table-cell>
          <table:table-cell>
            <text:p>(626) 746-5732</text:p>
          </table:table-cell>
          <table:table-cell>
            <text:p/>
          </table:table-cell>
          <table:table-cell>
            <text:p><text:a xlink:href="http://vhmplumbing.com/" xlink:type="simple" xlink:actuate="onRequest" office:target-frame="_blank" text:style-name="InternetLink">http://vhmplumbing.com/</text:a></text:p>
          </table:table-cell>
          <table:table-cell>
            <text:p>1415 N Sierra Bonita Ave, Pasade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>Pike Plumbing &amp; Sewer</text:p>
          </table:table-cell>
          <table:table-cell>
            <text:p>(206) 589-1923</text:p>
          </table:table-cell>
          <table:table-cell>
            <text:p/>
          </table:table-cell>
          <table:table-cell>
            <text:p><text:a xlink:href="https://pikewa.com/" xlink:type="simple" xlink:actuate="onRequest" office:target-frame="_blank" text:style-name="InternetLink">https://pikewa.com/</text:a></text:p>
          </table:table-cell>
          <table:table-cell>
            <text:p>26530 Woodland Way S, Ken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www.reevesfamilyplumbing.com/" xlink:type="simple" xlink:actuate="onRequest" office:target-frame="_blank" text:style-name="InternetLink">https://www.reevesfamilyplumbing.com/</text:a></text:p>
          </table:table-cell>
          <table:table-cell>
            <text:p>13346 Bee St, Carrollton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>PM Plumbing &amp; Mechanical</text:p>
          </table:table-cell>
          <table:table-cell>
            <text:p>(586) 298-4090</text:p>
          </table:table-cell>
          <table:table-cell>
            <text:p/>
          </table:table-cell>
          <table:table-cell>
            <text:p><text:a xlink:href="http://www.pmplumbingmi.com/" xlink:type="simple" xlink:actuate="onRequest" office:target-frame="_blank" text:style-name="InternetLink">http://www.pmplumbingmi.com/</text:a></text:p>
          </table:table-cell>
          <table:table-cell>
            <text:p>44648 Mound Rd, Sterling Heights, MI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>United Plumbing &amp; Water Heaters</text:p>
          </table:table-cell>
          <table:table-cell>
            <text:p>(650) 613-5090</text:p>
          </table:table-cell>
          <table:table-cell>
            <text:p/>
          </table:table-cell>
          <table:table-cell>
            <text:p><text:a xlink:href="https://plumbing-united.com/sanjose/" xlink:type="simple" xlink:actuate="onRequest" office:target-frame="_blank" text:style-name="InternetLink">https://plumbing-united.com/sanjose/</text:a></text:p>
          </table:table-cell>
          <table:table-cell>
            <text:p>3314 Victor Ct, Santa Clar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>Brown Plumbing - Abilene, TX</text:p>
          </table:table-cell>
          <table:table-cell>
            <text:p>(325) 425-0237</text:p>
          </table:table-cell>
          <table:table-cell>
            <text:p/>
          </table:table-cell>
          <table:table-cell>
            <text:p><text:a xlink:href="http://www.brownplumbing.net/" xlink:type="simple" xlink:actuate="onRequest" office:target-frame="_blank" text:style-name="InternetLink">http://www.brownplumbing.net/</text:a></text:p>
          </table:table-cell>
          <table:table-cell>
            <text:p>3201 S Treadaway Blvd, Abilene, TX 79602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<text:a xlink:href="https://brianwearplumbing.com/" xlink:type="simple" xlink:actuate="onRequest" office:target-frame="_blank" text:style-name="InternetLink">https://brianwearplumbing.com/</text:a>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>East Atlantic Plumbing LLC</text:p>
          </table:table-cell>
          <table:table-cell>
            <text:p>(910) 616-3238</text:p>
          </table:table-cell>
          <table:table-cell>
            <text:p/>
          </table:table-cell>
          <table:table-cell>
            <text:p><text:a xlink:href="https://eastatlanticplumbing.net/" xlink:type="simple" xlink:actuate="onRequest" office:target-frame="_blank" text:style-name="InternetLink">https://eastatlanticplumbing.net/</text:a></text:p>
          </table:table-cell>
          <table:table-cell>
            <text:p>1027 S 3rd St, Wilmington, NC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>Robinson Plumbing</text:p>
          </table:table-cell>
          <table:table-cell>
            <text:p>(610) 351-9889</text:p>
          </table:table-cell>
          <table:table-cell>
            <text:p/>
          </table:table-cell>
          <table:table-cell>
            <text:p><text:a xlink:href="http://www.robinsonplumbing.com/" xlink:type="simple" xlink:actuate="onRequest" office:target-frame="_blank" text:style-name="InternetLink">http://www.robinsonplumbing.com/</text:a></text:p>
          </table:table-cell>
          <table:table-cell>
            <text:p>1737 Neva St, Allentown, P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>Preferred Plumbing Professionals</text:p>
          </table:table-cell>
          <table:table-cell>
            <text:p>(785) 566-5028</text:p>
          </table:table-cell>
          <table:table-cell>
            <text:p/>
          </table:table-cell>
          <table:table-cell>
            <text:p><text:a xlink:href="https://preferredplumbingprofessionals.com/" xlink:type="simple" xlink:actuate="onRequest" office:target-frame="_blank" text:style-name="InternetLink">https://preferredplumbingprofessionals.com/</text:a></text:p>
          </table:table-cell>
          <table:table-cell>
            <text:p>2713 SW Burnett Rd, Topeka, K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>1-Tom-Plumber</text:p>
          </table:table-cell>
          <table:table-cell>
            <text:p>(863) 225-1411</text:p>
          </table:table-cell>
          <table:table-cell>
            <text:p/>
          </table:table-cell>
          <table:table-cell>
            <text:p><text:a xlink:href="https://www.1tomplumber.com/lakeland-fl/" xlink:type="simple" xlink:actuate="onRequest" office:target-frame="_blank" text:style-name="InternetLink">https://www.1tomplumber.com/lakeland-fl/</text:a></text:p>
          </table:table-cell>
          <table:table-cell>
            <text:p>5715 Ross Creek Rd, Lakeland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, Buckeye, AZ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>Phay Plumbing Services LLC</text:p>
          </table:table-cell>
          <table:table-cell>
            <text:p>(602) 291-0525</text:p>
          </table:table-cell>
          <table:table-cell>
            <text:p/>
          </table:table-cell>
          <table:table-cell>
            <text:p><text:a xlink:href="https://phayplumbingaz.com/" xlink:type="simple" xlink:actuate="onRequest" office:target-frame="_blank" text:style-name="InternetLink">https://phayplumbingaz.com/</text:a></text:p>
          </table:table-cell>
          <table:table-cell>
            <text:p>15941 W Madison St, Goodyear, AZ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>Spot On Plumbing of Tulsa Plumbers</text:p>
          </table:table-cell>
          <table:table-cell>
            <text:p>(918) 844-7961</text:p>
          </table:table-cell>
          <table:table-cell>
            <text:p/>
          </table:table-cell>
          <table:table-cell>
            <text:p><text:a xlink:href="https://spotonplumbing.com/" xlink:type="simple" xlink:actuate="onRequest" office:target-frame="_blank" text:style-name="InternetLink">https://spotonplumbing.com/</text:a></text:p>
          </table:table-cell>
          <table:table-cell>
            <text:p>1911 W Reno St, Broken Arrow, OK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>Paul Bunyan Plumbing &amp; Drains</text:p>
          </table:table-cell>
          <table:table-cell>
            <text:p>(507) 821-3664</text:p>
          </table:table-cell>
          <table:table-cell>
            <text:p/>
          </table:table-cell>
          <table:table-cell>
            <text:p><text:a xlink:href="https://paulbunyanplumbing.com/rochester/" xlink:type="simple" xlink:actuate="onRequest" office:target-frame="_blank" text:style-name="InternetLink">https://paulbunyanplumbing.com/rochester/</text:a></text:p>
          </table:table-cell>
          <table:table-cell>
            <text:p>4410 19th St NW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>Next Plumbing in Lafayette, LA</text:p>
          </table:table-cell>
          <table:table-cell>
            <text:p>(337) 324-8125</text:p>
          </table:table-cell>
          <table:table-cell>
            <text:p/>
          </table:table-cell>
          <table:table-cell>
            <text:p><text:a xlink:href="https://www.next-plumbing.com/" xlink:type="simple" xlink:actuate="onRequest" office:target-frame="_blank" text:style-name="InternetLink">https://www.next-plumbing.com/</text:a></text:p>
          </table:table-cell>
          <table:table-cell>
            <text:p>NW Evangeline Thruway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>Sons of Glory Plumbing</text:p>
          </table:table-cell>
          <table:table-cell>
            <text:p>(510) 502-9590</text:p>
          </table:table-cell>
          <table:table-cell>
            <text:p/>
          </table:table-cell>
          <table:table-cell>
            <text:p><text:a xlink:href="http://www.sonsofgloryplumbing.com/" xlink:type="simple" xlink:actuate="onRequest" office:target-frame="_blank" text:style-name="InternetLink">http://www.sonsofglory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>DIAMOND PLUMBING AND ROOTER</text:p>
          </table:table-cell>
          <table:table-cell>
            <text:p>(925) 864-1568</text:p>
          </table:table-cell>
          <table:table-cell>
            <text:p/>
          </table:table-cell>
          <table:table-cell>
            <text:p><text:a xlink:href="http://www.diamondplumbingandrooter.com/" xlink:type="simple" xlink:actuate="onRequest" office:target-frame="_blank" text:style-name="InternetLink">http://www.diamondplumbingandrooter.com/</text:a></text:p>
          </table:table-cell>
          <table:table-cell>
            <text:p>La Vist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>KMS Plumbing | Two Plumbs Up Plumber</text:p>
          </table:table-cell>
          <table:table-cell>
            <text:p>(303) 883-0401</text:p>
          </table:table-cell>
          <table:table-cell>
            <text:p/>
          </table:table-cell>
          <table:table-cell>
            <text:p><text:a xlink:href="https://kmsplumbing.com/" xlink:type="simple" xlink:actuate="onRequest" office:target-frame="_blank" text:style-name="InternetLink">https://kms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>Redeemed Water &amp; Plumbing</text:p>
          </table:table-cell>
          <table:table-cell>
            <text:p>(432) 202-6790</text:p>
          </table:table-cell>
          <table:table-cell>
            <text:p/>
          </table:table-cell>
          <table:table-cell>
            <text:p><text:a xlink:href="https://www.redeemedwaterplumbing.com/" xlink:type="simple" xlink:actuate="onRequest" office:target-frame="_blank" text:style-name="InternetLink">https://www.redeemedwater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>COMPLETE PLUMBING SERVICES</text:p>
          </table:table-cell>
          <table:table-cell>
            <text:p>(707) 803-1379</text:p>
          </table:table-cell>
          <table:table-cell>
            <text:p/>
          </table:table-cell>
          <table:table-cell>
            <text:p><text:a xlink:href="https://completeplumbingservices.net/" xlink:type="simple" xlink:actuate="onRequest" office:target-frame="_blank" text:style-name="InternetLink">https://completeplumbingservices.net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<text:a xlink:href="http://rimrockplumbing.com/" xlink:type="simple" xlink:actuate="onRequest" office:target-frame="_blank" text:style-name="InternetLink">http://rimrockplumbing.com/</text:a>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<text:a xlink:href="http://www.dillonplumbing.com/" xlink:type="simple" xlink:actuate="onRequest" office:target-frame="_blank" text:style-name="InternetLink">http://www.dillonplumbing.com/</text:a>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>Almighty Plumbing</text:p>
          </table:table-cell>
          <table:table-cell>
            <text:p>(925) 281-4861</text:p>
          </table:table-cell>
          <table:table-cell>
            <text:p/>
          </table:table-cell>
          <table:table-cell>
            <text:p><text:a xlink:href="http://www.almightyplumbing.biz/" xlink:type="simple" xlink:actuate="onRequest" office:target-frame="_blank" text:style-name="InternetLink">http://www.almightyplumbing.biz/</text:a></text:p>
          </table:table-cell>
          <table:table-cell>
            <text:p>1309 Mokelumne Dr, Antioch, CA 94531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>Neil and Sons Plumbing &amp; Water Heaters Inc</text:p>
          </table:table-cell>
          <table:table-cell>
            <text:p>(951) 546-8058</text:p>
          </table:table-cell>
          <table:table-cell>
            <text:p/>
          </table:table-cell>
          <table:table-cell>
            <text:p><text:a xlink:href="https://www.neilandsonsplumbing.com/" xlink:type="simple" xlink:actuate="onRequest" office:target-frame="_blank" text:style-name="InternetLink">https://www.neilandsonsplumbing.com/</text:a></text:p>
          </table:table-cell>
          <table:table-cell>
            <text:p>27679 Avenida Halago, Menifee, CA 92585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>Dean's Plumbing</text:p>
          </table:table-cell>
          <table:table-cell>
            <text:p>(972) 449-5274</text:p>
          </table:table-cell>
          <table:table-cell>
            <text:p/>
          </table:table-cell>
          <table:table-cell>
            <text:p><text:a xlink:href="https://www.deansplumbingtx.com/richardson-plumbers/" xlink:type="simple" xlink:actuate="onRequest" office:target-frame="_blank" text:style-name="InternetLink">https://www.deansplumbingtx.com/richardson-plumbers/</text:a></text:p>
          </table:table-cell>
          <table:table-cell>
            <text:p>610 Presidential Dr #110, Richardson, TX 75081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>John the Plumber</text:p>
          </table:table-cell>
          <table:table-cell>
            <text:p>(954) 807-2394</text:p>
          </table:table-cell>
          <table:table-cell>
            <text:p/>
          </table:table-cell>
          <table:table-cell>
            <text:p><text:a xlink:href="https://johntheplumberfl.com/" xlink:type="simple" xlink:actuate="onRequest" office:target-frame="_blank" text:style-name="InternetLink">https://johntheplumberfl.com/</text:a></text:p>
          </table:table-cell>
          <table:table-cell>
            <text:p>1571 SW 3rd St, Pompano Beach, FL 33069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<text:a xlink:href="https://www.paultheplumbernh.com/" xlink:type="simple" xlink:actuate="onRequest" office:target-frame="_blank" text:style-name="InternetLink">https://www.paultheplumbernh.com/</text:a>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>Avalon Services</text:p>
          </table:table-cell>
          <table:table-cell>
            <text:p>(510) 213-8350</text:p>
          </table:table-cell>
          <table:table-cell>
            <text:p/>
          </table:table-cell>
          <table:table-cell>
            <text:p><text:a xlink:href="https://avalonrooter.com/" xlink:type="simple" xlink:actuate="onRequest" office:target-frame="_blank" text:style-name="InternetLink">https://avalonrooter.com/</text:a></text:p>
          </table:table-cell>
          <table:table-cell>
            <text:p>5221 Central Ave, Richmon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>Service Pro Plumbing</text:p>
          </table:table-cell>
          <table:table-cell>
            <text:p>(704) 249-6883</text:p>
          </table:table-cell>
          <table:table-cell>
            <text:p/>
          </table:table-cell>
          <table:table-cell>
            <text:p><text:a xlink:href="http://www.serviceproplumbing.net/" xlink:type="simple" xlink:actuate="onRequest" office:target-frame="_blank" text:style-name="InternetLink">http://www.serviceproplumbing.net/</text:a></text:p>
          </table:table-cell>
          <table:table-cell>
            <text:p>6744 Drakestone Rd, Concord, NC 28027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>Skyline Plumbing and Mechanical, Inc.</text:p>
          </table:table-cell>
          <table:table-cell>
            <text:p>(801) 766-1711</text:p>
          </table:table-cell>
          <table:table-cell>
            <text:p/>
          </table:table-cell>
          <table:table-cell>
            <text:p><text:a xlink:href="https://skylineplumb.com/" xlink:type="simple" xlink:actuate="onRequest" office:target-frame="_blank" text:style-name="InternetLink">https://skylineplumb.com/</text:a></text:p>
          </table:table-cell>
          <table:table-cell>
            <text:p>801 N 1890 W, Provo, U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<text:a xlink:href="https://www.tlcplumbing.com/rio-rancho" xlink:type="simple" xlink:actuate="onRequest" office:target-frame="_blank" text:style-name="InternetLink">https://www.tlcplumbing.com/rio-rancho</text:a>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>Family Plumbing Heating &amp; Air Conditioning</text:p>
          </table:table-cell>
          <table:table-cell>
            <text:p>(951) 677-5445</text:p>
          </table:table-cell>
          <table:table-cell>
            <text:p/>
          </table:table-cell>
          <table:table-cell>
            <text:p><text:a xlink:href="https://www.866myfamily.com/" xlink:type="simple" xlink:actuate="onRequest" office:target-frame="_blank" text:style-name="InternetLink">https://www.866myfamily.com/</text:a></text:p>
          </table:table-cell>
          <table:table-cell>
            <text:p>29990 Technology Dr #19, Murrieta, C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>Michigan Plumbing</text:p>
          </table:table-cell>
          <table:table-cell>
            <text:p>(517) 322-2994</text:p>
          </table:table-cell>
          <table:table-cell>
            <text:p/>
          </table:table-cell>
          <table:table-cell>
            <text:p><text:a xlink:href="https://michiganplumbing.com/" xlink:type="simple" xlink:actuate="onRequest" office:target-frame="_blank" text:style-name="InternetLink">https://michiganplumbing.com/</text:a></text:p>
          </table:table-cell>
          <table:table-cell>
            <text:p>6204 Lansing Rd, Lansing, MI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>Fountain Plumbing, Inc</text:p>
          </table:table-cell>
          <table:table-cell>
            <text:p>(903) 566-5325</text:p>
          </table:table-cell>
          <table:table-cell>
            <text:p/>
          </table:table-cell>
          <table:table-cell>
            <text:p><text:a xlink:href="https://www.fountainplumbinginc.com/" xlink:type="simple" xlink:actuate="onRequest" office:target-frame="_blank" text:style-name="InternetLink">https://www.fountainplumbinginc.com/</text:a></text:p>
          </table:table-cell>
          <table:table-cell>
            <text:p>3314 County Rd 415, Tyler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>Jehveh Plumbing Company</text:p>
          </table:table-cell>
          <table:table-cell>
            <text:p>(305) 714-0343</text:p>
          </table:table-cell>
          <table:table-cell>
            <text:p/>
          </table:table-cell>
          <table:table-cell>
            <text:p><text:a xlink:href="https://jehvehplumbers.com/" xlink:type="simple" xlink:actuate="onRequest" office:target-frame="_blank" text:style-name="InternetLink">https://jehvehplumbers.com/</text:a></text:p>
          </table:table-cell>
          <table:table-cell>
            <text:p>15910 NW 48th Ave, Miami Gardens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>Dirt Cheap Sewer Inc</text:p>
          </table:table-cell>
          <table:table-cell>
            <text:p>(425) 537-6092</text:p>
          </table:table-cell>
          <table:table-cell>
            <text:p/>
          </table:table-cell>
          <table:table-cell>
            <text:p><text:a xlink:href="https://dirtcheapsewer.com/" xlink:type="simple" xlink:actuate="onRequest" office:target-frame="_blank" text:style-name="InternetLink">https://dirtcheapsewer.com/</text:a></text:p>
          </table:table-cell>
          <table:table-cell>
            <text:p>2617 Russell Way, Everet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>O'Bryan Plumbing Services</text:p>
          </table:table-cell>
          <table:table-cell>
            <text:p>(972) 708-4593</text:p>
          </table:table-cell>
          <table:table-cell>
            <text:p/>
          </table:table-cell>
          <table:table-cell>
            <text:p><text:a xlink:href="https://obryanplumbingservices.com/" xlink:type="simple" xlink:actuate="onRequest" office:target-frame="_blank" text:style-name="InternetLink">https://obryanplumbingservices.com/</text:a></text:p>
          </table:table-cell>
          <table:table-cell>
            <text:p>104 N Cedar Dr, Allen, TX 7500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>Rick Ray and Sons Plumbing</text:p>
          </table:table-cell>
          <table:table-cell>
            <text:p>(217) 525-0001</text:p>
          </table:table-cell>
          <table:table-cell>
            <text:p/>
          </table:table-cell>
          <table:table-cell>
            <text:p><text:a xlink:href="https://rickrayandsonsplumbing.com/" xlink:type="simple" xlink:actuate="onRequest" office:target-frame="_blank" text:style-name="InternetLink">https://rickrayandsonsplumbing.com/</text:a></text:p>
          </table:table-cell>
          <table:table-cell>
            <text:p>1514 W Jefferson St, Springfield, I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>Texas Lone Star Plumbing LLC</text:p>
          </table:table-cell>
          <table:table-cell>
            <text:p>(409) 790-8833</text:p>
          </table:table-cell>
          <table:table-cell>
            <text:p/>
          </table:table-cell>
          <table:table-cell>
            <text:p><text:a xlink:href="https://www.texaslonestarplumbingllc.com/" xlink:type="simple" xlink:actuate="onRequest" office:target-frame="_blank" text:style-name="InternetLink">https://www.texaslonestarplumbingllc.com/</text:a></text:p>
          </table:table-cell>
          <table:table-cell>
            <text:p>4691 College St, Beaumont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>A&amp;B Plumbing and Inspections</text:p>
          </table:table-cell>
          <table:table-cell>
            <text:p>(404) 918-3685</text:p>
          </table:table-cell>
          <table:table-cell>
            <text:p/>
          </table:table-cell>
          <table:table-cell>
            <text:p><text:a xlink:href="http://abplumbingandinspections.net/" xlink:type="simple" xlink:actuate="onRequest" office:target-frame="_blank" text:style-name="InternetLink">http://abplumbingandinspections.net/</text:a></text:p>
          </table:table-cell>
          <table:table-cell>
            <text:p>South Fulton, G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>MasterCraft Plumbers</text:p>
          </table:table-cell>
          <table:table-cell>
            <text:p>(760) 706-0008</text:p>
          </table:table-cell>
          <table:table-cell>
            <text:p/>
          </table:table-cell>
          <table:table-cell>
            <text:p><text:a xlink:href="https://mhiplumbers.com/" xlink:type="simple" xlink:actuate="onRequest" office:target-frame="_blank" text:style-name="InternetLink">https://mhiplumbers.com/</text:a></text:p>
          </table:table-cell>
          <table:table-cell>
            <text:p>2227 Faraday Ave Suite C, Carlsba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>58 Hardy Dr, Sparks, NV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>Diligent Plumbing LLC</text:p>
          </table:table-cell>
          <table:table-cell>
            <text:p>(503) 407-7293</text:p>
          </table:table-cell>
          <table:table-cell>
            <text:p/>
          </table:table-cell>
          <table:table-cell>
            <text:p><text:a xlink:href="http://diligent-plumbing.com/" xlink:type="simple" xlink:actuate="onRequest" office:target-frame="_blank" text:style-name="InternetLink">http://diligent-plumbing.com/</text:a></text:p>
          </table:table-cell>
          <table:table-cell>
            <text:p>1023 SE 223rd Ave, Gresham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>Pop's Plumbing</text:p>
          </table:table-cell>
          <table:table-cell>
            <text:p>(805) 864-2300</text:p>
          </table:table-cell>
          <table:table-cell>
            <text:p/>
          </table:table-cell>
          <table:table-cell>
            <text:p><text:a xlink:href="https://popsplumbingrepair.com/" xlink:type="simple" xlink:actuate="onRequest" office:target-frame="_blank" text:style-name="InternetLink">https://popsplumbingrepair.com/</text:a></text:p>
          </table:table-cell>
          <table:table-cell>
            <text:p>537 S Railroad Ave STE E, Santa Maria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>Timely Plumbing Solutions</text:p>
          </table:table-cell>
          <table:table-cell>
            <text:p>(971) 456-6762</text:p>
          </table:table-cell>
          <table:table-cell>
            <text:p/>
          </table:table-cell>
          <table:table-cell>
            <text:p><text:a xlink:href="http://www.timelyplumbingsolutions.com/" xlink:type="simple" xlink:actuate="onRequest" office:target-frame="_blank" text:style-name="InternetLink">http://www.timelyplumbingsolutions.com/</text:a></text:p>
          </table:table-cell>
          <table:table-cell>
            <text:p>Hillsboro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>Reading &amp; Son Plumbing, Inc.</text:p>
          </table:table-cell>
          <table:table-cell>
            <text:p>(309) 326-5831</text:p>
          </table:table-cell>
          <table:table-cell>
            <text:p/>
          </table:table-cell>
          <table:table-cell>
            <text:p><text:a xlink:href="https://readingandsonplumbing.com/" xlink:type="simple" xlink:actuate="onRequest" office:target-frame="_blank" text:style-name="InternetLink">https://readingandsonplumbing.com/</text:a></text:p>
          </table:table-cell>
          <table:table-cell>
            <text:p>7712 N Crestline Dr, Peoria, IL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>Joe Cole Plumbing</text:p>
          </table:table-cell>
          <table:table-cell>
            <text:p>(954) 573-2508</text:p>
          </table:table-cell>
          <table:table-cell>
            <text:p/>
          </table:table-cell>
          <table:table-cell>
            <text:p><text:a xlink:href="https://www.joecoleplumbing.com/" xlink:type="simple" xlink:actuate="onRequest" office:target-frame="_blank" text:style-name="InternetLink">https://www.joecoleplumbing.com/</text:a></text:p>
          </table:table-cell>
          <table:table-cell>
            <text:p>10392 W State Rd 84 #108, Davie, FL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>Faires Plumbing Co Inc</text:p>
          </table:table-cell>
          <table:table-cell>
            <text:p>(956) 383-3221</text:p>
          </table:table-cell>
          <table:table-cell>
            <text:p/>
          </table:table-cell>
          <table:table-cell>
            <text:p><text:a xlink:href="https://fairesplumbing.com/" xlink:type="simple" xlink:actuate="onRequest" office:target-frame="_blank" text:style-name="InternetLink">https://fairesplumbing.com/</text:a></text:p>
          </table:table-cell>
          <table:table-cell>
            <text:p>7810 E Mile 17 1/2 Rd, Edinburg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>Patterson Plumbing &amp; Heating, Inc.</text:p>
          </table:table-cell>
          <table:table-cell>
            <text:p>(719) 496-4939</text:p>
          </table:table-cell>
          <table:table-cell>
            <text:p/>
          </table:table-cell>
          <table:table-cell>
            <text:p><text:a xlink:href="https://www.pattersonplumbing.com/" xlink:type="simple" xlink:actuate="onRequest" office:target-frame="_blank" text:style-name="InternetLink">https://www.pattersonplumbing.com/</text:a></text:p>
          </table:table-cell>
          <table:table-cell>
            <text:p>1010 Aspen Pl, Pueblo, CO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>Hansen's Plumbing</text:p>
          </table:table-cell>
          <table:table-cell>
            <text:p>(805) 647-0113</text:p>
          </table:table-cell>
          <table:table-cell>
            <text:p/>
          </table:table-cell>
          <table:table-cell>
            <text:p><text:a xlink:href="https://hansensplumbing.com/" xlink:type="simple" xlink:actuate="onRequest" office:target-frame="_blank" text:style-name="InternetLink">https://hansensplumbing.com/</text:a></text:p>
          </table:table-cell>
          <table:table-cell>
            <text:p>2686 Johnson Dr Ste. 203, Ventur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<text:a xlink:href="https://www.plumbingfayettevillear.com/" xlink:type="simple" xlink:actuate="onRequest" office:target-frame="_blank" text:style-name="InternetLink">https://www.plumbingfayettevillear.com/</text:a>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>Drain Works drain cleaning and plumbing Brockton</text:p>
          </table:table-cell>
          <table:table-cell>
            <text:p>(774) 240-2076</text:p>
          </table:table-cell>
          <table:table-cell>
            <text:p/>
          </table:table-cell>
          <table:table-cell>
            <text:p><text:a xlink:href="https://drainworksbrockton.com" xlink:type="simple" xlink:actuate="onRequest" office:target-frame="_blank" text:style-name="InternetLink">https://drainworksbrockton.com</text:a></text:p>
          </table:table-cell>
          <table:table-cell>
            <text:p>105 Cashman Rd, Brockton, M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>The Plumbing Joint Inc.</text:p>
          </table:table-cell>
          <table:table-cell>
            <text:p>(425) 629-8430</text:p>
          </table:table-cell>
          <table:table-cell>
            <text:p/>
          </table:table-cell>
          <table:table-cell>
            <text:p><text:a xlink:href="https://www.plumbingjoint.com/" xlink:type="simple" xlink:actuate="onRequest" office:target-frame="_blank" text:style-name="InternetLink">https://www.plumbingjoint.com/</text:a></text:p>
          </table:table-cell>
          <table:table-cell>
            <text:p>351 Union Ave NE, Renton, WA 98059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>All Pro Plumbing Services LLC</text:p>
          </table:table-cell>
          <table:table-cell>
            <text:p>(317) 281-5510</text:p>
          </table:table-cell>
          <table:table-cell>
            <text:p/>
          </table:table-cell>
          <table:table-cell>
            <text:p><text:a xlink:href="https://www.all-proplumbingsvcs.com/" xlink:type="simple" xlink:actuate="onRequest" office:target-frame="_blank" text:style-name="InternetLink">https://www.all-proplumbingsvcs.com/</text:a></text:p>
          </table:table-cell>
          <table:table-cell>
            <text:p>9663 Aberdeen Ct, Fishers, IN 46038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>Four Towns Plumbing Inc</text:p>
          </table:table-cell>
          <table:table-cell>
            <text:p>(386) 668-4424</text:p>
          </table:table-cell>
          <table:table-cell>
            <text:p/>
          </table:table-cell>
          <table:table-cell>
            <text:p><text:a xlink:href="https://fourtownsplumbingdebary.com" xlink:type="simple" xlink:actuate="onRequest" office:target-frame="_blank" text:style-name="InternetLink">https://fourtownsplumbingdebary.com</text:a></text:p>
          </table:table-cell>
          <table:table-cell>
            <text:p>1623 Dunlap Dr, Deltona, FL 32725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>Streamline Plumbing, LLC</text:p>
          </table:table-cell>
          <table:table-cell>
            <text:p>(303) 772-2250</text:p>
          </table:table-cell>
          <table:table-cell>
            <text:p/>
          </table:table-cell>
          <table:table-cell>
            <text:p><text:a xlink:href="https://streamlineplb.com" xlink:type="simple" xlink:actuate="onRequest" office:target-frame="_blank" text:style-name="InternetLink">https://streamlineplb.com</text:a></text:p>
          </table:table-cell>
          <table:table-cell>
            <text:p>1740 Skyway Dr, Longmont, CO 80504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>JC Plumbing</text:p>
          </table:table-cell>
          <table:table-cell>
            <text:p>(253) 242-2079</text:p>
          </table:table-cell>
          <table:table-cell>
            <text:p/>
          </table:table-cell>
          <table:table-cell>
            <text:p><text:a xlink:href="https://jcplumbingwa.com" xlink:type="simple" xlink:actuate="onRequest" office:target-frame="_blank" text:style-name="InternetLink">https://jcplumbingwa.com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>Johnson Plumbing Inc.</text:p>
          </table:table-cell>
          <table:table-cell>
            <text:p>(209) 723-4032</text:p>
          </table:table-cell>
          <table:table-cell>
            <text:p/>
          </table:table-cell>
          <table:table-cell>
            <text:p><text:a xlink:href="https://johnsonplumbinginc.com" xlink:type="simple" xlink:actuate="onRequest" office:target-frame="_blank" text:style-name="InternetLink">https://johnsonplumbinginc.com</text:a></text:p>
          </table:table-cell>
          <table:table-cell>
            <text:p>2190 Yosemite Pkwy, Merced, CA 95341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>Kenosha Plumbing</text:p>
          </table:table-cell>
          <table:table-cell>
            <text:p>(262) 653-8223</text:p>
          </table:table-cell>
          <table:table-cell>
            <text:p/>
          </table:table-cell>
          <table:table-cell>
            <text:p><text:a xlink:href="https://kenoshaplumbing.net" xlink:type="simple" xlink:actuate="onRequest" office:target-frame="_blank" text:style-name="InternetLink">https://kenoshaplumbing.net</text:a></text:p>
          </table:table-cell>
          <table:table-cell>
            <text:p>7012 30th Ave, Kenosha, WI 53142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>Plantation fl Plumber</text:p>
          </table:table-cell>
          <table:table-cell>
            <text:p>(954) 787-1613</text:p>
          </table:table-cell>
          <table:table-cell>
            <text:p/>
          </table:table-cell>
          <table:table-cell>
            <text:p><text:a xlink:href="https://plantationflplumber.net" xlink:type="simple" xlink:actuate="onRequest" office:target-frame="_blank" text:style-name="InternetLink">https://plantationflplumber.net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>Badaracco Plumbing &amp; Heating LLC</text:p>
          </table:table-cell>
          <table:table-cell>
            <text:p>(203) 223-1579</text:p>
          </table:table-cell>
          <table:table-cell>
            <text:p/>
          </table:table-cell>
          <table:table-cell>
            <text:p><text:a xlink:href="https://badaraccoplumbing.com" xlink:type="simple" xlink:actuate="onRequest" office:target-frame="_blank" text:style-name="InternetLink">https://badaraccoplumbing.com</text:a></text:p>
          </table:table-cell>
          <table:table-cell>
            <text:p>345 Main Ave Unit CCDD, Norwalk, CT 0685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>Pierce Plumbing</text:p>
          </table:table-cell>
          <table:table-cell>
            <text:p>(951) 765-9411</text:p>
          </table:table-cell>
          <table:table-cell>
            <text:p/>
          </table:table-cell>
          <table:table-cell>
            <text:p><text:a xlink:href="https://pierceplumbing.net" xlink:type="simple" xlink:actuate="onRequest" office:target-frame="_blank" text:style-name="InternetLink">https://pierceplumbing.net</text:a></text:p>
          </table:table-cell>
          <table:table-cell>
            <text:p>700 W Florida Ave, Hemet, CA 92543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>Mr. Drippy Plumbing</text:p>
          </table:table-cell>
          <table:table-cell>
            <text:p>(205) 946-0337</text:p>
          </table:table-cell>
          <table:table-cell>
            <text:p/>
          </table:table-cell>
          <table:table-cell>
            <text:p><text:a xlink:href="https://mrdrippyplumbing.com" xlink:type="simple" xlink:actuate="onRequest" office:target-frame="_blank" text:style-name="InternetLink">https://mrdrippyplumbing.com</text:a></text:p>
          </table:table-cell>
          <table:table-cell>
            <text:p>3411 Lorna Ln, Hoover, AL 3521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>PlumbSmart Plumbing &amp; Drains</text:p>
          </table:table-cell>
          <table:table-cell>
            <text:p>(828) 974-6147</text:p>
          </table:table-cell>
          <table:table-cell>
            <text:p/>
          </table:table-cell>
          <table:table-cell>
            <text:p><text:a xlink:href="https://callplumbsmart.com" xlink:type="simple" xlink:actuate="onRequest" office:target-frame="_blank" text:style-name="InternetLink">https://callplumbsmart.com</text:a></text:p>
          </table:table-cell>
          <table:table-cell>
            <text:p>1 Sunny Ridge Dr, Asheville, NC 28804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>Kennedy Plumbing &amp; Heating</text:p>
          </table:table-cell>
          <table:table-cell>
            <text:p>(248) 474-0309</text:p>
          </table:table-cell>
          <table:table-cell>
            <text:p/>
          </table:table-cell>
          <table:table-cell>
            <text:p><text:a xlink:href="https://kennedyplumbingheating.com" xlink:type="simple" xlink:actuate="onRequest" office:target-frame="_blank" text:style-name="InternetLink">https://kennedyplumbingheating.com</text:a></text:p>
          </table:table-cell>
          <table:table-cell>
            <text:p>30284 7 Mile, Livonia, MI 48152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<text:a xlink:href="https://www.afphpro.com/" xlink:type="simple" xlink:actuate="onRequest" office:target-frame="_blank" text:style-name="InternetLink">https://www.afphpro.com/</text:a>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>Plumbing Utah</text:p>
          </table:table-cell>
          <table:table-cell>
            <text:p>(801) 601-1298</text:p>
          </table:table-cell>
          <table:table-cell>
            <text:p/>
          </table:table-cell>
          <table:table-cell>
            <text:p><text:a xlink:href="https://plumbingutah.com" xlink:type="simple" xlink:actuate="onRequest" office:target-frame="_blank" text:style-name="InternetLink">https://plumbingutah.com</text:a></text:p>
          </table:table-cell>
          <table:table-cell>
            <text:p>8789 Highland Dr #260, Sandy, UT 8409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>Larry &amp; Sons Plumbing, Heating, Cooling, Drain &amp; Electrical</text:p>
          </table:table-cell>
          <table:table-cell>
            <text:p>(240) 232-8985</text:p>
          </table:table-cell>
          <table:table-cell>
            <text:p/>
          </table:table-cell>
          <table:table-cell>
            <text:p><text:a xlink:href="https://larryandsons.com" xlink:type="simple" xlink:actuate="onRequest" office:target-frame="_blank" text:style-name="InternetLink">https://larryandsons.com</text:a></text:p>
          </table:table-cell>
          <table:table-cell>
            <text:p>5744 Industry Ln Ste N, Frederick, MD 21704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<text:a xlink:href="https://aplusplumbingofnwa.com/" xlink:type="simple" xlink:actuate="onRequest" office:target-frame="_blank" text:style-name="InternetLink">https://aplusplumbingofnwa.com/</text:a>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<text:a xlink:href="https://jamesplumbingandheating.com" xlink:type="simple" xlink:actuate="onRequest" office:target-frame="_blank" text:style-name="InternetLink">jamesplumbingandheating.com</text:a>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>Plumbing Installs</text:p>
          </table:table-cell>
          <table:table-cell>
            <text:p>(714) 455-9346</text:p>
          </table:table-cell>
          <table:table-cell>
            <text:p/>
          </table:table-cell>
          <table:table-cell>
            <text:p><text:a xlink:href="http://www.plumbinginstalls.com/" xlink:type="simple" xlink:actuate="onRequest" office:target-frame="_blank" text:style-name="InternetLink">http://www.plumbinginstalls.com/</text:a></text:p>
          </table:table-cell>
          <table:table-cell>
            <text:p>6291 Iroquois Rd, Westminster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>Paul C. Scott &amp; Sons Plumbing, Inc.</text:p>
          </table:table-cell>
          <table:table-cell>
            <text:p>(248) 547-9334</text:p>
          </table:table-cell>
          <table:table-cell>
            <text:p/>
          </table:table-cell>
          <table:table-cell>
            <text:p><text:a xlink:href="http://www.paulscottplumbing.com/" xlink:type="simple" xlink:actuate="onRequest" office:target-frame="_blank" text:style-name="InternetLink">http://www.paulscottplumbing.com/</text:a></text:p>
          </table:table-cell>
          <table:table-cell>
            <text:p>2722 Elliott Ave, Troy, MI</text:p>
          </table:table-cell>
          <table:table-cell>
            <text:p>4.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>Daytona Plumbing</text:p>
          </table:table-cell>
          <table:table-cell>
            <text:p>(386) 253-7674</text:p>
          </table:table-cell>
          <table:table-cell>
            <text:p/>
          </table:table-cell>
          <table:table-cell>
            <text:p><text:a xlink:href="http://www.daytonaplumb.com/" xlink:type="simple" xlink:actuate="onRequest" office:target-frame="_blank" text:style-name="InternetLink">http://www.daytonaplumb.com/</text:a></text:p>
          </table:table-cell>
          <table:table-cell>
            <text:p>500 Walker St, Daytona Beach, FL</text:p>
          </table:table-cell>
          <table:table-cell>
            <text:p>4.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>William J. Riley Plumbing &amp; Heating Co Inc</text:p>
          </table:table-cell>
          <table:table-cell>
            <text:p>(401) 738-1688</text:p>
          </table:table-cell>
          <table:table-cell>
            <text:p/>
          </table:table-cell>
          <table:table-cell>
            <text:p><text:a xlink:href="https://www.rileyplumbing.com/" xlink:type="simple" xlink:actuate="onRequest" office:target-frame="_blank" text:style-name="InternetLink">https://www.rileyplumbing.com/</text:a></text:p>
          </table:table-cell>
          <table:table-cell>
            <text:p>15 New England Way, Warwick, RI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>Jones Family Plumbing &amp; HVAC</text:p>
          </table:table-cell>
          <table:table-cell>
            <text:p>(720) 500-6890</text:p>
          </table:table-cell>
          <table:table-cell>
            <text:p/>
          </table:table-cell>
          <table:table-cell>
            <text:p><text:a xlink:href="https://jonesplumbinghvac.site/castle-rock" xlink:type="simple" xlink:actuate="onRequest" office:target-frame="_blank" text:style-name="InternetLink">https://jonesplumbinghvac.site/castle-rock</text:a></text:p>
          </table:table-cell>
          <table:table-cell>
            <text:p>2278 Manatt Ct, Castle Rock, CO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>Sabastian and Sons Plumbing Service LLC</text:p>
          </table:table-cell>
          <table:table-cell>
            <text:p>(763) 657-9821</text:p>
          </table:table-cell>
          <table:table-cell>
            <text:p/>
          </table:table-cell>
          <table:table-cell>
            <text:p><text:a xlink:href="https://snsplumbing.net/" xlink:type="simple" xlink:actuate="onRequest" office:target-frame="_blank" text:style-name="InternetLink">https://snsplumbing.net/</text:a></text:p>
          </table:table-cell>
          <table:table-cell>
            <text:p>3300 County Rd 10 Ste 500i, Brooklyn Park, MN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>Barnett Plumbing &amp; Water Heaters</text:p>
          </table:table-cell>
          <table:table-cell>
            <text:p>(925) 872-0805</text:p>
          </table:table-cell>
          <table:table-cell>
            <text:p/>
          </table:table-cell>
          <table:table-cell>
            <text:p><text:a xlink:href="https://barnettplumbing.com/" xlink:type="simple" xlink:actuate="onRequest" office:target-frame="_blank" text:style-name="InternetLink">https://barnettplumbing.com/</text:a></text:p>
          </table:table-cell>
          <table:table-cell>
            <text:p>780 E Airway Blvd, Livermore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<text:a xlink:href="https://www.loyalplumbing.com/" xlink:type="simple" xlink:actuate="onRequest" office:target-frame="_blank" text:style-name="InternetLink">https://www.loyalplumbing.com/</text:a>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>Pro Plumber Upland CA Company</text:p>
          </table:table-cell>
          <table:table-cell>
            <text:p>(909) 303-1480</text:p>
          </table:table-cell>
          <table:table-cell>
            <text:p/>
          </table:table-cell>
          <table:table-cell>
            <text:p><text:a xlink:href="https://www.proplumberuplandcacompany.com/" xlink:type="simple" xlink:actuate="onRequest" office:target-frame="_blank" text:style-name="InternetLink">https://www.proplumberuplandcacompany.com/</text:a></text:p>
          </table:table-cell>
          <table:table-cell>
            <text:p>1104 W 9th St, Upland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>The Honest Plumber - Flint</text:p>
          </table:table-cell>
          <table:table-cell>
            <text:p>(810) 830-5472</text:p>
          </table:table-cell>
          <table:table-cell>
            <text:p/>
          </table:table-cell>
          <table:table-cell>
            <text:p><text:a xlink:href="https://honest-pipes-now.lovable.app/" xlink:type="simple" xlink:actuate="onRequest" office:target-frame="_blank" text:style-name="InternetLink">https://honest-pipes-now.lovable.app/</text:a></text:p>
          </table:table-cell>
          <table:table-cell>
            <text:p>503 S Saginaw St, Flint, MI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<text:a xlink:href="https://plumbtechmt.com/" xlink:type="simple" xlink:actuate="onRequest" office:target-frame="_blank" text:style-name="InternetLink">https://plumbtechmt.com/</text:a>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<text:a xlink:href="https://www.timberridgephnd.com/" xlink:type="simple" xlink:actuate="onRequest" office:target-frame="_blank" text:style-name="InternetLink">https://www.timberridgephnd.com/</text:a>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<text:a xlink:href="https://kintyjonesplumbing.com/" xlink:type="simple" xlink:actuate="onRequest" office:target-frame="_blank" text:style-name="InternetLink">https://kintyjonesplumbing.com/</text:a>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<text:a xlink:href="https://arfplumbing.com/" xlink:type="simple" xlink:actuate="onRequest" office:target-frame="_blank" text:style-name="InternetLink">https://arfplumbing.com/</text:a>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<text:a xlink:href="https://benjaminfranklinplumbing.com/wilmington-de/" xlink:type="simple" xlink:actuate="onRequest" office:target-frame="_blank" text:style-name="InternetLink">https://benjaminfranklinplumbing.com/wilmington-de/</text:a>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<text:a xlink:href="http://www.piersonplumbingstl.com/" xlink:type="simple" xlink:actuate="onRequest" office:target-frame="_blank" text:style-name="InternetLink">http://www.piersonplumbingstl.com/</text:a>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<text:a xlink:href="https://justcallheritage.com/service-area/portland-me/" xlink:type="simple" xlink:actuate="onRequest" office:target-frame="_blank" text:style-name="InternetLink">https://justcallheritage.com/service-area/portland-me/</text:a>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<text:a xlink:href="https://www.aspenmtnplumbing.com/plumbers-cheyenne-wy" xlink:type="simple" xlink:actuate="onRequest" office:target-frame="_blank" text:style-name="InternetLink">https://www.aspenmtnplumbing.com/plumbers-cheyenne-wy</text:a>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<text:a xlink:href="https://www.callsmith.com/" xlink:type="simple" xlink:actuate="onRequest" office:target-frame="_blank" text:style-name="InternetLink">https://www.callsmith.com/</text:a>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<text:a xlink:href="http://www.nextgenerationgaylen.com/" xlink:type="simple" xlink:actuate="onRequest" office:target-frame="_blank" text:style-name="InternetLink">http://www.nextgenerationgaylen.com/</text:a>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<text:a xlink:href="https://kellyplumbinginc.com" xlink:type="simple" xlink:actuate="onRequest" office:target-frame="_blank" text:style-name="InternetLink">kellyplumbinginc.com</text:a>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<text:a xlink:href="https://tonylamartinaplumbing.com" xlink:type="simple" xlink:actuate="onRequest" office:target-frame="_blank" text:style-name="InternetLink">tonylamartinaplumbing.com</text:a>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<text:a xlink:href="https://boisefamilyplumbing.com" xlink:type="simple" xlink:actuate="onRequest" office:target-frame="_blank" text:style-name="InternetLink">boisefamilyplumbing.com</text:a>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sno</text:p>
          </table:table-cell>
          <table:table-cell>
            <text:p>CA</text:p>
          </table:table-cell>
          <table:table-cell>
            <text:p/>
          </table:table-cell>
          <table:table-cell>
            <text:p>Clovis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clovisplumbing.com" xlink:type="simple" xlink:actuate="onRequest" office:target-frame="_blank" text:style-name="InternetLink">clovisplumbing.com</text:a></text:p>
          </table:table-cell>
          <table:table-cell>
            <text:p>Fresn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lbuquerque</text:p>
          </table:table-cell>
          <table:table-cell>
            <text:p>NM</text:p>
          </table:table-cell>
          <table:table-cell>
            <text:p/>
          </table:table-cell>
          <table:table-cell>
            <text:p>Family Plumbing Heating &amp; Refrigeration</text:p>
          </table:table-cell>
          <table:table-cell>
            <text:p>(505) 803-3170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Albuquerque, NM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cramento</text:p>
          </table:table-cell>
          <table:table-cell>
            <text:p>CA</text:p>
          </table:table-cell>
          <table:table-cell>
            <text:p/>
          </table:table-cell>
          <table:table-cell>
            <text:p>Armstrong Plumbing Inc</text:p>
          </table:table-cell>
          <table:table-cell>
            <text:p>(916) 461-8744</text:p>
          </table:table-cell>
          <table:table-cell>
            <text:p/>
          </table:table-cell>
          <table:table-cell>
            <text:p><text:a xlink:href="https://armstrongplumbing.com" xlink:type="simple" xlink:actuate="onRequest" office:target-frame="_blank" text:style-name="InternetLink">armstrongplumbing.com</text:a></text:p>
          </table:table-cell>
          <table:table-cell>
            <text:p>Sacrament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Memphis</text:p>
          </table:table-cell>
          <table:table-cell>
            <text:p>TN</text:p>
          </table:table-cell>
          <table:table-cell>
            <text:p/>
          </table:table-cell>
          <table:table-cell>
            <text:p>Smith's Plumbing Services</text:p>
          </table:table-cell>
          <table:table-cell>
            <text:p>(901) 660-2009</text:p>
          </table:table-cell>
          <table:table-cell>
            <text:p/>
          </table:table-cell>
          <table:table-cell>
            <text:p><text:a xlink:href="https://smithsplumbingservice.com" xlink:type="simple" xlink:actuate="onRequest" office:target-frame="_blank" text:style-name="InternetLink">smithsplumbingservice.com</text:a></text:p>
          </table:table-cell>
          <table:table-cell>
            <text:p>Memphis, TN</text:p>
          </table:table-cell>
          <table:table-cell>
            <text:p>4.8+/5</text:p>
          </table:table-cell>
          <table:table-cell>
            <text:p>YES (201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Pro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nchorage</text:p>
          </table:table-cell>
          <table:table-cell>
            <text:p>AK</text:p>
          </table:table-cell>
          <table:table-cell>
            <text:p/>
          </table:table-cell>
          <table:table-cell>
            <text:p>Anchorage Plumbing</text:p>
          </table:table-cell>
          <table:table-cell>
            <text:p>(907) 349-6620</text:p>
          </table:table-cell>
          <table:table-cell>
            <text:p/>
          </table:table-cell>
          <table:table-cell>
            <text:p><text:a xlink:href="https://ancph.com" xlink:type="simple" xlink:actuate="onRequest" office:target-frame="_blank" text:style-name="InternetLink">ancph.com</text:a></text:p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Irvine</text:p>
          </table:table-cell>
          <table:table-cell>
            <text:p>CA</text:p>
          </table:table-cell>
          <table:table-cell>
            <text:p/>
          </table:table-cell>
          <table:table-cell>
            <text:p>Family Plumbing &amp; Rooter Services</text:p>
          </table:table-cell>
          <table:table-cell>
            <text:p>(949) 648-6645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ubbock</text:p>
          </table:table-cell>
          <table:table-cell>
            <text:p>TX</text:p>
          </table:table-cell>
          <table:table-cell>
            <text:p/>
          </table:table-cell>
          <table:table-cell>
            <text:p>A-1 Plumbing</text:p>
          </table:table-cell>
          <table:table-cell>
            <text:p>(806) 796-0206</text:p>
          </table:table-cell>
          <table:table-cell>
            <text:p/>
          </table:table-cell>
          <table:table-cell>
            <text:p><text:a xlink:href="https://lubbocka1plumbing.com" xlink:type="simple" xlink:actuate="onRequest" office:target-frame="_blank" text:style-name="InternetLink">lubbocka1plumbing.com</text:a></text:p>
          </table:table-cell>
          <table:table-cell>
            <text:p>Lubbock, TX</text:p>
          </table:table-cell>
          <table:table-cell>
            <text:p>4.5+/5</text:p>
          </table:table-cell>
          <table:table-cell>
            <text:p>YES (1976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ersey City</text:p>
          </table:table-cell>
          <table:table-cell>
            <text:p>NJ</text:p>
          </table:table-cell>
          <table:table-cell>
            <text:p/>
          </table:table-cell>
          <table:table-cell>
            <text:p>Carmine P. Aumenta &amp; Sons Plumbing</text:p>
          </table:table-cell>
          <table:table-cell>
            <text:p>(201) 451-8008</text:p>
          </table:table-cell>
          <table:table-cell>
            <text:p/>
          </table:table-cell>
          <table:table-cell>
            <text:p/>
          </table:table-cell>
          <table:table-cell>
            <text:p>Jersey City, NJ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AZ Family Plumbing</text:p>
          </table:table-cell>
          <table:table-cell>
            <text:p>(602) 922-0103</text:p>
          </table:table-cell>
          <table:table-cell>
            <text:p/>
          </table:table-cell>
          <table:table-cell>
            <text:p><text:a xlink:href="https://azfamilyplumbing.com" xlink:type="simple" xlink:actuate="onRequest" office:target-frame="_blank" text:style-name="InternetLink">azfamilyplumbing.com</text:a></text:p>
          </table:table-cell>
          <table:table-cell>
            <text:p>Glendale, AZ</text:p>
          </table:table-cell>
          <table:table-cell>
            <text:p>4.8+/5</text:p>
          </table:table-cell>
          <table:table-cell>
            <text:p>YES (2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ville</text:p>
          </table:table-cell>
          <table:table-cell>
            <text:p>FL</text:p>
          </table:table-cell>
          <table:table-cell>
            <text:p/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The Local Plumber LLC</text:p>
          </table:table-cell>
          <table:table-cell>
            <text:p>(614) 230-6086</text:p>
          </table:table-cell>
          <table:table-cell>
            <text:p/>
          </table:table-cell>
          <table:table-cell>
            <text:p><text:a xlink:href="http://localplumbercolumbus.com/" xlink:type="simple" xlink:actuate="onRequest" office:target-frame="_blank" text:style-name="InternetLink">http://localplumbercolumbus.com/</text:a></text:p>
          </table:table-cell>
          <table:table-cell>
            <text:p>461 Industry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Indianapolis</text:p>
          </table:table-cell>
          <table:table-cell>
            <text:p>IN</text:p>
          </table:table-cell>
          <table:table-cell>
            <text:p/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Magic Plumbing Heating &amp; Cooling</text:p>
          </table:table-cell>
          <table:table-cell>
            <text:p>(415) 441-2255</text:p>
          </table:table-cell>
          <table:table-cell>
            <text:p/>
          </table:table-cell>
          <table:table-cell>
            <text:p><text:a xlink:href="https://www.magicplumbing.com/" xlink:type="simple" xlink:actuate="onRequest" office:target-frame="_blank" text:style-name="InternetLink">https://www.magicplumbing.com/</text:a></text:p>
          </table:table-cell>
          <table:table-cell>
            <text:p>1455 Bancroft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Eaton Family Plumbers</text:p>
          </table:table-cell>
          <table:table-cell>
            <text:p>(405) 281-4400</text:p>
          </table:table-cell>
          <table:table-cell>
            <text:p/>
          </table:table-cell>
          <table:table-cell>
            <text:p><text:a xlink:href="https://eatonfamilyplumbers-ok.pro/" xlink:type="simple" xlink:actuate="onRequest" office:target-frame="_blank" text:style-name="InternetLink">https://eatonfamilyplumbers-ok.pro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 Paso</text:p>
          </table:table-cell>
          <table:table-cell>
            <text:p>TX</text:p>
          </table:table-cell>
          <table:table-cell>
            <text:p/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Detroit</text:p>
          </table:table-cell>
          <table:table-cell>
            <text:p>MI</text:p>
          </table:table-cell>
          <table:table-cell>
            <text:p/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mith Plumbing, Heating, Air Conditioning &amp; Electrical</text:p>
          </table:table-cell>
          <table:table-cell>
            <text:p>(719) 241-1924</text:p>
          </table:table-cell>
          <table:table-cell>
            <text:p/>
          </table:table-cell>
          <table:table-cell>
            <text:p><text:a xlink:href="https://www.smithtotalhome.com/" xlink:type="simple" xlink:actuate="onRequest" office:target-frame="_blank" text:style-name="InternetLink">https://www.smithtotalhome.com/</text:a></text:p>
          </table:table-cell>
          <table:table-cell>
            <text:p>1875 Mai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Virginia Beach</text:p>
          </table:table-cell>
          <table:table-cell>
            <text:p>VA</text:p>
          </table:table-cell>
          <table:table-cell>
            <text:p/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inneapolis</text:p>
          </table:table-cell>
          <table:table-cell>
            <text:p>MN</text:p>
          </table:table-cell>
          <table:table-cell>
            <text:p/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ichita</text:p>
          </table:table-cell>
          <table:table-cell>
            <text:p>KS</text:p>
          </table:table-cell>
          <table:table-cell>
            <text:p/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eveland</text:p>
          </table:table-cell>
          <table:table-cell>
            <text:p>OH</text:p>
          </table:table-cell>
          <table:table-cell>
            <text:p/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/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ittsburgh</text:p>
          </table:table-cell>
          <table:table-cell>
            <text:p>PA</text:p>
          </table:table-cell>
          <table:table-cell>
            <text:p/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isco</text:p>
          </table:table-cell>
          <table:table-cell>
            <text:p>TX</text:p>
          </table:table-cell>
          <table:table-cell>
            <text:p/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cKinney</text:p>
          </table:table-cell>
          <table:table-cell>
            <text:p>TX</text:p>
          </table:table-cell>
          <table:table-cell>
            <text:p/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t Lake City</text:p>
          </table:table-cell>
          <table:table-cell>
            <text:p>UT</text:p>
          </table:table-cell>
          <table:table-cell>
            <text:p/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k Grove</text:p>
          </table:table-cell>
          <table:table-cell>
            <text:p>CA</text:p>
          </table:table-cell>
          <table:table-cell>
            <text:p/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ry</text:p>
          </table:table-cell>
          <table:table-cell>
            <text:p>NC</text:p>
          </table:table-cell>
          <table:table-cell>
            <text:p/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em</text:p>
          </table:table-cell>
          <table:table-cell>
            <text:p>OR</text:p>
          </table:table-cell>
          <table:table-cell>
            <text:p/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empe</text:p>
          </table:table-cell>
          <table:table-cell>
            <text:p>AZ</text:p>
          </table:table-cell>
          <table:table-cell>
            <text:p/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arksville</text:p>
          </table:table-cell>
          <table:table-cell>
            <text:p>TN</text:p>
          </table:table-cell>
          <table:table-cell>
            <text:p/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Lauderdale</text:p>
          </table:table-cell>
          <table:table-cell>
            <text:p>FL</text:p>
          </table:table-cell>
          <table:table-cell>
            <text:p/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ta Rosa</text:p>
          </table:table-cell>
          <table:table-cell>
            <text:p>CA</text:p>
          </table:table-cell>
          <table:table-cell>
            <text:p/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ugene</text:p>
          </table:table-cell>
          <table:table-cell>
            <text:p>OR</text:p>
          </table:table-cell>
          <table:table-cell>
            <text:p/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ancho Cucamonga</text:p>
          </table:table-cell>
          <table:table-cell>
            <text:p>CA</text:p>
          </table:table-cell>
          <table:table-cell>
            <text:p/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embroke Pines</text:p>
          </table:table-cell>
          <table:table-cell>
            <text:p>FL</text:p>
          </table:table-cell>
          <table:table-cell>
            <text:p/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urprise</text:p>
          </table:table-cell>
          <table:table-cell>
            <text:p>AZ</text:p>
          </table:table-cell>
          <table:table-cell>
            <text:p/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Collins</text:p>
          </table:table-cell>
          <table:table-cell>
            <text:p>CO</text:p>
          </table:table-cell>
          <table:table-cell>
            <text:p/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urfreesboro</text:p>
          </table:table-cell>
          <table:table-cell>
            <text:p>TN</text:p>
          </table:table-cell>
          <table:table-cell>
            <text:p/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Garden Grove</text:p>
          </table:table-cell>
          <table:table-cell>
            <text:p>CA</text:p>
          </table:table-cell>
          <table:table-cell>
            <text:p/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uperior Plumbing Solutions</text:p>
          </table:table-cell>
          <table:table-cell>
            <text:p>(239) 518-2469</text:p>
          </table:table-cell>
          <table:table-cell>
            <text:p/>
          </table:table-cell>
          <table:table-cell>
            <text:p><text:a xlink:href="http://www.superiorplumbingflorida.com/" xlink:type="simple" xlink:actuate="onRequest" office:target-frame="_blank" text:style-name="InternetLink">http://www.superiorplumbingflorida.com/</text:a></text:p>
          </table:table-cell>
          <table:table-cell>
            <text:p>1014 SE 12th Ct #5, Cape Coral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Bob Larson Plumbing</text:p>
          </table:table-cell>
          <table:table-cell>
            <text:p>(253) 400-1582</text:p>
          </table:table-cell>
          <table:table-cell>
            <text:p/>
          </table:table-cell>
          <table:table-cell>
            <text:p><text:a xlink:href="https://www.boblarsonplumbing.com/" xlink:type="simple" xlink:actuate="onRequest" office:target-frame="_blank" text:style-name="InternetLink">https://www.boblarsonplumbing.com/</text:a></text:p>
          </table:table-cell>
          <table:table-cell>
            <text:p>4320 128th St E, Tacoma, W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Durrani Plumbing</text:p>
          </table:table-cell>
          <table:table-cell>
            <text:p>(510) 602-8370</text:p>
          </table:table-cell>
          <table:table-cell>
            <text:p/>
          </table:table-cell>
          <table:table-cell>
            <text:p><text:a xlink:href="http://www.durraniplumbing.com/" xlink:type="simple" xlink:actuate="onRequest" office:target-frame="_blank" text:style-name="InternetLink">http://www.durraniplumbing.com/</text:a></text:p>
          </table:table-cell>
          <table:table-cell>
            <text:p>38765 Mission Blvd, Fremont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orcester</text:p>
          </table:table-cell>
          <table:table-cell>
            <text:p>MA</text:p>
          </table:table-cell>
          <table:table-cell>
            <text:p/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Augusta</text:p>
          </table:table-cell>
          <table:table-cell>
            <text:p>GA</text:p>
          </table:table-cell>
          <table:table-cell>
            <text:p/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Hometown Plumbing Services</text:p>
          </table:table-cell>
          <table:table-cell>
            <text:p>(909) 442-5501</text:p>
          </table:table-cell>
          <table:table-cell>
            <text:p/>
          </table:table-cell>
          <table:table-cell>
            <text:p><text:a xlink:href="https://hometownplumbingserv.com/" xlink:type="simple" xlink:actuate="onRequest" office:target-frame="_blank" text:style-name="InternetLink">https://hometownplumbingserv.com/</text:a></text:p>
          </table:table-cell>
          <table:table-cell>
            <text:p>615 N Euclid Ave suite 843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aul</text:p>
          </table:table-cell>
          <table:table-cell>
            <text:p>MN</text:p>
          </table:table-cell>
          <table:table-cell>
            <text:p/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incoln</text:p>
          </table:table-cell>
          <table:table-cell>
            <text:p>NE</text:p>
          </table:table-cell>
          <table:table-cell>
            <text:p/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North Las Vegas</text:p>
          </table:table-cell>
          <table:table-cell>
            <text:p>NV</text:p>
          </table:table-cell>
          <table:table-cell>
            <text:p/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eno</text:p>
          </table:table-cell>
          <table:table-cell>
            <text:p>NV</text:p>
          </table:table-cell>
          <table:table-cell>
            <text:p/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ffalo</text:p>
          </table:table-cell>
          <table:table-cell>
            <text:p>NY</text:p>
          </table:table-cell>
          <table:table-cell>
            <text:p/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etersburg</text:p>
          </table:table-cell>
          <table:table-cell>
            <text:p>FL</text:p>
          </table:table-cell>
          <table:table-cell>
            <text:p/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oledo</text:p>
          </table:table-cell>
          <table:table-cell>
            <text:p>OH</text:p>
          </table:table-cell>
          <table:table-cell>
            <text:p/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esapeake</text:p>
          </table:table-cell>
          <table:table-cell>
            <text:p>VA</text:p>
          </table:table-cell>
          <table:table-cell>
            <text:p/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oise City</text:p>
          </table:table-cell>
          <table:table-cell>
            <text:p>ID</text:p>
          </table:table-cell>
          <table:table-cell>
            <text:p/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