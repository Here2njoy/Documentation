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able:1.0" xmlns:ns5="urn:oasis:names:tc:opendocument:xmlns:datastyle:1.0" xmlns:ns6="urn:org:documentfoundation:names:experimental:calc:xmlns:calcext:1.0" xmlns:ns7="urn:oasis:names:tc:opendocument:xmlns:text:1.0" ns0:version="1.4">
  <ns0:scripts/>
  <ns0:font-face-decls>
    <ns1:font-face ns1:name="Liberation Sans" ns2:font-family="'Liberation Sans'" ns1:font-family-generic="swiss" ns1:font-pitch="variable"/>
    <ns1:font-face ns1:name="Lucida Sans" ns2:font-family="'Lucida Sans'" ns1:font-family-generic="system" ns1:font-pitch="variable"/>
    <ns1:font-face ns1:name="Microsoft YaHei" ns2:font-family="'Microsoft YaHei'" ns1:font-family-generic="system" ns1:font-pitch="variable"/>
  </ns0:font-face-decls>
  <ns0:automatic-styles>
    <ns1:style ns1:name="co1" ns1:family="table-column">
      <ns1:table-column-properties ns3:break-before="auto" ns1:column-width="0.889in"/>
    </ns1:style>
    <ns1:style ns1:name="ro1" ns1:family="table-row">
      <ns1:table-row-properties ns1:row-height="0.178in" ns3:break-before="auto" ns1:use-optimal-row-height="true"/>
    </ns1:style>
    <ns1:style ns1:name="ta1" ns1:family="table" ns1:master-page-name="Default">
      <ns1:table-properties ns4:display="true" ns1:writing-mode="lr-tb"/>
    </ns1:style>
    <ns5:number-style ns1:name="N1">
      <ns5:number ns5:decimal-places="0" ns5:min-decimal-places="0" ns5:min-integer-digits="1"/>
    </ns5:number-style>
    <ns1:style ns1:name="ce1" ns1:family="table-cell" ns1:parent-style-name="Default" ns1:data-style-name="N1"/>
  </ns0:automatic-styles>
  <ns0:body>
    <ns0:spreadsheet>
      <ns4:table ns4:name="Cities" ns4:style-name="ta1">
        <ns4:table-column ns4:style-name="co1" ns4:number-columns-repeated="3" ns4:default-cell-style-name="Default"/>
        <ns4:table-column ns4:style-name="co1" ns4:default-cell-style-name="ce1"/>
        <ns4:table-column ns4:style-name="co1" ns4:number-columns-repeated="9" ns4:default-cell-style-name="Default"/>
        <ns4:table-row ns4:style-name="ro1">
          <ns4:table-cell ns0:value-type="string" ns6:value-type="string">
            <ns7:p>rank</ns7:p>
          </ns4:table-cell>
          <ns4:table-cell ns0:value-type="string" ns6:value-type="string">
            <ns7:p>city</ns7:p>
          </ns4:table-cell>
          <ns4:table-cell ns0:value-type="string" ns6:value-type="string">
            <ns7:p>state_abbr</ns7:p>
          </ns4:table-cell>
          <ns4:table-cell ns0:value-type="string" ns6:value-type="string">
            <ns7:p>pop_current</ns7:p>
          </ns4:table-cell>
          <ns4:table-cell ns0:value-type="string" ns6:value-type="string">
            <ns7:p>company</ns7:p>
          </ns4:table-cell>
          <ns4:table-cell ns0:value-type="string" ns6:value-type="string">
            <ns7:p>phone</ns7:p>
          </ns4:table-cell>
          <ns4:table-cell ns0:value-type="string" ns6:value-type="string">
            <ns7:p>email</ns7:p>
          </ns4:table-cell>
          <ns4:table-cell ns0:value-type="string" ns6:value-type="string">
            <ns7:p>website link</ns7:p>
          </ns4:table-cell>
          <ns4:table-cell ns0:value-type="string" ns6:value-type="string">
            <ns7:p>address</ns7:p>
          </ns4:table-cell>
          <ns4:table-cell ns0:value-type="string" ns6:value-type="string">
            <ns7:p>star rating</ns7:p>
          </ns4:table-cell>
          <ns4:table-cell ns0:value-type="string" ns6:value-type="string">
            <ns7:p>family owned</ns7:p>
          </ns4:table-cell>
          <ns4:table-cell ns0:value-type="string" ns6:value-type="string">
            <ns7:p>year in biz</ns7:p>
          </ns4:table-cell>
          <ns4:table-cell ns0:value-type="string" ns6:value-type="string">
            <ns7:p>platform found on</ns7:p>
          </ns4:table-cell>
        </ns4:table-row>
        <ns4:table-row ns4:style-name="ro1">
          <ns4:table-cell ns0:value-type="string" ns6:value-type="string">
            <ns7:p>1.0</ns7:p>
          </ns4:table-cell>
          <ns4:table-cell ns0:value-type="string" ns6:value-type="string">
            <ns7:p>New York</ns7:p>
          </ns4:table-cell>
          <ns4:table-cell ns0:value-type="string" ns6:value-type="string">
            <ns7:p>NY</ns7:p>
          </ns4:table-cell>
          <ns4:table-cell ns0:value-type="string" ns6:value-type="string">
            <ns7:p>8584629</ns7:p>
          </ns4:table-cell>
          <ns4:table-cell ns4:number-columns-repeated="9">
            <ns7:p>A Good Plumber Inc.</ns7:p>
          </ns4:table-cell>
        </ns4:table-row>
        <ns4:table-row ns4:style-name="ro1">
          <ns4:table-cell ns0:value-type="string" ns6:value-type="string">
            <ns7:p>2.0</ns7:p>
          </ns4:table-cell>
          <ns4:table-cell ns0:value-type="string" ns6:value-type="string">
            <ns7:p>Los Angeles</ns7:p>
          </ns4:table-cell>
          <ns4:table-cell ns0:value-type="string" ns6:value-type="string">
            <ns7:p>CA</ns7:p>
          </ns4:table-cell>
          <ns4:table-cell ns0:value-type="string" ns6:value-type="string">
            <ns7:p>3869089</ns7:p>
          </ns4:table-cell>
          <ns4:table-cell ns4:number-columns-repeated="9">
            <ns7:p>Advantage Plumbing &amp; Rooter</ns7:p>
          </ns4:table-cell>
        </ns4:table-row>
        <ns4:table-row ns4:style-name="ro1">
          <ns4:table-cell ns0:value-type="string" ns6:value-type="string">
            <ns7:p>3.0</ns7:p>
          </ns4:table-cell>
          <ns4:table-cell ns0:value-type="string" ns6:value-type="string">
            <ns7:p>Chicago</ns7:p>
          </ns4:table-cell>
          <ns4:table-cell ns0:value-type="string" ns6:value-type="string">
            <ns7:p>IL</ns7:p>
          </ns4:table-cell>
          <ns4:table-cell ns0:value-type="string" ns6:value-type="string">
            <ns7:p>2731585</ns7:p>
          </ns4:table-cell>
          <ns4:table-cell ns4:number-columns-repeated="9">
            <ns7:p>Jim Wagner Plumbing Inc.</ns7:p>
          </ns4:table-cell>
        </ns4:table-row>
        <ns4:table-row ns4:style-name="ro1">
          <ns4:table-cell ns0:value-type="string" ns6:value-type="string">
            <ns7:p>4.0</ns7:p>
          </ns4:table-cell>
          <ns4:table-cell ns0:value-type="string" ns6:value-type="string">
            <ns7:p>Houston</ns7:p>
          </ns4:table-cell>
          <ns4:table-cell ns0:value-type="string" ns6:value-type="string">
            <ns7:p>TX</ns7:p>
          </ns4:table-cell>
          <ns4:table-cell ns0:value-type="string" ns6:value-type="string">
            <ns7:p>2397315</ns7:p>
          </ns4:table-cell>
          <ns4:table-cell ns4:number-columns-repeated="9">
            <ns7:p>Texas Quality Plumbing</ns7:p>
          </ns4:table-cell>
        </ns4:table-row>
        <ns4:table-row ns4:style-name="ro1">
          <ns4:table-cell ns0:value-type="string" ns6:value-type="string">
            <ns7:p>5.0</ns7:p>
          </ns4:table-cell>
          <ns4:table-cell ns0:value-type="string" ns6:value-type="string">
            <ns7:p>Phoenix</ns7:p>
          </ns4:table-cell>
          <ns4:table-cell ns0:value-type="string" ns6:value-type="string">
            <ns7:p>AZ</ns7:p>
          </ns4:table-cell>
          <ns4:table-cell ns0:value-type="string" ns6:value-type="string">
            <ns7:p>1665481</ns7:p>
          </ns4:table-cell>
          <ns4:table-cell ns4:number-columns-repeated="9">
            <ns7:p>Lawson Family Plumbing</ns7:p>
          </ns4:table-cell>
        </ns4:table-row>
        <ns4:table-row ns4:style-name="ro1">
          <ns4:table-cell ns0:value-type="string" ns6:value-type="string">
            <ns7:p>6.0</ns7:p>
          </ns4:table-cell>
          <ns4:table-cell ns0:value-type="string" ns6:value-type="string">
            <ns7:p>Philadelphia</ns7:p>
          </ns4:table-cell>
          <ns4:table-cell ns0:value-type="string" ns6:value-type="string">
            <ns7:p>PA</ns7:p>
          </ns4:table-cell>
          <ns4:table-cell ns0:value-type="string" ns6:value-type="string">
            <ns7:p>1574281</ns7:p>
          </ns4:table-cell>
          <ns4:table-cell ns4:number-columns-repeated="9">
            <ns7:p>Goodman Plumbing</ns7:p>
          </ns4:table-cell>
        </ns4:table-row>
        <ns4:table-row ns4:style-name="ro1">
          <ns4:table-cell ns0:value-type="string" ns6:value-type="string">
            <ns7:p>7.0</ns7:p>
          </ns4:table-cell>
          <ns4:table-cell ns0:value-type="string" ns6:value-type="string">
            <ns7:p>San Antonio</ns7:p>
          </ns4:table-cell>
          <ns4:table-cell ns0:value-type="string" ns6:value-type="string">
            <ns7:p>TX</ns7:p>
          </ns4:table-cell>
          <ns4:table-cell ns0:value-type="string" ns6:value-type="string">
            <ns7:p>1548422</ns7:p>
          </ns4:table-cell>
          <ns4:table-cell ns4:number-columns-repeated="9">
            <ns7:p>Chambliss Plumbing</ns7:p>
          </ns4:table-cell>
        </ns4:table-row>
        <ns4:table-row ns4:style-name="ro1">
          <ns4:table-cell ns0:value-type="string" ns6:value-type="string">
            <ns7:p>8.0</ns7:p>
          </ns4:table-cell>
          <ns4:table-cell ns0:value-type="string" ns6:value-type="string">
            <ns7:p>San Diego</ns7:p>
          </ns4:table-cell>
          <ns4:table-cell ns0:value-type="string" ns6:value-type="string">
            <ns7:p>CA</ns7:p>
          </ns4:table-cell>
          <ns4:table-cell ns0:value-type="string" ns6:value-type="string">
            <ns7:p>1406106</ns7:p>
          </ns4:table-cell>
          <ns4:table-cell ns4:number-columns-repeated="9">
            <ns7:p>American Plumbing Co</ns7:p>
          </ns4:table-cell>
        </ns4:table-row>
        <ns4:table-row ns4:style-name="ro1">
          <ns4:table-cell ns0:value-type="string" ns6:value-type="string">
            <ns7:p>9.0</ns7:p>
          </ns4:table-cell>
          <ns4:table-cell ns0:value-type="string" ns6:value-type="string">
            <ns7:p>Dallas</ns7:p>
          </ns4:table-cell>
          <ns4:table-cell ns0:value-type="string" ns6:value-type="string">
            <ns7:p>TX</ns7:p>
          </ns4:table-cell>
          <ns4:table-cell ns0:value-type="string" ns6:value-type="string">
            <ns7:p>1329491</ns7:p>
          </ns4:table-cell>
          <ns4:table-cell ns4:number-columns-repeated="9">
            <ns7:p>Baker Brothers Plumbing</ns7:p>
          </ns4:table-cell>
        </ns4:table-row>
        <ns4:table-row ns4:style-name="ro1">
          <ns4:table-cell ns0:value-type="string" ns6:value-type="string">
            <ns7:p>10.0</ns7:p>
          </ns4:table-cell>
          <ns4:table-cell ns0:value-type="string" ns6:value-type="string">
            <ns7:p>Fort Worth</ns7:p>
          </ns4:table-cell>
          <ns4:table-cell ns0:value-type="string" ns6:value-type="string">
            <ns7:p>TX</ns7:p>
          </ns4:table-cell>
          <ns4:table-cell ns0:value-type="string" ns6:value-type="string">
            <ns7:p>1028117</ns7:p>
          </ns4:table-cell>
          <ns4:table-cell ns4:number-columns-repeated="9">
            <ns7:p>Larry Stinson Plumbing &amp; Water Heater Repair</ns7:p>
          </ns4:table-cell>
        </ns4:table-row>
        <ns4:table-row ns4:style-name="ro1">
          <ns4:table-cell ns0:value-type="string" ns6:value-type="string">
            <ns7:p>11.0</ns7:p>
          </ns4:table-cell>
          <ns4:table-cell ns0:value-type="string" ns6:value-type="string">
            <ns7:p>Jacksonville</ns7:p>
          </ns4:table-cell>
          <ns4:table-cell ns0:value-type="string" ns6:value-type="string">
            <ns7:p>FL</ns7:p>
          </ns4:table-cell>
          <ns4:table-cell ns0:value-type="string" ns6:value-type="string">
            <ns7:p>1017689</ns7:p>
          </ns4:table-cell>
          <ns4:table-cell ns4:number-columns-repeated="9"/>
        </ns4:table-row>
        <ns4:table-row ns4:style-name="ro1">
          <ns4:table-cell ns0:value-type="string" ns6:value-type="string">
            <ns7:p>12.0</ns7:p>
          </ns4:table-cell>
          <ns4:table-cell ns0:value-type="string" ns6:value-type="string">
            <ns7:p>Austin</ns7:p>
          </ns4:table-cell>
          <ns4:table-cell ns0:value-type="string" ns6:value-type="string">
            <ns7:p>TX</ns7:p>
          </ns4:table-cell>
          <ns4:table-cell ns0:value-type="string" ns6:value-type="string">
            <ns7:p>1002632</ns7:p>
          </ns4:table-cell>
          <ns4:table-cell ns4:number-columns-repeated="9">
            <ns7:p>Austin's Best Plumbing</ns7:p>
          </ns4:table-cell>
        </ns4:table-row>
        <ns4:table-row ns4:style-name="ro1">
          <ns4:table-cell ns0:value-type="string" ns6:value-type="string">
            <ns7:p>13.0</ns7:p>
          </ns4:table-cell>
          <ns4:table-cell ns0:value-type="string" ns6:value-type="string">
            <ns7:p>San Jose</ns7:p>
          </ns4:table-cell>
          <ns4:table-cell ns0:value-type="string" ns6:value-type="string">
            <ns7:p>CA</ns7:p>
          </ns4:table-cell>
          <ns4:table-cell ns0:value-type="string" ns6:value-type="string">
            <ns7:p>989814</ns7:p>
          </ns4:table-cell>
          <ns4:table-cell ns4:number-columns-repeated="9">
            <ns7:p>San Jose Plumbing Inc.</ns7:p>
          </ns4:table-cell>
        </ns4:table-row>
        <ns4:table-row ns4:style-name="ro1">
          <ns4:table-cell ns0:value-type="string" ns6:value-type="string">
            <ns7:p>14.0</ns7:p>
          </ns4:table-cell>
          <ns4:table-cell ns0:value-type="string" ns6:value-type="string">
            <ns7:p>Charlotte</ns7:p>
          </ns4:table-cell>
          <ns4:table-cell ns0:value-type="string" ns6:value-type="string">
            <ns7:p>NC</ns7:p>
          </ns4:table-cell>
          <ns4:table-cell ns0:value-type="string" ns6:value-type="string">
            <ns7:p>964784</ns7:p>
          </ns4:table-cell>
          <ns4:table-cell ns4:number-columns-repeated="9">
            <ns7:p>WyattWorks Plumbing Charlotte</ns7:p>
          </ns4:table-cell>
        </ns4:table-row>
        <ns4:table-row ns4:style-name="ro1">
          <ns4:table-cell ns0:value-type="string" ns6:value-type="string">
            <ns7:p>15.0</ns7:p>
          </ns4:table-cell>
          <ns4:table-cell ns0:value-type="string" ns6:value-type="string">
            <ns7:p>Columbus</ns7:p>
          </ns4:table-cell>
          <ns4:table-cell ns0:value-type="string" ns6:value-type="string">
            <ns7:p>OH</ns7:p>
          </ns4:table-cell>
          <ns4:table-cell ns0:value-type="string" ns6:value-type="string">
            <ns7:p>938396</ns7:p>
          </ns4:table-cell>
          <ns4:table-cell ns4:number-columns-repeated="9"/>
        </ns4:table-row>
        <ns4:table-row ns4:style-name="ro1">
          <ns4:table-cell ns0:value-type="string" ns6:value-type="string">
            <ns7:p>16.0</ns7:p>
          </ns4:table-cell>
          <ns4:table-cell ns0:value-type="string" ns6:value-type="string">
            <ns7:p>Indianapolis</ns7:p>
          </ns4:table-cell>
          <ns4:table-cell ns0:value-type="string" ns6:value-type="string">
            <ns7:p>IN</ns7:p>
          </ns4:table-cell>
          <ns4:table-cell ns0:value-type="string" ns6:value-type="string">
            <ns7:p>910638</ns7:p>
          </ns4:table-cell>
          <ns4:table-cell ns4:number-columns-repeated="9"/>
        </ns4:table-row>
        <ns4:table-row ns4:style-name="ro1">
          <ns4:table-cell ns0:value-type="string" ns6:value-type="string">
            <ns7:p>17.0</ns7:p>
          </ns4:table-cell>
          <ns4:table-cell ns0:value-type="string" ns6:value-type="string">
            <ns7:p>San Francisco</ns7:p>
          </ns4:table-cell>
          <ns4:table-cell ns0:value-type="string" ns6:value-type="string">
            <ns7:p>CA</ns7:p>
          </ns4:table-cell>
          <ns4:table-cell ns0:value-type="string" ns6:value-type="string">
            <ns7:p>826079</ns7:p>
          </ns4:table-cell>
          <ns4:table-cell ns4:number-columns-repeated="9"/>
        </ns4:table-row>
        <ns4:table-row ns4:style-name="ro1">
          <ns4:table-cell ns0:value-type="string" ns6:value-type="string">
            <ns7:p>18.0</ns7:p>
          </ns4:table-cell>
          <ns4:table-cell ns0:value-type="string" ns6:value-type="string">
            <ns7:p>Louisville</ns7:p>
          </ns4:table-cell>
          <ns4:table-cell ns0:value-type="string" ns6:value-type="string">
            <ns7:p>KY</ns7:p>
          </ns4:table-cell>
          <ns4:table-cell ns0:value-type="string" ns6:value-type="string">
            <ns7:p>795222</ns7:p>
          </ns4:table-cell>
          <ns4:table-cell ns4:number-columns-repeated="9">
            <ns7:p>Bryant &amp; Sons Plumbing</ns7:p>
          </ns4:table-cell>
        </ns4:table-row>
        <ns4:table-row ns4:style-name="ro1">
          <ns4:table-cell ns0:value-type="string" ns6:value-type="string">
            <ns7:p>19.0</ns7:p>
          </ns4:table-cell>
          <ns4:table-cell ns0:value-type="string" ns6:value-type="string">
            <ns7:p>Seattle</ns7:p>
          </ns4:table-cell>
          <ns4:table-cell ns0:value-type="string" ns6:value-type="string">
            <ns7:p>WA</ns7:p>
          </ns4:table-cell>
          <ns4:table-cell ns0:value-type="string" ns6:value-type="string">
            <ns7:p>784777</ns7:p>
          </ns4:table-cell>
          <ns4:table-cell ns4:number-columns-repeated="9">
            <ns7:p>Ballard Plumbing</ns7:p>
          </ns4:table-cell>
        </ns4:table-row>
        <ns4:table-row ns4:style-name="ro1">
          <ns4:table-cell ns0:value-type="string" ns6:value-type="string">
            <ns7:p>20.0</ns7:p>
          </ns4:table-cell>
          <ns4:table-cell ns0:value-type="string" ns6:value-type="string">
            <ns7:p>Nashville</ns7:p>
          </ns4:table-cell>
          <ns4:table-cell ns0:value-type="string" ns6:value-type="string">
            <ns7:p>TN</ns7:p>
          </ns4:table-cell>
          <ns4:table-cell ns0:value-type="string" ns6:value-type="string">
            <ns7:p>745904</ns7:p>
          </ns4:table-cell>
          <ns4:table-cell ns4:number-columns-repeated="9">
            <ns7:p>Southern Plumbing Works</ns7:p>
          </ns4:table-cell>
        </ns4:table-row>
        <ns4:table-row ns4:style-name="ro1">
          <ns4:table-cell ns0:value-type="string" ns6:value-type="string">
            <ns7:p>21.0</ns7:p>
          </ns4:table-cell>
          <ns4:table-cell ns0:value-type="string" ns6:value-type="string">
            <ns7:p>Denver</ns7:p>
          </ns4:table-cell>
          <ns4:table-cell ns0:value-type="string" ns6:value-type="string">
            <ns7:p>CO</ns7:p>
          </ns4:table-cell>
          <ns4:table-cell ns0:value-type="string" ns6:value-type="string">
            <ns7:p>740613</ns7:p>
          </ns4:table-cell>
          <ns4:table-cell ns4:number-columns-repeated="9">
            <ns7:p>Applewood Plumbing</ns7:p>
          </ns4:table-cell>
        </ns4:table-row>
        <ns4:table-row ns4:style-name="ro1">
          <ns4:table-cell ns0:value-type="string" ns6:value-type="string">
            <ns7:p>22.0</ns7:p>
          </ns4:table-cell>
          <ns4:table-cell ns0:value-type="string" ns6:value-type="string">
            <ns7:p>Oklahoma City</ns7:p>
          </ns4:table-cell>
          <ns4:table-cell ns0:value-type="string" ns6:value-type="string">
            <ns7:p>OK</ns7:p>
          </ns4:table-cell>
          <ns4:table-cell ns0:value-type="string" ns6:value-type="string">
            <ns7:p>719849</ns7:p>
          </ns4:table-cell>
          <ns4:table-cell ns4:number-columns-repeated="9"/>
        </ns4:table-row>
        <ns4:table-row ns4:style-name="ro1">
          <ns4:table-cell ns0:value-type="string" ns6:value-type="string">
            <ns7:p>24.0</ns7:p>
          </ns4:table-cell>
          <ns4:table-cell ns0:value-type="string" ns6:value-type="string">
            <ns7:p>El Paso</ns7:p>
          </ns4:table-cell>
          <ns4:table-cell ns0:value-type="string" ns6:value-type="string">
            <ns7:p>TX</ns7:p>
          </ns4:table-cell>
          <ns4:table-cell ns0:value-type="string" ns6:value-type="string">
            <ns7:p>683012</ns7:p>
          </ns4:table-cell>
          <ns4:table-cell ns4:number-columns-repeated="9"/>
        </ns4:table-row>
        <ns4:table-row ns4:style-name="ro1">
          <ns4:table-cell ns0:value-type="string" ns6:value-type="string">
            <ns7:p>25.0</ns7:p>
          </ns4:table-cell>
          <ns4:table-cell ns0:value-type="string" ns6:value-type="string">
            <ns7:p>Las Vegas</ns7:p>
          </ns4:table-cell>
          <ns4:table-cell ns0:value-type="string" ns6:value-type="string">
            <ns7:p>NV</ns7:p>
          </ns4:table-cell>
          <ns4:table-cell ns0:value-type="string" ns6:value-type="string">
            <ns7:p>679817</ns7:p>
          </ns4:table-cell>
          <ns4:table-cell ns4:number-columns-repeated="9">
            <ns7:p>Vegas Valley Plumbing</ns7:p>
          </ns4:table-cell>
        </ns4:table-row>
        <ns4:table-row ns4:style-name="ro1">
          <ns4:table-cell ns0:value-type="string" ns6:value-type="string">
            <ns7:p>26.0</ns7:p>
          </ns4:table-cell>
          <ns4:table-cell ns0:value-type="string" ns6:value-type="string">
            <ns7:p>Boston</ns7:p>
          </ns4:table-cell>
          <ns4:table-cell ns0:value-type="string" ns6:value-type="string">
            <ns7:p>MA</ns7:p>
          </ns4:table-cell>
          <ns4:table-cell ns0:value-type="string" ns6:value-type="string">
            <ns7:p>672973</ns7:p>
          </ns4:table-cell>
          <ns4:table-cell ns4:number-columns-repeated="9">
            <ns7:p>Vaughan Plumbing &amp; Heating</ns7:p>
          </ns4:table-cell>
        </ns4:table-row>
        <ns4:table-row ns4:style-name="ro1">
          <ns4:table-cell ns0:value-type="string" ns6:value-type="string">
            <ns7:p>27.0</ns7:p>
          </ns4:table-cell>
          <ns4:table-cell ns0:value-type="string" ns6:value-type="string">
            <ns7:p>Detroit</ns7:p>
          </ns4:table-cell>
          <ns4:table-cell ns0:value-type="string" ns6:value-type="string">
            <ns7:p>MI</ns7:p>
          </ns4:table-cell>
          <ns4:table-cell ns0:value-type="string" ns6:value-type="string">
            <ns7:p>649095</ns7:p>
          </ns4:table-cell>
          <ns4:table-cell ns4:number-columns-repeated="9"/>
        </ns4:table-row>
        <ns4:table-row ns4:style-name="ro1">
          <ns4:table-cell ns0:value-type="string" ns6:value-type="string">
            <ns7:p>28.0</ns7:p>
          </ns4:table-cell>
          <ns4:table-cell ns0:value-type="string" ns6:value-type="string">
            <ns7:p>Portland</ns7:p>
          </ns4:table-cell>
          <ns4:table-cell ns0:value-type="string" ns6:value-type="string">
            <ns7:p>OR</ns7:p>
          </ns4:table-cell>
          <ns4:table-cell ns0:value-type="string" ns6:value-type="string">
            <ns7:p>635109</ns7:p>
          </ns4:table-cell>
          <ns4:table-cell ns4:number-columns-repeated="9">
            <ns7:p>Service Plus Plumbing</ns7:p>
          </ns4:table-cell>
        </ns4:table-row>
        <ns4:table-row ns4:style-name="ro1">
          <ns4:table-cell ns0:value-type="string" ns6:value-type="string">
            <ns7:p>29.0</ns7:p>
          </ns4:table-cell>
          <ns4:table-cell ns0:value-type="string" ns6:value-type="string">
            <ns7:p>Memphis</ns7:p>
          </ns4:table-cell>
          <ns4:table-cell ns0:value-type="string" ns6:value-type="string">
            <ns7:p>TN</ns7:p>
          </ns4:table-cell>
          <ns4:table-cell ns0:value-type="string" ns6:value-type="string">
            <ns7:p>609647</ns7:p>
          </ns4:table-cell>
          <ns4:table-cell ns4:number-columns-repeated="9">
            <ns7:p>Memphis Plumbing</ns7:p>
          </ns4:table-cell>
        </ns4:table-row>
        <ns4:table-row ns4:style-name="ro1">
          <ns4:table-cell ns0:value-type="string" ns6:value-type="string">
            <ns7:p>30.0</ns7:p>
          </ns4:table-cell>
          <ns4:table-cell ns0:value-type="string" ns6:value-type="string">
            <ns7:p>Baltimore</ns7:p>
          </ns4:table-cell>
          <ns4:table-cell ns0:value-type="string" ns6:value-type="string">
            <ns7:p>MD</ns7:p>
          </ns4:table-cell>
          <ns4:table-cell ns0:value-type="string" ns6:value-type="string">
            <ns7:p>569997</ns7:p>
          </ns4:table-cell>
          <ns4:table-cell ns4:number-columns-repeated="9">
            <ns7:p>Lyons Plumbing</ns7:p>
          </ns4:table-cell>
        </ns4:table-row>
        <ns4:table-row ns4:style-name="ro1">
          <ns4:table-cell ns0:value-type="string" ns6:value-type="string">
            <ns7:p>31.0</ns7:p>
          </ns4:table-cell>
          <ns4:table-cell ns0:value-type="string" ns6:value-type="string">
            <ns7:p>Milwaukee</ns7:p>
          </ns4:table-cell>
          <ns4:table-cell ns0:value-type="string" ns6:value-type="string">
            <ns7:p>WI</ns7:p>
          </ns4:table-cell>
          <ns4:table-cell ns0:value-type="string" ns6:value-type="string">
            <ns7:p>562407</ns7:p>
          </ns4:table-cell>
          <ns4:table-cell ns4:number-columns-repeated="9">
            <ns7:p>J J's Plumbing Repair</ns7:p>
          </ns4:table-cell>
        </ns4:table-row>
        <ns4:table-row ns4:style-name="ro1">
          <ns4:table-cell ns0:value-type="string" ns6:value-type="string">
            <ns7:p>32.0</ns7:p>
          </ns4:table-cell>
          <ns4:table-cell ns0:value-type="string" ns6:value-type="string">
            <ns7:p>Albuquerque</ns7:p>
          </ns4:table-cell>
          <ns4:table-cell ns0:value-type="string" ns6:value-type="string">
            <ns7:p>NM</ns7:p>
          </ns4:table-cell>
          <ns4:table-cell ns0:value-type="string" ns6:value-type="string">
            <ns7:p>556588</ns7:p>
          </ns4:table-cell>
          <ns4:table-cell ns4:number-columns-repeated="9">
            <ns7:p>TLC Plumbing Heating Cooling Electrical</ns7:p>
          </ns4:table-cell>
        </ns4:table-row>
        <ns4:table-row ns4:style-name="ro1">
          <ns4:table-cell ns0:value-type="string" ns6:value-type="string">
            <ns7:p>33.0</ns7:p>
          </ns4:table-cell>
          <ns4:table-cell ns0:value-type="string" ns6:value-type="string">
            <ns7:p>Fresno</ns7:p>
          </ns4:table-cell>
          <ns4:table-cell ns0:value-type="string" ns6:value-type="string">
            <ns7:p>CA</ns7:p>
          </ns4:table-cell>
          <ns4:table-cell ns0:value-type="string" ns6:value-type="string">
            <ns7:p>555549</ns7:p>
          </ns4:table-cell>
          <ns4:table-cell ns4:number-columns-repeated="9">
            <ns7:p>Fresno Plumbing</ns7:p>
          </ns4:table-cell>
        </ns4:table-row>
        <ns4:table-row ns4:style-name="ro1">
          <ns4:table-cell ns0:value-type="string" ns6:value-type="string">
            <ns7:p>34.0</ns7:p>
          </ns4:table-cell>
          <ns4:table-cell ns0:value-type="string" ns6:value-type="string">
            <ns7:p>Tucson</ns7:p>
          </ns4:table-cell>
          <ns4:table-cell ns0:value-type="string" ns6:value-type="string">
            <ns7:p>AZ</ns7:p>
          </ns4:table-cell>
          <ns4:table-cell ns0:value-type="string" ns6:value-type="string">
            <ns7:p>548371</ns7:p>
          </ns4:table-cell>
          <ns4:table-cell ns4:number-columns-repeated="9">
            <ns7:p>Jobe &amp; Sons Plumbing</ns7:p>
          </ns4:table-cell>
        </ns4:table-row>
        <ns4:table-row ns4:style-name="ro1">
          <ns4:table-cell ns0:value-type="string" ns6:value-type="string">
            <ns7:p>35.0</ns7:p>
          </ns4:table-cell>
          <ns4:table-cell ns0:value-type="string" ns6:value-type="string">
            <ns7:p>Sacramento</ns7:p>
          </ns4:table-cell>
          <ns4:table-cell ns0:value-type="string" ns6:value-type="string">
            <ns7:p>CA</ns7:p>
          </ns4:table-cell>
          <ns4:table-cell ns0:value-type="string" ns6:value-type="string">
            <ns7:p>536449</ns7:p>
          </ns4:table-cell>
          <ns4:table-cell ns4:number-columns-repeated="9">
            <ns7:p>Sacramento Plumbing</ns7:p>
          </ns4:table-cell>
        </ns4:table-row>
        <ns4:table-row ns4:style-name="ro1">
          <ns4:table-cell ns0:value-type="string" ns6:value-type="string">
            <ns7:p>36.0</ns7:p>
          </ns4:table-cell>
          <ns4:table-cell ns0:value-type="string" ns6:value-type="string">
            <ns7:p>Atlanta</ns7:p>
          </ns4:table-cell>
          <ns4:table-cell ns0:value-type="string" ns6:value-type="string">
            <ns7:p>GA</ns7:p>
          </ns4:table-cell>
          <ns4:table-cell ns0:value-type="string" ns6:value-type="string">
            <ns7:p>529110</ns7:p>
          </ns4:table-cell>
          <ns4:table-cell ns4:number-columns-repeated="9">
            <ns7:p>Head's Plumbing Sales &amp; Service</ns7:p>
          </ns4:table-cell>
        </ns4:table-row>
        <ns4:table-row ns4:style-name="ro1">
          <ns4:table-cell ns0:value-type="string" ns6:value-type="string">
            <ns7:p>37.0</ns7:p>
          </ns4:table-cell>
          <ns4:table-cell ns0:value-type="string" ns6:value-type="string">
            <ns7:p>Kansas City</ns7:p>
          </ns4:table-cell>
          <ns4:table-cell ns0:value-type="string" ns6:value-type="string">
            <ns7:p>MO</ns7:p>
          </ns4:table-cell>
          <ns4:table-cell ns0:value-type="string" ns6:value-type="string">
            <ns7:p>521220</ns7:p>
          </ns4:table-cell>
          <ns4:table-cell ns4:number-columns-repeated="9">
            <ns7:p>Stine-Nichols Plumbing</ns7:p>
          </ns4:table-cell>
        </ns4:table-row>
        <ns4:table-row ns4:style-name="ro1">
          <ns4:table-cell ns0:value-type="string" ns6:value-type="string">
            <ns7:p>38.0</ns7:p>
          </ns4:table-cell>
          <ns4:table-cell ns0:value-type="string" ns6:value-type="string">
            <ns7:p>Mesa</ns7:p>
          </ns4:table-cell>
          <ns4:table-cell ns0:value-type="string" ns6:value-type="string">
            <ns7:p>AZ</ns7:p>
          </ns4:table-cell>
          <ns4:table-cell ns0:value-type="string" ns6:value-type="string">
            <ns7:p>513656</ns7:p>
          </ns4:table-cell>
          <ns4:table-cell ns4:number-columns-repeated="9">
            <ns7:p>Goettl Plumbing</ns7:p>
          </ns4:table-cell>
        </ns4:table-row>
        <ns4:table-row ns4:style-name="ro1">
          <ns4:table-cell ns0:value-type="string" ns6:value-type="string">
            <ns7:p>39.0</ns7:p>
          </ns4:table-cell>
          <ns4:table-cell ns0:value-type="string" ns6:value-type="string">
            <ns7:p>Raleigh</ns7:p>
          </ns4:table-cell>
          <ns4:table-cell ns0:value-type="string" ns6:value-type="string">
            <ns7:p>NC</ns7:p>
          </ns4:table-cell>
          <ns4:table-cell ns0:value-type="string" ns6:value-type="string">
            <ns7:p>506306</ns7:p>
          </ns4:table-cell>
          <ns4:table-cell ns4:number-columns-repeated="9">
            <ns7:p>William Parrish Plumbing</ns7:p>
          </ns4:table-cell>
        </ns4:table-row>
        <ns4:table-row ns4:style-name="ro1">
          <ns4:table-cell ns0:value-type="string" ns6:value-type="string">
            <ns7:p>40.0</ns7:p>
          </ns4:table-cell>
          <ns4:table-cell ns0:value-type="string" ns6:value-type="string">
            <ns7:p>Colorado Springs</ns7:p>
          </ns4:table-cell>
          <ns4:table-cell ns0:value-type="string" ns6:value-type="string">
            <ns7:p>CO</ns7:p>
          </ns4:table-cell>
          <ns4:table-cell ns0:value-type="string" ns6:value-type="string">
            <ns7:p>494743</ns7:p>
          </ns4:table-cell>
          <ns4:table-cell ns4:number-columns-repeated="9"/>
        </ns4:table-row>
        <ns4:table-row ns4:style-name="ro1">
          <ns4:table-cell ns0:value-type="string" ns6:value-type="string">
            <ns7:p>41.0</ns7:p>
          </ns4:table-cell>
          <ns4:table-cell ns0:value-type="string" ns6:value-type="string">
            <ns7:p>Miami</ns7:p>
          </ns4:table-cell>
          <ns4:table-cell ns0:value-type="string" ns6:value-type="string">
            <ns7:p>FL</ns7:p>
          </ns4:table-cell>
          <ns4:table-cell ns0:value-type="string" ns6:value-type="string">
            <ns7:p>489812</ns7:p>
          </ns4:table-cell>
          <ns4:table-cell ns4:number-columns-repeated="9">
            <ns7:p>Miami Dade Plumbing</ns7:p>
          </ns4:table-cell>
        </ns4:table-row>
        <ns4:table-row ns4:style-name="ro1">
          <ns4:table-cell ns0:value-type="string" ns6:value-type="string">
            <ns7:p>42.0</ns7:p>
          </ns4:table-cell>
          <ns4:table-cell ns0:value-type="string" ns6:value-type="string">
            <ns7:p>Omaha</ns7:p>
          </ns4:table-cell>
          <ns4:table-cell ns0:value-type="string" ns6:value-type="string">
            <ns7:p>NE</ns7:p>
          </ns4:table-cell>
          <ns4:table-cell ns0:value-type="string" ns6:value-type="string">
            <ns7:p>488797</ns7:p>
          </ns4:table-cell>
          <ns4:table-cell ns4:number-columns-repeated="9">
            <ns7:p>Grayson Plumbing</ns7:p>
          </ns4:table-cell>
        </ns4:table-row>
        <ns4:table-row ns4:style-name="ro1">
          <ns4:table-cell ns0:value-type="string" ns6:value-type="string">
            <ns7:p>43.0</ns7:p>
          </ns4:table-cell>
          <ns4:table-cell ns0:value-type="string" ns6:value-type="string">
            <ns7:p>Virginia Beach</ns7:p>
          </ns4:table-cell>
          <ns4:table-cell ns0:value-type="string" ns6:value-type="string">
            <ns7:p>VA</ns7:p>
          </ns4:table-cell>
          <ns4:table-cell ns0:value-type="string" ns6:value-type="string">
            <ns7:p>453737</ns7:p>
          </ns4:table-cell>
          <ns4:table-cell ns4:number-columns-repeated="9"/>
        </ns4:table-row>
        <ns4:table-row ns4:style-name="ro1">
          <ns4:table-cell ns0:value-type="string" ns6:value-type="string">
            <ns7:p>44.0</ns7:p>
          </ns4:table-cell>
          <ns4:table-cell ns0:value-type="string" ns6:value-type="string">
            <ns7:p>Long Beach</ns7:p>
          </ns4:table-cell>
          <ns4:table-cell ns0:value-type="string" ns6:value-type="string">
            <ns7:p>CA</ns7:p>
          </ns4:table-cell>
          <ns4:table-cell ns0:value-type="string" ns6:value-type="string">
            <ns7:p>450469</ns7:p>
          </ns4:table-cell>
          <ns4:table-cell ns4:number-columns-repeated="9">
            <ns7:p>The Family Plumber</ns7:p>
          </ns4:table-cell>
        </ns4:table-row>
        <ns4:table-row ns4:style-name="ro1">
          <ns4:table-cell ns0:value-type="string" ns6:value-type="string">
            <ns7:p>45.0</ns7:p>
          </ns4:table-cell>
          <ns4:table-cell ns0:value-type="string" ns6:value-type="string">
            <ns7:p>Oakland</ns7:p>
          </ns4:table-cell>
          <ns4:table-cell ns0:value-type="string" ns6:value-type="string">
            <ns7:p>CA</ns7:p>
          </ns4:table-cell>
          <ns4:table-cell ns0:value-type="string" ns6:value-type="string">
            <ns7:p>440838</ns7:p>
          </ns4:table-cell>
          <ns4:table-cell ns4:number-columns-repeated="9">
            <ns7:p>Fazule and Sons Plumbing</ns7:p>
          </ns4:table-cell>
        </ns4:table-row>
        <ns4:table-row ns4:style-name="ro1">
          <ns4:table-cell ns0:value-type="string" ns6:value-type="string">
            <ns7:p>46.0</ns7:p>
          </ns4:table-cell>
          <ns4:table-cell ns0:value-type="string" ns6:value-type="string">
            <ns7:p>Minneapolis</ns7:p>
          </ns4:table-cell>
          <ns4:table-cell ns0:value-type="string" ns6:value-type="string">
            <ns7:p>MN</ns7:p>
          </ns4:table-cell>
          <ns4:table-cell ns0:value-type="string" ns6:value-type="string">
            <ns7:p>430324</ns7:p>
          </ns4:table-cell>
          <ns4:table-cell ns4:number-columns-repeated="9"/>
        </ns4:table-row>
        <ns4:table-row ns4:style-name="ro1">
          <ns4:table-cell ns0:value-type="string" ns6:value-type="string">
            <ns7:p>47.0</ns7:p>
          </ns4:table-cell>
          <ns4:table-cell ns0:value-type="string" ns6:value-type="string">
            <ns7:p>Bakersfield</ns7:p>
          </ns4:table-cell>
          <ns4:table-cell ns0:value-type="string" ns6:value-type="string">
            <ns7:p>CA</ns7:p>
          </ns4:table-cell>
          <ns4:table-cell ns0:value-type="string" ns6:value-type="string">
            <ns7:p>422165</ns7:p>
          </ns4:table-cell>
          <ns4:table-cell ns4:number-columns-repeated="9">
            <ns7:p>Cisneros Brothers Plumbing</ns7:p>
          </ns4:table-cell>
        </ns4:table-row>
        <ns4:table-row ns4:style-name="ro1">
          <ns4:table-cell ns0:value-type="string" ns6:value-type="string">
            <ns7:p>48.0</ns7:p>
          </ns4:table-cell>
          <ns4:table-cell ns0:value-type="string" ns6:value-type="string">
            <ns7:p>Tulsa</ns7:p>
          </ns4:table-cell>
          <ns4:table-cell ns0:value-type="string" ns6:value-type="string">
            <ns7:p>OK</ns7:p>
          </ns4:table-cell>
          <ns4:table-cell ns0:value-type="string" ns6:value-type="string">
            <ns7:p>416209</ns7:p>
          </ns4:table-cell>
          <ns4:table-cell ns4:number-columns-repeated="9">
            <ns7:p>Williams Plumbing &amp; Drain Service</ns7:p>
          </ns4:table-cell>
        </ns4:table-row>
        <ns4:table-row ns4:style-name="ro1">
          <ns4:table-cell ns0:value-type="string" ns6:value-type="string">
            <ns7:p>49.0</ns7:p>
          </ns4:table-cell>
          <ns4:table-cell ns0:value-type="string" ns6:value-type="string">
            <ns7:p>Tampa</ns7:p>
          </ns4:table-cell>
          <ns4:table-cell ns0:value-type="string" ns6:value-type="string">
            <ns7:p>FL</ns7:p>
          </ns4:table-cell>
          <ns4:table-cell ns0:value-type="string" ns6:value-type="string">
            <ns7:p>413554</ns7:p>
          </ns4:table-cell>
          <ns4:table-cell ns4:number-columns-repeated="9">
            <ns7:p>Olin Plumbing Inc.</ns7:p>
          </ns4:table-cell>
        </ns4:table-row>
        <ns4:table-row ns4:style-name="ro1">
          <ns4:table-cell ns0:value-type="string" ns6:value-type="string">
            <ns7:p>50.0</ns7:p>
          </ns4:table-cell>
          <ns4:table-cell ns0:value-type="string" ns6:value-type="string">
            <ns7:p>Aurora</ns7:p>
          </ns4:table-cell>
          <ns4:table-cell ns0:value-type="string" ns6:value-type="string">
            <ns7:p>CO</ns7:p>
          </ns4:table-cell>
          <ns4:table-cell ns0:value-type="string" ns6:value-type="string">
            <ns7:p>410053</ns7:p>
          </ns4:table-cell>
          <ns4:table-cell ns4:number-columns-repeated="9">
            <ns7:p>Aurora Plumbing Company</ns7:p>
          </ns4:table-cell>
        </ns4:table-row>
        <ns4:table-row ns4:style-name="ro1">
          <ns4:table-cell ns0:value-type="string" ns6:value-type="string">
            <ns7:p>51.0</ns7:p>
          </ns4:table-cell>
          <ns4:table-cell ns0:value-type="string" ns6:value-type="string">
            <ns7:p>Arlington</ns7:p>
          </ns4:table-cell>
          <ns4:table-cell ns0:value-type="string" ns6:value-type="string">
            <ns7:p>TX</ns7:p>
          </ns4:table-cell>
          <ns4:table-cell ns0:value-type="string" ns6:value-type="string">
            <ns7:p>402134</ns7:p>
          </ns4:table-cell>
          <ns4:table-cell ns4:number-columns-repeated="9">
            <ns7:p>Family Friends Plumbing Service</ns7:p>
          </ns4:table-cell>
        </ns4:table-row>
        <ns4:table-row ns4:style-name="ro1">
          <ns4:table-cell ns0:value-type="string" ns6:value-type="string">
            <ns7:p>52.0</ns7:p>
          </ns4:table-cell>
          <ns4:table-cell ns0:value-type="string" ns6:value-type="string">
            <ns7:p>Wichita</ns7:p>
          </ns4:table-cell>
          <ns4:table-cell ns0:value-type="string" ns6:value-type="string">
            <ns7:p>KS</ns7:p>
          </ns4:table-cell>
          <ns4:table-cell ns0:value-type="string" ns6:value-type="string">
            <ns7:p>400987</ns7:p>
          </ns4:table-cell>
          <ns4:table-cell ns4:number-columns-repeated="9"/>
        </ns4:table-row>
        <ns4:table-row ns4:style-name="ro1">
          <ns4:table-cell ns0:value-type="string" ns6:value-type="string">
            <ns7:p>53.0</ns7:p>
          </ns4:table-cell>
          <ns4:table-cell ns0:value-type="string" ns6:value-type="string">
            <ns7:p>Cleveland</ns7:p>
          </ns4:table-cell>
          <ns4:table-cell ns0:value-type="string" ns6:value-type="string">
            <ns7:p>OH</ns7:p>
          </ns4:table-cell>
          <ns4:table-cell ns0:value-type="string" ns6:value-type="string">
            <ns7:p>363608</ns7:p>
          </ns4:table-cell>
          <ns4:table-cell ns4:number-columns-repeated="9"/>
        </ns4:table-row>
        <ns4:table-row ns4:style-name="ro1">
          <ns4:table-cell ns0:value-type="string" ns6:value-type="string">
            <ns7:p>54.0</ns7:p>
          </ns4:table-cell>
          <ns4:table-cell ns0:value-type="string" ns6:value-type="string">
            <ns7:p>New Orleans</ns7:p>
          </ns4:table-cell>
          <ns4:table-cell ns0:value-type="string" ns6:value-type="string">
            <ns7:p>LA</ns7:p>
          </ns4:table-cell>
          <ns4:table-cell ns0:value-type="string" ns6:value-type="string">
            <ns7:p>362154</ns7:p>
          </ns4:table-cell>
          <ns4:table-cell ns4:number-columns-repeated="9">
            <ns7:p>Noel's Plumbing, LLC.</ns7:p>
          </ns4:table-cell>
        </ns4:table-row>
        <ns4:table-row ns4:style-name="ro1">
          <ns4:table-cell ns0:value-type="string" ns6:value-type="string">
            <ns7:p>55.0</ns7:p>
          </ns4:table-cell>
          <ns4:table-cell ns0:value-type="string" ns6:value-type="string">
            <ns7:p>Henderson</ns7:p>
          </ns4:table-cell>
          <ns4:table-cell ns0:value-type="string" ns6:value-type="string">
            <ns7:p>NV</ns7:p>
          </ns4:table-cell>
          <ns4:table-cell ns0:value-type="string" ns6:value-type="string">
            <ns7:p>353289</ns7:p>
          </ns4:table-cell>
          <ns4:table-cell ns4:number-columns-repeated="9">
            <ns7:p>Robinson Family Plumbing &amp; HVAC</ns7:p>
          </ns4:table-cell>
        </ns4:table-row>
        <ns4:table-row ns4:style-name="ro1">
          <ns4:table-cell ns0:value-type="string" ns6:value-type="string">
            <ns7:p>56.0</ns7:p>
          </ns4:table-cell>
          <ns4:table-cell ns0:value-type="string" ns6:value-type="string">
            <ns7:p>Honolulu</ns7:p>
          </ns4:table-cell>
          <ns4:table-cell ns0:value-type="string" ns6:value-type="string">
            <ns7:p>HI</ns7:p>
          </ns4:table-cell>
          <ns4:table-cell ns0:value-type="string" ns6:value-type="string">
            <ns7:p>341868</ns7:p>
          </ns4:table-cell>
          <ns4:table-cell ns4:number-columns-repeated="9">
            <ns7:p>Allens Plumbing</ns7:p>
          </ns4:table-cell>
        </ns4:table-row>
        <ns4:table-row ns4:style-name="ro1">
          <ns4:table-cell ns0:value-type="string" ns6:value-type="string">
            <ns7:p>57.0</ns7:p>
          </ns4:table-cell>
          <ns4:table-cell ns0:value-type="string" ns6:value-type="string">
            <ns7:p>Anaheim</ns7:p>
          </ns4:table-cell>
          <ns4:table-cell ns0:value-type="string" ns6:value-type="string">
            <ns7:p>CA</ns7:p>
          </ns4:table-cell>
          <ns4:table-cell ns0:value-type="string" ns6:value-type="string">
            <ns7:p>341008</ns7:p>
          </ns4:table-cell>
          <ns4:table-cell ns4:number-columns-repeated="9">
            <ns7:p>Barker and Sons Plumbing &amp; Rooter</ns7:p>
          </ns4:table-cell>
        </ns4:table-row>
        <ns4:table-row ns4:style-name="ro1">
          <ns4:table-cell ns0:value-type="string" ns6:value-type="string">
            <ns7:p>58.0</ns7:p>
          </ns4:table-cell>
          <ns4:table-cell ns0:value-type="string" ns6:value-type="string">
            <ns7:p>Orlando</ns7:p>
          </ns4:table-cell>
          <ns4:table-cell ns0:value-type="string" ns6:value-type="string">
            <ns7:p>FL</ns7:p>
          </ns4:table-cell>
          <ns4:table-cell ns0:value-type="string" ns6:value-type="string">
            <ns7:p>333888</ns7:p>
          </ns4:table-cell>
          <ns4:table-cell ns4:number-columns-repeated="9">
            <ns7:p>Choice Plumbing Orlando</ns7:p>
          </ns4:table-cell>
        </ns4:table-row>
        <ns4:table-row ns4:style-name="ro1">
          <ns4:table-cell ns0:value-type="string" ns6:value-type="string">
            <ns7:p>59.0</ns7:p>
          </ns4:table-cell>
          <ns4:table-cell ns0:value-type="string" ns6:value-type="string">
            <ns7:p>Lexington-Fayette urban county</ns7:p>
          </ns4:table-cell>
          <ns4:table-cell ns0:value-type="string" ns6:value-type="string">
            <ns7:p>KY</ns7:p>
          </ns4:table-cell>
          <ns4:table-cell ns0:value-type="string" ns6:value-type="string">
            <ns7:p>329751</ns7:p>
          </ns4:table-cell>
          <ns4:table-cell ns4:number-columns-repeated="9"/>
        </ns4:table-row>
        <ns4:table-row ns4:style-name="ro1">
          <ns4:table-cell ns0:value-type="string" ns6:value-type="string">
            <ns7:p>60.0</ns7:p>
          </ns4:table-cell>
          <ns4:table-cell ns0:value-type="string" ns6:value-type="string">
            <ns7:p>Stockton</ns7:p>
          </ns4:table-cell>
          <ns4:table-cell ns0:value-type="string" ns6:value-type="string">
            <ns7:p>CA</ns7:p>
          </ns4:table-cell>
          <ns4:table-cell ns0:value-type="string" ns6:value-type="string">
            <ns7:p>324597</ns7:p>
          </ns4:table-cell>
          <ns4:table-cell ns4:number-columns-repeated="9">
            <ns7:p>Tony's Plumbing, Heating &amp; Air</ns7:p>
          </ns4:table-cell>
        </ns4:table-row>
        <ns4:table-row ns4:style-name="ro1">
          <ns4:table-cell ns0:value-type="string" ns6:value-type="string">
            <ns7:p>61.0</ns7:p>
          </ns4:table-cell>
          <ns4:table-cell ns0:value-type="string" ns6:value-type="string">
            <ns7:p>Newark</ns7:p>
          </ns4:table-cell>
          <ns4:table-cell ns0:value-type="string" ns6:value-type="string">
            <ns7:p>NJ</ns7:p>
          </ns4:table-cell>
          <ns4:table-cell ns0:value-type="string" ns6:value-type="string">
            <ns7:p>323808</ns7:p>
          </ns4:table-cell>
          <ns4:table-cell ns4:number-columns-repeated="9">
            <ns7:p>Friends &amp; Family Plumbing and Heating</ns7:p>
          </ns4:table-cell>
        </ns4:table-row>
        <ns4:table-row ns4:style-name="ro1">
          <ns4:table-cell ns0:value-type="string" ns6:value-type="string">
            <ns7:p>62.0</ns7:p>
          </ns4:table-cell>
          <ns4:table-cell ns0:value-type="string" ns6:value-type="string">
            <ns7:p>Riverside</ns7:p>
          </ns4:table-cell>
          <ns4:table-cell ns0:value-type="string" ns6:value-type="string">
            <ns7:p>CA</ns7:p>
          </ns4:table-cell>
          <ns4:table-cell ns0:value-type="string" ns6:value-type="string">
            <ns7:p>323057</ns7:p>
          </ns4:table-cell>
          <ns4:table-cell ns4:number-columns-repeated="9">
            <ns7:p>Campbell Family Plumbing &amp; Electric</ns7:p>
          </ns4:table-cell>
        </ns4:table-row>
        <ns4:table-row ns4:style-name="ro1">
          <ns4:table-cell ns0:value-type="string" ns6:value-type="string">
            <ns7:p>63.0</ns7:p>
          </ns4:table-cell>
          <ns4:table-cell ns0:value-type="string" ns6:value-type="string">
            <ns7:p>Irvine</ns7:p>
          </ns4:table-cell>
          <ns4:table-cell ns0:value-type="string" ns6:value-type="string">
            <ns7:p>CA</ns7:p>
          </ns4:table-cell>
          <ns4:table-cell ns0:value-type="string" ns6:value-type="string">
            <ns7:p>318764</ns7:p>
          </ns4:table-cell>
          <ns4:table-cell ns4:number-columns-repeated="9">
            <ns7:p>Irvine Plumbing</ns7:p>
          </ns4:table-cell>
        </ns4:table-row>
        <ns4:table-row ns4:style-name="ro1">
          <ns4:table-cell ns0:value-type="string" ns6:value-type="string">
            <ns7:p>64.0</ns7:p>
          </ns4:table-cell>
          <ns4:table-cell ns0:value-type="string" ns6:value-type="string">
            <ns7:p>Corpus Christi</ns7:p>
          </ns4:table-cell>
          <ns4:table-cell ns0:value-type="string" ns6:value-type="string">
            <ns7:p>TX</ns7:p>
          </ns4:table-cell>
          <ns4:table-cell ns0:value-type="string" ns6:value-type="string">
            <ns7:p>317247</ns7:p>
          </ns4:table-cell>
          <ns4:table-cell ns4:number-columns-repeated="9">
            <ns7:p>Dwain McCain Plumbing</ns7:p>
          </ns4:table-cell>
        </ns4:table-row>
        <ns4:table-row ns4:style-name="ro1">
          <ns4:table-cell ns0:value-type="string" ns6:value-type="string">
            <ns7:p>65.0</ns7:p>
          </ns4:table-cell>
          <ns4:table-cell ns0:value-type="string" ns6:value-type="string">
            <ns7:p>Santa Ana</ns7:p>
          </ns4:table-cell>
          <ns4:table-cell ns0:value-type="string" ns6:value-type="string">
            <ns7:p>CA</ns7:p>
          </ns4:table-cell>
          <ns4:table-cell ns0:value-type="string" ns6:value-type="string">
            <ns7:p>315586</ns7:p>
          </ns4:table-cell>
          <ns4:table-cell ns4:number-columns-repeated="9">
            <ns7:p>Do It Right Plumbers</ns7:p>
          </ns4:table-cell>
        </ns4:table-row>
        <ns4:table-row ns4:style-name="ro1">
          <ns4:table-cell ns0:value-type="string" ns6:value-type="string">
            <ns7:p>66.0</ns7:p>
          </ns4:table-cell>
          <ns4:table-cell ns0:value-type="string" ns6:value-type="string">
            <ns7:p>Cincinnati</ns7:p>
          </ns4:table-cell>
          <ns4:table-cell ns0:value-type="string" ns6:value-type="string">
            <ns7:p>OH</ns7:p>
          </ns4:table-cell>
          <ns4:table-cell ns0:value-type="string" ns6:value-type="string">
            <ns7:p>314367</ns7:p>
          </ns4:table-cell>
          <ns4:table-cell ns4:number-columns-repeated="9">
            <ns7:p>Halpin Plumbing Inc</ns7:p>
          </ns4:table-cell>
        </ns4:table-row>
        <ns4:table-row ns4:style-name="ro1">
          <ns4:table-cell ns0:value-type="string" ns6:value-type="string">
            <ns7:p>67.0</ns7:p>
          </ns4:table-cell>
          <ns4:table-cell ns0:value-type="string" ns6:value-type="string">
            <ns7:p>Greensboro</ns7:p>
          </ns4:table-cell>
          <ns4:table-cell ns0:value-type="string" ns6:value-type="string">
            <ns7:p>NC</ns7:p>
          </ns4:table-cell>
          <ns4:table-cell ns0:value-type="string" ns6:value-type="string">
            <ns7:p>308667</ns7:p>
          </ns4:table-cell>
          <ns4:table-cell ns4:number-columns-repeated="9">
            <ns7:p>Owens Plumbing Company LLC</ns7:p>
          </ns4:table-cell>
        </ns4:table-row>
        <ns4:table-row ns4:style-name="ro1">
          <ns4:table-cell ns0:value-type="string" ns6:value-type="string">
            <ns7:p>68.0</ns7:p>
          </ns4:table-cell>
          <ns4:table-cell ns0:value-type="string" ns6:value-type="string">
            <ns7:p>Pittsburgh</ns7:p>
          </ns4:table-cell>
          <ns4:table-cell ns0:value-type="string" ns6:value-type="string">
            <ns7:p>PA</ns7:p>
          </ns4:table-cell>
          <ns4:table-cell ns0:value-type="string" ns6:value-type="string">
            <ns7:p>307632</ns7:p>
          </ns4:table-cell>
          <ns4:table-cell ns4:number-columns-repeated="9"/>
        </ns4:table-row>
        <ns4:table-row ns4:style-name="ro1">
          <ns4:table-cell ns0:value-type="string" ns6:value-type="string">
            <ns7:p>69.0</ns7:p>
          </ns4:table-cell>
          <ns4:table-cell ns0:value-type="string" ns6:value-type="string">
            <ns7:p>St. Paul</ns7:p>
          </ns4:table-cell>
          <ns4:table-cell ns0:value-type="string" ns6:value-type="string">
            <ns7:p>MN</ns7:p>
          </ns4:table-cell>
          <ns4:table-cell ns0:value-type="string" ns6:value-type="string">
            <ns7:p>306684</ns7:p>
          </ns4:table-cell>
          <ns4:table-cell ns4:number-columns-repeated="9"/>
        </ns4:table-row>
        <ns4:table-row ns4:style-name="ro1">
          <ns4:table-cell ns0:value-type="string" ns6:value-type="string">
            <ns7:p>70.0</ns7:p>
          </ns4:table-cell>
          <ns4:table-cell ns0:value-type="string" ns6:value-type="string">
            <ns7:p>Durham</ns7:p>
          </ns4:table-cell>
          <ns4:table-cell ns0:value-type="string" ns6:value-type="string">
            <ns7:p>NC</ns7:p>
          </ns4:table-cell>
          <ns4:table-cell ns0:value-type="string" ns6:value-type="string">
            <ns7:p>305561</ns7:p>
          </ns4:table-cell>
          <ns4:table-cell ns4:number-columns-repeated="9">
            <ns7:p>Brown Brothers Plumbing &amp; Heating</ns7:p>
          </ns4:table-cell>
        </ns4:table-row>
        <ns4:table-row ns4:style-name="ro1">
          <ns4:table-cell ns0:value-type="string" ns6:value-type="string">
            <ns7:p>71.0</ns7:p>
          </ns4:table-cell>
          <ns4:table-cell ns0:value-type="string" ns6:value-type="string">
            <ns7:p>Jersey City</ns7:p>
          </ns4:table-cell>
          <ns4:table-cell ns0:value-type="string" ns6:value-type="string">
            <ns7:p>NJ</ns7:p>
          </ns4:table-cell>
          <ns4:table-cell ns0:value-type="string" ns6:value-type="string">
            <ns7:p>302013</ns7:p>
          </ns4:table-cell>
          <ns4:table-cell ns4:number-columns-repeated="9">
            <ns7:p>M&amp;A Plumbing &amp; Heating</ns7:p>
          </ns4:table-cell>
        </ns4:table-row>
        <ns4:table-row ns4:style-name="ro1">
          <ns4:table-cell ns0:value-type="string" ns6:value-type="string">
            <ns7:p>72.0</ns7:p>
          </ns4:table-cell>
          <ns4:table-cell ns0:value-type="string" ns6:value-type="string">
            <ns7:p>Lincoln</ns7:p>
          </ns4:table-cell>
          <ns4:table-cell ns0:value-type="string" ns6:value-type="string">
            <ns7:p>NE</ns7:p>
          </ns4:table-cell>
          <ns4:table-cell ns0:value-type="string" ns6:value-type="string">
            <ns7:p>301522</ns7:p>
          </ns4:table-cell>
          <ns4:table-cell ns4:number-columns-repeated="9"/>
        </ns4:table-row>
        <ns4:table-row ns4:style-name="ro1">
          <ns4:table-cell ns0:value-type="string" ns6:value-type="string">
            <ns7:p>73.0</ns7:p>
          </ns4:table-cell>
          <ns4:table-cell ns0:value-type="string" ns6:value-type="string">
            <ns7:p>North Las Vegas</ns7:p>
          </ns4:table-cell>
          <ns4:table-cell ns0:value-type="string" ns6:value-type="string">
            <ns7:p>NV</ns7:p>
          </ns4:table-cell>
          <ns4:table-cell ns0:value-type="string" ns6:value-type="string">
            <ns7:p>296653</ns7:p>
          </ns4:table-cell>
          <ns4:table-cell ns4:number-columns-repeated="9"/>
        </ns4:table-row>
        <ns4:table-row ns4:style-name="ro1">
          <ns4:table-cell ns0:value-type="string" ns6:value-type="string">
            <ns7:p>74.0</ns7:p>
          </ns4:table-cell>
          <ns4:table-cell ns0:value-type="string" ns6:value-type="string">
            <ns7:p>Plano</ns7:p>
          </ns4:table-cell>
          <ns4:table-cell ns0:value-type="string" ns6:value-type="string">
            <ns7:p>TX</ns7:p>
          </ns4:table-cell>
          <ns4:table-cell ns0:value-type="string" ns6:value-type="string">
            <ns7:p>293028</ns7:p>
          </ns4:table-cell>
          <ns4:table-cell ns4:number-columns-repeated="9">
            <ns7:p>Plano Plumbing</ns7:p>
          </ns4:table-cell>
        </ns4:table-row>
        <ns4:table-row ns4:style-name="ro1">
          <ns4:table-cell ns0:value-type="string" ns6:value-type="string">
            <ns7:p>75.0</ns7:p>
          </ns4:table-cell>
          <ns4:table-cell ns0:value-type="string" ns6:value-type="string">
            <ns7:p>Gilbert</ns7:p>
          </ns4:table-cell>
          <ns4:table-cell ns0:value-type="string" ns6:value-type="string">
            <ns7:p>AZ</ns7:p>
          </ns4:table-cell>
          <ns4:table-cell ns0:value-type="string" ns6:value-type="string">
            <ns7:p>287285</ns7:p>
          </ns4:table-cell>
          <ns4:table-cell ns4:number-columns-repeated="9">
            <ns7:p>Travis &amp; Sons Plumbing &amp; Rooter</ns7:p>
          </ns4:table-cell>
        </ns4:table-row>
        <ns4:table-row ns4:style-name="ro1">
          <ns4:table-cell ns0:value-type="string" ns6:value-type="string">
            <ns7:p>76.0</ns7:p>
          </ns4:table-cell>
          <ns4:table-cell ns0:value-type="string" ns6:value-type="string">
            <ns7:p>Anchorage</ns7:p>
          </ns4:table-cell>
          <ns4:table-cell ns0:value-type="string" ns6:value-type="string">
            <ns7:p>AK</ns7:p>
          </ns4:table-cell>
          <ns4:table-cell ns0:value-type="string" ns6:value-type="string">
            <ns7:p>287155</ns7:p>
          </ns4:table-cell>
          <ns4:table-cell ns4:number-columns-repeated="9">
            <ns7:p>Anchorage Plumbing Pro</ns7:p>
          </ns4:table-cell>
        </ns4:table-row>
        <ns4:table-row ns4:style-name="ro1">
          <ns4:table-cell ns0:value-type="string" ns6:value-type="string">
            <ns7:p>77.0</ns7:p>
          </ns4:table-cell>
          <ns4:table-cell ns0:value-type="string" ns6:value-type="string">
            <ns7:p>Madison</ns7:p>
          </ns4:table-cell>
          <ns4:table-cell ns0:value-type="string" ns6:value-type="string">
            <ns7:p>WI</ns7:p>
          </ns4:table-cell>
          <ns4:table-cell ns0:value-type="string" ns6:value-type="string">
            <ns7:p>286233</ns7:p>
          </ns4:table-cell>
          <ns4:table-cell ns4:number-columns-repeated="9">
            <ns7:p>Howe Brothers Plumbing LLC</ns7:p>
          </ns4:table-cell>
        </ns4:table-row>
        <ns4:table-row ns4:style-name="ro1">
          <ns4:table-cell ns0:value-type="string" ns6:value-type="string">
            <ns7:p>78.0</ns7:p>
          </ns4:table-cell>
          <ns4:table-cell ns0:value-type="string" ns6:value-type="string">
            <ns7:p>Reno</ns7:p>
          </ns4:table-cell>
          <ns4:table-cell ns0:value-type="string" ns6:value-type="string">
            <ns7:p>NV</ns7:p>
          </ns4:table-cell>
          <ns4:table-cell ns0:value-type="string" ns6:value-type="string">
            <ns7:p>283621</ns7:p>
          </ns4:table-cell>
          <ns4:table-cell ns4:number-columns-repeated="9"/>
        </ns4:table-row>
        <ns4:table-row ns4:style-name="ro1">
          <ns4:table-cell ns0:value-type="string" ns6:value-type="string">
            <ns7:p>79.0</ns7:p>
          </ns4:table-cell>
          <ns4:table-cell ns0:value-type="string" ns6:value-type="string">
            <ns7:p>Chandler</ns7:p>
          </ns4:table-cell>
          <ns4:table-cell ns0:value-type="string" ns6:value-type="string">
            <ns7:p>AZ</ns7:p>
          </ns4:table-cell>
          <ns4:table-cell ns0:value-type="string" ns6:value-type="string">
            <ns7:p>278748</ns7:p>
          </ns4:table-cell>
          <ns4:table-cell ns4:number-columns-repeated="9">
            <ns7:p>Roy Dossey Plumbing</ns7:p>
          </ns4:table-cell>
        </ns4:table-row>
        <ns4:table-row ns4:style-name="ro1">
          <ns4:table-cell ns0:value-type="string" ns6:value-type="string">
            <ns7:p>80.0</ns7:p>
          </ns4:table-cell>
          <ns4:table-cell ns0:value-type="string" ns6:value-type="string">
            <ns7:p>St. Louis</ns7:p>
          </ns4:table-cell>
          <ns4:table-cell ns0:value-type="string" ns6:value-type="string">
            <ns7:p>MO</ns7:p>
          </ns4:table-cell>
          <ns4:table-cell ns0:value-type="string" ns6:value-type="string">
            <ns7:p>278144</ns7:p>
          </ns4:table-cell>
          <ns4:table-cell ns4:number-columns-repeated="9"/>
        </ns4:table-row>
        <ns4:table-row ns4:style-name="ro1">
          <ns4:table-cell ns0:value-type="string" ns6:value-type="string">
            <ns7:p>81.0</ns7:p>
          </ns4:table-cell>
          <ns4:table-cell ns0:value-type="string" ns6:value-type="string">
            <ns7:p>Chula Vista</ns7:p>
          </ns4:table-cell>
          <ns4:table-cell ns0:value-type="string" ns6:value-type="string">
            <ns7:p>CA</ns7:p>
          </ns4:table-cell>
          <ns4:table-cell ns0:value-type="string" ns6:value-type="string">
            <ns7:p>275533</ns7:p>
          </ns4:table-cell>
          <ns4:table-cell ns4:number-columns-repeated="9">
            <ns7:p>Bob the Plumber of Chula Vista</ns7:p>
          </ns4:table-cell>
        </ns4:table-row>
        <ns4:table-row ns4:style-name="ro1">
          <ns4:table-cell ns0:value-type="string" ns6:value-type="string">
            <ns7:p>82.0</ns7:p>
          </ns4:table-cell>
          <ns4:table-cell ns0:value-type="string" ns6:value-type="string">
            <ns7:p>Fort Wayne</ns7:p>
          </ns4:table-cell>
          <ns4:table-cell ns0:value-type="string" ns6:value-type="string">
            <ns7:p>IN</ns7:p>
          </ns4:table-cell>
          <ns4:table-cell ns0:value-type="string" ns6:value-type="string">
            <ns7:p>275203</ns7:p>
          </ns4:table-cell>
          <ns4:table-cell ns4:number-columns-repeated="9">
            <ns7:p>A Hattersley &amp; Sons Inc</ns7:p>
          </ns4:table-cell>
        </ns4:table-row>
        <ns4:table-row ns4:style-name="ro1">
          <ns4:table-cell ns0:value-type="string" ns6:value-type="string">
            <ns7:p>83.0</ns7:p>
          </ns4:table-cell>
          <ns4:table-cell ns0:value-type="string" ns6:value-type="string">
            <ns7:p>Buffalo</ns7:p>
          </ns4:table-cell>
          <ns4:table-cell ns0:value-type="string" ns6:value-type="string">
            <ns7:p>NY</ns7:p>
          </ns4:table-cell>
          <ns4:table-cell ns0:value-type="string" ns6:value-type="string">
            <ns7:p>274613</ns7:p>
          </ns4:table-cell>
          <ns4:table-cell ns4:number-columns-repeated="9"/>
        </ns4:table-row>
        <ns4:table-row ns4:style-name="ro1">
          <ns4:table-cell ns0:value-type="string" ns6:value-type="string">
            <ns7:p>84.0</ns7:p>
          </ns4:table-cell>
          <ns4:table-cell ns0:value-type="string" ns6:value-type="string">
            <ns7:p>Lubbock</ns7:p>
          </ns4:table-cell>
          <ns4:table-cell ns0:value-type="string" ns6:value-type="string">
            <ns7:p>TX</ns7:p>
          </ns4:table-cell>
          <ns4:table-cell ns0:value-type="string" ns6:value-type="string">
            <ns7:p>273071</ns7:p>
          </ns4:table-cell>
          <ns4:table-cell ns4:number-columns-repeated="9">
            <ns7:p>Lubbock Plumbing TX</ns7:p>
          </ns4:table-cell>
        </ns4:table-row>
        <ns4:table-row ns4:style-name="ro1">
          <ns4:table-cell ns0:value-type="string" ns6:value-type="string">
            <ns7:p>85.0</ns7:p>
          </ns4:table-cell>
          <ns4:table-cell ns0:value-type="string" ns6:value-type="string">
            <ns7:p>Laredo</ns7:p>
          </ns4:table-cell>
          <ns4:table-cell ns0:value-type="string" ns6:value-type="string">
            <ns7:p>TX</ns7:p>
          </ns4:table-cell>
          <ns4:table-cell ns0:value-type="string" ns6:value-type="string">
            <ns7:p>269515</ns7:p>
          </ns4:table-cell>
          <ns4:table-cell ns4:number-columns-repeated="9">
            <ns7:p>South Texas Plumbing Contractors</ns7:p>
          </ns4:table-cell>
        </ns4:table-row>
        <ns4:table-row ns4:style-name="ro1">
          <ns4:table-cell ns0:value-type="string" ns6:value-type="string">
            <ns7:p>86.0</ns7:p>
          </ns4:table-cell>
          <ns4:table-cell ns0:value-type="string" ns6:value-type="string">
            <ns7:p>Port St. Lucie</ns7:p>
          </ns4:table-cell>
          <ns4:table-cell ns0:value-type="string" ns6:value-type="string">
            <ns7:p>FL</ns7:p>
          </ns4:table-cell>
          <ns4:table-cell ns0:value-type="string" ns6:value-type="string">
            <ns7:p>268062</ns7:p>
          </ns4:table-cell>
          <ns4:table-cell ns4:number-columns-repeated="9">
            <ns7:p>First Choice Plus Plumbing &amp; Air</ns7:p>
          </ns4:table-cell>
        </ns4:table-row>
        <ns4:table-row ns4:style-name="ro1">
          <ns4:table-cell ns0:value-type="string" ns6:value-type="string">
            <ns7:p>87.0</ns7:p>
          </ns4:table-cell>
          <ns4:table-cell ns0:value-type="string" ns6:value-type="string">
            <ns7:p>St. Petersburg</ns7:p>
          </ns4:table-cell>
          <ns4:table-cell ns0:value-type="string" ns6:value-type="string">
            <ns7:p>FL</ns7:p>
          </ns4:table-cell>
          <ns4:table-cell ns0:value-type="string" ns6:value-type="string">
            <ns7:p>264033</ns7:p>
          </ns4:table-cell>
          <ns4:table-cell ns4:number-columns-repeated="9"/>
        </ns4:table-row>
        <ns4:table-row ns4:style-name="ro1">
          <ns4:table-cell ns0:value-type="string" ns6:value-type="string">
            <ns7:p>88.0</ns7:p>
          </ns4:table-cell>
          <ns4:table-cell ns0:value-type="string" ns6:value-type="string">
            <ns7:p>Toledo</ns7:p>
          </ns4:table-cell>
          <ns4:table-cell ns0:value-type="string" ns6:value-type="string">
            <ns7:p>OH</ns7:p>
          </ns4:table-cell>
          <ns4:table-cell ns0:value-type="string" ns6:value-type="string">
            <ns7:p>263423</ns7:p>
          </ns4:table-cell>
          <ns4:table-cell ns4:number-columns-repeated="9"/>
        </ns4:table-row>
        <ns4:table-row ns4:style-name="ro1">
          <ns4:table-cell ns0:value-type="string" ns6:value-type="string">
            <ns7:p>89.0</ns7:p>
          </ns4:table-cell>
          <ns4:table-cell ns0:value-type="string" ns6:value-type="string">
            <ns7:p>Glendale</ns7:p>
          </ns4:table-cell>
          <ns4:table-cell ns0:value-type="string" ns6:value-type="string">
            <ns7:p>AZ</ns7:p>
          </ns4:table-cell>
          <ns4:table-cell ns0:value-type="string" ns6:value-type="string">
            <ns7:p>260572</ns7:p>
          </ns4:table-cell>
          <ns4:table-cell ns4:number-columns-repeated="9">
            <ns7:p>Glendale Plumbing AZ</ns7:p>
          </ns4:table-cell>
        </ns4:table-row>
        <ns4:table-row ns4:style-name="ro1">
          <ns4:table-cell ns0:value-type="string" ns6:value-type="string">
            <ns7:p>90.0</ns7:p>
          </ns4:table-cell>
          <ns4:table-cell ns0:value-type="string" ns6:value-type="string">
            <ns7:p>Winston-Salem</ns7:p>
          </ns4:table-cell>
          <ns4:table-cell ns0:value-type="string" ns6:value-type="string">
            <ns7:p>NC</ns7:p>
          </ns4:table-cell>
          <ns4:table-cell ns0:value-type="string" ns6:value-type="string">
            <ns7:p>257271</ns7:p>
          </ns4:table-cell>
          <ns4:table-cell ns4:number-columns-repeated="9">
            <ns7:p>Transou's Plumbing &amp; Septic</ns7:p>
          </ns4:table-cell>
        </ns4:table-row>
        <ns4:table-row ns4:style-name="ro1">
          <ns4:table-cell ns0:value-type="string" ns6:value-type="string">
            <ns7:p>91.0</ns7:p>
          </ns4:table-cell>
          <ns4:table-cell ns0:value-type="string" ns6:value-type="string">
            <ns7:p>Irving</ns7:p>
          </ns4:table-cell>
          <ns4:table-cell ns0:value-type="string" ns6:value-type="string">
            <ns7:p>TX</ns7:p>
          </ns4:table-cell>
          <ns4:table-cell ns0:value-type="string" ns6:value-type="string">
            <ns7:p>257076</ns7:p>
          </ns4:table-cell>
          <ns4:table-cell ns4:number-columns-repeated="9">
            <ns7:p>Reeves Family Plumbing</ns7:p>
          </ns4:table-cell>
        </ns4:table-row>
        <ns4:table-row ns4:style-name="ro1">
          <ns4:table-cell ns0:value-type="string" ns6:value-type="string">
            <ns7:p>92.0</ns7:p>
          </ns4:table-cell>
          <ns4:table-cell ns0:value-type="string" ns6:value-type="string">
            <ns7:p>Chesapeake</ns7:p>
          </ns4:table-cell>
          <ns4:table-cell ns0:value-type="string" ns6:value-type="string">
            <ns7:p>VA</ns7:p>
          </ns4:table-cell>
          <ns4:table-cell ns0:value-type="string" ns6:value-type="string">
            <ns7:p>255332</ns7:p>
          </ns4:table-cell>
          <ns4:table-cell ns4:number-columns-repeated="9"/>
        </ns4:table-row>
        <ns4:table-row ns4:style-name="ro1">
          <ns4:table-cell ns0:value-type="string" ns6:value-type="string">
            <ns7:p>93.0</ns7:p>
          </ns4:table-cell>
          <ns4:table-cell ns0:value-type="string" ns6:value-type="string">
            <ns7:p>Garland</ns7:p>
          </ns4:table-cell>
          <ns4:table-cell ns0:value-type="string" ns6:value-type="string">
            <ns7:p>TX</ns7:p>
          </ns4:table-cell>
          <ns4:table-cell ns0:value-type="string" ns6:value-type="string">
            <ns7:p>249625</ns7:p>
          </ns4:table-cell>
          <ns4:table-cell ns4:number-columns-repeated="9">
            <ns7:p>Family Ties Plumbing &amp; Construction</ns7:p>
          </ns4:table-cell>
        </ns4:table-row>
        <ns4:table-row ns4:style-name="ro1">
          <ns4:table-cell ns0:value-type="string" ns6:value-type="string">
            <ns7:p>94.0</ns7:p>
          </ns4:table-cell>
          <ns4:table-cell ns0:value-type="string" ns6:value-type="string">
            <ns7:p>Scottsdale</ns7:p>
          </ns4:table-cell>
          <ns4:table-cell ns0:value-type="string" ns6:value-type="string">
            <ns7:p>AZ</ns7:p>
          </ns4:table-cell>
          <ns4:table-cell ns0:value-type="string" ns6:value-type="string">
            <ns7:p>243006</ns7:p>
          </ns4:table-cell>
          <ns4:table-cell ns4:number-columns-repeated="9">
            <ns7:p>DC Family Plumbing</ns7:p>
          </ns4:table-cell>
        </ns4:table-row>
        <ns4:table-row ns4:style-name="ro1">
          <ns4:table-cell ns0:value-type="string" ns6:value-type="string">
            <ns7:p>95.0</ns7:p>
          </ns4:table-cell>
          <ns4:table-cell ns0:value-type="string" ns6:value-type="string">
            <ns7:p>Boise City</ns7:p>
          </ns4:table-cell>
          <ns4:table-cell ns0:value-type="string" ns6:value-type="string">
            <ns7:p>ID</ns7:p>
          </ns4:table-cell>
          <ns4:table-cell ns0:value-type="string" ns6:value-type="string">
            <ns7:p>238429</ns7:p>
          </ns4:table-cell>
          <ns4:table-cell ns4:number-columns-repeated="9"/>
        </ns4:table-row>
        <ns4:table-row ns4:style-name="ro1">
          <ns4:table-cell ns0:value-type="string" ns6:value-type="string">
            <ns7:p>96.0</ns7:p>
          </ns4:table-cell>
          <ns4:table-cell ns0:value-type="string" ns6:value-type="string">
            <ns7:p>Richmond</ns7:p>
          </ns4:table-cell>
          <ns4:table-cell ns0:value-type="string" ns6:value-type="string">
            <ns7:p>VA</ns7:p>
          </ns4:table-cell>
          <ns4:table-cell ns0:value-type="string" ns6:value-type="string">
            <ns7:p>237257</ns7:p>
          </ns4:table-cell>
          <ns4:table-cell ns4:number-columns-repeated="9"/>
        </ns4:table-row>
        <ns4:table-row ns4:style-name="ro1">
          <ns4:table-cell ns0:value-type="string" ns6:value-type="string">
            <ns7:p>97.0</ns7:p>
          </ns4:table-cell>
          <ns4:table-cell ns0:value-type="string" ns6:value-type="string">
            <ns7:p>Frisco</ns7:p>
          </ns4:table-cell>
          <ns4:table-cell ns0:value-type="string" ns6:value-type="string">
            <ns7:p>TX</ns7:p>
          </ns4:table-cell>
          <ns4:table-cell ns0:value-type="string" ns6:value-type="string">
            <ns7:p>236955</ns7:p>
          </ns4:table-cell>
          <ns4:table-cell ns4:number-columns-repeated="9"/>
        </ns4:table-row>
        <ns4:table-row ns4:style-name="ro1">
          <ns4:table-cell ns0:value-type="string" ns6:value-type="string">
            <ns7:p>98.0</ns7:p>
          </ns4:table-cell>
          <ns4:table-cell ns0:value-type="string" ns6:value-type="string">
            <ns7:p>Cape Coral</ns7:p>
          </ns4:table-cell>
          <ns4:table-cell ns0:value-type="string" ns6:value-type="string">
            <ns7:p>FL</ns7:p>
          </ns4:table-cell>
          <ns4:table-cell ns0:value-type="string" ns6:value-type="string">
            <ns7:p>236264</ns7:p>
          </ns4:table-cell>
          <ns4:table-cell ns4:number-columns-repeated="9"/>
        </ns4:table-row>
        <ns4:table-row ns4:style-name="ro1">
          <ns4:table-cell ns0:value-type="string" ns6:value-type="string">
            <ns7:p>99.0</ns7:p>
          </ns4:table-cell>
          <ns4:table-cell ns0:value-type="string" ns6:value-type="string">
            <ns7:p>McKinney</ns7:p>
          </ns4:table-cell>
          <ns4:table-cell ns0:value-type="string" ns6:value-type="string">
            <ns7:p>TX</ns7:p>
          </ns4:table-cell>
          <ns4:table-cell ns0:value-type="string" ns6:value-type="string">
            <ns7:p>236001</ns7:p>
          </ns4:table-cell>
          <ns4:table-cell ns4:number-columns-repeated="9"/>
        </ns4:table-row>
        <ns4:table-row ns4:style-name="ro1">
          <ns4:table-cell ns0:value-type="string" ns6:value-type="string">
            <ns7:p>100.0</ns7:p>
          </ns4:table-cell>
          <ns4:table-cell ns0:value-type="string" ns6:value-type="string">
            <ns7:p>Huntsville</ns7:p>
          </ns4:table-cell>
          <ns4:table-cell ns0:value-type="string" ns6:value-type="string">
            <ns7:p>AL</ns7:p>
          </ns4:table-cell>
          <ns4:table-cell ns0:value-type="string" ns6:value-type="string">
            <ns7:p>233627</ns7:p>
          </ns4:table-cell>
          <ns4:table-cell ns4:number-columns-repeated="9">
            <ns7:p>Dean Plumbing Company Inc.</ns7:p>
          </ns4:table-cell>
        </ns4:table-row>
        <ns4:table-row ns4:style-name="ro1">
          <ns4:table-cell ns0:value-type="string" ns6:value-type="string">
            <ns7:p>101.0</ns7:p>
          </ns4:table-cell>
          <ns4:table-cell ns0:value-type="string" ns6:value-type="string">
            <ns7:p>Norfolk</ns7:p>
          </ns4:table-cell>
          <ns4:table-cell ns0:value-type="string" ns6:value-type="string">
            <ns7:p>VA</ns7:p>
          </ns4:table-cell>
          <ns4:table-cell ns0:value-type="string" ns6:value-type="string">
            <ns7:p>231013</ns7:p>
          </ns4:table-cell>
          <ns4:table-cell ns4:number-columns-repeated="9">
            <ns7:p>Eaton Family Plumbing</ns7:p>
          </ns4:table-cell>
        </ns4:table-row>
        <ns4:table-row ns4:style-name="ro1">
          <ns4:table-cell ns0:value-type="string" ns6:value-type="string">
            <ns7:p>102.0</ns7:p>
          </ns4:table-cell>
          <ns4:table-cell ns0:value-type="string" ns6:value-type="string">
            <ns7:p>Hialeah</ns7:p>
          </ns4:table-cell>
          <ns4:table-cell ns0:value-type="string" ns6:value-type="string">
            <ns7:p>FL</ns7:p>
          </ns4:table-cell>
          <ns4:table-cell ns0:value-type="string" ns6:value-type="string">
            <ns7:p>230968</ns7:p>
          </ns4:table-cell>
          <ns4:table-cell ns4:number-columns-repeated="9">
            <ns7:p>Hernandez Plumbing Co.</ns7:p>
          </ns4:table-cell>
        </ns4:table-row>
        <ns4:table-row ns4:style-name="ro1">
          <ns4:table-cell ns0:value-type="string" ns6:value-type="string">
            <ns7:p>103.0</ns7:p>
          </ns4:table-cell>
          <ns4:table-cell ns0:value-type="string" ns6:value-type="string">
            <ns7:p>Spokane</ns7:p>
          </ns4:table-cell>
          <ns4:table-cell ns0:value-type="string" ns6:value-type="string">
            <ns7:p>WA</ns7:p>
          </ns4:table-cell>
          <ns4:table-cell ns0:value-type="string" ns6:value-type="string">
            <ns7:p>230783</ns7:p>
          </ns4:table-cell>
          <ns4:table-cell ns4:number-columns-repeated="9">
            <ns7:p>Shaw Plumbing Heating &amp; Air Conditioning</ns7:p>
          </ns4:table-cell>
        </ns4:table-row>
        <ns4:table-row ns4:style-name="ro1">
          <ns4:table-cell ns0:value-type="string" ns6:value-type="string">
            <ns7:p>104.0</ns7:p>
          </ns4:table-cell>
          <ns4:table-cell ns0:value-type="string" ns6:value-type="string">
            <ns7:p>Tacoma</ns7:p>
          </ns4:table-cell>
          <ns4:table-cell ns0:value-type="string" ns6:value-type="string">
            <ns7:p>WA</ns7:p>
          </ns4:table-cell>
          <ns4:table-cell ns0:value-type="string" ns6:value-type="string">
            <ns7:p>229816</ns7:p>
          </ns4:table-cell>
          <ns4:table-cell ns4:number-columns-repeated="9"/>
        </ns4:table-row>
        <ns4:table-row ns4:style-name="ro1">
          <ns4:table-cell ns0:value-type="string" ns6:value-type="string">
            <ns7:p>105.0</ns7:p>
          </ns4:table-cell>
          <ns4:table-cell ns0:value-type="string" ns6:value-type="string">
            <ns7:p>Santa Clarita</ns7:p>
          </ns4:table-cell>
          <ns4:table-cell ns0:value-type="string" ns6:value-type="string">
            <ns7:p>CA</ns7:p>
          </ns4:table-cell>
          <ns4:table-cell ns0:value-type="string" ns6:value-type="string">
            <ns7:p>228430</ns7:p>
          </ns4:table-cell>
          <ns4:table-cell ns4:number-columns-repeated="9">
            <ns7:p>Matthew's Plumbing Inc</ns7:p>
          </ns4:table-cell>
        </ns4:table-row>
        <ns4:table-row ns4:style-name="ro1">
          <ns4:table-cell ns0:value-type="string" ns6:value-type="string">
            <ns7:p>106.0</ns7:p>
          </ns4:table-cell>
          <ns4:table-cell ns0:value-type="string" ns6:value-type="string">
            <ns7:p>Fremont</ns7:p>
          </ns4:table-cell>
          <ns4:table-cell ns0:value-type="string" ns6:value-type="string">
            <ns7:p>CA</ns7:p>
          </ns4:table-cell>
          <ns4:table-cell ns0:value-type="string" ns6:value-type="string">
            <ns7:p>226442</ns7:p>
          </ns4:table-cell>
          <ns4:table-cell ns4:number-columns-repeated="9"/>
        </ns4:table-row>
        <ns4:table-row ns4:style-name="ro1">
          <ns4:table-cell ns0:value-type="string" ns6:value-type="string">
            <ns7:p>107.0</ns7:p>
          </ns4:table-cell>
          <ns4:table-cell ns0:value-type="string" ns6:value-type="string">
            <ns7:p>Baton Rouge</ns7:p>
          </ns4:table-cell>
          <ns4:table-cell ns0:value-type="string" ns6:value-type="string">
            <ns7:p>LA</ns7:p>
          </ns4:table-cell>
          <ns4:table-cell ns0:value-type="string" ns6:value-type="string">
            <ns7:p>222795</ns7:p>
          </ns4:table-cell>
          <ns4:table-cell ns4:number-columns-repeated="9">
            <ns7:p>Trinity Plumbing</ns7:p>
          </ns4:table-cell>
        </ns4:table-row>
        <ns4:table-row ns4:style-name="ro1">
          <ns4:table-cell ns0:value-type="string" ns6:value-type="string">
            <ns7:p>108.0</ns7:p>
          </ns4:table-cell>
          <ns4:table-cell ns0:value-type="string" ns6:value-type="string">
            <ns7:p>San Bernardino</ns7:p>
          </ns4:table-cell>
          <ns4:table-cell ns0:value-type="string" ns6:value-type="string">
            <ns7:p>CA</ns7:p>
          </ns4:table-cell>
          <ns4:table-cell ns0:value-type="string" ns6:value-type="string">
            <ns7:p>222044</ns7:p>
          </ns4:table-cell>
          <ns4:table-cell ns4:number-columns-repeated="9">
            <ns7:p>Thompson Family Plumbing &amp; Drain</ns7:p>
          </ns4:table-cell>
        </ns4:table-row>
        <ns4:table-row ns4:style-name="ro1">
          <ns4:table-cell ns0:value-type="string" ns6:value-type="string">
            <ns7:p>109.0</ns7:p>
          </ns4:table-cell>
          <ns4:table-cell ns0:value-type="string" ns6:value-type="string">
            <ns7:p>Fontana</ns7:p>
          </ns4:table-cell>
          <ns4:table-cell ns0:value-type="string" ns6:value-type="string">
            <ns7:p>CA</ns7:p>
          </ns4:table-cell>
          <ns4:table-cell ns0:value-type="string" ns6:value-type="string">
            <ns7:p>221223</ns7:p>
          </ns4:table-cell>
          <ns4:table-cell ns4:number-columns-repeated="9">
            <ns7:p>Family Ties Air, Plumbing, &amp; Drain</ns7:p>
          </ns4:table-cell>
        </ns4:table-row>
        <ns4:table-row ns4:style-name="ro1">
          <ns4:table-cell ns0:value-type="string" ns6:value-type="string">
            <ns7:p>110.0</ns7:p>
          </ns4:table-cell>
          <ns4:table-cell ns0:value-type="string" ns6:value-type="string">
            <ns7:p>Modesto</ns7:p>
          </ns4:table-cell>
          <ns4:table-cell ns0:value-type="string" ns6:value-type="string">
            <ns7:p>CA</ns7:p>
          </ns4:table-cell>
          <ns4:table-cell ns0:value-type="string" ns6:value-type="string">
            <ns7:p>219652</ns7:p>
          </ns4:table-cell>
          <ns4:table-cell ns4:number-columns-repeated="9">
            <ns7:p>Herk's Plumbing</ns7:p>
          </ns4:table-cell>
        </ns4:table-row>
        <ns4:table-row ns4:style-name="ro1">
          <ns4:table-cell ns0:value-type="string" ns6:value-type="string">
            <ns7:p>111.0</ns7:p>
          </ns4:table-cell>
          <ns4:table-cell ns0:value-type="string" ns6:value-type="string">
            <ns7:p>Salt Lake City</ns7:p>
          </ns4:table-cell>
          <ns4:table-cell ns0:value-type="string" ns6:value-type="string">
            <ns7:p>UT</ns7:p>
          </ns4:table-cell>
          <ns4:table-cell ns0:value-type="string" ns6:value-type="string">
            <ns7:p>218428</ns7:p>
          </ns4:table-cell>
          <ns4:table-cell ns4:number-columns-repeated="9"/>
        </ns4:table-row>
        <ns4:table-row ns4:style-name="ro1">
          <ns4:table-cell ns0:value-type="string" ns6:value-type="string">
            <ns7:p>112.0</ns7:p>
          </ns4:table-cell>
          <ns4:table-cell ns0:value-type="string" ns6:value-type="string">
            <ns7:p>Moreno Valley</ns7:p>
          </ns4:table-cell>
          <ns4:table-cell ns0:value-type="string" ns6:value-type="string">
            <ns7:p>CA</ns7:p>
          </ns4:table-cell>
          <ns4:table-cell ns0:value-type="string" ns6:value-type="string">
            <ns7:p>214263</ns7:p>
          </ns4:table-cell>
          <ns4:table-cell ns4:number-columns-repeated="9">
            <ns7:p>McPherson Bros Plumbing</ns7:p>
          </ns4:table-cell>
        </ns4:table-row>
        <ns4:table-row ns4:style-name="ro1">
          <ns4:table-cell ns0:value-type="string" ns6:value-type="string">
            <ns7:p>113.0</ns7:p>
          </ns4:table-cell>
          <ns4:table-cell ns0:value-type="string" ns6:value-type="string">
            <ns7:p>Worcester</ns7:p>
          </ns4:table-cell>
          <ns4:table-cell ns0:value-type="string" ns6:value-type="string">
            <ns7:p>MA</ns7:p>
          </ns4:table-cell>
          <ns4:table-cell ns0:value-type="string" ns6:value-type="string">
            <ns7:p>213862</ns7:p>
          </ns4:table-cell>
          <ns4:table-cell ns4:number-columns-repeated="9"/>
        </ns4:table-row>
        <ns4:table-row ns4:style-name="ro1">
          <ns4:table-cell ns0:value-type="string" ns6:value-type="string">
            <ns7:p>114.0</ns7:p>
          </ns4:table-cell>
          <ns4:table-cell ns0:value-type="string" ns6:value-type="string">
            <ns7:p>Sioux Falls</ns7:p>
          </ns4:table-cell>
          <ns4:table-cell ns0:value-type="string" ns6:value-type="string">
            <ns7:p>SD</ns7:p>
          </ns4:table-cell>
          <ns4:table-cell ns0:value-type="string" ns6:value-type="string">
            <ns7:p>213748</ns7:p>
          </ns4:table-cell>
          <ns4:table-cell ns4:number-columns-repeated="9">
            <ns7:p>Sioux Falls Plumbing LLC.</ns7:p>
          </ns4:table-cell>
        </ns4:table-row>
        <ns4:table-row ns4:style-name="ro1">
          <ns4:table-cell ns0:value-type="string" ns6:value-type="string">
            <ns7:p>115.0</ns7:p>
          </ns4:table-cell>
          <ns4:table-cell ns0:value-type="string" ns6:value-type="string">
            <ns7:p>Yonkers</ns7:p>
          </ns4:table-cell>
          <ns4:table-cell ns0:value-type="string" ns6:value-type="string">
            <ns7:p>NY</ns7:p>
          </ns4:table-cell>
          <ns4:table-cell ns0:value-type="string" ns6:value-type="string">
            <ns7:p>212603</ns7:p>
          </ns4:table-cell>
          <ns4:table-cell ns4:number-columns-repeated="9">
            <ns7:p>JP Plumbing and Sewer</ns7:p>
          </ns4:table-cell>
        </ns4:table-row>
        <ns4:table-row ns4:style-name="ro1">
          <ns4:table-cell ns0:value-type="string" ns6:value-type="string">
            <ns7:p>116.0</ns7:p>
          </ns4:table-cell>
          <ns4:table-cell ns0:value-type="string" ns6:value-type="string">
            <ns7:p>Des Moines</ns7:p>
          </ns4:table-cell>
          <ns4:table-cell ns0:value-type="string" ns6:value-type="string">
            <ns7:p>IA</ns7:p>
          </ns4:table-cell>
          <ns4:table-cell ns0:value-type="string" ns6:value-type="string">
            <ns7:p>212086</ns7:p>
          </ns4:table-cell>
          <ns4:table-cell ns4:number-columns-repeated="9">
            <ns7:p>Schaal Plumbing, Heating and Cooling</ns7:p>
          </ns4:table-cell>
        </ns4:table-row>
        <ns4:table-row ns4:style-name="ro1">
          <ns4:table-cell ns0:value-type="string" ns6:value-type="string">
            <ns7:p>117.0</ns7:p>
          </ns4:table-cell>
          <ns4:table-cell ns0:value-type="string" ns6:value-type="string">
            <ns7:p>Grand Prairie</ns7:p>
          </ns4:table-cell>
          <ns4:table-cell ns0:value-type="string" ns6:value-type="string">
            <ns7:p>TX</ns7:p>
          </ns4:table-cell>
          <ns4:table-cell ns0:value-type="string" ns6:value-type="string">
            <ns7:p>209434</ns7:p>
          </ns4:table-cell>
          <ns4:table-cell ns4:number-columns-repeated="9">
            <ns7:p>Grand Prairie Plumbing</ns7:p>
          </ns4:table-cell>
        </ns4:table-row>
        <ns4:table-row ns4:style-name="ro1">
          <ns4:table-cell ns0:value-type="string" ns6:value-type="string">
            <ns7:p>118.0</ns7:p>
          </ns4:table-cell>
          <ns4:table-cell ns0:value-type="string" ns6:value-type="string">
            <ns7:p>Fayetteville</ns7:p>
          </ns4:table-cell>
          <ns4:table-cell ns0:value-type="string" ns6:value-type="string">
            <ns7:p>NC</ns7:p>
          </ns4:table-cell>
          <ns4:table-cell ns0:value-type="string" ns6:value-type="string">
            <ns7:p>209120</ns7:p>
          </ns4:table-cell>
          <ns4:table-cell ns4:number-columns-repeated="9">
            <ns7:p>Woods Plumbing Service LLC</ns7:p>
          </ns4:table-cell>
        </ns4:table-row>
        <ns4:table-row ns4:style-name="ro1">
          <ns4:table-cell ns0:value-type="string" ns6:value-type="string">
            <ns7:p>119.0</ns7:p>
          </ns4:table-cell>
          <ns4:table-cell ns0:value-type="string" ns6:value-type="string">
            <ns7:p>Augusta</ns7:p>
          </ns4:table-cell>
          <ns4:table-cell ns0:value-type="string" ns6:value-type="string">
            <ns7:p>GA</ns7:p>
          </ns4:table-cell>
          <ns4:table-cell ns0:value-type="string" ns6:value-type="string">
            <ns7:p>206559</ns7:p>
          </ns4:table-cell>
          <ns4:table-cell ns4:number-columns-repeated="9"/>
        </ns4:table-row>
        <ns4:table-row ns4:style-name="ro1">
          <ns4:table-cell ns0:value-type="string" ns6:value-type="string">
            <ns7:p>120.0</ns7:p>
          </ns4:table-cell>
          <ns4:table-cell ns0:value-type="string" ns6:value-type="string">
            <ns7:p>Little Rock</ns7:p>
          </ns4:table-cell>
          <ns4:table-cell ns0:value-type="string" ns6:value-type="string">
            <ns7:p>AR</ns7:p>
          </ns4:table-cell>
          <ns4:table-cell ns0:value-type="string" ns6:value-type="string">
            <ns7:p>206427</ns7:p>
          </ns4:table-cell>
          <ns4:table-cell ns4:number-columns-repeated="9"/>
        </ns4:table-row>
        <ns4:table-row ns4:style-name="ro1">
          <ns4:table-cell ns0:value-type="string" ns6:value-type="string">
            <ns7:p>121.0</ns7:p>
          </ns4:table-cell>
          <ns4:table-cell ns0:value-type="string" ns6:value-type="string">
            <ns7:p>Rochester</ns7:p>
          </ns4:table-cell>
          <ns4:table-cell ns0:value-type="string" ns6:value-type="string">
            <ns7:p>NY</ns7:p>
          </ns4:table-cell>
          <ns4:table-cell ns0:value-type="string" ns6:value-type="string">
            <ns7:p>206108</ns7:p>
          </ns4:table-cell>
          <ns4:table-cell ns4:number-columns-repeated="9"/>
        </ns4:table-row>
        <ns4:table-row ns4:style-name="ro1">
          <ns4:table-cell ns0:value-type="string" ns6:value-type="string">
            <ns7:p>122.0</ns7:p>
          </ns4:table-cell>
          <ns4:table-cell ns0:value-type="string" ns6:value-type="string">
            <ns7:p>Amarillo</ns7:p>
          </ns4:table-cell>
          <ns4:table-cell ns0:value-type="string" ns6:value-type="string">
            <ns7:p>TX</ns7:p>
          </ns4:table-cell>
          <ns4:table-cell ns0:value-type="string" ns6:value-type="string">
            <ns7:p>205130</ns7:p>
          </ns4:table-cell>
          <ns4:table-cell ns4:number-columns-repeated="9"/>
        </ns4:table-row>
        <ns4:table-row ns4:style-name="ro1">
          <ns4:table-cell ns0:value-type="string" ns6:value-type="string">
            <ns7:p>123.0</ns7:p>
          </ns4:table-cell>
          <ns4:table-cell ns0:value-type="string" ns6:value-type="string">
            <ns7:p>Tallahassee</ns7:p>
          </ns4:table-cell>
          <ns4:table-cell ns0:value-type="string" ns6:value-type="string">
            <ns7:p>FL</ns7:p>
          </ns4:table-cell>
          <ns4:table-cell ns0:value-type="string" ns6:value-type="string">
            <ns7:p>204902</ns7:p>
          </ns4:table-cell>
          <ns4:table-cell ns4:number-columns-repeated="9">
            <ns7:p>White's Plumbing Inc</ns7:p>
          </ns4:table-cell>
        </ns4:table-row>
        <ns4:table-row ns4:style-name="ro1">
          <ns4:table-cell ns0:value-type="string" ns6:value-type="string">
            <ns7:p>124.0</ns7:p>
          </ns4:table-cell>
          <ns4:table-cell ns0:value-type="string" ns6:value-type="string">
            <ns7:p>Overland Park</ns7:p>
          </ns4:table-cell>
          <ns4:table-cell ns0:value-type="string" ns6:value-type="string">
            <ns7:p>KS</ns7:p>
          </ns4:table-cell>
          <ns4:table-cell ns0:value-type="string" ns6:value-type="string">
            <ns7:p>203677</ns7:p>
          </ns4:table-cell>
          <ns4:table-cell ns4:number-columns-repeated="9"/>
        </ns4:table-row>
        <ns4:table-row ns4:style-name="ro1">
          <ns4:table-cell ns0:value-type="string" ns6:value-type="string">
            <ns7:p>125.0</ns7:p>
          </ns4:table-cell>
          <ns4:table-cell ns0:value-type="string" ns6:value-type="string">
            <ns7:p>Columbus</ns7:p>
          </ns4:table-cell>
          <ns4:table-cell ns0:value-type="string" ns6:value-type="string">
            <ns7:p>GA</ns7:p>
          </ns4:table-cell>
          <ns4:table-cell ns0:value-type="string" ns6:value-type="string">
            <ns7:p>202171</ns7:p>
          </ns4:table-cell>
          <ns4:table-cell ns4:number-columns-repeated="9"/>
        </ns4:table-row>
        <ns4:table-row ns4:style-name="ro1">
          <ns4:table-cell ns0:value-type="string" ns6:value-type="string">
            <ns7:p>126.0</ns7:p>
          </ns4:table-cell>
          <ns4:table-cell ns0:value-type="string" ns6:value-type="string">
            <ns7:p>Knoxville</ns7:p>
          </ns4:table-cell>
          <ns4:table-cell ns0:value-type="string" ns6:value-type="string">
            <ns7:p>TN</ns7:p>
          </ns4:table-cell>
          <ns4:table-cell ns0:value-type="string" ns6:value-type="string">
            <ns7:p>202021</ns7:p>
          </ns4:table-cell>
          <ns4:table-cell ns4:number-columns-repeated="9"/>
        </ns4:table-row>
        <ns4:table-row ns4:style-name="ro1">
          <ns4:table-cell ns0:value-type="string" ns6:value-type="string">
            <ns7:p>127.0</ns7:p>
          </ns4:table-cell>
          <ns4:table-cell ns0:value-type="string" ns6:value-type="string">
            <ns7:p>Grand Rapids</ns7:p>
          </ns4:table-cell>
          <ns4:table-cell ns0:value-type="string" ns6:value-type="string">
            <ns7:p>MI</ns7:p>
          </ns4:table-cell>
          <ns4:table-cell ns0:value-type="string" ns6:value-type="string">
            <ns7:p>201183</ns7:p>
          </ns4:table-cell>
          <ns4:table-cell ns4:number-columns-repeated="9"/>
        </ns4:table-row>
        <ns4:table-row ns4:style-name="ro1">
          <ns4:table-cell ns0:value-type="string" ns6:value-type="string">
            <ns7:p>128.0</ns7:p>
          </ns4:table-cell>
          <ns4:table-cell ns0:value-type="string" ns6:value-type="string">
            <ns7:p>Peoria</ns7:p>
          </ns4:table-cell>
          <ns4:table-cell ns0:value-type="string" ns6:value-type="string">
            <ns7:p>AZ</ns7:p>
          </ns4:table-cell>
          <ns4:table-cell ns0:value-type="string" ns6:value-type="string">
            <ns7:p>200881</ns7:p>
          </ns4:table-cell>
          <ns4:table-cell ns4:number-columns-repeated="9"/>
        </ns4:table-row>
        <ns4:table-row ns4:style-name="ro1">
          <ns4:table-cell ns0:value-type="string" ns6:value-type="string">
            <ns7:p>129.0</ns7:p>
          </ns4:table-cell>
          <ns4:table-cell ns0:value-type="string" ns6:value-type="string">
            <ns7:p>Mobile</ns7:p>
          </ns4:table-cell>
          <ns4:table-cell ns0:value-type="string" ns6:value-type="string">
            <ns7:p>AL</ns7:p>
          </ns4:table-cell>
          <ns4:table-cell ns0:value-type="string" ns6:value-type="string">
            <ns7:p>200824</ns7:p>
          </ns4:table-cell>
          <ns4:table-cell ns4:number-columns-repeated="9"/>
        </ns4:table-row>
        <ns4:table-row ns4:style-name="ro1">
          <ns4:table-cell ns0:value-type="string" ns6:value-type="string">
            <ns7:p>130.0</ns7:p>
          </ns4:table-cell>
          <ns4:table-cell ns0:value-type="string" ns6:value-type="string">
            <ns7:p>Vancouver</ns7:p>
          </ns4:table-cell>
          <ns4:table-cell ns0:value-type="string" ns6:value-type="string">
            <ns7:p>WA</ns7:p>
          </ns4:table-cell>
          <ns4:table-cell ns0:value-type="string" ns6:value-type="string">
            <ns7:p>199698</ns7:p>
          </ns4:table-cell>
          <ns4:table-cell ns4:number-columns-repeated="9"/>
        </ns4:table-row>
        <ns4:table-row ns4:style-name="ro1">
          <ns4:table-cell ns0:value-type="string" ns6:value-type="string">
            <ns7:p>131.0</ns7:p>
          </ns4:table-cell>
          <ns4:table-cell ns0:value-type="string" ns6:value-type="string">
            <ns7:p>Oxnard</ns7:p>
          </ns4:table-cell>
          <ns4:table-cell ns0:value-type="string" ns6:value-type="string">
            <ns7:p>CA</ns7:p>
          </ns4:table-cell>
          <ns4:table-cell ns0:value-type="string" ns6:value-type="string">
            <ns7:p>199651</ns7:p>
          </ns4:table-cell>
          <ns4:table-cell ns4:number-columns-repeated="9">
            <ns7:p>Salinas and Sons Rooter</ns7:p>
          </ns4:table-cell>
        </ns4:table-row>
        <ns4:table-row ns4:style-name="ro1">
          <ns4:table-cell ns0:value-type="string" ns6:value-type="string">
            <ns7:p>132.0</ns7:p>
          </ns4:table-cell>
          <ns4:table-cell ns0:value-type="string" ns6:value-type="string">
            <ns7:p>Birmingham</ns7:p>
          </ns4:table-cell>
          <ns4:table-cell ns0:value-type="string" ns6:value-type="string">
            <ns7:p>AL</ns7:p>
          </ns4:table-cell>
          <ns4:table-cell ns0:value-type="string" ns6:value-type="string">
            <ns7:p>195893</ns7:p>
          </ns4:table-cell>
          <ns4:table-cell ns4:number-columns-repeated="9"/>
        </ns4:table-row>
        <ns4:table-row ns4:style-name="ro1">
          <ns4:table-cell ns0:value-type="string" ns6:value-type="string">
            <ns7:p>133.0</ns7:p>
          </ns4:table-cell>
          <ns4:table-cell ns0:value-type="string" ns6:value-type="string">
            <ns7:p>Providence</ns7:p>
          </ns4:table-cell>
          <ns4:table-cell ns0:value-type="string" ns6:value-type="string">
            <ns7:p>RI</ns7:p>
          </ns4:table-cell>
          <ns4:table-cell ns0:value-type="string" ns6:value-type="string">
            <ns7:p>195310</ns7:p>
          </ns4:table-cell>
          <ns4:table-cell ns4:number-columns-repeated="9"/>
        </ns4:table-row>
        <ns4:table-row ns4:style-name="ro1">
          <ns4:table-cell ns0:value-type="string" ns6:value-type="string">
            <ns7:p>134.0</ns7:p>
          </ns4:table-cell>
          <ns4:table-cell ns0:value-type="string" ns6:value-type="string">
            <ns7:p>Montgomery</ns7:p>
          </ns4:table-cell>
          <ns4:table-cell ns0:value-type="string" ns6:value-type="string">
            <ns7:p>AL</ns7:p>
          </ns4:table-cell>
          <ns4:table-cell ns0:value-type="string" ns6:value-type="string">
            <ns7:p>195300</ns7:p>
          </ns4:table-cell>
          <ns4:table-cell ns4:number-columns-repeated="9"/>
        </ns4:table-row>
        <ns4:table-row ns4:style-name="ro1">
          <ns4:table-cell ns0:value-type="string" ns6:value-type="string">
            <ns7:p>135.0</ns7:p>
          </ns4:table-cell>
          <ns4:table-cell ns0:value-type="string" ns6:value-type="string">
            <ns7:p>Chattanooga</ns7:p>
          </ns4:table-cell>
          <ns4:table-cell ns0:value-type="string" ns6:value-type="string">
            <ns7:p>TN</ns7:p>
          </ns4:table-cell>
          <ns4:table-cell ns0:value-type="string" ns6:value-type="string">
            <ns7:p>194144</ns7:p>
          </ns4:table-cell>
          <ns4:table-cell ns4:number-columns-repeated="9"/>
        </ns4:table-row>
        <ns4:table-row ns4:style-name="ro1">
          <ns4:table-cell ns0:value-type="string" ns6:value-type="string">
            <ns7:p>136.0</ns7:p>
          </ns4:table-cell>
          <ns4:table-cell ns0:value-type="string" ns6:value-type="string">
            <ns7:p>Brownsville</ns7:p>
          </ns4:table-cell>
          <ns4:table-cell ns0:value-type="string" ns6:value-type="string">
            <ns7:p>TX</ns7:p>
          </ns4:table-cell>
          <ns4:table-cell ns0:value-type="string" ns6:value-type="string">
            <ns7:p>192957</ns7:p>
          </ns4:table-cell>
          <ns4:table-cell ns4:number-columns-repeated="9">
            <ns7:p>Robert's Repair Plumbing</ns7:p>
          </ns4:table-cell>
        </ns4:table-row>
        <ns4:table-row ns4:style-name="ro1">
          <ns4:table-cell ns0:value-type="string" ns6:value-type="string">
            <ns7:p>137.0</ns7:p>
          </ns4:table-cell>
          <ns4:table-cell ns0:value-type="string" ns6:value-type="string">
            <ns7:p>Huntington Beach</ns7:p>
          </ns4:table-cell>
          <ns4:table-cell ns0:value-type="string" ns6:value-type="string">
            <ns7:p>CA</ns7:p>
          </ns4:table-cell>
          <ns4:table-cell ns0:value-type="string" ns6:value-type="string">
            <ns7:p>191451</ns7:p>
          </ns4:table-cell>
          <ns4:table-cell ns4:number-columns-repeated="9">
            <ns7:p>DeVinney Plumbing, Inc.</ns7:p>
          </ns4:table-cell>
        </ns4:table-row>
        <ns4:table-row ns4:style-name="ro1">
          <ns4:table-cell ns0:value-type="string" ns6:value-type="string">
            <ns7:p>138.0</ns7:p>
          </ns4:table-cell>
          <ns4:table-cell ns0:value-type="string" ns6:value-type="string">
            <ns7:p>Tempe</ns7:p>
          </ns4:table-cell>
          <ns4:table-cell ns0:value-type="string" ns6:value-type="string">
            <ns7:p>AZ</ns7:p>
          </ns4:table-cell>
          <ns4:table-cell ns0:value-type="string" ns6:value-type="string">
            <ns7:p>190571</ns7:p>
          </ns4:table-cell>
          <ns4:table-cell ns4:number-columns-repeated="9"/>
        </ns4:table-row>
        <ns4:table-row ns4:style-name="ro1">
          <ns4:table-cell ns0:value-type="string" ns6:value-type="string">
            <ns7:p>139.0</ns7:p>
          </ns4:table-cell>
          <ns4:table-cell ns0:value-type="string" ns6:value-type="string">
            <ns7:p>Akron</ns7:p>
          </ns4:table-cell>
          <ns4:table-cell ns0:value-type="string" ns6:value-type="string">
            <ns7:p>OH</ns7:p>
          </ns4:table-cell>
          <ns4:table-cell ns0:value-type="string" ns6:value-type="string">
            <ns7:p>189691</ns7:p>
          </ns4:table-cell>
          <ns4:table-cell ns4:number-columns-repeated="9">
            <ns7:p>J&amp;J Plumbing, Heating, Cooling, &amp; Electric</ns7:p>
          </ns4:table-cell>
        </ns4:table-row>
        <ns4:table-row ns4:style-name="ro1">
          <ns4:table-cell ns0:value-type="string" ns6:value-type="string">
            <ns7:p>140.0</ns7:p>
          </ns4:table-cell>
          <ns4:table-cell ns0:value-type="string" ns6:value-type="string">
            <ns7:p>Clarksville</ns7:p>
          </ns4:table-cell>
          <ns4:table-cell ns0:value-type="string" ns6:value-type="string">
            <ns7:p>TN</ns7:p>
          </ns4:table-cell>
          <ns4:table-cell ns0:value-type="string" ns6:value-type="string">
            <ns7:p>188829</ns7:p>
          </ns4:table-cell>
          <ns4:table-cell ns4:number-columns-repeated="9"/>
        </ns4:table-row>
        <ns4:table-row ns4:style-name="ro1">
          <ns4:table-cell ns0:value-type="string" ns6:value-type="string">
            <ns7:p>141.0</ns7:p>
          </ns4:table-cell>
          <ns4:table-cell ns0:value-type="string" ns6:value-type="string">
            <ns7:p>Fort Lauderdale</ns7:p>
          </ns4:table-cell>
          <ns4:table-cell ns0:value-type="string" ns6:value-type="string">
            <ns7:p>FL</ns7:p>
          </ns4:table-cell>
          <ns4:table-cell ns0:value-type="string" ns6:value-type="string">
            <ns7:p>188677</ns7:p>
          </ns4:table-cell>
          <ns4:table-cell ns4:number-columns-repeated="9"/>
        </ns4:table-row>
        <ns4:table-row ns4:style-name="ro1">
          <ns4:table-cell ns0:value-type="string" ns6:value-type="string">
            <ns7:p>142.0</ns7:p>
          </ns4:table-cell>
          <ns4:table-cell ns0:value-type="string" ns6:value-type="string">
            <ns7:p>Glendale</ns7:p>
          </ns4:table-cell>
          <ns4:table-cell ns0:value-type="string" ns6:value-type="string">
            <ns7:p>CA</ns7:p>
          </ns4:table-cell>
          <ns4:table-cell ns0:value-type="string" ns6:value-type="string">
            <ns7:p>187160</ns7:p>
          </ns4:table-cell>
          <ns4:table-cell ns4:number-columns-repeated="9">
            <ns7:p>Morrissey Family Plumbing</ns7:p>
          </ns4:table-cell>
        </ns4:table-row>
        <ns4:table-row ns4:style-name="ro1">
          <ns4:table-cell ns0:value-type="string" ns6:value-type="string">
            <ns7:p>143.0</ns7:p>
          </ns4:table-cell>
          <ns4:table-cell ns0:value-type="string" ns6:value-type="string">
            <ns7:p>Ontario</ns7:p>
          </ns4:table-cell>
          <ns4:table-cell ns0:value-type="string" ns6:value-type="string">
            <ns7:p>CA</ns7:p>
          </ns4:table-cell>
          <ns4:table-cell ns0:value-type="string" ns6:value-type="string">
            <ns7:p>187013</ns7:p>
          </ns4:table-cell>
          <ns4:table-cell ns4:number-columns-repeated="9"/>
        </ns4:table-row>
        <ns4:table-row ns4:style-name="ro1">
          <ns4:table-cell ns0:value-type="string" ns6:value-type="string">
            <ns7:p>144.0</ns7:p>
          </ns4:table-cell>
          <ns4:table-cell ns0:value-type="string" ns6:value-type="string">
            <ns7:p>Elk Grove</ns7:p>
          </ns4:table-cell>
          <ns4:table-cell ns0:value-type="string" ns6:value-type="string">
            <ns7:p>CA</ns7:p>
          </ns4:table-cell>
          <ns4:table-cell ns0:value-type="string" ns6:value-type="string">
            <ns7:p>185007</ns7:p>
          </ns4:table-cell>
          <ns4:table-cell ns4:number-columns-repeated="9"/>
        </ns4:table-row>
        <ns4:table-row ns4:style-name="ro1">
          <ns4:table-cell ns0:value-type="string" ns6:value-type="string">
            <ns7:p>145.0</ns7:p>
          </ns4:table-cell>
          <ns4:table-cell ns0:value-type="string" ns6:value-type="string">
            <ns7:p>Cary</ns7:p>
          </ns4:table-cell>
          <ns4:table-cell ns0:value-type="string" ns6:value-type="string">
            <ns7:p>NC</ns7:p>
          </ns4:table-cell>
          <ns4:table-cell ns0:value-type="string" ns6:value-type="string">
            <ns7:p>183582</ns7:p>
          </ns4:table-cell>
          <ns4:table-cell ns4:number-columns-repeated="9"/>
        </ns4:table-row>
        <ns4:table-row ns4:style-name="ro1">
          <ns4:table-cell ns0:value-type="string" ns6:value-type="string">
            <ns7:p>146.0</ns7:p>
          </ns4:table-cell>
          <ns4:table-cell ns0:value-type="string" ns6:value-type="string">
            <ns7:p>Newport News</ns7:p>
          </ns4:table-cell>
          <ns4:table-cell ns0:value-type="string" ns6:value-type="string">
            <ns7:p>VA</ns7:p>
          </ns4:table-cell>
          <ns4:table-cell ns0:value-type="string" ns6:value-type="string">
            <ns7:p>183230</ns7:p>
          </ns4:table-cell>
          <ns4:table-cell ns4:number-columns-repeated="9">
            <ns7:p>Blair's Plumbing Repair &amp; Drains</ns7:p>
          </ns4:table-cell>
        </ns4:table-row>
        <ns4:table-row ns4:style-name="ro1">
          <ns4:table-cell ns0:value-type="string" ns6:value-type="string">
            <ns7:p>147.0</ns7:p>
          </ns4:table-cell>
          <ns4:table-cell ns0:value-type="string" ns6:value-type="string">
            <ns7:p>Salem</ns7:p>
          </ns4:table-cell>
          <ns4:table-cell ns0:value-type="string" ns6:value-type="string">
            <ns7:p>OR</ns7:p>
          </ns4:table-cell>
          <ns4:table-cell ns0:value-type="string" ns6:value-type="string">
            <ns7:p>181779</ns7:p>
          </ns4:table-cell>
          <ns4:table-cell ns4:number-columns-repeated="9"/>
        </ns4:table-row>
        <ns4:table-row ns4:style-name="ro1">
          <ns4:table-cell ns0:value-type="string" ns6:value-type="string">
            <ns7:p>148.0</ns7:p>
          </ns4:table-cell>
          <ns4:table-cell ns0:value-type="string" ns6:value-type="string">
            <ns7:p>Aurora</ns7:p>
          </ns4:table-cell>
          <ns4:table-cell ns0:value-type="string" ns6:value-type="string">
            <ns7:p>IL</ns7:p>
          </ns4:table-cell>
          <ns4:table-cell ns0:value-type="string" ns6:value-type="string">
            <ns7:p>181505</ns7:p>
          </ns4:table-cell>
          <ns4:table-cell ns4:number-columns-repeated="9">
            <ns7:p>Michels Plumbing Inc</ns7:p>
          </ns4:table-cell>
        </ns4:table-row>
        <ns4:table-row ns4:style-name="ro1">
          <ns4:table-cell ns0:value-type="string" ns6:value-type="string">
            <ns7:p>149.0</ns7:p>
          </ns4:table-cell>
          <ns4:table-cell ns0:value-type="string" ns6:value-type="string">
            <ns7:p>Santa Rosa</ns7:p>
          </ns4:table-cell>
          <ns4:table-cell ns0:value-type="string" ns6:value-type="string">
            <ns7:p>CA</ns7:p>
          </ns4:table-cell>
          <ns4:table-cell ns0:value-type="string" ns6:value-type="string">
            <ns7:p>179437</ns7:p>
          </ns4:table-cell>
          <ns4:table-cell ns4:number-columns-repeated="9"/>
        </ns4:table-row>
        <ns4:table-row ns4:style-name="ro1">
          <ns4:table-cell ns0:value-type="string" ns6:value-type="string">
            <ns7:p>150.0</ns7:p>
          </ns4:table-cell>
          <ns4:table-cell ns0:value-type="string" ns6:value-type="string">
            <ns7:p>Eugene</ns7:p>
          </ns4:table-cell>
          <ns4:table-cell ns0:value-type="string" ns6:value-type="string">
            <ns7:p>OR</ns7:p>
          </ns4:table-cell>
          <ns4:table-cell ns0:value-type="string" ns6:value-type="string">
            <ns7:p>178618</ns7:p>
          </ns4:table-cell>
          <ns4:table-cell ns4:number-columns-repeated="9"/>
        </ns4:table-row>
        <ns4:table-row ns4:style-name="ro1">
          <ns4:table-cell ns0:value-type="string" ns6:value-type="string">
            <ns7:p>151.0</ns7:p>
          </ns4:table-cell>
          <ns4:table-cell ns0:value-type="string" ns6:value-type="string">
            <ns7:p>Rancho Cucamonga</ns7:p>
          </ns4:table-cell>
          <ns4:table-cell ns0:value-type="string" ns6:value-type="string">
            <ns7:p>CA</ns7:p>
          </ns4:table-cell>
          <ns4:table-cell ns0:value-type="string" ns6:value-type="string">
            <ns7:p>177856</ns7:p>
          </ns4:table-cell>
          <ns4:table-cell ns4:number-columns-repeated="9"/>
        </ns4:table-row>
        <ns4:table-row ns4:style-name="ro1">
          <ns4:table-cell ns0:value-type="string" ns6:value-type="string">
            <ns7:p>152.0</ns7:p>
          </ns4:table-cell>
          <ns4:table-cell ns0:value-type="string" ns6:value-type="string">
            <ns7:p>Pembroke Pines</ns7:p>
          </ns4:table-cell>
          <ns4:table-cell ns0:value-type="string" ns6:value-type="string">
            <ns7:p>FL</ns7:p>
          </ns4:table-cell>
          <ns4:table-cell ns0:value-type="string" ns6:value-type="string">
            <ns7:p>176714</ns7:p>
          </ns4:table-cell>
          <ns4:table-cell ns4:number-columns-repeated="9"/>
        </ns4:table-row>
        <ns4:table-row ns4:style-name="ro1">
          <ns4:table-cell ns0:value-type="string" ns6:value-type="string">
            <ns7:p>153.0</ns7:p>
          </ns4:table-cell>
          <ns4:table-cell ns0:value-type="string" ns6:value-type="string">
            <ns7:p>Shreveport</ns7:p>
          </ns4:table-cell>
          <ns4:table-cell ns0:value-type="string" ns6:value-type="string">
            <ns7:p>LA</ns7:p>
          </ns4:table-cell>
          <ns4:table-cell ns0:value-type="string" ns6:value-type="string">
            <ns7:p>175902</ns7:p>
          </ns4:table-cell>
          <ns4:table-cell ns4:number-columns-repeated="9">
            <ns7:p>Bobby L. Greene Plumbing</ns7:p>
          </ns4:table-cell>
        </ns4:table-row>
        <ns4:table-row ns4:style-name="ro1">
          <ns4:table-cell ns0:value-type="string" ns6:value-type="string">
            <ns7:p>154.0</ns7:p>
          </ns4:table-cell>
          <ns4:table-cell ns0:value-type="string" ns6:value-type="string">
            <ns7:p>Surprise</ns7:p>
          </ns4:table-cell>
          <ns4:table-cell ns0:value-type="string" ns6:value-type="string">
            <ns7:p>AZ</ns7:p>
          </ns4:table-cell>
          <ns4:table-cell ns0:value-type="string" ns6:value-type="string">
            <ns7:p>175304</ns7:p>
          </ns4:table-cell>
          <ns4:table-cell ns4:number-columns-repeated="9"/>
        </ns4:table-row>
        <ns4:table-row ns4:style-name="ro1">
          <ns4:table-cell ns0:value-type="string" ns6:value-type="string">
            <ns7:p>155.0</ns7:p>
          </ns4:table-cell>
          <ns4:table-cell ns0:value-type="string" ns6:value-type="string">
            <ns7:p>Fort Collins</ns7:p>
          </ns4:table-cell>
          <ns4:table-cell ns0:value-type="string" ns6:value-type="string">
            <ns7:p>CO</ns7:p>
          </ns4:table-cell>
          <ns4:table-cell ns0:value-type="string" ns6:value-type="string">
            <ns7:p>171500</ns7:p>
          </ns4:table-cell>
          <ns4:table-cell ns4:number-columns-repeated="9"/>
        </ns4:table-row>
        <ns4:table-row ns4:style-name="ro1">
          <ns4:table-cell ns0:value-type="string" ns6:value-type="string">
            <ns7:p>156.0</ns7:p>
          </ns4:table-cell>
          <ns4:table-cell ns0:value-type="string" ns6:value-type="string">
            <ns7:p>Murfreesboro</ns7:p>
          </ns4:table-cell>
          <ns4:table-cell ns0:value-type="string" ns6:value-type="string">
            <ns7:p>TN</ns7:p>
          </ns4:table-cell>
          <ns4:table-cell ns0:value-type="string" ns6:value-type="string">
            <ns7:p>171178</ns7:p>
          </ns4:table-cell>
          <ns4:table-cell ns4:number-columns-repeated="9"/>
        </ns4:table-row>
        <ns4:table-row ns4:style-name="ro1">
          <ns4:table-cell ns0:value-type="string" ns6:value-type="string">
            <ns7:p>157.0</ns7:p>
          </ns4:table-cell>
          <ns4:table-cell ns0:value-type="string" ns6:value-type="string">
            <ns7:p>Oceanside</ns7:p>
          </ns4:table-cell>
          <ns4:table-cell ns0:value-type="string" ns6:value-type="string">
            <ns7:p>CA</ns7:p>
          </ns4:table-cell>
          <ns4:table-cell ns0:value-type="string" ns6:value-type="string">
            <ns7:p>170483</ns7:p>
          </ns4:table-cell>
          <ns4:table-cell ns4:number-columns-repeated="9">
            <ns7:p>Parmley Plumbing</ns7:p>
          </ns4:table-cell>
        </ns4:table-row>
        <ns4:table-row ns4:style-name="ro1">
          <ns4:table-cell ns0:value-type="string" ns6:value-type="string">
            <ns7:p>158.0</ns7:p>
          </ns4:table-cell>
          <ns4:table-cell ns0:value-type="string" ns6:value-type="string">
            <ns7:p>Garden Grove</ns7:p>
          </ns4:table-cell>
          <ns4:table-cell ns0:value-type="string" ns6:value-type="string">
            <ns7:p>CA</ns7:p>
          </ns4:table-cell>
          <ns4:table-cell ns0:value-type="string" ns6:value-type="string">
            <ns7:p>170455</ns7:p>
          </ns4:table-cell>
          <ns4:table-cell ns4:number-columns-repeated="9"/>
        </ns4:table-row>
        <ns4:table-row ns4:style-name="ro1">
          <ns4:table-cell ns0:value-type="string" ns6:value-type="string">
            <ns7:p>159.0</ns7:p>
          </ns4:table-cell>
          <ns4:table-cell ns0:value-type="string" ns6:value-type="string">
            <ns7:p>Lancaster</ns7:p>
          </ns4:table-cell>
          <ns4:table-cell ns0:value-type="string" ns6:value-type="string">
            <ns7:p>CA</ns7:p>
          </ns4:table-cell>
          <ns4:table-cell ns0:value-type="string" ns6:value-type="string">
            <ns7:p>170084</ns7:p>
          </ns4:table-cell>
          <ns4:table-cell ns4:number-columns-repeated="9"/>
        </ns4:table-row>
        <ns4:table-row ns4:style-name="ro1">
          <ns4:table-cell ns0:value-type="string" ns6:value-type="string">
            <ns7:p>160.0</ns7:p>
          </ns4:table-cell>
          <ns4:table-cell ns0:value-type="string" ns6:value-type="string">
            <ns7:p>Springfield</ns7:p>
          </ns4:table-cell>
          <ns4:table-cell ns0:value-type="string" ns6:value-type="string">
            <ns7:p>MO</ns7:p>
          </ns4:table-cell>
          <ns4:table-cell ns0:value-type="string" ns6:value-type="string">
            <ns7:p>169847</ns7:p>
          </ns4:table-cell>
          <ns4:table-cell ns4:number-columns-repeated="9">
            <ns7:p>Junior's Plumbing LLC</ns7:p>
          </ns4:table-cell>
        </ns4:table-row>
        <ns4:table-row ns4:style-name="ro1">
          <ns4:table-cell ns0:value-type="string" ns6:value-type="string">
            <ns7:p>161.0</ns7:p>
          </ns4:table-cell>
          <ns4:table-cell ns0:value-type="string" ns6:value-type="string">
            <ns7:p>Denton</ns7:p>
          </ns4:table-cell>
          <ns4:table-cell ns0:value-type="string" ns6:value-type="string">
            <ns7:p>TX</ns7:p>
          </ns4:table-cell>
          <ns4:table-cell ns0:value-type="string" ns6:value-type="string">
            <ns7:p>169431</ns7:p>
          </ns4:table-cell>
          <ns4:table-cell ns4:number-columns-repeated="9"/>
        </ns4:table-row>
        <ns4:table-row ns4:style-name="ro1">
          <ns4:table-cell ns0:value-type="string" ns6:value-type="string">
            <ns7:p>162.0</ns7:p>
          </ns4:table-cell>
          <ns4:table-cell ns0:value-type="string" ns6:value-type="string">
            <ns7:p>Roseville</ns7:p>
          </ns4:table-cell>
          <ns4:table-cell ns0:value-type="string" ns6:value-type="string">
            <ns7:p>CA</ns7:p>
          </ns4:table-cell>
          <ns4:table-cell ns0:value-type="string" ns6:value-type="string">
            <ns7:p>167302</ns7:p>
          </ns4:table-cell>
          <ns4:table-cell ns4:number-columns-repeated="9"/>
        </ns4:table-row>
        <ns4:table-row ns4:style-name="ro1">
          <ns4:table-cell ns0:value-type="string" ns6:value-type="string">
            <ns7:p>163.0</ns7:p>
          </ns4:table-cell>
          <ns4:table-cell ns0:value-type="string" ns6:value-type="string">
            <ns7:p>Killeen</ns7:p>
          </ns4:table-cell>
          <ns4:table-cell ns0:value-type="string" ns6:value-type="string">
            <ns7:p>TX</ns7:p>
          </ns4:table-cell>
          <ns4:table-cell ns0:value-type="string" ns6:value-type="string">
            <ns7:p>161883</ns7:p>
          </ns4:table-cell>
          <ns4:table-cell ns4:number-columns-repeated="9"/>
        </ns4:table-row>
        <ns4:table-row ns4:style-name="ro1">
          <ns4:table-cell ns0:value-type="string" ns6:value-type="string">
            <ns7:p>164.0</ns7:p>
          </ns4:table-cell>
          <ns4:table-cell ns0:value-type="string" ns6:value-type="string">
            <ns7:p>Palmdale</ns7:p>
          </ns4:table-cell>
          <ns4:table-cell ns0:value-type="string" ns6:value-type="string">
            <ns7:p>CA</ns7:p>
          </ns4:table-cell>
          <ns4:table-cell ns0:value-type="string" ns6:value-type="string">
            <ns7:p>161845</ns7:p>
          </ns4:table-cell>
          <ns4:table-cell ns4:number-columns-repeated="9"/>
        </ns4:table-row>
        <ns4:table-row ns4:style-name="ro1">
          <ns4:table-cell ns0:value-type="string" ns6:value-type="string">
            <ns7:p>165.0</ns7:p>
          </ns4:table-cell>
          <ns4:table-cell ns0:value-type="string" ns6:value-type="string">
            <ns7:p>Paterson</ns7:p>
          </ns4:table-cell>
          <ns4:table-cell ns0:value-type="string" ns6:value-type="string">
            <ns7:p>NJ</ns7:p>
          </ns4:table-cell>
          <ns4:table-cell ns0:value-type="string" ns6:value-type="string">
            <ns7:p>161793</ns7:p>
          </ns4:table-cell>
          <ns4:table-cell ns4:number-columns-repeated="9"/>
        </ns4:table-row>
        <ns4:table-row ns4:style-name="ro1">
          <ns4:table-cell ns0:value-type="string" ns6:value-type="string">
            <ns7:p>166.0</ns7:p>
          </ns4:table-cell>
          <ns4:table-cell ns0:value-type="string" ns6:value-type="string">
            <ns7:p>Corona</ns7:p>
          </ns4:table-cell>
          <ns4:table-cell ns0:value-type="string" ns6:value-type="string">
            <ns7:p>CA</ns7:p>
          </ns4:table-cell>
          <ns4:table-cell ns0:value-type="string" ns6:value-type="string">
            <ns7:p>161734</ns7:p>
          </ns4:table-cell>
          <ns4:table-cell ns4:number-columns-repeated="9"/>
        </ns4:table-row>
        <ns4:table-row ns4:style-name="ro1">
          <ns4:table-cell ns0:value-type="string" ns6:value-type="string">
            <ns7:p>167.0</ns7:p>
          </ns4:table-cell>
          <ns4:table-cell ns0:value-type="string" ns6:value-type="string">
            <ns7:p>Alexandria</ns7:p>
          </ns4:table-cell>
          <ns4:table-cell ns0:value-type="string" ns6:value-type="string">
            <ns7:p>VA</ns7:p>
          </ns4:table-cell>
          <ns4:table-cell ns0:value-type="string" ns6:value-type="string">
            <ns7:p>160662</ns7:p>
          </ns4:table-cell>
          <ns4:table-cell ns4:number-columns-repeated="9"/>
        </ns4:table-row>
        <ns4:table-row ns4:style-name="ro1">
          <ns4:table-cell ns0:value-type="string" ns6:value-type="string">
            <ns7:p>168.0</ns7:p>
          </ns4:table-cell>
          <ns4:table-cell ns0:value-type="string" ns6:value-type="string">
            <ns7:p>Charleston</ns7:p>
          </ns4:table-cell>
          <ns4:table-cell ns0:value-type="string" ns6:value-type="string">
            <ns7:p>SC</ns7:p>
          </ns4:table-cell>
          <ns4:table-cell ns0:value-type="string" ns6:value-type="string">
            <ns7:p>159423</ns7:p>
          </ns4:table-cell>
          <ns4:table-cell ns4:number-columns-repeated="9">
            <ns7:p>Plumb Easy</ns7:p>
          </ns4:table-cell>
        </ns4:table-row>
        <ns4:table-row ns4:style-name="ro1">
          <ns4:table-cell ns0:value-type="string" ns6:value-type="string">
            <ns7:p>169.0</ns7:p>
          </ns4:table-cell>
          <ns4:table-cell ns0:value-type="string" ns6:value-type="string">
            <ns7:p>Salinas</ns7:p>
          </ns4:table-cell>
          <ns4:table-cell ns0:value-type="string" ns6:value-type="string">
            <ns7:p>CA</ns7:p>
          </ns4:table-cell>
          <ns4:table-cell ns0:value-type="string" ns6:value-type="string">
            <ns7:p>159134</ns7:p>
          </ns4:table-cell>
          <ns4:table-cell ns4:number-columns-repeated="9"/>
        </ns4:table-row>
        <ns4:table-row ns4:style-name="ro1">
          <ns4:table-cell ns0:value-type="string" ns6:value-type="string">
            <ns7:p>170.0</ns7:p>
          </ns4:table-cell>
          <ns4:table-cell ns0:value-type="string" ns6:value-type="string">
            <ns7:p>Kansas City</ns7:p>
          </ns4:table-cell>
          <ns4:table-cell ns0:value-type="string" ns6:value-type="string">
            <ns7:p>KS</ns7:p>
          </ns4:table-cell>
          <ns4:table-cell ns0:value-type="string" ns6:value-type="string">
            <ns7:p>157805</ns7:p>
          </ns4:table-cell>
          <ns4:table-cell ns4:number-columns-repeated="9"/>
        </ns4:table-row>
        <ns4:table-row ns4:style-name="ro1">
          <ns4:table-cell ns0:value-type="string" ns6:value-type="string">
            <ns7:p>171.0</ns7:p>
          </ns4:table-cell>
          <ns4:table-cell ns0:value-type="string" ns6:value-type="string">
            <ns7:p>Macon-Bibb County</ns7:p>
          </ns4:table-cell>
          <ns4:table-cell ns0:value-type="string" ns6:value-type="string">
            <ns7:p>GA</ns7:p>
          </ns4:table-cell>
          <ns4:table-cell ns0:value-type="string" ns6:value-type="string">
            <ns7:p>157556</ns7:p>
          </ns4:table-cell>
          <ns4:table-cell ns4:number-columns-repeated="9"/>
        </ns4:table-row>
        <ns4:table-row ns4:style-name="ro1">
          <ns4:table-cell ns0:value-type="string" ns6:value-type="string">
            <ns7:p>172.0</ns7:p>
          </ns4:table-cell>
          <ns4:table-cell ns0:value-type="string" ns6:value-type="string">
            <ns7:p>Hayward</ns7:p>
          </ns4:table-cell>
          <ns4:table-cell ns0:value-type="string" ns6:value-type="string">
            <ns7:p>CA</ns7:p>
          </ns4:table-cell>
          <ns4:table-cell ns0:value-type="string" ns6:value-type="string">
            <ns7:p>157113</ns7:p>
          </ns4:table-cell>
          <ns4:table-cell ns4:number-columns-repeated="9"/>
        </ns4:table-row>
        <ns4:table-row ns4:style-name="ro1">
          <ns4:table-cell ns0:value-type="string" ns6:value-type="string">
            <ns7:p>173.0</ns7:p>
          </ns4:table-cell>
          <ns4:table-cell ns0:value-type="string" ns6:value-type="string">
            <ns7:p>Hollywood</ns7:p>
          </ns4:table-cell>
          <ns4:table-cell ns0:value-type="string" ns6:value-type="string">
            <ns7:p>FL</ns7:p>
          </ns4:table-cell>
          <ns4:table-cell ns0:value-type="string" ns6:value-type="string">
            <ns7:p>157019</ns7:p>
          </ns4:table-cell>
          <ns4:table-cell ns4:number-columns-repeated="9"/>
        </ns4:table-row>
        <ns4:table-row ns4:style-name="ro1">
          <ns4:table-cell ns0:value-type="string" ns6:value-type="string">
            <ns7:p>174.0</ns7:p>
          </ns4:table-cell>
          <ns4:table-cell ns0:value-type="string" ns6:value-type="string">
            <ns7:p>Lakewood</ns7:p>
          </ns4:table-cell>
          <ns4:table-cell ns0:value-type="string" ns6:value-type="string">
            <ns7:p>CO</ns7:p>
          </ns4:table-cell>
          <ns4:table-cell ns0:value-type="string" ns6:value-type="string">
            <ns7:p>156927</ns7:p>
          </ns4:table-cell>
          <ns4:table-cell ns4:number-columns-repeated="9"/>
        </ns4:table-row>
        <ns4:table-row ns4:style-name="ro1">
          <ns4:table-cell ns0:value-type="string" ns6:value-type="string">
            <ns7:p>175.0</ns7:p>
          </ns4:table-cell>
          <ns4:table-cell ns0:value-type="string" ns6:value-type="string">
            <ns7:p>Sunnyvale</ns7:p>
          </ns4:table-cell>
          <ns4:table-cell ns0:value-type="string" ns6:value-type="string">
            <ns7:p>CA</ns7:p>
          </ns4:table-cell>
          <ns4:table-cell ns0:value-type="string" ns6:value-type="string">
            <ns7:p>156577</ns7:p>
          </ns4:table-cell>
          <ns4:table-cell ns4:number-columns-repeated="9"/>
        </ns4:table-row>
        <ns4:table-row ns4:style-name="ro1">
          <ns4:table-cell ns0:value-type="string" ns6:value-type="string">
            <ns7:p>176.0</ns7:p>
          </ns4:table-cell>
          <ns4:table-cell ns0:value-type="string" ns6:value-type="string">
            <ns7:p>Springfield</ns7:p>
          </ns4:table-cell>
          <ns4:table-cell ns0:value-type="string" ns6:value-type="string">
            <ns7:p>MA</ns7:p>
          </ns4:table-cell>
          <ns4:table-cell ns0:value-type="string" ns6:value-type="string">
            <ns7:p>154702</ns7:p>
          </ns4:table-cell>
          <ns4:table-cell ns4:number-columns-repeated="9"/>
        </ns4:table-row>
        <ns4:table-row ns4:style-name="ro1">
          <ns4:table-cell ns0:value-type="string" ns6:value-type="string">
            <ns7:p>177.0</ns7:p>
          </ns4:table-cell>
          <ns4:table-cell ns0:value-type="string" ns6:value-type="string">
            <ns7:p>Bellevue</ns7:p>
          </ns4:table-cell>
          <ns4:table-cell ns0:value-type="string" ns6:value-type="string">
            <ns7:p>WA</ns7:p>
          </ns4:table-cell>
          <ns4:table-cell ns0:value-type="string" ns6:value-type="string">
            <ns7:p>154193</ns7:p>
          </ns4:table-cell>
          <ns4:table-cell ns4:number-columns-repeated="9"/>
        </ns4:table-row>
        <ns4:table-row ns4:style-name="ro1">
          <ns4:table-cell ns0:value-type="string" ns6:value-type="string">
            <ns7:p>178.0</ns7:p>
          </ns4:table-cell>
          <ns4:table-cell ns0:value-type="string" ns6:value-type="string">
            <ns7:p>Naperville</ns7:p>
          </ns4:table-cell>
          <ns4:table-cell ns0:value-type="string" ns6:value-type="string">
            <ns7:p>IL</ns7:p>
          </ns4:table-cell>
          <ns4:table-cell ns0:value-type="string" ns6:value-type="string">
            <ns7:p>153114</ns7:p>
          </ns4:table-cell>
          <ns4:table-cell ns4:number-columns-repeated="9"/>
        </ns4:table-row>
        <ns4:table-row ns4:style-name="ro1">
          <ns4:table-cell ns0:value-type="string" ns6:value-type="string">
            <ns7:p>179.0</ns7:p>
          </ns4:table-cell>
          <ns4:table-cell ns0:value-type="string" ns6:value-type="string">
            <ns7:p>Bridgeport</ns7:p>
          </ns4:table-cell>
          <ns4:table-cell ns0:value-type="string" ns6:value-type="string">
            <ns7:p>CT</ns7:p>
          </ns4:table-cell>
          <ns4:table-cell ns0:value-type="string" ns6:value-type="string">
            <ns7:p>152273</ns7:p>
          </ns4:table-cell>
          <ns4:table-cell ns4:number-columns-repeated="9"/>
        </ns4:table-row>
        <ns4:table-row ns4:style-name="ro1">
          <ns4:table-cell ns0:value-type="string" ns6:value-type="string">
            <ns7:p>180.0</ns7:p>
          </ns4:table-cell>
          <ns4:table-cell ns0:value-type="string" ns6:value-type="string">
            <ns7:p>Joliet</ns7:p>
          </ns4:table-cell>
          <ns4:table-cell ns0:value-type="string" ns6:value-type="string">
            <ns7:p>IL</ns7:p>
          </ns4:table-cell>
          <ns4:table-cell ns0:value-type="string" ns6:value-type="string">
            <ns7:p>152241</ns7:p>
          </ns4:table-cell>
          <ns4:table-cell ns4:number-columns-repeated="9"/>
        </ns4:table-row>
        <ns4:table-row ns4:style-name="ro1">
          <ns4:table-cell ns0:value-type="string" ns6:value-type="string">
            <ns7:p>181.0</ns7:p>
          </ns4:table-cell>
          <ns4:table-cell ns0:value-type="string" ns6:value-type="string">
            <ns7:p>Mesquite</ns7:p>
          </ns4:table-cell>
          <ns4:table-cell ns0:value-type="string" ns6:value-type="string">
            <ns7:p>TX</ns7:p>
          </ns4:table-cell>
          <ns4:table-cell ns0:value-type="string" ns6:value-type="string">
            <ns7:p>150693</ns7:p>
          </ns4:table-cell>
          <ns4:table-cell ns4:number-columns-repeated="9"/>
        </ns4:table-row>
        <ns4:table-row ns4:style-name="ro1">
          <ns4:table-cell ns0:value-type="string" ns6:value-type="string">
            <ns7:p>182.0</ns7:p>
          </ns4:table-cell>
          <ns4:table-cell ns0:value-type="string" ns6:value-type="string">
            <ns7:p>McAllen</ns7:p>
          </ns4:table-cell>
          <ns4:table-cell ns0:value-type="string" ns6:value-type="string">
            <ns7:p>TX</ns7:p>
          </ns4:table-cell>
          <ns4:table-cell ns0:value-type="string" ns6:value-type="string">
            <ns7:p>150640</ns7:p>
          </ns4:table-cell>
          <ns4:table-cell ns4:number-columns-repeated="9"/>
        </ns4:table-row>
        <ns4:table-row ns4:style-name="ro1">
          <ns4:table-cell ns0:value-type="string" ns6:value-type="string">
            <ns7:p>183.0</ns7:p>
          </ns4:table-cell>
          <ns4:table-cell ns0:value-type="string" ns6:value-type="string">
            <ns7:p>Olathe</ns7:p>
          </ns4:table-cell>
          <ns4:table-cell ns0:value-type="string" ns6:value-type="string">
            <ns7:p>KS</ns7:p>
          </ns4:table-cell>
          <ns4:table-cell ns0:value-type="string" ns6:value-type="string">
            <ns7:p>150025</ns7:p>
          </ns4:table-cell>
          <ns4:table-cell ns4:number-columns-repeated="9"/>
        </ns4:table-row>
        <ns4:table-row ns4:style-name="ro1">
          <ns4:table-cell ns0:value-type="string" ns6:value-type="string">
            <ns7:p>184.0</ns7:p>
          </ns4:table-cell>
          <ns4:table-cell ns0:value-type="string" ns6:value-type="string">
            <ns7:p>Savannah</ns7:p>
          </ns4:table-cell>
          <ns4:table-cell ns0:value-type="string" ns6:value-type="string">
            <ns7:p>GA</ns7:p>
          </ns4:table-cell>
          <ns4:table-cell ns0:value-type="string" ns6:value-type="string">
            <ns7:p>149440</ns7:p>
          </ns4:table-cell>
          <ns4:table-cell ns4:number-columns-repeated="9"/>
        </ns4:table-row>
        <ns4:table-row ns4:style-name="ro1">
          <ns4:table-cell ns0:value-type="string" ns6:value-type="string">
            <ns7:p>185.0</ns7:p>
          </ns4:table-cell>
          <ns4:table-cell ns0:value-type="string" ns6:value-type="string">
            <ns7:p>Gainesville</ns7:p>
          </ns4:table-cell>
          <ns4:table-cell ns0:value-type="string" ns6:value-type="string">
            <ns7:p>FL</ns7:p>
          </ns4:table-cell>
          <ns4:table-cell ns0:value-type="string" ns6:value-type="string">
            <ns7:p>148671</ns7:p>
          </ns4:table-cell>
          <ns4:table-cell ns4:number-columns-repeated="9"/>
        </ns4:table-row>
        <ns4:table-row ns4:style-name="ro1">
          <ns4:table-cell ns0:value-type="string" ns6:value-type="string">
            <ns7:p>186.0</ns7:p>
          </ns4:table-cell>
          <ns4:table-cell ns0:value-type="string" ns6:value-type="string">
            <ns7:p>Pasadena</ns7:p>
          </ns4:table-cell>
          <ns4:table-cell ns0:value-type="string" ns6:value-type="string">
            <ns7:p>TX</ns7:p>
          </ns4:table-cell>
          <ns4:table-cell ns0:value-type="string" ns6:value-type="string">
            <ns7:p>148539</ns7:p>
          </ns4:table-cell>
          <ns4:table-cell ns4:number-columns-repeated="9"/>
        </ns4:table-row>
        <ns4:table-row ns4:style-name="ro1">
          <ns4:table-cell ns0:value-type="string" ns6:value-type="string">
            <ns7:p>187.0</ns7:p>
          </ns4:table-cell>
          <ns4:table-cell ns0:value-type="string" ns6:value-type="string">
            <ns7:p>Palm Bay</ns7:p>
          </ns4:table-cell>
          <ns4:table-cell ns0:value-type="string" ns6:value-type="string">
            <ns7:p>FL</ns7:p>
          </ns4:table-cell>
          <ns4:table-cell ns0:value-type="string" ns6:value-type="string">
            <ns7:p>148092</ns7:p>
          </ns4:table-cell>
          <ns4:table-cell ns4:number-columns-repeated="9"/>
        </ns4:table-row>
        <ns4:table-row ns4:style-name="ro1">
          <ns4:table-cell ns0:value-type="string" ns6:value-type="string">
            <ns7:p>188.0</ns7:p>
          </ns4:table-cell>
          <ns4:table-cell ns0:value-type="string" ns6:value-type="string">
            <ns7:p>Pomona</ns7:p>
          </ns4:table-cell>
          <ns4:table-cell ns0:value-type="string" ns6:value-type="string">
            <ns7:p>CA</ns7:p>
          </ns4:table-cell>
          <ns4:table-cell ns0:value-type="string" ns6:value-type="string">
            <ns7:p>147807</ns7:p>
          </ns4:table-cell>
          <ns4:table-cell ns4:number-columns-repeated="9"/>
        </ns4:table-row>
        <ns4:table-row ns4:style-name="ro1">
          <ns4:table-cell ns0:value-type="string" ns6:value-type="string">
            <ns7:p>189.0</ns7:p>
          </ns4:table-cell>
          <ns4:table-cell ns0:value-type="string" ns6:value-type="string">
            <ns7:p>Waco</ns7:p>
          </ns4:table-cell>
          <ns4:table-cell ns0:value-type="string" ns6:value-type="string">
            <ns7:p>TX</ns7:p>
          </ns4:table-cell>
          <ns4:table-cell ns0:value-type="string" ns6:value-type="string">
            <ns7:p>147788</ns7:p>
          </ns4:table-cell>
          <ns4:table-cell ns4:number-columns-repeated="9"/>
        </ns4:table-row>
        <ns4:table-row ns4:style-name="ro1">
          <ns4:table-cell ns0:value-type="string" ns6:value-type="string">
            <ns7:p>190.0</ns7:p>
          </ns4:table-cell>
          <ns4:table-cell ns0:value-type="string" ns6:value-type="string">
            <ns7:p>Thornton</ns7:p>
          </ns4:table-cell>
          <ns4:table-cell ns0:value-type="string" ns6:value-type="string">
            <ns7:p>CO</ns7:p>
          </ns4:table-cell>
          <ns4:table-cell ns0:value-type="string" ns6:value-type="string">
            <ns7:p>147766</ns7:p>
          </ns4:table-cell>
          <ns4:table-cell ns4:number-columns-repeated="9"/>
        </ns4:table-row>
        <ns4:table-row ns4:style-name="ro1">
          <ns4:table-cell ns0:value-type="string" ns6:value-type="string">
            <ns7:p>191.0</ns7:p>
          </ns4:table-cell>
          <ns4:table-cell ns0:value-type="string" ns6:value-type="string">
            <ns7:p>Midland</ns7:p>
          </ns4:table-cell>
          <ns4:table-cell ns0:value-type="string" ns6:value-type="string">
            <ns7:p>TX</ns7:p>
          </ns4:table-cell>
          <ns4:table-cell ns0:value-type="string" ns6:value-type="string">
            <ns7:p>147615</ns7:p>
          </ns4:table-cell>
          <ns4:table-cell ns4:number-columns-repeated="9"/>
        </ns4:table-row>
        <ns4:table-row ns4:style-name="ro1">
          <ns4:table-cell ns0:value-type="string" ns6:value-type="string">
            <ns7:p>192.0</ns7:p>
          </ns4:table-cell>
          <ns4:table-cell ns0:value-type="string" ns6:value-type="string">
            <ns7:p>Rockford</ns7:p>
          </ns4:table-cell>
          <ns4:table-cell ns0:value-type="string" ns6:value-type="string">
            <ns7:p>IL</ns7:p>
          </ns4:table-cell>
          <ns4:table-cell ns0:value-type="string" ns6:value-type="string">
            <ns7:p>147384</ns7:p>
          </ns4:table-cell>
          <ns4:table-cell ns4:number-columns-repeated="9"/>
        </ns4:table-row>
        <ns4:table-row ns4:style-name="ro1">
          <ns4:table-cell ns0:value-type="string" ns6:value-type="string">
            <ns7:p>193.0</ns7:p>
          </ns4:table-cell>
          <ns4:table-cell ns0:value-type="string" ns6:value-type="string">
            <ns7:p>Columbia</ns7:p>
          </ns4:table-cell>
          <ns4:table-cell ns0:value-type="string" ns6:value-type="string">
            <ns7:p>SC</ns7:p>
          </ns4:table-cell>
          <ns4:table-cell ns0:value-type="string" ns6:value-type="string">
            <ns7:p>147035</ns7:p>
          </ns4:table-cell>
          <ns4:table-cell ns4:number-columns-repeated="9">
            <ns7:p>Franklin Plumbing &amp; Drain Cleaning</ns7:p>
          </ns4:table-cell>
        </ns4:table-row>
        <ns4:table-row ns4:style-name="ro1">
          <ns4:table-cell ns0:value-type="string" ns6:value-type="string">
            <ns7:p>194.0</ns7:p>
          </ns4:table-cell>
          <ns4:table-cell ns0:value-type="string" ns6:value-type="string">
            <ns7:p>Visalia</ns7:p>
          </ns4:table-cell>
          <ns4:table-cell ns0:value-type="string" ns6:value-type="string">
            <ns7:p>CA</ns7:p>
          </ns4:table-cell>
          <ns4:table-cell ns0:value-type="string" ns6:value-type="string">
            <ns7:p>146541</ns7:p>
          </ns4:table-cell>
          <ns4:table-cell ns4:number-columns-repeated="9"/>
        </ns4:table-row>
        <ns4:table-row ns4:style-name="ro1">
          <ns4:table-cell ns0:value-type="string" ns6:value-type="string">
            <ns7:p>195.0</ns7:p>
          </ns4:table-cell>
          <ns4:table-cell ns0:value-type="string" ns6:value-type="string">
            <ns7:p>Escondido</ns7:p>
          </ns4:table-cell>
          <ns4:table-cell ns0:value-type="string" ns6:value-type="string">
            <ns7:p>CA</ns7:p>
          </ns4:table-cell>
          <ns4:table-cell ns0:value-type="string" ns6:value-type="string">
            <ns7:p>146030</ns7:p>
          </ns4:table-cell>
          <ns4:table-cell ns4:number-columns-repeated="9"/>
        </ns4:table-row>
        <ns4:table-row ns4:style-name="ro1">
          <ns4:table-cell ns0:value-type="string" ns6:value-type="string">
            <ns7:p>196.0</ns7:p>
          </ns4:table-cell>
          <ns4:table-cell ns0:value-type="string" ns6:value-type="string">
            <ns7:p>Syracuse</ns7:p>
          </ns4:table-cell>
          <ns4:table-cell ns0:value-type="string" ns6:value-type="string">
            <ns7:p>NY</ns7:p>
          </ns4:table-cell>
          <ns4:table-cell ns0:value-type="string" ns6:value-type="string">
            <ns7:p>144896</ns7:p>
          </ns4:table-cell>
          <ns4:table-cell ns4:number-columns-repeated="9"/>
        </ns4:table-row>
        <ns4:table-row ns4:style-name="ro1">
          <ns4:table-cell ns0:value-type="string" ns6:value-type="string">
            <ns7:p>197.0</ns7:p>
          </ns4:table-cell>
          <ns4:table-cell ns0:value-type="string" ns6:value-type="string">
            <ns7:p>Meridian</ns7:p>
          </ns4:table-cell>
          <ns4:table-cell ns0:value-type="string" ns6:value-type="string">
            <ns7:p>ID</ns7:p>
          </ns4:table-cell>
          <ns4:table-cell ns0:value-type="string" ns6:value-type="string">
            <ns7:p>142988</ns7:p>
          </ns4:table-cell>
          <ns4:table-cell ns4:number-columns-repeated="9"/>
        </ns4:table-row>
        <ns4:table-row ns4:style-name="ro1">
          <ns4:table-cell ns0:value-type="string" ns6:value-type="string">
            <ns7:p>198.0</ns7:p>
          </ns4:table-cell>
          <ns4:table-cell ns0:value-type="string" ns6:value-type="string">
            <ns7:p>Miramar</ns7:p>
          </ns4:table-cell>
          <ns4:table-cell ns0:value-type="string" ns6:value-type="string">
            <ns7:p>FL</ns7:p>
          </ns4:table-cell>
          <ns4:table-cell ns0:value-type="string" ns6:value-type="string">
            <ns7:p>142570</ns7:p>
          </ns4:table-cell>
          <ns4:table-cell ns4:number-columns-repeated="9"/>
        </ns4:table-row>
        <ns4:table-row ns4:style-name="ro1">
          <ns4:table-cell ns0:value-type="string" ns6:value-type="string">
            <ns7:p>199.0</ns7:p>
          </ns4:table-cell>
          <ns4:table-cell ns0:value-type="string" ns6:value-type="string">
            <ns7:p>Elizabeth</ns7:p>
          </ns4:table-cell>
          <ns4:table-cell ns0:value-type="string" ns6:value-type="string">
            <ns7:p>NJ</ns7:p>
          </ns4:table-cell>
          <ns4:table-cell ns0:value-type="string" ns6:value-type="string">
            <ns7:p>141675</ns7:p>
          </ns4:table-cell>
          <ns4:table-cell ns4:number-columns-repeated="9"/>
        </ns4:table-row>
        <ns4:table-row ns4:style-name="ro1">
          <ns4:table-cell ns0:value-type="string" ns6:value-type="string">
            <ns7:p>200.0</ns7:p>
          </ns4:table-cell>
          <ns4:table-cell ns0:value-type="string" ns6:value-type="string">
            <ns7:p>Victorville</ns7:p>
          </ns4:table-cell>
          <ns4:table-cell ns0:value-type="string" ns6:value-type="string">
            <ns7:p>CA</ns7:p>
          </ns4:table-cell>
          <ns4:table-cell ns0:value-type="string" ns6:value-type="string">
            <ns7:p>141395</ns7:p>
          </ns4:table-cell>
          <ns4:table-cell ns4:number-columns-repeated="9"/>
        </ns4:table-row>
        <ns4:table-row ns4:style-name="ro1">
          <ns4:table-cell ns0:value-type="string" ns6:value-type="string">
            <ns7:p>201.0</ns7:p>
          </ns4:table-cell>
          <ns4:table-cell ns0:value-type="string" ns6:value-type="string">
            <ns7:p>Round Rock</ns7:p>
          </ns4:table-cell>
          <ns4:table-cell ns0:value-type="string" ns6:value-type="string">
            <ns7:p>TX</ns7:p>
          </ns4:table-cell>
          <ns4:table-cell ns0:value-type="string" ns6:value-type="string">
            <ns7:p>141282</ns7:p>
          </ns4:table-cell>
          <ns4:table-cell ns4:number-columns-repeated="9"/>
        </ns4:table-row>
        <ns4:table-row ns4:style-name="ro1">
          <ns4:table-cell ns0:value-type="string" ns6:value-type="string">
            <ns7:p>202.0</ns7:p>
          </ns4:table-cell>
          <ns4:table-cell ns0:value-type="string" ns6:value-type="string">
            <ns7:p>Jackson</ns7:p>
          </ns4:table-cell>
          <ns4:table-cell ns0:value-type="string" ns6:value-type="string">
            <ns7:p>MS</ns7:p>
          </ns4:table-cell>
          <ns4:table-cell ns0:value-type="string" ns6:value-type="string">
            <ns7:p>141196</ns7:p>
          </ns4:table-cell>
          <ns4:table-cell ns4:number-columns-repeated="9">
            <ns7:p>Mississippi Plumbing Solutions - Formerly Reid Plumbing</ns7:p>
          </ns4:table-cell>
        </ns4:table-row>
        <ns4:table-row ns4:style-name="ro1">
          <ns4:table-cell ns0:value-type="string" ns6:value-type="string">
            <ns7:p>203.0</ns7:p>
          </ns4:table-cell>
          <ns4:table-cell ns0:value-type="string" ns6:value-type="string">
            <ns7:p>Stamford</ns7:p>
          </ns4:table-cell>
          <ns4:table-cell ns0:value-type="string" ns6:value-type="string">
            <ns7:p>CT</ns7:p>
          </ns4:table-cell>
          <ns4:table-cell ns0:value-type="string" ns6:value-type="string">
            <ns7:p>139535</ns7:p>
          </ns4:table-cell>
          <ns4:table-cell ns4:number-columns-repeated="9"/>
        </ns4:table-row>
        <ns4:table-row ns4:style-name="ro1">
          <ns4:table-cell ns0:value-type="string" ns6:value-type="string">
            <ns7:p>204.0</ns7:p>
          </ns4:table-cell>
          <ns4:table-cell ns0:value-type="string" ns6:value-type="string">
            <ns7:p>Lewisville</ns7:p>
          </ns4:table-cell>
          <ns4:table-cell ns0:value-type="string" ns6:value-type="string">
            <ns7:p>TX</ns7:p>
          </ns4:table-cell>
          <ns4:table-cell ns0:value-type="string" ns6:value-type="string">
            <ns7:p>139006</ns7:p>
          </ns4:table-cell>
          <ns4:table-cell ns4:number-columns-repeated="9"/>
        </ns4:table-row>
        <ns4:table-row ns4:style-name="ro1">
          <ns4:table-cell ns0:value-type="string" ns6:value-type="string">
            <ns7:p>205.0</ns7:p>
          </ns4:table-cell>
          <ns4:table-cell ns0:value-type="string" ns6:value-type="string">
            <ns7:p>Coral Springs</ns7:p>
          </ns4:table-cell>
          <ns4:table-cell ns0:value-type="string" ns6:value-type="string">
            <ns7:p>FL</ns7:p>
          </ns4:table-cell>
          <ns4:table-cell ns0:value-type="string" ns6:value-type="string">
            <ns7:p>138783</ns7:p>
          </ns4:table-cell>
          <ns4:table-cell ns4:number-columns-repeated="9"/>
        </ns4:table-row>
        <ns4:table-row ns4:style-name="ro1">
          <ns4:table-cell ns0:value-type="string" ns6:value-type="string">
            <ns7:p>206.0</ns7:p>
          </ns4:table-cell>
          <ns4:table-cell ns0:value-type="string" ns6:value-type="string">
            <ns7:p>New Haven</ns7:p>
          </ns4:table-cell>
          <ns4:table-cell ns0:value-type="string" ns6:value-type="string">
            <ns7:p>CT</ns7:p>
          </ns4:table-cell>
          <ns4:table-cell ns0:value-type="string" ns6:value-type="string">
            <ns7:p>138774</ns7:p>
          </ns4:table-cell>
          <ns4:table-cell ns4:number-columns-repeated="9"/>
        </ns4:table-row>
        <ns4:table-row ns4:style-name="ro1">
          <ns4:table-cell ns0:value-type="string" ns6:value-type="string">
            <ns7:p>207.0</ns7:p>
          </ns4:table-cell>
          <ns4:table-cell ns0:value-type="string" ns6:value-type="string">
            <ns7:p>Fullerton</ns7:p>
          </ns4:table-cell>
          <ns4:table-cell ns0:value-type="string" ns6:value-type="string">
            <ns7:p>CA</ns7:p>
          </ns4:table-cell>
          <ns4:table-cell ns0:value-type="string" ns6:value-type="string">
            <ns7:p>138675</ns7:p>
          </ns4:table-cell>
          <ns4:table-cell ns4:number-columns-repeated="9"/>
        </ns4:table-row>
        <ns4:table-row ns4:style-name="ro1">
          <ns4:table-cell ns0:value-type="string" ns6:value-type="string">
            <ns7:p>208.0</ns7:p>
          </ns4:table-cell>
          <ns4:table-cell ns0:value-type="string" ns6:value-type="string">
            <ns7:p>Torrance</ns7:p>
          </ns4:table-cell>
          <ns4:table-cell ns0:value-type="string" ns6:value-type="string">
            <ns7:p>CA</ns7:p>
          </ns4:table-cell>
          <ns4:table-cell ns0:value-type="string" ns6:value-type="string">
            <ns7:p>138391</ns7:p>
          </ns4:table-cell>
          <ns4:table-cell ns4:number-columns-repeated="9"/>
        </ns4:table-row>
        <ns4:table-row ns4:style-name="ro1">
          <ns4:table-cell ns0:value-type="string" ns6:value-type="string">
            <ns7:p>209.0</ns7:p>
          </ns4:table-cell>
          <ns4:table-cell ns0:value-type="string" ns6:value-type="string">
            <ns7:p>Orange</ns7:p>
          </ns4:table-cell>
          <ns4:table-cell ns0:value-type="string" ns6:value-type="string">
            <ns7:p>CA</ns7:p>
          </ns4:table-cell>
          <ns4:table-cell ns0:value-type="string" ns6:value-type="string">
            <ns7:p>138365</ns7:p>
          </ns4:table-cell>
          <ns4:table-cell ns4:number-columns-repeated="9"/>
        </ns4:table-row>
        <ns4:table-row ns4:style-name="ro1">
          <ns4:table-cell ns0:value-type="string" ns6:value-type="string">
            <ns7:p>210.0</ns7:p>
          </ns4:table-cell>
          <ns4:table-cell ns0:value-type="string" ns6:value-type="string">
            <ns7:p>Cedar Rapids</ns7:p>
          </ns4:table-cell>
          <ns4:table-cell ns0:value-type="string" ns6:value-type="string">
            <ns7:p>IA</ns7:p>
          </ns4:table-cell>
          <ns4:table-cell ns0:value-type="string" ns6:value-type="string">
            <ns7:p>137935</ns7:p>
          </ns4:table-cell>
          <ns4:table-cell ns4:number-columns-repeated="9"/>
        </ns4:table-row>
        <ns4:table-row ns4:style-name="ro1">
          <ns4:table-cell ns0:value-type="string" ns6:value-type="string">
            <ns7:p>211.0</ns7:p>
          </ns4:table-cell>
          <ns4:table-cell ns0:value-type="string" ns6:value-type="string">
            <ns7:p>West Valley City</ns7:p>
          </ns4:table-cell>
          <ns4:table-cell ns0:value-type="string" ns6:value-type="string">
            <ns7:p>UT</ns7:p>
          </ns4:table-cell>
          <ns4:table-cell ns0:value-type="string" ns6:value-type="string">
            <ns7:p>137491</ns7:p>
          </ns4:table-cell>
          <ns4:table-cell ns4:number-columns-repeated="9"/>
        </ns4:table-row>
        <ns4:table-row ns4:style-name="ro1">
          <ns4:table-cell ns0:value-type="string" ns6:value-type="string">
            <ns7:p>212.0</ns7:p>
          </ns4:table-cell>
          <ns4:table-cell ns0:value-type="string" ns6:value-type="string">
            <ns7:p>Hampton</ns7:p>
          </ns4:table-cell>
          <ns4:table-cell ns0:value-type="string" ns6:value-type="string">
            <ns7:p>VA</ns7:p>
          </ns4:table-cell>
          <ns4:table-cell ns0:value-type="string" ns6:value-type="string">
            <ns7:p>137315</ns7:p>
          </ns4:table-cell>
          <ns4:table-cell ns4:number-columns-repeated="9"/>
        </ns4:table-row>
        <ns4:table-row ns4:style-name="ro1">
          <ns4:table-cell ns0:value-type="string" ns6:value-type="string">
            <ns7:p>213.0</ns7:p>
          </ns4:table-cell>
          <ns4:table-cell ns0:value-type="string" ns6:value-type="string">
            <ns7:p>Warren</ns7:p>
          </ns4:table-cell>
          <ns4:table-cell ns0:value-type="string" ns6:value-type="string">
            <ns7:p>MI</ns7:p>
          </ns4:table-cell>
          <ns4:table-cell ns0:value-type="string" ns6:value-type="string">
            <ns7:p>137138</ns7:p>
          </ns4:table-cell>
          <ns4:table-cell ns4:number-columns-repeated="9"/>
        </ns4:table-row>
        <ns4:table-row ns4:style-name="ro1">
          <ns4:table-cell ns0:value-type="string" ns6:value-type="string">
            <ns7:p>214.0</ns7:p>
          </ns4:table-cell>
          <ns4:table-cell ns0:value-type="string" ns6:value-type="string">
            <ns7:p>Dayton</ns7:p>
          </ns4:table-cell>
          <ns4:table-cell ns0:value-type="string" ns6:value-type="string">
            <ns7:p>OH</ns7:p>
          </ns4:table-cell>
          <ns4:table-cell ns0:value-type="string" ns6:value-type="string">
            <ns7:p>136688</ns7:p>
          </ns4:table-cell>
          <ns4:table-cell ns4:number-columns-repeated="9"/>
        </ns4:table-row>
        <ns4:table-row ns4:style-name="ro1">
          <ns4:table-cell ns0:value-type="string" ns6:value-type="string">
            <ns7:p>215.0</ns7:p>
          </ns4:table-cell>
          <ns4:table-cell ns0:value-type="string" ns6:value-type="string">
            <ns7:p>Fargo</ns7:p>
          </ns4:table-cell>
          <ns4:table-cell ns0:value-type="string" ns6:value-type="string">
            <ns7:p>ND</ns7:p>
          </ns4:table-cell>
          <ns4:table-cell ns0:value-type="string" ns6:value-type="string">
            <ns7:p>136275</ns7:p>
          </ns4:table-cell>
          <ns4:table-cell ns4:number-columns-repeated="9">
            <ns7:p>LEGACY PLUMBING &amp; HEATING</ns7:p>
          </ns4:table-cell>
        </ns4:table-row>
        <ns4:table-row ns4:style-name="ro1">
          <ns4:table-cell ns0:value-type="string" ns6:value-type="string">
            <ns7:p>216.0</ns7:p>
          </ns4:table-cell>
          <ns4:table-cell ns0:value-type="string" ns6:value-type="string">
            <ns7:p>Pasadena</ns7:p>
          </ns4:table-cell>
          <ns4:table-cell ns0:value-type="string" ns6:value-type="string">
            <ns7:p>CA</ns7:p>
          </ns4:table-cell>
          <ns4:table-cell ns0:value-type="string" ns6:value-type="string">
            <ns7:p>135804</ns7:p>
          </ns4:table-cell>
          <ns4:table-cell ns4:number-columns-repeated="9"/>
        </ns4:table-row>
        <ns4:table-row ns4:style-name="ro1">
          <ns4:table-cell ns0:value-type="string" ns6:value-type="string">
            <ns7:p>217.0</ns7:p>
          </ns4:table-cell>
          <ns4:table-cell ns0:value-type="string" ns6:value-type="string">
            <ns7:p>Kent</ns7:p>
          </ns4:table-cell>
          <ns4:table-cell ns0:value-type="string" ns6:value-type="string">
            <ns7:p>WA</ns7:p>
          </ns4:table-cell>
          <ns4:table-cell ns0:value-type="string" ns6:value-type="string">
            <ns7:p>134871</ns7:p>
          </ns4:table-cell>
          <ns4:table-cell ns4:number-columns-repeated="9"/>
        </ns4:table-row>
        <ns4:table-row ns4:style-name="ro1">
          <ns4:table-cell ns0:value-type="string" ns6:value-type="string">
            <ns7:p>218.0</ns7:p>
          </ns4:table-cell>
          <ns4:table-cell ns0:value-type="string" ns6:value-type="string">
            <ns7:p>Carrollton</ns7:p>
          </ns4:table-cell>
          <ns4:table-cell ns0:value-type="string" ns6:value-type="string">
            <ns7:p>TX</ns7:p>
          </ns4:table-cell>
          <ns4:table-cell ns0:value-type="string" ns6:value-type="string">
            <ns7:p>134562</ns7:p>
          </ns4:table-cell>
          <ns4:table-cell ns4:number-columns-repeated="9"/>
        </ns4:table-row>
        <ns4:table-row ns4:style-name="ro1">
          <ns4:table-cell ns0:value-type="string" ns6:value-type="string">
            <ns7:p>219.0</ns7:p>
          </ns4:table-cell>
          <ns4:table-cell ns0:value-type="string" ns6:value-type="string">
            <ns7:p>Sterling Heights</ns7:p>
          </ns4:table-cell>
          <ns4:table-cell ns0:value-type="string" ns6:value-type="string">
            <ns7:p>MI</ns7:p>
          </ns4:table-cell>
          <ns4:table-cell ns0:value-type="string" ns6:value-type="string">
            <ns7:p>133931</ns7:p>
          </ns4:table-cell>
          <ns4:table-cell ns4:number-columns-repeated="9"/>
        </ns4:table-row>
        <ns4:table-row ns4:style-name="ro1">
          <ns4:table-cell ns0:value-type="string" ns6:value-type="string">
            <ns7:p>220.0</ns7:p>
          </ns4:table-cell>
          <ns4:table-cell ns0:value-type="string" ns6:value-type="string">
            <ns7:p>Santa Clara</ns7:p>
          </ns4:table-cell>
          <ns4:table-cell ns0:value-type="string" ns6:value-type="string">
            <ns7:p>CA</ns7:p>
          </ns4:table-cell>
          <ns4:table-cell ns0:value-type="string" ns6:value-type="string">
            <ns7:p>133446</ns7:p>
          </ns4:table-cell>
          <ns4:table-cell ns4:number-columns-repeated="9"/>
        </ns4:table-row>
        <ns4:table-row ns4:style-name="ro1">
          <ns4:table-cell ns0:value-type="string" ns6:value-type="string">
            <ns7:p>221.0</ns7:p>
          </ns4:table-cell>
          <ns4:table-cell ns0:value-type="string" ns6:value-type="string">
            <ns7:p>Abilene</ns7:p>
          </ns4:table-cell>
          <ns4:table-cell ns0:value-type="string" ns6:value-type="string">
            <ns7:p>TX</ns7:p>
          </ns4:table-cell>
          <ns4:table-cell ns0:value-type="string" ns6:value-type="string">
            <ns7:p>131588</ns7:p>
          </ns4:table-cell>
          <ns4:table-cell ns4:number-columns-repeated="9"/>
        </ns4:table-row>
        <ns4:table-row ns4:style-name="ro1">
          <ns4:table-cell ns0:value-type="string" ns6:value-type="string">
            <ns7:p>222.0</ns7:p>
          </ns4:table-cell>
          <ns4:table-cell ns0:value-type="string" ns6:value-type="string">
            <ns7:p>Norman</ns7:p>
          </ns4:table-cell>
          <ns4:table-cell ns0:value-type="string" ns6:value-type="string">
            <ns7:p>OK</ns7:p>
          </ns4:table-cell>
          <ns4:table-cell ns0:value-type="string" ns6:value-type="string">
            <ns7:p>130943</ns7:p>
          </ns4:table-cell>
          <ns4:table-cell ns4:number-columns-repeated="9"/>
        </ns4:table-row>
        <ns4:table-row ns4:style-name="ro1">
          <ns4:table-cell ns0:value-type="string" ns6:value-type="string">
            <ns7:p>223.0</ns7:p>
          </ns4:table-cell>
          <ns4:table-cell ns0:value-type="string" ns6:value-type="string">
            <ns7:p>Columbia</ns7:p>
          </ns4:table-cell>
          <ns4:table-cell ns0:value-type="string" ns6:value-type="string">
            <ns7:p>MO</ns7:p>
          </ns4:table-cell>
          <ns4:table-cell ns0:value-type="string" ns6:value-type="string">
            <ns7:p>130851</ns7:p>
          </ns4:table-cell>
          <ns4:table-cell ns4:number-columns-repeated="9">
            <ns7:p>Brian Wear Plumbing &amp; Restoration</ns7:p>
          </ns4:table-cell>
        </ns4:table-row>
        <ns4:table-row ns4:style-name="ro1">
          <ns4:table-cell ns0:value-type="string" ns6:value-type="string">
            <ns7:p>224.0</ns7:p>
          </ns4:table-cell>
          <ns4:table-cell ns0:value-type="string" ns6:value-type="string">
            <ns7:p>Pearland</ns7:p>
          </ns4:table-cell>
          <ns4:table-cell ns0:value-type="string" ns6:value-type="string">
            <ns7:p>TX</ns7:p>
          </ns4:table-cell>
          <ns4:table-cell ns0:value-type="string" ns6:value-type="string">
            <ns7:p>129930</ns7:p>
          </ns4:table-cell>
          <ns4:table-cell ns4:number-columns-repeated="9"/>
        </ns4:table-row>
        <ns4:table-row ns4:style-name="ro1">
          <ns4:table-cell ns0:value-type="string" ns6:value-type="string">
            <ns7:p>225.0</ns7:p>
          </ns4:table-cell>
          <ns4:table-cell ns0:value-type="string" ns6:value-type="string">
            <ns7:p>Athens</ns7:p>
          </ns4:table-cell>
          <ns4:table-cell ns0:value-type="string" ns6:value-type="string">
            <ns7:p>GA</ns7:p>
          </ns4:table-cell>
          <ns4:table-cell ns0:value-type="string" ns6:value-type="string">
            <ns7:p>129921</ns7:p>
          </ns4:table-cell>
          <ns4:table-cell ns4:number-columns-repeated="9"/>
        </ns4:table-row>
        <ns4:table-row ns4:style-name="ro1">
          <ns4:table-cell ns0:value-type="string" ns6:value-type="string">
            <ns7:p>226.0</ns7:p>
          </ns4:table-cell>
          <ns4:table-cell ns0:value-type="string" ns6:value-type="string">
            <ns7:p>Clovis</ns7:p>
          </ns4:table-cell>
          <ns4:table-cell ns0:value-type="string" ns6:value-type="string">
            <ns7:p>CA</ns7:p>
          </ns4:table-cell>
          <ns4:table-cell ns0:value-type="string" ns6:value-type="string">
            <ns7:p>129347</ns7:p>
          </ns4:table-cell>
          <ns4:table-cell ns4:number-columns-repeated="9"/>
        </ns4:table-row>
        <ns4:table-row ns4:style-name="ro1">
          <ns4:table-cell ns0:value-type="string" ns6:value-type="string">
            <ns7:p>227.0</ns7:p>
          </ns4:table-cell>
          <ns4:table-cell ns0:value-type="string" ns6:value-type="string">
            <ns7:p>North Charleston</ns7:p>
          </ns4:table-cell>
          <ns4:table-cell ns0:value-type="string" ns6:value-type="string">
            <ns7:p>SC</ns7:p>
          </ns4:table-cell>
          <ns4:table-cell ns0:value-type="string" ns6:value-type="string">
            <ns7:p>129245</ns7:p>
          </ns4:table-cell>
          <ns4:table-cell ns4:number-columns-repeated="9"/>
        </ns4:table-row>
        <ns4:table-row ns4:style-name="ro1">
          <ns4:table-cell ns0:value-type="string" ns6:value-type="string">
            <ns7:p>228.0</ns7:p>
          </ns4:table-cell>
          <ns4:table-cell ns0:value-type="string" ns6:value-type="string">
            <ns7:p>College Station</ns7:p>
          </ns4:table-cell>
          <ns4:table-cell ns0:value-type="string" ns6:value-type="string">
            <ns7:p>TX</ns7:p>
          </ns4:table-cell>
          <ns4:table-cell ns0:value-type="string" ns6:value-type="string">
            <ns7:p>127472</ns7:p>
          </ns4:table-cell>
          <ns4:table-cell ns4:number-columns-repeated="9"/>
        </ns4:table-row>
        <ns4:table-row ns4:style-name="ro1">
          <ns4:table-cell ns0:value-type="string" ns6:value-type="string">
            <ns7:p>229.0</ns7:p>
          </ns4:table-cell>
          <ns4:table-cell ns0:value-type="string" ns6:value-type="string">
            <ns7:p>West Palm Beach</ns7:p>
          </ns4:table-cell>
          <ns4:table-cell ns0:value-type="string" ns6:value-type="string">
            <ns7:p>FL</ns7:p>
          </ns4:table-cell>
          <ns4:table-cell ns0:value-type="string" ns6:value-type="string">
            <ns7:p>127189</ns7:p>
          </ns4:table-cell>
          <ns4:table-cell ns4:number-columns-repeated="9"/>
        </ns4:table-row>
        <ns4:table-row ns4:style-name="ro1">
          <ns4:table-cell ns0:value-type="string" ns6:value-type="string">
            <ns7:p>230.0</ns7:p>
          </ns4:table-cell>
          <ns4:table-cell ns0:value-type="string" ns6:value-type="string">
            <ns7:p>Wilmington</ns7:p>
          </ns4:table-cell>
          <ns4:table-cell ns0:value-type="string" ns6:value-type="string">
            <ns7:p>NC</ns7:p>
          </ns4:table-cell>
          <ns4:table-cell ns0:value-type="string" ns6:value-type="string">
            <ns7:p>126809</ns7:p>
          </ns4:table-cell>
          <ns4:table-cell ns4:number-columns-repeated="9"/>
        </ns4:table-row>
        <ns4:table-row ns4:style-name="ro1">
          <ns4:table-cell ns0:value-type="string" ns6:value-type="string">
            <ns7:p>231.0</ns7:p>
          </ns4:table-cell>
          <ns4:table-cell ns0:value-type="string" ns6:value-type="string">
            <ns7:p>Allentown</ns7:p>
          </ns4:table-cell>
          <ns4:table-cell ns0:value-type="string" ns6:value-type="string">
            <ns7:p>PA</ns7:p>
          </ns4:table-cell>
          <ns4:table-cell ns0:value-type="string" ns6:value-type="string">
            <ns7:p>126044</ns7:p>
          </ns4:table-cell>
          <ns4:table-cell ns4:number-columns-repeated="9"/>
        </ns4:table-row>
        <ns4:table-row ns4:style-name="ro1">
          <ns4:table-cell ns0:value-type="string" ns6:value-type="string">
            <ns7:p>232.0</ns7:p>
          </ns4:table-cell>
          <ns4:table-cell ns0:value-type="string" ns6:value-type="string">
            <ns7:p>Topeka</ns7:p>
          </ns4:table-cell>
          <ns4:table-cell ns0:value-type="string" ns6:value-type="string">
            <ns7:p>KS</ns7:p>
          </ns4:table-cell>
          <ns4:table-cell ns0:value-type="string" ns6:value-type="string">
            <ns7:p>125795</ns7:p>
          </ns4:table-cell>
          <ns4:table-cell ns4:number-columns-repeated="9"/>
        </ns4:table-row>
        <ns4:table-row ns4:style-name="ro1">
          <ns4:table-cell ns0:value-type="string" ns6:value-type="string">
            <ns7:p>233.0</ns7:p>
          </ns4:table-cell>
          <ns4:table-cell ns0:value-type="string" ns6:value-type="string">
            <ns7:p>Lakeland</ns7:p>
          </ns4:table-cell>
          <ns4:table-cell ns0:value-type="string" ns6:value-type="string">
            <ns7:p>FL</ns7:p>
          </ns4:table-cell>
          <ns4:table-cell ns0:value-type="string" ns6:value-type="string">
            <ns7:p>125520</ns7:p>
          </ns4:table-cell>
          <ns4:table-cell ns4:number-columns-repeated="9"/>
        </ns4:table-row>
        <ns4:table-row ns4:style-name="ro1">
          <ns4:table-cell ns0:value-type="string" ns6:value-type="string">
            <ns7:p>234.0</ns7:p>
          </ns4:table-cell>
          <ns4:table-cell ns0:value-type="string" ns6:value-type="string">
            <ns7:p>Buckeye</ns7:p>
          </ns4:table-cell>
          <ns4:table-cell ns0:value-type="string" ns6:value-type="string">
            <ns7:p>AZ</ns7:p>
          </ns4:table-cell>
          <ns4:table-cell ns0:value-type="string" ns6:value-type="string">
            <ns7:p>125445</ns7:p>
          </ns4:table-cell>
          <ns4:table-cell ns4:number-columns-repeated="9"/>
        </ns4:table-row>
        <ns4:table-row ns4:style-name="ro1">
          <ns4:table-cell ns0:value-type="string" ns6:value-type="string">
            <ns7:p>235.0</ns7:p>
          </ns4:table-cell>
          <ns4:table-cell ns0:value-type="string" ns6:value-type="string">
            <ns7:p>Goodyear</ns7:p>
          </ns4:table-cell>
          <ns4:table-cell ns0:value-type="string" ns6:value-type="string">
            <ns7:p>AZ</ns7:p>
          </ns4:table-cell>
          <ns4:table-cell ns0:value-type="string" ns6:value-type="string">
            <ns7:p>125359</ns7:p>
          </ns4:table-cell>
          <ns4:table-cell ns4:number-columns-repeated="9"/>
        </ns4:table-row>
        <ns4:table-row ns4:style-name="ro1">
          <ns4:table-cell ns0:value-type="string" ns6:value-type="string">
            <ns7:p>236.0</ns7:p>
          </ns4:table-cell>
          <ns4:table-cell ns0:value-type="string" ns6:value-type="string">
            <ns7:p>Broken Arrow</ns7:p>
          </ns4:table-cell>
          <ns4:table-cell ns0:value-type="string" ns6:value-type="string">
            <ns7:p>OK</ns7:p>
          </ns4:table-cell>
          <ns4:table-cell ns0:value-type="string" ns6:value-type="string">
            <ns7:p>124991</ns7:p>
          </ns4:table-cell>
          <ns4:table-cell ns4:number-columns-repeated="9"/>
        </ns4:table-row>
        <ns4:table-row ns4:style-name="ro1">
          <ns4:table-cell ns0:value-type="string" ns6:value-type="string">
            <ns7:p>237.0</ns7:p>
          </ns4:table-cell>
          <ns4:table-cell ns0:value-type="string" ns6:value-type="string">
            <ns7:p>Simi Valley</ns7:p>
          </ns4:table-cell>
          <ns4:table-cell ns0:value-type="string" ns6:value-type="string">
            <ns7:p>CA</ns7:p>
          </ns4:table-cell>
          <ns4:table-cell ns0:value-type="string" ns6:value-type="string">
            <ns7:p>124861</ns7:p>
          </ns4:table-cell>
          <ns4:table-cell ns4:number-columns-repeated="9"/>
        </ns4:table-row>
        <ns4:table-row ns4:style-name="ro1">
          <ns4:table-cell ns0:value-type="string" ns6:value-type="string">
            <ns7:p>238.0</ns7:p>
          </ns4:table-cell>
          <ns4:table-cell ns0:value-type="string" ns6:value-type="string">
            <ns7:p>Rochester</ns7:p>
          </ns4:table-cell>
          <ns4:table-cell ns0:value-type="string" ns6:value-type="string">
            <ns7:p>MN</ns7:p>
          </ns4:table-cell>
          <ns4:table-cell ns0:value-type="string" ns6:value-type="string">
            <ns7:p>124292</ns7:p>
          </ns4:table-cell>
          <ns4:table-cell ns4:number-columns-repeated="9"/>
        </ns4:table-row>
        <ns4:table-row ns4:style-name="ro1">
          <ns4:table-cell ns0:value-type="string" ns6:value-type="string">
            <ns7:p>239.0</ns7:p>
          </ns4:table-cell>
          <ns4:table-cell ns0:value-type="string" ns6:value-type="string">
            <ns7:p>Lafayette</ns7:p>
          </ns4:table-cell>
          <ns4:table-cell ns0:value-type="string" ns6:value-type="string">
            <ns7:p>LA</ns7:p>
          </ns4:table-cell>
          <ns4:table-cell ns0:value-type="string" ns6:value-type="string">
            <ns7:p>123311</ns7:p>
          </ns4:table-cell>
          <ns4:table-cell ns4:number-columns-repeated="9"/>
        </ns4:table-row>
        <ns4:table-row ns4:style-name="ro1">
          <ns4:table-cell ns0:value-type="string" ns6:value-type="string">
            <ns7:p>240.0</ns7:p>
          </ns4:table-cell>
          <ns4:table-cell ns0:value-type="string" ns6:value-type="string">
            <ns7:p>Vallejo</ns7:p>
          </ns4:table-cell>
          <ns4:table-cell ns0:value-type="string" ns6:value-type="string">
            <ns7:p>CA</ns7:p>
          </ns4:table-cell>
          <ns4:table-cell ns0:value-type="string" ns6:value-type="string">
            <ns7:p>123287</ns7:p>
          </ns4:table-cell>
          <ns4:table-cell ns4:number-columns-repeated="9"/>
        </ns4:table-row>
        <ns4:table-row ns4:style-name="ro1">
          <ns4:table-cell ns0:value-type="string" ns6:value-type="string">
            <ns7:p>241.0</ns7:p>
          </ns4:table-cell>
          <ns4:table-cell ns0:value-type="string" ns6:value-type="string">
            <ns7:p>Concord</ns7:p>
          </ns4:table-cell>
          <ns4:table-cell ns0:value-type="string" ns6:value-type="string">
            <ns7:p>CA</ns7:p>
          </ns4:table-cell>
          <ns4:table-cell ns0:value-type="string" ns6:value-type="string">
            <ns7:p>123261</ns7:p>
          </ns4:table-cell>
          <ns4:table-cell ns4:number-columns-repeated="9"/>
        </ns4:table-row>
        <ns4:table-row ns4:style-name="ro1">
          <ns4:table-cell ns0:value-type="string" ns6:value-type="string">
            <ns7:p>242.0</ns7:p>
          </ns4:table-cell>
          <ns4:table-cell ns0:value-type="string" ns6:value-type="string">
            <ns7:p>Arvada</ns7:p>
          </ns4:table-cell>
          <ns4:table-cell ns0:value-type="string" ns6:value-type="string">
            <ns7:p>CO</ns7:p>
          </ns4:table-cell>
          <ns4:table-cell ns0:value-type="string" ns6:value-type="string">
            <ns7:p>122901</ns7:p>
          </ns4:table-cell>
          <ns4:table-cell ns4:number-columns-repeated="9"/>
        </ns4:table-row>
        <ns4:table-row ns4:style-name="ro1">
          <ns4:table-cell ns0:value-type="string" ns6:value-type="string">
            <ns7:p>243.0</ns7:p>
          </ns4:table-cell>
          <ns4:table-cell ns0:value-type="string" ns6:value-type="string">
            <ns7:p>Odessa</ns7:p>
          </ns4:table-cell>
          <ns4:table-cell ns0:value-type="string" ns6:value-type="string">
            <ns7:p>TX</ns7:p>
          </ns4:table-cell>
          <ns4:table-cell ns0:value-type="string" ns6:value-type="string">
            <ns7:p>122707</ns7:p>
          </ns4:table-cell>
          <ns4:table-cell ns4:number-columns-repeated="9"/>
        </ns4:table-row>
        <ns4:table-row ns4:style-name="ro1">
          <ns4:table-cell ns0:value-type="string" ns6:value-type="string">
            <ns7:p>244.0</ns7:p>
          </ns4:table-cell>
          <ns4:table-cell ns0:value-type="string" ns6:value-type="string">
            <ns7:p>Cambridge</ns7:p>
          </ns4:table-cell>
          <ns4:table-cell ns0:value-type="string" ns6:value-type="string">
            <ns7:p>MA</ns7:p>
          </ns4:table-cell>
          <ns4:table-cell ns0:value-type="string" ns6:value-type="string">
            <ns7:p>122588</ns7:p>
          </ns4:table-cell>
          <ns4:table-cell ns4:number-columns-repeated="9"/>
        </ns4:table-row>
        <ns4:table-row ns4:style-name="ro1">
          <ns4:table-cell ns0:value-type="string" ns6:value-type="string">
            <ns7:p>245.0</ns7:p>
          </ns4:table-cell>
          <ns4:table-cell ns0:value-type="string" ns6:value-type="string">
            <ns7:p>New Braunfels</ns7:p>
          </ns4:table-cell>
          <ns4:table-cell ns0:value-type="string" ns6:value-type="string">
            <ns7:p>TX</ns7:p>
          </ns4:table-cell>
          <ns4:table-cell ns0:value-type="string" ns6:value-type="string">
            <ns7:p>122492</ns7:p>
          </ns4:table-cell>
          <ns4:table-cell ns4:number-columns-repeated="9"/>
        </ns4:table-row>
        <ns4:table-row ns4:style-name="ro1">
          <ns4:table-cell ns0:value-type="string" ns6:value-type="string">
            <ns7:p>246.0</ns7:p>
          </ns4:table-cell>
          <ns4:table-cell ns0:value-type="string" ns6:value-type="string">
            <ns7:p>Fairfield</ns7:p>
          </ns4:table-cell>
          <ns4:table-cell ns0:value-type="string" ns6:value-type="string">
            <ns7:p>CA</ns7:p>
          </ns4:table-cell>
          <ns4:table-cell ns0:value-type="string" ns6:value-type="string">
            <ns7:p>122489</ns7:p>
          </ns4:table-cell>
          <ns4:table-cell ns4:number-columns-repeated="9"/>
        </ns4:table-row>
        <ns4:table-row ns4:style-name="ro1">
          <ns4:table-cell ns0:value-type="string" ns6:value-type="string">
            <ns7:p>247.0</ns7:p>
          </ns4:table-cell>
          <ns4:table-cell ns0:value-type="string" ns6:value-type="string">
            <ns7:p>Ann Arbor</ns7:p>
          </ns4:table-cell>
          <ns4:table-cell ns0:value-type="string" ns6:value-type="string">
            <ns7:p>MI</ns7:p>
          </ns4:table-cell>
          <ns4:table-cell ns0:value-type="string" ns6:value-type="string">
            <ns7:p>122233</ns7:p>
          </ns4:table-cell>
          <ns4:table-cell ns4:number-columns-repeated="9"/>
        </ns4:table-row>
        <ns4:table-row ns4:style-name="ro1">
          <ns4:table-cell ns0:value-type="string" ns6:value-type="string">
            <ns7:p>248.0</ns7:p>
          </ns4:table-cell>
          <ns4:table-cell ns0:value-type="string" ns6:value-type="string">
            <ns7:p>Thousand Oaks</ns7:p>
          </ns4:table-cell>
          <ns4:table-cell ns0:value-type="string" ns6:value-type="string">
            <ns7:p>CA</ns7:p>
          </ns4:table-cell>
          <ns4:table-cell ns0:value-type="string" ns6:value-type="string">
            <ns7:p>122230</ns7:p>
          </ns4:table-cell>
          <ns4:table-cell ns4:number-columns-repeated="9"/>
        </ns4:table-row>
        <ns4:table-row ns4:style-name="ro1">
          <ns4:table-cell ns0:value-type="string" ns6:value-type="string">
            <ns7:p>249.0</ns7:p>
          </ns4:table-cell>
          <ns4:table-cell ns0:value-type="string" ns6:value-type="string">
            <ns7:p>Hartford</ns7:p>
          </ns4:table-cell>
          <ns4:table-cell ns0:value-type="string" ns6:value-type="string">
            <ns7:p>CT</ns7:p>
          </ns4:table-cell>
          <ns4:table-cell ns0:value-type="string" ns6:value-type="string">
            <ns7:p>121981</ns7:p>
          </ns4:table-cell>
          <ns4:table-cell ns4:number-columns-repeated="9"/>
        </ns4:table-row>
        <ns4:table-row ns4:style-name="ro1">
          <ns4:table-cell ns0:value-type="string" ns6:value-type="string">
            <ns7:p>250.0</ns7:p>
          </ns4:table-cell>
          <ns4:table-cell ns0:value-type="string" ns6:value-type="string">
            <ns7:p>Berkeley</ns7:p>
          </ns4:table-cell>
          <ns4:table-cell ns0:value-type="string" ns6:value-type="string">
            <ns7:p>CA</ns7:p>
          </ns4:table-cell>
          <ns4:table-cell ns0:value-type="string" ns6:value-type="string">
            <ns7:p>121911</ns7:p>
          </ns4:table-cell>
          <ns4:table-cell ns4:number-columns-repeated="9"/>
        </ns4:table-row>
        <ns4:table-row ns4:style-name="ro1">
          <ns4:table-cell ns0:value-type="string" ns6:value-type="string">
            <ns7:p>251.0</ns7:p>
          </ns4:table-cell>
          <ns4:table-cell ns0:value-type="string" ns6:value-type="string">
            <ns7:p>Independence</ns7:p>
          </ns4:table-cell>
          <ns4:table-cell ns0:value-type="string" ns6:value-type="string">
            <ns7:p>MO</ns7:p>
          </ns4:table-cell>
          <ns4:table-cell ns0:value-type="string" ns6:value-type="string">
            <ns7:p>121675</ns7:p>
          </ns4:table-cell>
          <ns4:table-cell ns4:number-columns-repeated="9"/>
        </ns4:table-row>
        <ns4:table-row ns4:style-name="ro1">
          <ns4:table-cell ns0:value-type="string" ns6:value-type="string">
            <ns7:p>252.0</ns7:p>
          </ns4:table-cell>
          <ns4:table-cell ns0:value-type="string" ns6:value-type="string">
            <ns7:p>Billings</ns7:p>
          </ns4:table-cell>
          <ns4:table-cell ns0:value-type="string" ns6:value-type="string">
            <ns7:p>MT</ns7:p>
          </ns4:table-cell>
          <ns4:table-cell ns0:value-type="string" ns6:value-type="string">
            <ns7:p>121239</ns7:p>
          </ns4:table-cell>
          <ns4:table-cell ns4:number-columns-repeated="9">
            <ns7:p>Rimrock Plumbing</ns7:p>
          </ns4:table-cell>
        </ns4:table-row>
        <ns4:table-row ns4:style-name="ro1">
          <ns4:table-cell ns0:value-type="string" ns6:value-type="string">
            <ns7:p>253.0</ns7:p>
          </ns4:table-cell>
          <ns4:table-cell ns0:value-type="string" ns6:value-type="string">
            <ns7:p>High Point</ns7:p>
          </ns4:table-cell>
          <ns4:table-cell ns0:value-type="string" ns6:value-type="string">
            <ns7:p>NC</ns7:p>
          </ns4:table-cell>
          <ns4:table-cell ns0:value-type="string" ns6:value-type="string">
            <ns7:p>120571</ns7:p>
          </ns4:table-cell>
          <ns4:table-cell ns4:number-columns-repeated="9"/>
        </ns4:table-row>
        <ns4:table-row ns4:style-name="ro1">
          <ns4:table-cell ns0:value-type="string" ns6:value-type="string">
            <ns7:p>254.0</ns7:p>
          </ns4:table-cell>
          <ns4:table-cell ns0:value-type="string" ns6:value-type="string">
            <ns7:p>Nampa</ns7:p>
          </ns4:table-cell>
          <ns4:table-cell ns0:value-type="string" ns6:value-type="string">
            <ns7:p>ID</ns7:p>
          </ns4:table-cell>
          <ns4:table-cell ns0:value-type="string" ns6:value-type="string">
            <ns7:p>120384</ns7:p>
          </ns4:table-cell>
          <ns4:table-cell ns4:number-columns-repeated="9">
            <ns7:p>Dillon Plumbing</ns7:p>
          </ns4:table-cell>
        </ns4:table-row>
        <ns4:table-row ns4:style-name="ro1">
          <ns4:table-cell ns0:value-type="string" ns6:value-type="string">
            <ns7:p>255.0</ns7:p>
          </ns4:table-cell>
          <ns4:table-cell ns0:value-type="string" ns6:value-type="string">
            <ns7:p>Lowell</ns7:p>
          </ns4:table-cell>
          <ns4:table-cell ns0:value-type="string" ns6:value-type="string">
            <ns7:p>MA</ns7:p>
          </ns4:table-cell>
          <ns4:table-cell ns0:value-type="string" ns6:value-type="string">
            <ns7:p>119971</ns7:p>
          </ns4:table-cell>
          <ns4:table-cell ns4:number-columns-repeated="9"/>
        </ns4:table-row>
        <ns4:table-row ns4:style-name="ro1">
          <ns4:table-cell ns0:value-type="string" ns6:value-type="string">
            <ns7:p>256.0</ns7:p>
          </ns4:table-cell>
          <ns4:table-cell ns0:value-type="string" ns6:value-type="string">
            <ns7:p>League City</ns7:p>
          </ns4:table-cell>
          <ns4:table-cell ns0:value-type="string" ns6:value-type="string">
            <ns7:p>TX</ns7:p>
          </ns4:table-cell>
          <ns4:table-cell ns0:value-type="string" ns6:value-type="string">
            <ns7:p>119905</ns7:p>
          </ns4:table-cell>
          <ns4:table-cell ns4:number-columns-repeated="9"/>
        </ns4:table-row>
        <ns4:table-row ns4:style-name="ro1">
          <ns4:table-cell ns0:value-type="string" ns6:value-type="string">
            <ns7:p>257.0</ns7:p>
          </ns4:table-cell>
          <ns4:table-cell ns0:value-type="string" ns6:value-type="string">
            <ns7:p>Conroe</ns7:p>
          </ns4:table-cell>
          <ns4:table-cell ns0:value-type="string" ns6:value-type="string">
            <ns7:p>TX</ns7:p>
          </ns4:table-cell>
          <ns4:table-cell ns0:value-type="string" ns6:value-type="string">
            <ns7:p>119564</ns7:p>
          </ns4:table-cell>
          <ns4:table-cell ns4:number-columns-repeated="9"/>
        </ns4:table-row>
        <ns4:table-row ns4:style-name="ro1">
          <ns4:table-cell ns0:value-type="string" ns6:value-type="string">
            <ns7:p>258.0</ns7:p>
          </ns4:table-cell>
          <ns4:table-cell ns0:value-type="string" ns6:value-type="string">
            <ns7:p>Antioch</ns7:p>
          </ns4:table-cell>
          <ns4:table-cell ns0:value-type="string" ns6:value-type="string">
            <ns7:p>CA</ns7:p>
          </ns4:table-cell>
          <ns4:table-cell ns0:value-type="string" ns6:value-type="string">
            <ns7:p>118958</ns7:p>
          </ns4:table-cell>
          <ns4:table-cell ns4:number-columns-repeated="9"/>
        </ns4:table-row>
        <ns4:table-row ns4:style-name="ro1">
          <ns4:table-cell ns0:value-type="string" ns6:value-type="string">
            <ns7:p>259.0</ns7:p>
          </ns4:table-cell>
          <ns4:table-cell ns0:value-type="string" ns6:value-type="string">
            <ns7:p>Menifee</ns7:p>
          </ns4:table-cell>
          <ns4:table-cell ns0:value-type="string" ns6:value-type="string">
            <ns7:p>CA</ns7:p>
          </ns4:table-cell>
          <ns4:table-cell ns0:value-type="string" ns6:value-type="string">
            <ns7:p>118592</ns7:p>
          </ns4:table-cell>
          <ns4:table-cell ns4:number-columns-repeated="9"/>
        </ns4:table-row>
        <ns4:table-row ns4:style-name="ro1">
          <ns4:table-cell ns0:value-type="string" ns6:value-type="string">
            <ns7:p>260.0</ns7:p>
          </ns4:table-cell>
          <ns4:table-cell ns0:value-type="string" ns6:value-type="string">
            <ns7:p>Richardson</ns7:p>
          </ns4:table-cell>
          <ns4:table-cell ns0:value-type="string" ns6:value-type="string">
            <ns7:p>TX</ns7:p>
          </ns4:table-cell>
          <ns4:table-cell ns0:value-type="string" ns6:value-type="string">
            <ns7:p>118542</ns7:p>
          </ns4:table-cell>
          <ns4:table-cell ns4:number-columns-repeated="9"/>
        </ns4:table-row>
        <ns4:table-row ns4:style-name="ro1">
          <ns4:table-cell ns0:value-type="string" ns6:value-type="string">
            <ns7:p>261.0</ns7:p>
          </ns4:table-cell>
          <ns4:table-cell ns0:value-type="string" ns6:value-type="string">
            <ns7:p>Pompano Beach</ns7:p>
          </ns4:table-cell>
          <ns4:table-cell ns0:value-type="string" ns6:value-type="string">
            <ns7:p>FL</ns7:p>
          </ns4:table-cell>
          <ns4:table-cell ns0:value-type="string" ns6:value-type="string">
            <ns7:p>117211</ns7:p>
          </ns4:table-cell>
          <ns4:table-cell ns4:number-columns-repeated="9"/>
        </ns4:table-row>
        <ns4:table-row ns4:style-name="ro1">
          <ns4:table-cell ns0:value-type="string" ns6:value-type="string">
            <ns7:p>262.0</ns7:p>
          </ns4:table-cell>
          <ns4:table-cell ns0:value-type="string" ns6:value-type="string">
            <ns7:p>Las Cruces</ns7:p>
          </ns4:table-cell>
          <ns4:table-cell ns0:value-type="string" ns6:value-type="string">
            <ns7:p>NM</ns7:p>
          </ns4:table-cell>
          <ns4:table-cell ns0:value-type="string" ns6:value-type="string">
            <ns7:p>116978</ns7:p>
          </ns4:table-cell>
          <ns4:table-cell ns4:number-columns-repeated="9"/>
        </ns4:table-row>
        <ns4:table-row ns4:style-name="ro1">
          <ns4:table-cell ns0:value-type="string" ns6:value-type="string">
            <ns7:p>263.0</ns7:p>
          </ns4:table-cell>
          <ns4:table-cell ns0:value-type="string" ns6:value-type="string">
            <ns7:p>Manchester</ns7:p>
          </ns4:table-cell>
          <ns4:table-cell ns0:value-type="string" ns6:value-type="string">
            <ns7:p>NH</ns7:p>
          </ns4:table-cell>
          <ns4:table-cell ns0:value-type="string" ns6:value-type="string">
            <ns7:p>116818</ns7:p>
          </ns4:table-cell>
          <ns4:table-cell ns4:number-columns-repeated="9">
            <ns7:p>Paul The Plumber - Manchester</ns7:p>
          </ns4:table-cell>
        </ns4:table-row>
        <ns4:table-row ns4:style-name="ro1">
          <ns4:table-cell ns0:value-type="string" ns6:value-type="string">
            <ns7:p>264.0</ns7:p>
          </ns4:table-cell>
          <ns4:table-cell ns0:value-type="string" ns6:value-type="string">
            <ns7:p>West Jordan</ns7:p>
          </ns4:table-cell>
          <ns4:table-cell ns0:value-type="string" ns6:value-type="string">
            <ns7:p>UT</ns7:p>
          </ns4:table-cell>
          <ns4:table-cell ns0:value-type="string" ns6:value-type="string">
            <ns7:p>116812</ns7:p>
          </ns4:table-cell>
          <ns4:table-cell ns4:number-columns-repeated="9"/>
        </ns4:table-row>
        <ns4:table-row ns4:style-name="ro1">
          <ns4:table-cell ns0:value-type="string" ns6:value-type="string">
            <ns7:p>265.0</ns7:p>
          </ns4:table-cell>
          <ns4:table-cell ns0:value-type="string" ns6:value-type="string">
            <ns7:p>Westminster</ns7:p>
          </ns4:table-cell>
          <ns4:table-cell ns0:value-type="string" ns6:value-type="string">
            <ns7:p>CO</ns7:p>
          </ns4:table-cell>
          <ns4:table-cell ns0:value-type="string" ns6:value-type="string">
            <ns7:p>116182</ns7:p>
          </ns4:table-cell>
          <ns4:table-cell ns4:number-columns-repeated="9"/>
        </ns4:table-row>
        <ns4:table-row ns4:style-name="ro1">
          <ns4:table-cell ns0:value-type="string" ns6:value-type="string">
            <ns7:p>266.0</ns7:p>
          </ns4:table-cell>
          <ns4:table-cell ns0:value-type="string" ns6:value-type="string">
            <ns7:p>Evansville</ns7:p>
          </ns4:table-cell>
          <ns4:table-cell ns0:value-type="string" ns6:value-type="string">
            <ns7:p>IN</ns7:p>
          </ns4:table-cell>
          <ns4:table-cell ns0:value-type="string" ns6:value-type="string">
            <ns7:p>116176</ns7:p>
          </ns4:table-cell>
          <ns4:table-cell ns4:number-columns-repeated="9"/>
        </ns4:table-row>
        <ns4:table-row ns4:style-name="ro1">
          <ns4:table-cell ns0:value-type="string" ns6:value-type="string">
            <ns7:p>267.0</ns7:p>
          </ns4:table-cell>
          <ns4:table-cell ns0:value-type="string" ns6:value-type="string">
            <ns7:p>Waterbury</ns7:p>
          </ns4:table-cell>
          <ns4:table-cell ns0:value-type="string" ns6:value-type="string">
            <ns7:p>CT</ns7:p>
          </ns4:table-cell>
          <ns4:table-cell ns0:value-type="string" ns6:value-type="string">
            <ns7:p>115771</ns7:p>
          </ns4:table-cell>
          <ns4:table-cell ns4:number-columns-repeated="9"/>
        </ns4:table-row>
        <ns4:table-row ns4:style-name="ro1">
          <ns4:table-cell ns0:value-type="string" ns6:value-type="string">
            <ns7:p>268.0</ns7:p>
          </ns4:table-cell>
          <ns4:table-cell ns0:value-type="string" ns6:value-type="string">
            <ns7:p>Elgin</ns7:p>
          </ns4:table-cell>
          <ns4:table-cell ns0:value-type="string" ns6:value-type="string">
            <ns7:p>IL</ns7:p>
          </ns4:table-cell>
          <ns4:table-cell ns0:value-type="string" ns6:value-type="string">
            <ns7:p>115476</ns7:p>
          </ns4:table-cell>
          <ns4:table-cell ns4:number-columns-repeated="9"/>
        </ns4:table-row>
        <ns4:table-row ns4:style-name="ro1">
          <ns4:table-cell ns0:value-type="string" ns6:value-type="string">
            <ns7:p>269.0</ns7:p>
          </ns4:table-cell>
          <ns4:table-cell ns0:value-type="string" ns6:value-type="string">
            <ns7:p>Greeley</ns7:p>
          </ns4:table-cell>
          <ns4:table-cell ns0:value-type="string" ns6:value-type="string">
            <ns7:p>CO</ns7:p>
          </ns4:table-cell>
          <ns4:table-cell ns0:value-type="string" ns6:value-type="string">
            <ns7:p>115073</ns7:p>
          </ns4:table-cell>
          <ns4:table-cell ns4:number-columns-repeated="9"/>
        </ns4:table-row>
        <ns4:table-row ns4:style-name="ro1">
          <ns4:table-cell ns0:value-type="string" ns6:value-type="string">
            <ns7:p>270.0</ns7:p>
          </ns4:table-cell>
          <ns4:table-cell ns0:value-type="string" ns6:value-type="string">
            <ns7:p>Temecula</ns7:p>
          </ns4:table-cell>
          <ns4:table-cell ns0:value-type="string" ns6:value-type="string">
            <ns7:p>CA</ns7:p>
          </ns4:table-cell>
          <ns4:table-cell ns0:value-type="string" ns6:value-type="string">
            <ns7:p>114865</ns7:p>
          </ns4:table-cell>
          <ns4:table-cell ns4:number-columns-repeated="9"/>
        </ns4:table-row>
        <ns4:table-row ns4:style-name="ro1">
          <ns4:table-cell ns0:value-type="string" ns6:value-type="string">
            <ns7:p>271.0</ns7:p>
          </ns4:table-cell>
          <ns4:table-cell ns0:value-type="string" ns6:value-type="string">
            <ns7:p>Richmond</ns7:p>
          </ns4:table-cell>
          <ns4:table-cell ns0:value-type="string" ns6:value-type="string">
            <ns7:p>CA</ns7:p>
          </ns4:table-cell>
          <ns4:table-cell ns0:value-type="string" ns6:value-type="string">
            <ns7:p>114861</ns7:p>
          </ns4:table-cell>
          <ns4:table-cell ns4:number-columns-repeated="9"/>
        </ns4:table-row>
        <ns4:table-row ns4:style-name="ro1">
          <ns4:table-cell ns0:value-type="string" ns6:value-type="string">
            <ns7:p>272.0</ns7:p>
          </ns4:table-cell>
          <ns4:table-cell ns0:value-type="string" ns6:value-type="string">
            <ns7:p>Concord</ns7:p>
          </ns4:table-cell>
          <ns4:table-cell ns0:value-type="string" ns6:value-type="string">
            <ns7:p>NC</ns7:p>
          </ns4:table-cell>
          <ns4:table-cell ns0:value-type="string" ns6:value-type="string">
            <ns7:p>114598</ns7:p>
          </ns4:table-cell>
          <ns4:table-cell ns4:number-columns-repeated="9"/>
        </ns4:table-row>
        <ns4:table-row ns4:style-name="ro1">
          <ns4:table-cell ns0:value-type="string" ns6:value-type="string">
            <ns7:p>273.0</ns7:p>
          </ns4:table-cell>
          <ns4:table-cell ns0:value-type="string" ns6:value-type="string">
            <ns7:p>Provo</ns7:p>
          </ns4:table-cell>
          <ns4:table-cell ns0:value-type="string" ns6:value-type="string">
            <ns7:p>UT</ns7:p>
          </ns4:table-cell>
          <ns4:table-cell ns0:value-type="string" ns6:value-type="string">
            <ns7:p>114527</ns7:p>
          </ns4:table-cell>
          <ns4:table-cell ns4:number-columns-repeated="9"/>
        </ns4:table-row>
        <ns4:table-row ns4:style-name="ro1">
          <ns4:table-cell ns0:value-type="string" ns6:value-type="string">
            <ns7:p>274.0</ns7:p>
          </ns4:table-cell>
          <ns4:table-cell ns0:value-type="string" ns6:value-type="string">
            <ns7:p>Rio Rancho</ns7:p>
          </ns4:table-cell>
          <ns4:table-cell ns0:value-type="string" ns6:value-type="string">
            <ns7:p>NM</ns7:p>
          </ns4:table-cell>
          <ns4:table-cell ns0:value-type="string" ns6:value-type="string">
            <ns7:p>114419</ns7:p>
          </ns4:table-cell>
          <ns4:table-cell ns4:number-columns-repeated="9">
            <ns7:p>TLC Plumbing Heating Cooling Electrical</ns7:p>
          </ns4:table-cell>
        </ns4:table-row>
        <ns4:table-row ns4:style-name="ro1">
          <ns4:table-cell ns0:value-type="string" ns6:value-type="string">
            <ns7:p>275.0</ns7:p>
          </ns4:table-cell>
          <ns4:table-cell ns0:value-type="string" ns6:value-type="string">
            <ns7:p>Clearwater</ns7:p>
          </ns4:table-cell>
          <ns4:table-cell ns0:value-type="string" ns6:value-type="string">
            <ns7:p>FL</ns7:p>
          </ns4:table-cell>
          <ns4:table-cell ns0:value-type="string" ns6:value-type="string">
            <ns7:p>114364</ns7:p>
          </ns4:table-cell>
          <ns4:table-cell ns4:number-columns-repeated="9"/>
        </ns4:table-row>
        <ns4:table-row ns4:style-name="ro1">
          <ns4:table-cell ns0:value-type="string" ns6:value-type="string">
            <ns7:p>276.0</ns7:p>
          </ns4:table-cell>
          <ns4:table-cell ns0:value-type="string" ns6:value-type="string">
            <ns7:p>Tuscaloosa</ns7:p>
          </ns4:table-cell>
          <ns4:table-cell ns0:value-type="string" ns6:value-type="string">
            <ns7:p>AL</ns7:p>
          </ns4:table-cell>
          <ns4:table-cell ns0:value-type="string" ns6:value-type="string">
            <ns7:p>114316</ns7:p>
          </ns4:table-cell>
          <ns4:table-cell ns4:number-columns-repeated="9"/>
        </ns4:table-row>
        <ns4:table-row ns4:style-name="ro1">
          <ns4:table-cell ns0:value-type="string" ns6:value-type="string">
            <ns7:p>277.0</ns7:p>
          </ns4:table-cell>
          <ns4:table-cell ns0:value-type="string" ns6:value-type="string">
            <ns7:p>Murrieta</ns7:p>
          </ns4:table-cell>
          <ns4:table-cell ns0:value-type="string" ns6:value-type="string">
            <ns7:p>CA</ns7:p>
          </ns4:table-cell>
          <ns4:table-cell ns0:value-type="string" ns6:value-type="string">
            <ns7:p>114124</ns7:p>
          </ns4:table-cell>
          <ns4:table-cell ns4:number-columns-repeated="9"/>
        </ns4:table-row>
        <ns4:table-row ns4:style-name="ro1">
          <ns4:table-cell ns0:value-type="string" ns6:value-type="string">
            <ns7:p>278.0</ns7:p>
          </ns4:table-cell>
          <ns4:table-cell ns0:value-type="string" ns6:value-type="string">
            <ns7:p>Lansing</ns7:p>
          </ns4:table-cell>
          <ns4:table-cell ns0:value-type="string" ns6:value-type="string">
            <ns7:p>MI</ns7:p>
          </ns4:table-cell>
          <ns4:table-cell ns0:value-type="string" ns6:value-type="string">
            <ns7:p>113884</ns7:p>
          </ns4:table-cell>
          <ns4:table-cell ns4:number-columns-repeated="9"/>
        </ns4:table-row>
        <ns4:table-row ns4:style-name="ro1">
          <ns4:table-cell ns0:value-type="string" ns6:value-type="string">
            <ns7:p>279.0</ns7:p>
          </ns4:table-cell>
          <ns4:table-cell ns0:value-type="string" ns6:value-type="string">
            <ns7:p>Tyler</ns7:p>
          </ns4:table-cell>
          <ns4:table-cell ns0:value-type="string" ns6:value-type="string">
            <ns7:p>TX</ns7:p>
          </ns4:table-cell>
          <ns4:table-cell ns0:value-type="string" ns6:value-type="string">
            <ns7:p>113723</ns7:p>
          </ns4:table-cell>
          <ns4:table-cell ns4:number-columns-repeated="9"/>
        </ns4:table-row>
        <ns4:table-row ns4:style-name="ro1">
          <ns4:table-cell ns0:value-type="string" ns6:value-type="string">
            <ns7:p>280.0</ns7:p>
          </ns4:table-cell>
          <ns4:table-cell ns0:value-type="string" ns6:value-type="string">
            <ns7:p>Miami Gardens</ns7:p>
          </ns4:table-cell>
          <ns4:table-cell ns0:value-type="string" ns6:value-type="string">
            <ns7:p>FL</ns7:p>
          </ns4:table-cell>
          <ns4:table-cell ns0:value-type="string" ns6:value-type="string">
            <ns7:p>113579</ns7:p>
          </ns4:table-cell>
          <ns4:table-cell ns4:number-columns-repeated="9"/>
        </ns4:table-row>
        <ns4:table-row ns4:style-name="ro1">
          <ns4:table-cell ns0:value-type="string" ns6:value-type="string">
            <ns7:p>281.0</ns7:p>
          </ns4:table-cell>
          <ns4:table-cell ns0:value-type="string" ns6:value-type="string">
            <ns7:p>Everett</ns7:p>
          </ns4:table-cell>
          <ns4:table-cell ns0:value-type="string" ns6:value-type="string">
            <ns7:p>WA</ns7:p>
          </ns4:table-cell>
          <ns4:table-cell ns0:value-type="string" ns6:value-type="string">
            <ns7:p>113567</ns7:p>
          </ns4:table-cell>
          <ns4:table-cell ns4:number-columns-repeated="9"/>
        </ns4:table-row>
        <ns4:table-row ns4:style-name="ro1">
          <ns4:table-cell ns0:value-type="string" ns6:value-type="string">
            <ns7:p>282.0</ns7:p>
          </ns4:table-cell>
          <ns4:table-cell ns0:value-type="string" ns6:value-type="string">
            <ns7:p>Allen</ns7:p>
          </ns4:table-cell>
          <ns4:table-cell ns0:value-type="string" ns6:value-type="string">
            <ns7:p>TX</ns7:p>
          </ns4:table-cell>
          <ns4:table-cell ns0:value-type="string" ns6:value-type="string">
            <ns7:p>113447</ns7:p>
          </ns4:table-cell>
          <ns4:table-cell ns4:number-columns-repeated="9"/>
        </ns4:table-row>
        <ns4:table-row ns4:style-name="ro1">
          <ns4:table-cell ns0:value-type="string" ns6:value-type="string">
            <ns7:p>283.0</ns7:p>
          </ns4:table-cell>
          <ns4:table-cell ns0:value-type="string" ns6:value-type="string">
            <ns7:p>Springfield</ns7:p>
          </ns4:table-cell>
          <ns4:table-cell ns0:value-type="string" ns6:value-type="string">
            <ns7:p>IL</ns7:p>
          </ns4:table-cell>
          <ns4:table-cell ns0:value-type="string" ns6:value-type="string">
            <ns7:p>112989</ns7:p>
          </ns4:table-cell>
          <ns4:table-cell ns4:number-columns-repeated="9"/>
        </ns4:table-row>
        <ns4:table-row ns4:style-name="ro1">
          <ns4:table-cell ns0:value-type="string" ns6:value-type="string">
            <ns7:p>284.0</ns7:p>
          </ns4:table-cell>
          <ns4:table-cell ns0:value-type="string" ns6:value-type="string">
            <ns7:p>Beaumont</ns7:p>
          </ns4:table-cell>
          <ns4:table-cell ns0:value-type="string" ns6:value-type="string">
            <ns7:p>TX</ns7:p>
          </ns4:table-cell>
          <ns4:table-cell ns0:value-type="string" ns6:value-type="string">
            <ns7:p>112967</ns7:p>
          </ns4:table-cell>
          <ns4:table-cell ns4:number-columns-repeated="9"/>
        </ns4:table-row>
        <ns4:table-row ns4:style-name="ro1">
          <ns4:table-cell ns0:value-type="string" ns6:value-type="string">
            <ns7:p>285.0</ns7:p>
          </ns4:table-cell>
          <ns4:table-cell ns0:value-type="string" ns6:value-type="string">
            <ns7:p>South Fulton</ns7:p>
          </ns4:table-cell>
          <ns4:table-cell ns0:value-type="string" ns6:value-type="string">
            <ns7:p>GA</ns7:p>
          </ns4:table-cell>
          <ns4:table-cell ns0:value-type="string" ns6:value-type="string">
            <ns7:p>112820</ns7:p>
          </ns4:table-cell>
          <ns4:table-cell ns4:number-columns-repeated="9"/>
        </ns4:table-row>
        <ns4:table-row ns4:style-name="ro1">
          <ns4:table-cell ns0:value-type="string" ns6:value-type="string">
            <ns7:p>286.0</ns7:p>
          </ns4:table-cell>
          <ns4:table-cell ns0:value-type="string" ns6:value-type="string">
            <ns7:p>Carlsbad</ns7:p>
          </ns4:table-cell>
          <ns4:table-cell ns0:value-type="string" ns6:value-type="string">
            <ns7:p>CA</ns7:p>
          </ns4:table-cell>
          <ns4:table-cell ns0:value-type="string" ns6:value-type="string">
            <ns7:p>112260</ns7:p>
          </ns4:table-cell>
          <ns4:table-cell ns4:number-columns-repeated="9"/>
        </ns4:table-row>
        <ns4:table-row ns4:style-name="ro1">
          <ns4:table-cell ns0:value-type="string" ns6:value-type="string">
            <ns7:p>287.0</ns7:p>
          </ns4:table-cell>
          <ns4:table-cell ns0:value-type="string" ns6:value-type="string">
            <ns7:p>Sparks</ns7:p>
          </ns4:table-cell>
          <ns4:table-cell ns0:value-type="string" ns6:value-type="string">
            <ns7:p>NV</ns7:p>
          </ns4:table-cell>
          <ns4:table-cell ns0:value-type="string" ns6:value-type="string">
            <ns7:p>111902</ns7:p>
          </ns4:table-cell>
          <ns4:table-cell ns4:number-columns-repeated="9"/>
        </ns4:table-row>
        <ns4:table-row ns4:style-name="ro1">
          <ns4:table-cell ns0:value-type="string" ns6:value-type="string">
            <ns7:p>288.0</ns7:p>
          </ns4:table-cell>
          <ns4:table-cell ns0:value-type="string" ns6:value-type="string">
            <ns7:p>Gresham</ns7:p>
          </ns4:table-cell>
          <ns4:table-cell ns0:value-type="string" ns6:value-type="string">
            <ns7:p>OR</ns7:p>
          </ns4:table-cell>
          <ns4:table-cell ns0:value-type="string" ns6:value-type="string">
            <ns7:p>111513</ns7:p>
          </ns4:table-cell>
          <ns4:table-cell ns4:number-columns-repeated="9"/>
        </ns4:table-row>
        <ns4:table-row ns4:style-name="ro1">
          <ns4:table-cell ns0:value-type="string" ns6:value-type="string">
            <ns7:p>289.0</ns7:p>
          </ns4:table-cell>
          <ns4:table-cell ns0:value-type="string" ns6:value-type="string">
            <ns7:p>Santa Maria</ns7:p>
          </ns4:table-cell>
          <ns4:table-cell ns0:value-type="string" ns6:value-type="string">
            <ns7:p>CA</ns7:p>
          </ns4:table-cell>
          <ns4:table-cell ns0:value-type="string" ns6:value-type="string">
            <ns7:p>111390</ns7:p>
          </ns4:table-cell>
          <ns4:table-cell ns4:number-columns-repeated="9"/>
        </ns4:table-row>
        <ns4:table-row ns4:style-name="ro1">
          <ns4:table-cell ns0:value-type="string" ns6:value-type="string">
            <ns7:p>290.0</ns7:p>
          </ns4:table-cell>
          <ns4:table-cell ns0:value-type="string" ns6:value-type="string">
            <ns7:p>Hillsboro</ns7:p>
          </ns4:table-cell>
          <ns4:table-cell ns0:value-type="string" ns6:value-type="string">
            <ns7:p>OR</ns7:p>
          </ns4:table-cell>
          <ns4:table-cell ns0:value-type="string" ns6:value-type="string">
            <ns7:p>111126</ns7:p>
          </ns4:table-cell>
          <ns4:table-cell ns4:number-columns-repeated="9"/>
        </ns4:table-row>
        <ns4:table-row ns4:style-name="ro1">
          <ns4:table-cell ns0:value-type="string" ns6:value-type="string">
            <ns7:p>291.0</ns7:p>
          </ns4:table-cell>
          <ns4:table-cell ns0:value-type="string" ns6:value-type="string">
            <ns7:p>Peoria</ns7:p>
          </ns4:table-cell>
          <ns4:table-cell ns0:value-type="string" ns6:value-type="string">
            <ns7:p>IL</ns7:p>
          </ns4:table-cell>
          <ns4:table-cell ns0:value-type="string" ns6:value-type="string">
            <ns7:p>110920</ns7:p>
          </ns4:table-cell>
          <ns4:table-cell ns4:number-columns-repeated="9"/>
        </ns4:table-row>
        <ns4:table-row ns4:style-name="ro1">
          <ns4:table-cell ns0:value-type="string" ns6:value-type="string">
            <ns7:p>292.0</ns7:p>
          </ns4:table-cell>
          <ns4:table-cell ns0:value-type="string" ns6:value-type="string">
            <ns7:p>Davie</ns7:p>
          </ns4:table-cell>
          <ns4:table-cell ns0:value-type="string" ns6:value-type="string">
            <ns7:p>FL</ns7:p>
          </ns4:table-cell>
          <ns4:table-cell ns0:value-type="string" ns6:value-type="string">
            <ns7:p>110851</ns7:p>
          </ns4:table-cell>
          <ns4:table-cell ns4:number-columns-repeated="9"/>
        </ns4:table-row>
        <ns4:table-row ns4:style-name="ro1">
          <ns4:table-cell ns0:value-type="string" ns6:value-type="string">
            <ns7:p>293.0</ns7:p>
          </ns4:table-cell>
          <ns4:table-cell ns0:value-type="string" ns6:value-type="string">
            <ns7:p>Edinburg</ns7:p>
          </ns4:table-cell>
          <ns4:table-cell ns0:value-type="string" ns6:value-type="string">
            <ns7:p>TX</ns7:p>
          </ns4:table-cell>
          <ns4:table-cell ns0:value-type="string" ns6:value-type="string">
            <ns7:p>110700</ns7:p>
          </ns4:table-cell>
          <ns4:table-cell ns4:number-columns-repeated="9"/>
        </ns4:table-row>
        <ns4:table-row ns4:style-name="ro1">
          <ns4:table-cell ns0:value-type="string" ns6:value-type="string">
            <ns7:p>294.0</ns7:p>
          </ns4:table-cell>
          <ns4:table-cell ns0:value-type="string" ns6:value-type="string">
            <ns7:p>Pueblo</ns7:p>
          </ns4:table-cell>
          <ns4:table-cell ns0:value-type="string" ns6:value-type="string">
            <ns7:p>CO</ns7:p>
          </ns4:table-cell>
          <ns4:table-cell ns0:value-type="string" ns6:value-type="string">
            <ns7:p>110404</ns7:p>
          </ns4:table-cell>
          <ns4:table-cell ns4:number-columns-repeated="9"/>
        </ns4:table-row>
        <ns4:table-row ns4:style-name="ro1">
          <ns4:table-cell ns0:value-type="string" ns6:value-type="string">
            <ns7:p>295.0</ns7:p>
          </ns4:table-cell>
          <ns4:table-cell ns0:value-type="string" ns6:value-type="string">
            <ns7:p>San Buenaventura (Ventura)</ns7:p>
          </ns4:table-cell>
          <ns4:table-cell ns0:value-type="string" ns6:value-type="string">
            <ns7:p>CA</ns7:p>
          </ns4:table-cell>
          <ns4:table-cell ns0:value-type="string" ns6:value-type="string">
            <ns7:p>109914</ns7:p>
          </ns4:table-cell>
          <ns4:table-cell ns4:number-columns-repeated="9"/>
        </ns4:table-row>
        <ns4:table-row ns4:style-name="ro1">
          <ns4:table-cell ns0:value-type="string" ns6:value-type="string">
            <ns7:p>296.0</ns7:p>
          </ns4:table-cell>
          <ns4:table-cell ns0:value-type="string" ns6:value-type="string">
            <ns7:p>Palm Coast</ns7:p>
          </ns4:table-cell>
          <ns4:table-cell ns0:value-type="string" ns6:value-type="string">
            <ns7:p>FL</ns7:p>
          </ns4:table-cell>
          <ns4:table-cell ns0:value-type="string" ns6:value-type="string">
            <ns7:p>109886</ns7:p>
          </ns4:table-cell>
          <ns4:table-cell ns4:number-columns-repeated="9"/>
        </ns4:table-row>
        <ns4:table-row ns4:style-name="ro1">
          <ns4:table-cell ns0:value-type="string" ns6:value-type="string">
            <ns7:p>297.0</ns7:p>
          </ns4:table-cell>
          <ns4:table-cell ns0:value-type="string" ns6:value-type="string">
            <ns7:p>Costa Mesa</ns7:p>
          </ns4:table-cell>
          <ns4:table-cell ns0:value-type="string" ns6:value-type="string">
            <ns7:p>CA</ns7:p>
          </ns4:table-cell>
          <ns4:table-cell ns0:value-type="string" ns6:value-type="string">
            <ns7:p>108881</ns7:p>
          </ns4:table-cell>
          <ns4:table-cell ns4:number-columns-repeated="9"/>
        </ns4:table-row>
        <ns4:table-row ns4:style-name="ro1">
          <ns4:table-cell ns0:value-type="string" ns6:value-type="string">
            <ns7:p>298.0</ns7:p>
          </ns4:table-cell>
          <ns4:table-cell ns0:value-type="string" ns6:value-type="string">
            <ns7:p>St. George</ns7:p>
          </ns4:table-cell>
          <ns4:table-cell ns0:value-type="string" ns6:value-type="string">
            <ns7:p>UT</ns7:p>
          </ns4:table-cell>
          <ns4:table-cell ns0:value-type="string" ns6:value-type="string">
            <ns7:p>108713</ns7:p>
          </ns4:table-cell>
          <ns4:table-cell ns4:number-columns-repeated="9"/>
        </ns4:table-row>
        <ns4:table-row ns4:style-name="ro1">
          <ns4:table-cell ns0:value-type="string" ns6:value-type="string">
            <ns7:p>299.0</ns7:p>
          </ns4:table-cell>
          <ns4:table-cell ns0:value-type="string" ns6:value-type="string">
            <ns7:p>Centennial</ns7:p>
          </ns4:table-cell>
          <ns4:table-cell ns0:value-type="string" ns6:value-type="string">
            <ns7:p>CO</ns7:p>
          </ns4:table-cell>
          <ns4:table-cell ns0:value-type="string" ns6:value-type="string">
            <ns7:p>108658</ns7:p>
          </ns4:table-cell>
          <ns4:table-cell ns4:number-columns-repeated="9"/>
        </ns4:table-row>
        <ns4:table-row ns4:style-name="ro1">
          <ns4:table-cell ns0:value-type="string" ns6:value-type="string">
            <ns7:p>300.0</ns7:p>
          </ns4:table-cell>
          <ns4:table-cell ns0:value-type="string" ns6:value-type="string">
            <ns7:p>Downey</ns7:p>
          </ns4:table-cell>
          <ns4:table-cell ns0:value-type="string" ns6:value-type="string">
            <ns7:p>CA</ns7:p>
          </ns4:table-cell>
          <ns4:table-cell ns0:value-type="string" ns6:value-type="string">
            <ns7:p>108468</ns7:p>
          </ns4:table-cell>
          <ns4:table-cell ns4:number-columns-repeated="9"/>
        </ns4:table-row>
        <ns4:table-row ns4:style-name="ro1">
          <ns4:table-cell ns0:value-type="string" ns6:value-type="string">
            <ns7:p>301.0</ns7:p>
          </ns4:table-cell>
          <ns4:table-cell ns0:value-type="string" ns6:value-type="string">
            <ns7:p>Spokane Valley</ns7:p>
          </ns4:table-cell>
          <ns4:table-cell ns0:value-type="string" ns6:value-type="string">
            <ns7:p>WA</ns7:p>
          </ns4:table-cell>
          <ns4:table-cell ns0:value-type="string" ns6:value-type="string">
            <ns7:p>108405</ns7:p>
          </ns4:table-cell>
          <ns4:table-cell ns4:number-columns-repeated="9"/>
        </ns4:table-row>
        <ns4:table-row ns4:style-name="ro1">
          <ns4:table-cell ns0:value-type="string" ns6:value-type="string">
            <ns7:p>302.0</ns7:p>
          </ns4:table-cell>
          <ns4:table-cell ns0:value-type="string" ns6:value-type="string">
            <ns7:p>Sugar Land</ns7:p>
          </ns4:table-cell>
          <ns4:table-cell ns0:value-type="string" ns6:value-type="string">
            <ns7:p>TX</ns7:p>
          </ns4:table-cell>
          <ns4:table-cell ns0:value-type="string" ns6:value-type="string">
            <ns7:p>107726</ns7:p>
          </ns4:table-cell>
          <ns4:table-cell ns4:number-columns-repeated="9"/>
        </ns4:table-row>
        <ns4:table-row ns4:style-name="ro1">
          <ns4:table-cell ns0:value-type="string" ns6:value-type="string">
            <ns7:p>303.0</ns7:p>
          </ns4:table-cell>
          <ns4:table-cell ns0:value-type="string" ns6:value-type="string">
            <ns7:p>Lee's Summit</ns7:p>
          </ns4:table-cell>
          <ns4:table-cell ns0:value-type="string" ns6:value-type="string">
            <ns7:p>MO</ns7:p>
          </ns4:table-cell>
          <ns4:table-cell ns0:value-type="string" ns6:value-type="string">
            <ns7:p>107514</ns7:p>
          </ns4:table-cell>
          <ns4:table-cell ns4:number-columns-repeated="9"/>
        </ns4:table-row>
        <ns4:table-row ns4:style-name="ro1">
          <ns4:table-cell ns0:value-type="string" ns6:value-type="string">
            <ns7:p>304.0</ns7:p>
          </ns4:table-cell>
          <ns4:table-cell ns0:value-type="string" ns6:value-type="string">
            <ns7:p>Bend</ns7:p>
          </ns4:table-cell>
          <ns4:table-cell ns0:value-type="string" ns6:value-type="string">
            <ns7:p>OR</ns7:p>
          </ns4:table-cell>
          <ns4:table-cell ns0:value-type="string" ns6:value-type="string">
            <ns7:p>107342</ns7:p>
          </ns4:table-cell>
          <ns4:table-cell ns4:number-columns-repeated="9"/>
        </ns4:table-row>
        <ns4:table-row ns4:style-name="ro1">
          <ns4:table-cell ns0:value-type="string" ns6:value-type="string">
            <ns7:p>305.0</ns7:p>
          </ns4:table-cell>
          <ns4:table-cell ns0:value-type="string" ns6:value-type="string">
            <ns7:p>Jurupa Valley</ns7:p>
          </ns4:table-cell>
          <ns4:table-cell ns0:value-type="string" ns6:value-type="string">
            <ns7:p>CA</ns7:p>
          </ns4:table-cell>
          <ns4:table-cell ns0:value-type="string" ns6:value-type="string">
            <ns7:p>107311</ns7:p>
          </ns4:table-cell>
          <ns4:table-cell ns4:number-columns-repeated="9"/>
        </ns4:table-row>
        <ns4:table-row ns4:style-name="ro1">
          <ns4:table-cell ns0:value-type="string" ns6:value-type="string">
            <ns7:p>306.0</ns7:p>
          </ns4:table-cell>
          <ns4:table-cell ns0:value-type="string" ns6:value-type="string">
            <ns7:p>Georgetown</ns7:p>
          </ns4:table-cell>
          <ns4:table-cell ns0:value-type="string" ns6:value-type="string">
            <ns7:p>TX</ns7:p>
          </ns4:table-cell>
          <ns4:table-cell ns0:value-type="string" ns6:value-type="string">
            <ns7:p>106907</ns7:p>
          </ns4:table-cell>
          <ns4:table-cell ns4:number-columns-repeated="9"/>
        </ns4:table-row>
        <ns4:table-row ns4:style-name="ro1">
          <ns4:table-cell ns0:value-type="string" ns6:value-type="string">
            <ns7:p>307.0</ns7:p>
          </ns4:table-cell>
          <ns4:table-cell ns0:value-type="string" ns6:value-type="string">
            <ns7:p>Green Bay</ns7:p>
          </ns4:table-cell>
          <ns4:table-cell ns0:value-type="string" ns6:value-type="string">
            <ns7:p>WI</ns7:p>
          </ns4:table-cell>
          <ns4:table-cell ns0:value-type="string" ns6:value-type="string">
            <ns7:p>106675</ns7:p>
          </ns4:table-cell>
          <ns4:table-cell ns4:number-columns-repeated="9"/>
        </ns4:table-row>
        <ns4:table-row ns4:style-name="ro1">
          <ns4:table-cell ns0:value-type="string" ns6:value-type="string">
            <ns7:p>308.0</ns7:p>
          </ns4:table-cell>
          <ns4:table-cell ns0:value-type="string" ns6:value-type="string">
            <ns7:p>Fayetteville</ns7:p>
          </ns4:table-cell>
          <ns4:table-cell ns0:value-type="string" ns6:value-type="string">
            <ns7:p>AR</ns7:p>
          </ns4:table-cell>
          <ns4:table-cell ns0:value-type="string" ns6:value-type="string">
            <ns7:p>106623</ns7:p>
          </ns4:table-cell>
          <ns4:table-cell ns4:number-columns-repeated="9">
            <ns7:p>Fayetteville Plumbing Services</ns7:p>
          </ns4:table-cell>
        </ns4:table-row>
        <ns4:table-row ns4:style-name="ro1">
          <ns4:table-cell ns0:value-type="string" ns6:value-type="string">
            <ns7:p>309.0</ns7:p>
          </ns4:table-cell>
          <ns4:table-cell ns0:value-type="string" ns6:value-type="string">
            <ns7:p>Rialto</ns7:p>
          </ns4:table-cell>
          <ns4:table-cell ns0:value-type="string" ns6:value-type="string">
            <ns7:p>CA</ns7:p>
          </ns4:table-cell>
          <ns4:table-cell ns0:value-type="string" ns6:value-type="string">
            <ns7:p>106554</ns7:p>
          </ns4:table-cell>
          <ns4:table-cell ns4:number-columns-repeated="9"/>
        </ns4:table-row>
        <ns4:table-row ns4:style-name="ro1">
          <ns4:table-cell ns0:value-type="string" ns6:value-type="string">
            <ns7:p>310.0</ns7:p>
          </ns4:table-cell>
          <ns4:table-cell ns0:value-type="string" ns6:value-type="string">
            <ns7:p>Brockton</ns7:p>
          </ns4:table-cell>
          <ns4:table-cell ns0:value-type="string" ns6:value-type="string">
            <ns7:p>MA</ns7:p>
          </ns4:table-cell>
          <ns4:table-cell ns0:value-type="string" ns6:value-type="string">
            <ns7:p>106134</ns7:p>
          </ns4:table-cell>
          <ns4:table-cell ns4:number-columns-repeated="9"/>
        </ns4:table-row>
        <ns4:table-row ns4:style-name="ro1">
          <ns4:table-cell ns0:value-type="string" ns6:value-type="string">
            <ns7:p>311.0</ns7:p>
          </ns4:table-cell>
          <ns4:table-cell ns0:value-type="string" ns6:value-type="string">
            <ns7:p>Boulder</ns7:p>
          </ns4:table-cell>
          <ns4:table-cell ns0:value-type="string" ns6:value-type="string">
            <ns7:p>CO</ns7:p>
          </ns4:table-cell>
          <ns4:table-cell ns0:value-type="string" ns6:value-type="string">
            <ns7:p>105689</ns7:p>
          </ns4:table-cell>
          <ns4:table-cell ns4:number-columns-repeated="9"/>
        </ns4:table-row>
        <ns4:table-row ns4:style-name="ro1">
          <ns4:table-cell ns0:value-type="string" ns6:value-type="string">
            <ns7:p>312.0</ns7:p>
          </ns4:table-cell>
          <ns4:table-cell ns0:value-type="string" ns6:value-type="string">
            <ns7:p>Carmel</ns7:p>
          </ns4:table-cell>
          <ns4:table-cell ns0:value-type="string" ns6:value-type="string">
            <ns7:p>IN</ns7:p>
          </ns4:table-cell>
          <ns4:table-cell ns0:value-type="string" ns6:value-type="string">
            <ns7:p>105634</ns7:p>
          </ns4:table-cell>
          <ns4:table-cell ns4:number-columns-repeated="9"/>
        </ns4:table-row>
        <ns4:table-row ns4:style-name="ro1">
          <ns4:table-cell ns0:value-type="string" ns6:value-type="string">
            <ns7:p>313.0</ns7:p>
          </ns4:table-cell>
          <ns4:table-cell ns0:value-type="string" ns6:value-type="string">
            <ns7:p>Dearborn</ns7:p>
          </ns4:table-cell>
          <ns4:table-cell ns0:value-type="string" ns6:value-type="string">
            <ns7:p>MI</ns7:p>
          </ns4:table-cell>
          <ns4:table-cell ns0:value-type="string" ns6:value-type="string">
            <ns7:p>105611</ns7:p>
          </ns4:table-cell>
          <ns4:table-cell ns4:number-columns-repeated="9"/>
        </ns4:table-row>
        <ns4:table-row ns4:style-name="ro1">
          <ns4:table-cell ns0:value-type="string" ns6:value-type="string">
            <ns7:p>314.0</ns7:p>
          </ns4:table-cell>
          <ns4:table-cell ns0:value-type="string" ns6:value-type="string">
            <ns7:p>West Covina</ns7:p>
          </ns4:table-cell>
          <ns4:table-cell ns0:value-type="string" ns6:value-type="string">
            <ns7:p>CA</ns7:p>
          </ns4:table-cell>
          <ns4:table-cell ns0:value-type="string" ns6:value-type="string">
            <ns7:p>105301</ns7:p>
          </ns4:table-cell>
          <ns4:table-cell ns4:number-columns-repeated="9"/>
        </ns4:table-row>
        <ns4:table-row ns4:style-name="ro1">
          <ns4:table-cell ns0:value-type="string" ns6:value-type="string">
            <ns7:p>315.0</ns7:p>
          </ns4:table-cell>
          <ns4:table-cell ns0:value-type="string" ns6:value-type="string">
            <ns7:p>Yuma</ns7:p>
          </ns4:table-cell>
          <ns4:table-cell ns0:value-type="string" ns6:value-type="string">
            <ns7:p>AZ</ns7:p>
          </ns4:table-cell>
          <ns4:table-cell ns0:value-type="string" ns6:value-type="string">
            <ns7:p>105227</ns7:p>
          </ns4:table-cell>
          <ns4:table-cell ns4:number-columns-repeated="9"/>
        </ns4:table-row>
        <ns4:table-row ns4:style-name="ro1">
          <ns4:table-cell ns0:value-type="string" ns6:value-type="string">
            <ns7:p>316.0</ns7:p>
          </ns4:table-cell>
          <ns4:table-cell ns0:value-type="string" ns6:value-type="string">
            <ns7:p>Chico</ns7:p>
          </ns4:table-cell>
          <ns4:table-cell ns0:value-type="string" ns6:value-type="string">
            <ns7:p>CA</ns7:p>
          </ns4:table-cell>
          <ns4:table-cell ns0:value-type="string" ns6:value-type="string">
            <ns7:p>105081</ns7:p>
          </ns4:table-cell>
          <ns4:table-cell ns4:number-columns-repeated="9"/>
        </ns4:table-row>
        <ns4:table-row ns4:style-name="ro1">
          <ns4:table-cell ns0:value-type="string" ns6:value-type="string">
            <ns7:p>317.0</ns7:p>
          </ns4:table-cell>
          <ns4:table-cell ns0:value-type="string" ns6:value-type="string">
            <ns7:p>El Monte</ns7:p>
          </ns4:table-cell>
          <ns4:table-cell ns0:value-type="string" ns6:value-type="string">
            <ns7:p>CA</ns7:p>
          </ns4:table-cell>
          <ns4:table-cell ns0:value-type="string" ns6:value-type="string">
            <ns7:p>105075</ns7:p>
          </ns4:table-cell>
          <ns4:table-cell ns4:number-columns-repeated="9"/>
        </ns4:table-row>
        <ns4:table-row ns4:style-name="ro1">
          <ns4:table-cell ns0:value-type="string" ns6:value-type="string">
            <ns7:p>318.0</ns7:p>
          </ns4:table-cell>
          <ns4:table-cell ns0:value-type="string" ns6:value-type="string">
            <ns7:p>Sandy Springs</ns7:p>
          </ns4:table-cell>
          <ns4:table-cell ns0:value-type="string" ns6:value-type="string">
            <ns7:p>GA</ns7:p>
          </ns4:table-cell>
          <ns4:table-cell ns0:value-type="string" ns6:value-type="string">
            <ns7:p>105013</ns7:p>
          </ns4:table-cell>
          <ns4:table-cell ns4:number-columns-repeated="9"/>
        </ns4:table-row>
        <ns4:table-row ns4:style-name="ro1">
          <ns4:table-cell ns0:value-type="string" ns6:value-type="string">
            <ns7:p>319.0</ns7:p>
          </ns4:table-cell>
          <ns4:table-cell ns0:value-type="string" ns6:value-type="string">
            <ns7:p>Renton</ns7:p>
          </ns4:table-cell>
          <ns4:table-cell ns0:value-type="string" ns6:value-type="string">
            <ns7:p>WA</ns7:p>
          </ns4:table-cell>
          <ns4:table-cell ns0:value-type="string" ns6:value-type="string">
            <ns7:p>104975</ns7:p>
          </ns4:table-cell>
          <ns4:table-cell ns4:number-columns-repeated="9"/>
        </ns4:table-row>
        <ns4:table-row ns4:style-name="ro1">
          <ns4:table-cell ns0:value-type="string" ns6:value-type="string">
            <ns7:p>320.0</ns7:p>
          </ns4:table-cell>
          <ns4:table-cell ns0:value-type="string" ns6:value-type="string">
            <ns7:p>Fishers</ns7:p>
          </ns4:table-cell>
          <ns4:table-cell ns0:value-type="string" ns6:value-type="string">
            <ns7:p>IN</ns7:p>
          </ns4:table-cell>
          <ns4:table-cell ns0:value-type="string" ns6:value-type="string">
            <ns7:p>104812</ns7:p>
          </ns4:table-cell>
          <ns4:table-cell ns4:number-columns-repeated="9"/>
        </ns4:table-row>
        <ns4:table-row ns4:style-name="ro1">
          <ns4:table-cell ns0:value-type="string" ns6:value-type="string">
            <ns7:p>321.0</ns7:p>
          </ns4:table-cell>
          <ns4:table-cell ns0:value-type="string" ns6:value-type="string">
            <ns7:p>Suffolk</ns7:p>
          </ns4:table-cell>
          <ns4:table-cell ns0:value-type="string" ns6:value-type="string">
            <ns7:p>VA</ns7:p>
          </ns4:table-cell>
          <ns4:table-cell ns0:value-type="string" ns6:value-type="string">
            <ns7:p>104699</ns7:p>
          </ns4:table-cell>
          <ns4:table-cell ns4:number-columns-repeated="9"/>
        </ns4:table-row>
        <ns4:table-row ns4:style-name="ro1">
          <ns4:table-cell ns0:value-type="string" ns6:value-type="string">
            <ns7:p>322.0</ns7:p>
          </ns4:table-cell>
          <ns4:table-cell ns0:value-type="string" ns6:value-type="string">
            <ns7:p>Lynn</ns7:p>
          </ns4:table-cell>
          <ns4:table-cell ns0:value-type="string" ns6:value-type="string">
            <ns7:p>MA</ns7:p>
          </ns4:table-cell>
          <ns4:table-cell ns0:value-type="string" ns6:value-type="string">
            <ns7:p>104236</ns7:p>
          </ns4:table-cell>
          <ns4:table-cell ns4:number-columns-repeated="9"/>
        </ns4:table-row>
        <ns4:table-row ns4:style-name="ro1">
          <ns4:table-cell ns0:value-type="string" ns6:value-type="string">
            <ns7:p>323.0</ns7:p>
          </ns4:table-cell>
          <ns4:table-cell ns0:value-type="string" ns6:value-type="string">
            <ns7:p>Vacaville</ns7:p>
          </ns4:table-cell>
          <ns4:table-cell ns0:value-type="string" ns6:value-type="string">
            <ns7:p>CA</ns7:p>
          </ns4:table-cell>
          <ns4:table-cell ns0:value-type="string" ns6:value-type="string">
            <ns7:p>103850</ns7:p>
          </ns4:table-cell>
          <ns4:table-cell ns4:number-columns-repeated="9"/>
        </ns4:table-row>
        <ns4:table-row ns4:style-name="ro1">
          <ns4:table-cell ns0:value-type="string" ns6:value-type="string">
            <ns7:p>324.0</ns7:p>
          </ns4:table-cell>
          <ns4:table-cell ns0:value-type="string" ns6:value-type="string">
            <ns7:p>San Mateo</ns7:p>
          </ns4:table-cell>
          <ns4:table-cell ns0:value-type="string" ns6:value-type="string">
            <ns7:p>CA</ns7:p>
          </ns4:table-cell>
          <ns4:table-cell ns0:value-type="string" ns6:value-type="string">
            <ns7:p>103337</ns7:p>
          </ns4:table-cell>
          <ns4:table-cell ns4:number-columns-repeated="9"/>
        </ns4:table-row>
        <ns4:table-row ns4:style-name="ro1">
          <ns4:table-cell ns0:value-type="string" ns6:value-type="string">
            <ns7:p>325.0</ns7:p>
          </ns4:table-cell>
          <ns4:table-cell ns0:value-type="string" ns6:value-type="string">
            <ns7:p>South Bend</ns7:p>
          </ns4:table-cell>
          <ns4:table-cell ns0:value-type="string" ns6:value-type="string">
            <ns7:p>IN</ns7:p>
          </ns4:table-cell>
          <ns4:table-cell ns0:value-type="string" ns6:value-type="string">
            <ns7:p>103201</ns7:p>
          </ns4:table-cell>
          <ns4:table-cell ns4:number-columns-repeated="9"/>
        </ns4:table-row>
        <ns4:table-row ns4:style-name="ro1">
          <ns4:table-cell ns0:value-type="string" ns6:value-type="string">
            <ns7:p>326.0</ns7:p>
          </ns4:table-cell>
          <ns4:table-cell ns0:value-type="string" ns6:value-type="string">
            <ns7:p>Quincy</ns7:p>
          </ns4:table-cell>
          <ns4:table-cell ns0:value-type="string" ns6:value-type="string">
            <ns7:p>MA</ns7:p>
          </ns4:table-cell>
          <ns4:table-cell ns0:value-type="string" ns6:value-type="string">
            <ns7:p>103173</ns7:p>
          </ns4:table-cell>
          <ns4:table-cell ns4:number-columns-repeated="9"/>
        </ns4:table-row>
        <ns4:table-row ns4:style-name="ro1">
          <ns4:table-cell ns0:value-type="string" ns6:value-type="string">
            <ns7:p>327.0</ns7:p>
          </ns4:table-cell>
          <ns4:table-cell ns0:value-type="string" ns6:value-type="string">
            <ns7:p>Burbank</ns7:p>
          </ns4:table-cell>
          <ns4:table-cell ns0:value-type="string" ns6:value-type="string">
            <ns7:p>CA</ns7:p>
          </ns4:table-cell>
          <ns4:table-cell ns0:value-type="string" ns6:value-type="string">
            <ns7:p>102988</ns7:p>
          </ns4:table-cell>
          <ns4:table-cell ns4:number-columns-repeated="9"/>
        </ns4:table-row>
        <ns4:table-row ns4:style-name="ro1">
          <ns4:table-cell ns0:value-type="string" ns6:value-type="string">
            <ns7:p>328.0</ns7:p>
          </ns4:table-cell>
          <ns4:table-cell ns0:value-type="string" ns6:value-type="string">
            <ns7:p>Hesperia</ns7:p>
          </ns4:table-cell>
          <ns4:table-cell ns0:value-type="string" ns6:value-type="string">
            <ns7:p>CA</ns7:p>
          </ns4:table-cell>
          <ns4:table-cell ns0:value-type="string" ns6:value-type="string">
            <ns7:p>102605</ns7:p>
          </ns4:table-cell>
          <ns4:table-cell ns4:number-columns-repeated="9"/>
        </ns4:table-row>
        <ns4:table-row ns4:style-name="ro1">
          <ns4:table-cell ns0:value-type="string" ns6:value-type="string">
            <ns7:p>329.0</ns7:p>
          </ns4:table-cell>
          <ns4:table-cell ns0:value-type="string" ns6:value-type="string">
            <ns7:p>Wichita Falls</ns7:p>
          </ns4:table-cell>
          <ns4:table-cell ns0:value-type="string" ns6:value-type="string">
            <ns7:p>TX</ns7:p>
          </ns4:table-cell>
          <ns4:table-cell ns0:value-type="string" ns6:value-type="string">
            <ns7:p>101951</ns7:p>
          </ns4:table-cell>
          <ns4:table-cell ns4:number-columns-repeated="9"/>
        </ns4:table-row>
        <ns4:table-row ns4:style-name="ro1">
          <ns4:table-cell ns0:value-type="string" ns6:value-type="string">
            <ns7:p>330.0</ns7:p>
          </ns4:table-cell>
          <ns4:table-cell ns0:value-type="string" ns6:value-type="string">
            <ns7:p>Tracy</ns7:p>
          </ns4:table-cell>
          <ns4:table-cell ns0:value-type="string" ns6:value-type="string">
            <ns7:p>CA</ns7:p>
          </ns4:table-cell>
          <ns4:table-cell ns0:value-type="string" ns6:value-type="string">
            <ns7:p>101901</ns7:p>
          </ns4:table-cell>
          <ns4:table-cell ns4:number-columns-repeated="9"/>
        </ns4:table-row>
        <ns4:table-row ns4:style-name="ro1">
          <ns4:table-cell ns0:value-type="string" ns6:value-type="string">
            <ns7:p>331.0</ns7:p>
          </ns4:table-cell>
          <ns4:table-cell ns0:value-type="string" ns6:value-type="string">
            <ns7:p>New Bedford</ns7:p>
          </ns4:table-cell>
          <ns4:table-cell ns0:value-type="string" ns6:value-type="string">
            <ns7:p>MA</ns7:p>
          </ns4:table-cell>
          <ns4:table-cell ns0:value-type="string" ns6:value-type="string">
            <ns7:p>101834</ns7:p>
          </ns4:table-cell>
          <ns4:table-cell ns4:number-columns-repeated="9"/>
        </ns4:table-row>
        <ns4:table-row ns4:style-name="ro1">
          <ns4:table-cell ns0:value-type="string" ns6:value-type="string">
            <ns7:p>332.0</ns7:p>
          </ns4:table-cell>
          <ns4:table-cell ns0:value-type="string" ns6:value-type="string">
            <ns7:p>El Cajon</ns7:p>
          </ns4:table-cell>
          <ns4:table-cell ns0:value-type="string" ns6:value-type="string">
            <ns7:p>CA</ns7:p>
          </ns4:table-cell>
          <ns4:table-cell ns0:value-type="string" ns6:value-type="string">
            <ns7:p>101755</ns7:p>
          </ns4:table-cell>
          <ns4:table-cell ns4:number-columns-repeated="9"/>
        </ns4:table-row>
        <ns4:table-row ns4:style-name="ro1">
          <ns4:table-cell ns0:value-type="string" ns6:value-type="string">
            <ns7:p>333.0</ns7:p>
          </ns4:table-cell>
          <ns4:table-cell ns0:value-type="string" ns6:value-type="string">
            <ns7:p>Albany</ns7:p>
          </ns4:table-cell>
          <ns4:table-cell ns0:value-type="string" ns6:value-type="string">
            <ns7:p>NY</ns7:p>
          </ns4:table-cell>
          <ns4:table-cell ns0:value-type="string" ns6:value-type="string">
            <ns7:p>101698</ns7:p>
          </ns4:table-cell>
          <ns4:table-cell ns4:number-columns-repeated="9"/>
        </ns4:table-row>
        <ns4:table-row ns4:style-name="ro1">
          <ns4:table-cell ns0:value-type="string" ns6:value-type="string">
            <ns7:p>334.0</ns7:p>
          </ns4:table-cell>
          <ns4:table-cell ns0:value-type="string" ns6:value-type="string">
            <ns7:p>Inglewood</ns7:p>
          </ns4:table-cell>
          <ns4:table-cell ns0:value-type="string" ns6:value-type="string">
            <ns7:p>CA</ns7:p>
          </ns4:table-cell>
          <ns4:table-cell ns0:value-type="string" ns6:value-type="string">
            <ns7:p>101662</ns7:p>
          </ns4:table-cell>
          <ns4:table-cell ns4:number-columns-repeated="9"/>
        </ns4:table-row>
        <ns4:table-row ns4:style-name="ro1">
          <ns4:table-cell ns0:value-type="string" ns6:value-type="string">
            <ns7:p>335.0</ns7:p>
          </ns4:table-cell>
          <ns4:table-cell ns0:value-type="string" ns6:value-type="string">
            <ns7:p>Boca Raton</ns7:p>
          </ns4:table-cell>
          <ns4:table-cell ns0:value-type="string" ns6:value-type="string">
            <ns7:p>FL</ns7:p>
          </ns4:table-cell>
          <ns4:table-cell ns0:value-type="string" ns6:value-type="string">
            <ns7:p>101582</ns7:p>
          </ns4:table-cell>
          <ns4:table-cell ns4:number-columns-repeated="9"/>
        </ns4:table-row>
        <ns4:table-row ns4:style-name="ro1">
          <ns4:table-cell ns0:value-type="string" ns6:value-type="string">
            <ns7:p>336.0</ns7:p>
          </ns4:table-cell>
          <ns4:table-cell ns0:value-type="string" ns6:value-type="string">
            <ns7:p>Fort Myers</ns7:p>
          </ns4:table-cell>
          <ns4:table-cell ns0:value-type="string" ns6:value-type="string">
            <ns7:p>FL</ns7:p>
          </ns4:table-cell>
          <ns4:table-cell ns0:value-type="string" ns6:value-type="string">
            <ns7:p>101581</ns7:p>
          </ns4:table-cell>
          <ns4:table-cell ns4:number-columns-repeated="9"/>
        </ns4:table-row>
        <ns4:table-row ns4:style-name="ro1">
          <ns4:table-cell ns0:value-type="string" ns6:value-type="string">
            <ns7:p>337.0</ns7:p>
          </ns4:table-cell>
          <ns4:table-cell ns0:value-type="string" ns6:value-type="string">
            <ns7:p>Daly City</ns7:p>
          </ns4:table-cell>
          <ns4:table-cell ns0:value-type="string" ns6:value-type="string">
            <ns7:p>CA</ns7:p>
          </ns4:table-cell>
          <ns4:table-cell ns0:value-type="string" ns6:value-type="string">
            <ns7:p>101261</ns7:p>
          </ns4:table-cell>
          <ns4:table-cell ns4:number-columns-repeated="9"/>
        </ns4:table-row>
        <ns4:table-row ns4:style-name="ro1">
          <ns4:table-cell ns0:value-type="string" ns6:value-type="string">
            <ns7:p>338.0</ns7:p>
          </ns4:table-cell>
          <ns4:table-cell ns0:value-type="string" ns6:value-type="string">
            <ns7:p>Avondale</ns7:p>
          </ns4:table-cell>
          <ns4:table-cell ns0:value-type="string" ns6:value-type="string">
            <ns7:p>AZ</ns7:p>
          </ns4:table-cell>
          <ns4:table-cell ns0:value-type="string" ns6:value-type="string">
            <ns7:p>100983</ns7:p>
          </ns4:table-cell>
          <ns4:table-cell ns4:number-columns-repeated="9"/>
        </ns4:table-row>
        <ns4:table-row ns4:style-name="ro1">
          <ns4:table-cell ns0:value-type="string" ns6:value-type="string">
            <ns7:p>339.0</ns7:p>
          </ns4:table-cell>
          <ns4:table-cell ns0:value-type="string" ns6:value-type="string">
            <ns7:p>San Angelo</ns7:p>
          </ns4:table-cell>
          <ns4:table-cell ns0:value-type="string" ns6:value-type="string">
            <ns7:p>TX</ns7:p>
          </ns4:table-cell>
          <ns4:table-cell ns0:value-type="string" ns6:value-type="string">
            <ns7:p>100640</ns7:p>
          </ns4:table-cell>
          <ns4:table-cell ns4:number-columns-repeated="9"/>
        </ns4:table-row>
        <ns4:table-row ns4:style-name="ro1">
          <ns4:table-cell ns0:value-type="string" ns6:value-type="string">
            <ns7:p>340.0</ns7:p>
          </ns4:table-cell>
          <ns4:table-cell ns0:value-type="string" ns6:value-type="string">
            <ns7:p>Edmond</ns7:p>
          </ns4:table-cell>
          <ns4:table-cell ns0:value-type="string" ns6:value-type="string">
            <ns7:p>OK</ns7:p>
          </ns4:table-cell>
          <ns4:table-cell ns0:value-type="string" ns6:value-type="string">
            <ns7:p>100479</ns7:p>
          </ns4:table-cell>
          <ns4:table-cell ns4:number-columns-repeated="9"/>
        </ns4:table-row>
        <ns4:table-row ns4:style-name="ro1">
          <ns4:table-cell ns0:value-type="string" ns6:value-type="string">
            <ns7:p>341.0</ns7:p>
          </ns4:table-cell>
          <ns4:table-cell ns0:value-type="string" ns6:value-type="string">
            <ns7:p>Davenport</ns7:p>
          </ns4:table-cell>
          <ns4:table-cell ns0:value-type="string" ns6:value-type="string">
            <ns7:p>IA</ns7:p>
          </ns4:table-cell>
          <ns4:table-cell ns0:value-type="string" ns6:value-type="string">
            <ns7:p>100358</ns7:p>
          </ns4:table-cell>
          <ns4:table-cell ns4:number-columns-repeated="9"/>
        </ns4:table-row>
        <ns4:table-row ns4:style-name="ro1">
          <ns4:table-cell ns0:value-type="string" ns6:value-type="string">
            <ns7:p>342.0</ns7:p>
          </ns4:table-cell>
          <ns4:table-cell ns0:value-type="string" ns6:value-type="string">
            <ns7:p>Deltona</ns7:p>
          </ns4:table-cell>
          <ns4:table-cell ns0:value-type="string" ns6:value-type="string">
            <ns7:p>FL</ns7:p>
          </ns4:table-cell>
          <ns4:table-cell ns0:value-type="string" ns6:value-type="string">
            <ns7:p>100267</ns7:p>
          </ns4:table-cell>
          <ns4:table-cell ns4:number-columns-repeated="9"/>
        </ns4:table-row>
        <ns4:table-row ns4:style-name="ro1">
          <ns4:table-cell ns0:value-type="string" ns6:value-type="string">
            <ns7:p>343.0</ns7:p>
          </ns4:table-cell>
          <ns4:table-cell ns0:value-type="string" ns6:value-type="string">
            <ns7:p>Longmont</ns7:p>
          </ns4:table-cell>
          <ns4:table-cell ns0:value-type="string" ns6:value-type="string">
            <ns7:p>CO</ns7:p>
          </ns4:table-cell>
          <ns4:table-cell ns0:value-type="string" ns6:value-type="string">
            <ns7:p>100109</ns7:p>
          </ns4:table-cell>
          <ns4:table-cell ns4:number-columns-repeated="9"/>
        </ns4:table-row>
        <ns4:table-row ns4:style-name="ro1">
          <ns4:table-cell ns0:value-type="string" ns6:value-type="string">
            <ns7:p>344.0</ns7:p>
          </ns4:table-cell>
          <ns4:table-cell ns0:value-type="string" ns6:value-type="string">
            <ns7:p>Federal Way</ns7:p>
          </ns4:table-cell>
          <ns4:table-cell ns0:value-type="string" ns6:value-type="string">
            <ns7:p>WA</ns7:p>
          </ns4:table-cell>
          <ns4:table-cell ns0:value-type="string" ns6:value-type="string">
            <ns7:p>99729</ns7:p>
          </ns4:table-cell>
          <ns4:table-cell ns4:number-columns-repeated="9"/>
        </ns4:table-row>
        <ns4:table-row ns4:style-name="ro1">
          <ns4:table-cell ns0:value-type="string" ns6:value-type="string">
            <ns7:p>345.0</ns7:p>
          </ns4:table-cell>
          <ns4:table-cell ns0:value-type="string" ns6:value-type="string">
            <ns7:p>Merced</ns7:p>
          </ns4:table-cell>
          <ns4:table-cell ns0:value-type="string" ns6:value-type="string">
            <ns7:p>CA</ns7:p>
          </ns4:table-cell>
          <ns4:table-cell ns0:value-type="string" ns6:value-type="string">
            <ns7:p>99724</ns7:p>
          </ns4:table-cell>
          <ns4:table-cell ns4:number-columns-repeated="9"/>
        </ns4:table-row>
        <ns4:table-row ns4:style-name="ro1">
          <ns4:table-cell ns0:value-type="string" ns6:value-type="string">
            <ns7:p>346.0</ns7:p>
          </ns4:table-cell>
          <ns4:table-cell ns0:value-type="string" ns6:value-type="string">
            <ns7:p>Kenosha</ns7:p>
          </ns4:table-cell>
          <ns4:table-cell ns0:value-type="string" ns6:value-type="string">
            <ns7:p>WI</ns7:p>
          </ns4:table-cell>
          <ns4:table-cell ns0:value-type="string" ns6:value-type="string">
            <ns7:p>99239</ns7:p>
          </ns4:table-cell>
          <ns4:table-cell ns4:number-columns-repeated="9"/>
        </ns4:table-row>
        <ns4:table-row ns4:style-name="ro1">
          <ns4:table-cell ns0:value-type="string" ns6:value-type="string">
            <ns7:p>347.0</ns7:p>
          </ns4:table-cell>
          <ns4:table-cell ns0:value-type="string" ns6:value-type="string">
            <ns7:p>Plantation</ns7:p>
          </ns4:table-cell>
          <ns4:table-cell ns0:value-type="string" ns6:value-type="string">
            <ns7:p>FL</ns7:p>
          </ns4:table-cell>
          <ns4:table-cell ns0:value-type="string" ns6:value-type="string">
            <ns7:p>99183</ns7:p>
          </ns4:table-cell>
          <ns4:table-cell ns4:number-columns-repeated="9"/>
        </ns4:table-row>
        <ns4:table-row ns4:style-name="ro1">
          <ns4:table-cell ns0:value-type="string" ns6:value-type="string">
            <ns7:p>348.0</ns7:p>
          </ns4:table-cell>
          <ns4:table-cell ns0:value-type="string" ns6:value-type="string">
            <ns7:p>Roanoke</ns7:p>
          </ns4:table-cell>
          <ns4:table-cell ns0:value-type="string" ns6:value-type="string">
            <ns7:p>VA</ns7:p>
          </ns4:table-cell>
          <ns4:table-cell ns0:value-type="string" ns6:value-type="string">
            <ns7:p>99111</ns7:p>
          </ns4:table-cell>
          <ns4:table-cell ns4:number-columns-repeated="9"/>
        </ns4:table-row>
        <ns4:table-row ns4:style-name="ro1">
          <ns4:table-cell ns0:value-type="string" ns6:value-type="string">
            <ns7:p>349.0</ns7:p>
          </ns4:table-cell>
          <ns4:table-cell ns0:value-type="string" ns6:value-type="string">
            <ns7:p>Sunrise</ns7:p>
          </ns4:table-cell>
          <ns4:table-cell ns0:value-type="string" ns6:value-type="string">
            <ns7:p>FL</ns7:p>
          </ns4:table-cell>
          <ns4:table-cell ns0:value-type="string" ns6:value-type="string">
            <ns7:p>98846</ns7:p>
          </ns4:table-cell>
          <ns4:table-cell ns4:number-columns-repeated="9"/>
        </ns4:table-row>
        <ns4:table-row ns4:style-name="ro1">
          <ns4:table-cell ns0:value-type="string" ns6:value-type="string">
            <ns7:p>350.0</ns7:p>
          </ns4:table-cell>
          <ns4:table-cell ns0:value-type="string" ns6:value-type="string">
            <ns7:p>Temple</ns7:p>
          </ns4:table-cell>
          <ns4:table-cell ns0:value-type="string" ns6:value-type="string">
            <ns7:p>TX</ns7:p>
          </ns4:table-cell>
          <ns4:table-cell ns0:value-type="string" ns6:value-type="string">
            <ns7:p>98412</ns7:p>
          </ns4:table-cell>
          <ns4:table-cell ns4:number-columns-repeated="9"/>
        </ns4:table-row>
        <ns4:table-row ns4:style-name="ro1">
          <ns4:table-cell ns0:value-type="string" ns6:value-type="string">
            <ns7:p>351.0</ns7:p>
          </ns4:table-cell>
          <ns4:table-cell ns0:value-type="string" ns6:value-type="string">
            <ns7:p>Vista</ns7:p>
          </ns4:table-cell>
          <ns4:table-cell ns0:value-type="string" ns6:value-type="string">
            <ns7:p>CA</ns7:p>
          </ns4:table-cell>
          <ns4:table-cell ns0:value-type="string" ns6:value-type="string">
            <ns7:p>98274</ns7:p>
          </ns4:table-cell>
          <ns4:table-cell ns4:number-columns-repeated="9"/>
        </ns4:table-row>
        <ns4:table-row ns4:style-name="ro1">
          <ns4:table-cell ns0:value-type="string" ns6:value-type="string">
            <ns7:p>352.0</ns7:p>
          </ns4:table-cell>
          <ns4:table-cell ns0:value-type="string" ns6:value-type="string">
            <ns7:p>Beaverton</ns7:p>
          </ns4:table-cell>
          <ns4:table-cell ns0:value-type="string" ns6:value-type="string">
            <ns7:p>OR</ns7:p>
          </ns4:table-cell>
          <ns4:table-cell ns0:value-type="string" ns6:value-type="string">
            <ns7:p>97842</ns7:p>
          </ns4:table-cell>
          <ns4:table-cell ns4:number-columns-repeated="9"/>
        </ns4:table-row>
        <ns4:table-row ns4:style-name="ro1">
          <ns4:table-cell ns0:value-type="string" ns6:value-type="string">
            <ns7:p>353.0</ns7:p>
          </ns4:table-cell>
          <ns4:table-cell ns0:value-type="string" ns6:value-type="string">
            <ns7:p>Yakima</ns7:p>
          </ns4:table-cell>
          <ns4:table-cell ns0:value-type="string" ns6:value-type="string">
            <ns7:p>WA</ns7:p>
          </ns4:table-cell>
          <ns4:table-cell ns0:value-type="string" ns6:value-type="string">
            <ns7:p>97458</ns7:p>
          </ns4:table-cell>
          <ns4:table-cell ns4:number-columns-repeated="9"/>
        </ns4:table-row>
        <ns4:table-row ns4:style-name="ro1">
          <ns4:table-cell ns0:value-type="string" ns6:value-type="string">
            <ns7:p>354.0</ns7:p>
          </ns4:table-cell>
          <ns4:table-cell ns0:value-type="string" ns6:value-type="string">
            <ns7:p>Kirkland</ns7:p>
          </ns4:table-cell>
          <ns4:table-cell ns0:value-type="string" ns6:value-type="string">
            <ns7:p>WA</ns7:p>
          </ns4:table-cell>
          <ns4:table-cell ns0:value-type="string" ns6:value-type="string">
            <ns7:p>97410</ns7:p>
          </ns4:table-cell>
          <ns4:table-cell ns4:number-columns-repeated="9"/>
        </ns4:table-row>
        <ns4:table-row ns4:style-name="ro1">
          <ns4:table-cell ns0:value-type="string" ns6:value-type="string">
            <ns7:p>355.0</ns7:p>
          </ns4:table-cell>
          <ns4:table-cell ns0:value-type="string" ns6:value-type="string">
            <ns7:p>Norwalk</ns7:p>
          </ns4:table-cell>
          <ns4:table-cell ns0:value-type="string" ns6:value-type="string">
            <ns7:p>CA</ns7:p>
          </ns4:table-cell>
          <ns4:table-cell ns0:value-type="string" ns6:value-type="string">
            <ns7:p>97104</ns7:p>
          </ns4:table-cell>
          <ns4:table-cell ns4:number-columns-repeated="9"/>
        </ns4:table-row>
        <ns4:table-row ns4:style-name="ro1">
          <ns4:table-cell ns0:value-type="string" ns6:value-type="string">
            <ns7:p>356.0</ns7:p>
          </ns4:table-cell>
          <ns4:table-cell ns0:value-type="string" ns6:value-type="string">
            <ns7:p>Chino</ns7:p>
          </ns4:table-cell>
          <ns4:table-cell ns0:value-type="string" ns6:value-type="string">
            <ns7:p>CA</ns7:p>
          </ns4:table-cell>
          <ns4:table-cell ns0:value-type="string" ns6:value-type="string">
            <ns7:p>96957</ns7:p>
          </ns4:table-cell>
          <ns4:table-cell ns4:number-columns-repeated="9"/>
        </ns4:table-row>
        <ns4:table-row ns4:style-name="ro1">
          <ns4:table-cell ns0:value-type="string" ns6:value-type="string">
            <ns7:p>357.0</ns7:p>
          </ns4:table-cell>
          <ns4:table-cell ns0:value-type="string" ns6:value-type="string">
            <ns7:p>Portsmouth</ns7:p>
          </ns4:table-cell>
          <ns4:table-cell ns0:value-type="string" ns6:value-type="string">
            <ns7:p>VA</ns7:p>
          </ns4:table-cell>
          <ns4:table-cell ns0:value-type="string" ns6:value-type="string">
            <ns7:p>96777</ns7:p>
          </ns4:table-cell>
          <ns4:table-cell ns4:number-columns-repeated="9"/>
        </ns4:table-row>
        <ns4:table-row ns4:style-name="ro1">
          <ns4:table-cell ns0:value-type="string" ns6:value-type="string">
            <ns7:p>358.0</ns7:p>
          </ns4:table-cell>
          <ns4:table-cell ns0:value-type="string" ns6:value-type="string">
            <ns7:p>Manteca</ns7:p>
          </ns4:table-cell>
          <ns4:table-cell ns0:value-type="string" ns6:value-type="string">
            <ns7:p>CA</ns7:p>
          </ns4:table-cell>
          <ns4:table-cell ns0:value-type="string" ns6:value-type="string">
            <ns7:p>96693</ns7:p>
          </ns4:table-cell>
          <ns4:table-cell ns4:number-columns-repeated="9"/>
        </ns4:table-row>
        <ns4:table-row ns4:style-name="ro1">
          <ns4:table-cell ns0:value-type="string" ns6:value-type="string">
            <ns7:p>359.0</ns7:p>
          </ns4:table-cell>
          <ns4:table-cell ns0:value-type="string" ns6:value-type="string">
            <ns7:p>North Port</ns7:p>
          </ns4:table-cell>
          <ns4:table-cell ns0:value-type="string" ns6:value-type="string">
            <ns7:p>FL</ns7:p>
          </ns4:table-cell>
          <ns4:table-cell ns0:value-type="string" ns6:value-type="string">
            <ns7:p>96551</ns7:p>
          </ns4:table-cell>
          <ns4:table-cell ns4:number-columns-repeated="9"/>
        </ns4:table-row>
        <ns4:table-row ns4:style-name="ro1">
          <ns4:table-cell ns0:value-type="string" ns6:value-type="string">
            <ns7:p>360.0</ns7:p>
          </ns4:table-cell>
          <ns4:table-cell ns0:value-type="string" ns6:value-type="string">
            <ns7:p>Greenville</ns7:p>
          </ns4:table-cell>
          <ns4:table-cell ns0:value-type="string" ns6:value-type="string">
            <ns7:p>NC</ns7:p>
          </ns4:table-cell>
          <ns4:table-cell ns0:value-type="string" ns6:value-type="string">
            <ns7:p>96443</ns7:p>
          </ns4:table-cell>
          <ns4:table-cell ns4:number-columns-repeated="9"/>
        </ns4:table-row>
        <ns4:table-row ns4:style-name="ro1">
          <ns4:table-cell ns0:value-type="string" ns6:value-type="string">
            <ns7:p>361.0</ns7:p>
          </ns4:table-cell>
          <ns4:table-cell ns0:value-type="string" ns6:value-type="string">
            <ns7:p>Bellingham</ns7:p>
          </ns4:table-cell>
          <ns4:table-cell ns0:value-type="string" ns6:value-type="string">
            <ns7:p>WA</ns7:p>
          </ns4:table-cell>
          <ns4:table-cell ns0:value-type="string" ns6:value-type="string">
            <ns7:p>96395</ns7:p>
          </ns4:table-cell>
          <ns4:table-cell ns4:number-columns-repeated="9"/>
        </ns4:table-row>
        <ns4:table-row ns4:style-name="ro1">
          <ns4:table-cell ns0:value-type="string" ns6:value-type="string">
            <ns7:p>362.0</ns7:p>
          </ns4:table-cell>
          <ns4:table-cell ns0:value-type="string" ns6:value-type="string">
            <ns7:p>Lawrence</ns7:p>
          </ns4:table-cell>
          <ns4:table-cell ns0:value-type="string" ns6:value-type="string">
            <ns7:p>KS</ns7:p>
          </ns4:table-cell>
          <ns4:table-cell ns0:value-type="string" ns6:value-type="string">
            <ns7:p>96367</ns7:p>
          </ns4:table-cell>
          <ns4:table-cell ns4:number-columns-repeated="9"/>
        </ns4:table-row>
        <ns4:table-row ns4:style-name="ro1">
          <ns4:table-cell ns0:value-type="string" ns6:value-type="string">
            <ns7:p>363.0</ns7:p>
          </ns4:table-cell>
          <ns4:table-cell ns0:value-type="string" ns6:value-type="string">
            <ns7:p>O'Fallon</ns7:p>
          </ns4:table-cell>
          <ns4:table-cell ns0:value-type="string" ns6:value-type="string">
            <ns7:p>MO</ns7:p>
          </ns4:table-cell>
          <ns4:table-cell ns0:value-type="string" ns6:value-type="string">
            <ns7:p>96101</ns7:p>
          </ns4:table-cell>
          <ns4:table-cell ns4:number-columns-repeated="9"/>
        </ns4:table-row>
        <ns4:table-row ns4:style-name="ro1">
          <ns4:table-cell ns0:value-type="string" ns6:value-type="string">
            <ns7:p>364.0</ns7:p>
          </ns4:table-cell>
          <ns4:table-cell ns0:value-type="string" ns6:value-type="string">
            <ns7:p>Reading</ns7:p>
          </ns4:table-cell>
          <ns4:table-cell ns0:value-type="string" ns6:value-type="string">
            <ns7:p>PA</ns7:p>
          </ns4:table-cell>
          <ns4:table-cell ns0:value-type="string" ns6:value-type="string">
            <ns7:p>95832</ns7:p>
          </ns4:table-cell>
          <ns4:table-cell ns4:number-columns-repeated="9"/>
        </ns4:table-row>
        <ns4:table-row ns4:style-name="ro1">
          <ns4:table-cell ns0:value-type="string" ns6:value-type="string">
            <ns7:p>365.0</ns7:p>
          </ns4:table-cell>
          <ns4:table-cell ns0:value-type="string" ns6:value-type="string">
            <ns7:p>Mount Pleasant</ns7:p>
          </ns4:table-cell>
          <ns4:table-cell ns0:value-type="string" ns6:value-type="string">
            <ns7:p>SC</ns7:p>
          </ns4:table-cell>
          <ns4:table-cell ns0:value-type="string" ns6:value-type="string">
            <ns7:p>95469</ns7:p>
          </ns4:table-cell>
          <ns4:table-cell ns4:number-columns-repeated="9"/>
        </ns4:table-row>
        <ns4:table-row ns4:style-name="ro1">
          <ns4:table-cell ns0:value-type="string" ns6:value-type="string">
            <ns7:p>366.0</ns7:p>
          </ns4:table-cell>
          <ns4:table-cell ns0:value-type="string" ns6:value-type="string">
            <ns7:p>Lehi</ns7:p>
          </ns4:table-cell>
          <ns4:table-cell ns0:value-type="string" ns6:value-type="string">
            <ns7:p>UT</ns7:p>
          </ns4:table-cell>
          <ns4:table-cell ns0:value-type="string" ns6:value-type="string">
            <ns7:p>95313</ns7:p>
          </ns4:table-cell>
          <ns4:table-cell ns4:number-columns-repeated="9"/>
        </ns4:table-row>
        <ns4:table-row ns4:style-name="ro1">
          <ns4:table-cell ns0:value-type="string" ns6:value-type="string">
            <ns7:p>367.0</ns7:p>
          </ns4:table-cell>
          <ns4:table-cell ns0:value-type="string" ns6:value-type="string">
            <ns7:p>Fall River</ns7:p>
          </ns4:table-cell>
          <ns4:table-cell ns0:value-type="string" ns6:value-type="string">
            <ns7:p>MA</ns7:p>
          </ns4:table-cell>
          <ns4:table-cell ns0:value-type="string" ns6:value-type="string">
            <ns7:p>95298</ns7:p>
          </ns4:table-cell>
          <ns4:table-cell ns4:number-columns-repeated="9"/>
        </ns4:table-row>
        <ns4:table-row ns4:style-name="ro1">
          <ns4:table-cell ns0:value-type="string" ns6:value-type="string">
            <ns7:p>368.0</ns7:p>
          </ns4:table-cell>
          <ns4:table-cell ns0:value-type="string" ns6:value-type="string">
            <ns7:p>Orem</ns7:p>
          </ns4:table-cell>
          <ns4:table-cell ns0:value-type="string" ns6:value-type="string">
            <ns7:p>UT</ns7:p>
          </ns4:table-cell>
          <ns4:table-cell ns0:value-type="string" ns6:value-type="string">
            <ns7:p>95214</ns7:p>
          </ns4:table-cell>
          <ns4:table-cell ns4:number-columns-repeated="9"/>
        </ns4:table-row>
        <ns4:table-row ns4:style-name="ro1">
          <ns4:table-cell ns0:value-type="string" ns6:value-type="string">
            <ns7:p>369.0</ns7:p>
          </ns4:table-cell>
          <ns4:table-cell ns0:value-type="string" ns6:value-type="string">
            <ns7:p>San Marcos</ns7:p>
          </ns4:table-cell>
          <ns4:table-cell ns0:value-type="string" ns6:value-type="string">
            <ns7:p>CA</ns7:p>
          </ns4:table-cell>
          <ns4:table-cell ns0:value-type="string" ns6:value-type="string">
            <ns7:p>94908</ns7:p>
          </ns4:table-cell>
          <ns4:table-cell ns4:number-columns-repeated="9"/>
        </ns4:table-row>
        <ns4:table-row ns4:style-name="ro1">
          <ns4:table-cell ns0:value-type="string" ns6:value-type="string">
            <ns7:p>370.0</ns7:p>
          </ns4:table-cell>
          <ns4:table-cell ns0:value-type="string" ns6:value-type="string">
            <ns7:p>Norwalk</ns7:p>
          </ns4:table-cell>
          <ns4:table-cell ns0:value-type="string" ns6:value-type="string">
            <ns7:p>CT</ns7:p>
          </ns4:table-cell>
          <ns4:table-cell ns0:value-type="string" ns6:value-type="string">
            <ns7:p>94508</ns7:p>
          </ns4:table-cell>
          <ns4:table-cell ns4:number-columns-repeated="9"/>
        </ns4:table-row>
        <ns4:table-row ns4:style-name="ro1">
          <ns4:table-cell ns0:value-type="string" ns6:value-type="string">
            <ns7:p>371.0</ns7:p>
          </ns4:table-cell>
          <ns4:table-cell ns0:value-type="string" ns6:value-type="string">
            <ns7:p>Indio</ns7:p>
          </ns4:table-cell>
          <ns4:table-cell ns0:value-type="string" ns6:value-type="string">
            <ns7:p>CA</ns7:p>
          </ns4:table-cell>
          <ns4:table-cell ns0:value-type="string" ns6:value-type="string">
            <ns7:p>94269</ns7:p>
          </ns4:table-cell>
          <ns4:table-cell ns4:number-columns-repeated="9"/>
        </ns4:table-row>
        <ns4:table-row ns4:style-name="ro1">
          <ns4:table-cell ns0:value-type="string" ns6:value-type="string">
            <ns7:p>372.0</ns7:p>
          </ns4:table-cell>
          <ns4:table-cell ns0:value-type="string" ns6:value-type="string">
            <ns7:p>Redding</ns7:p>
          </ns4:table-cell>
          <ns4:table-cell ns0:value-type="string" ns6:value-type="string">
            <ns7:p>CA</ns7:p>
          </ns4:table-cell>
          <ns4:table-cell ns0:value-type="string" ns6:value-type="string">
            <ns7:p>94092</ns7:p>
          </ns4:table-cell>
          <ns4:table-cell ns4:number-columns-repeated="9"/>
        </ns4:table-row>
        <ns4:table-row ns4:style-name="ro1">
          <ns4:table-cell ns0:value-type="string" ns6:value-type="string">
            <ns7:p>373.0</ns7:p>
          </ns4:table-cell>
          <ns4:table-cell ns0:value-type="string" ns6:value-type="string">
            <ns7:p>Hemet</ns7:p>
          </ns4:table-cell>
          <ns4:table-cell ns0:value-type="string" ns6:value-type="string">
            <ns7:p>CA</ns7:p>
          </ns4:table-cell>
          <ns4:table-cell ns0:value-type="string" ns6:value-type="string">
            <ns7:p>93649</ns7:p>
          </ns4:table-cell>
          <ns4:table-cell ns4:number-columns-repeated="9"/>
        </ns4:table-row>
        <ns4:table-row ns4:style-name="ro1">
          <ns4:table-cell ns0:value-type="string" ns6:value-type="string">
            <ns7:p>374.0</ns7:p>
          </ns4:table-cell>
          <ns4:table-cell ns0:value-type="string" ns6:value-type="string">
            <ns7:p>Hoover</ns7:p>
          </ns4:table-cell>
          <ns4:table-cell ns0:value-type="string" ns6:value-type="string">
            <ns7:p>AL</ns7:p>
          </ns4:table-cell>
          <ns4:table-cell ns0:value-type="string" ns6:value-type="string">
            <ns7:p>93550</ns7:p>
          </ns4:table-cell>
          <ns4:table-cell ns4:number-columns-repeated="9"/>
        </ns4:table-row>
        <ns4:table-row ns4:style-name="ro1">
          <ns4:table-cell ns0:value-type="string" ns6:value-type="string">
            <ns7:p>375.0</ns7:p>
          </ns4:table-cell>
          <ns4:table-cell ns0:value-type="string" ns6:value-type="string">
            <ns7:p>Asheville</ns7:p>
          </ns4:table-cell>
          <ns4:table-cell ns0:value-type="string" ns6:value-type="string">
            <ns7:p>NC</ns7:p>
          </ns4:table-cell>
          <ns4:table-cell ns0:value-type="string" ns6:value-type="string">
            <ns7:p>93523</ns7:p>
          </ns4:table-cell>
          <ns4:table-cell ns4:number-columns-repeated="9"/>
        </ns4:table-row>
        <ns4:table-row ns4:style-name="ro1">
          <ns4:table-cell ns0:value-type="string" ns6:value-type="string">
            <ns7:p>376.0</ns7:p>
          </ns4:table-cell>
          <ns4:table-cell ns0:value-type="string" ns6:value-type="string">
            <ns7:p>Livonia</ns7:p>
          </ns4:table-cell>
          <ns4:table-cell ns0:value-type="string" ns6:value-type="string">
            <ns7:p>MI</ns7:p>
          </ns4:table-cell>
          <ns4:table-cell ns0:value-type="string" ns6:value-type="string">
            <ns7:p>92603</ns7:p>
          </ns4:table-cell>
          <ns4:table-cell ns4:number-columns-repeated="9"/>
        </ns4:table-row>
        <ns4:table-row ns4:style-name="ro1">
          <ns4:table-cell ns0:value-type="string" ns6:value-type="string">
            <ns7:p>377.0</ns7:p>
          </ns4:table-cell>
          <ns4:table-cell ns0:value-type="string" ns6:value-type="string">
            <ns7:p>Nashua</ns7:p>
          </ns4:table-cell>
          <ns4:table-cell ns0:value-type="string" ns6:value-type="string">
            <ns7:p>NH</ns7:p>
          </ns4:table-cell>
          <ns4:table-cell ns0:value-type="string" ns6:value-type="string">
            <ns7:p>92435</ns7:p>
          </ns4:table-cell>
          <ns4:table-cell ns4:number-columns-repeated="9">
            <ns7:p>Fagundes Plumbing Heating AC</ns7:p>
          </ns4:table-cell>
        </ns4:table-row>
        <ns4:table-row ns4:style-name="ro1">
          <ns4:table-cell ns0:value-type="string" ns6:value-type="string">
            <ns7:p>378.0</ns7:p>
          </ns4:table-cell>
          <ns4:table-cell ns0:value-type="string" ns6:value-type="string">
            <ns7:p>Sandy</ns7:p>
          </ns4:table-cell>
          <ns4:table-cell ns0:value-type="string" ns6:value-type="string">
            <ns7:p>UT</ns7:p>
          </ns4:table-cell>
          <ns4:table-cell ns0:value-type="string" ns6:value-type="string">
            <ns7:p>92386</ns7:p>
          </ns4:table-cell>
          <ns4:table-cell ns4:number-columns-repeated="9"/>
        </ns4:table-row>
        <ns4:table-row ns4:style-name="ro1">
          <ns4:table-cell ns0:value-type="string" ns6:value-type="string">
            <ns7:p>379.0</ns7:p>
          </ns4:table-cell>
          <ns4:table-cell ns0:value-type="string" ns6:value-type="string">
            <ns7:p>Frederick</ns7:p>
          </ns4:table-cell>
          <ns4:table-cell ns0:value-type="string" ns6:value-type="string">
            <ns7:p>MD</ns7:p>
          </ns4:table-cell>
          <ns4:table-cell ns0:value-type="string" ns6:value-type="string">
            <ns7:p>92059</ns7:p>
          </ns4:table-cell>
          <ns4:table-cell ns4:number-columns-repeated="9"/>
        </ns4:table-row>
        <ns4:table-row ns4:style-name="ro1">
          <ns4:table-cell ns0:value-type="string" ns6:value-type="string">
            <ns7:p>380.0</ns7:p>
          </ns4:table-cell>
          <ns4:table-cell ns0:value-type="string" ns6:value-type="string">
            <ns7:p>Bryan</ns7:p>
          </ns4:table-cell>
          <ns4:table-cell ns0:value-type="string" ns6:value-type="string">
            <ns7:p>TX</ns7:p>
          </ns4:table-cell>
          <ns4:table-cell ns0:value-type="string" ns6:value-type="string">
            <ns7:p>91996</ns7:p>
          </ns4:table-cell>
          <ns4:table-cell ns4:number-columns-repeated="9"/>
        </ns4:table-row>
        <ns4:table-row ns4:style-name="ro1">
          <ns4:table-cell ns0:value-type="string" ns6:value-type="string">
            <ns7:p>381.0</ns7:p>
          </ns4:table-cell>
          <ns4:table-cell ns0:value-type="string" ns6:value-type="string">
            <ns7:p>Folsom</ns7:p>
          </ns4:table-cell>
          <ns4:table-cell ns0:value-type="string" ns6:value-type="string">
            <ns7:p>CA</ns7:p>
          </ns4:table-cell>
          <ns4:table-cell ns0:value-type="string" ns6:value-type="string">
            <ns7:p>91983</ns7:p>
          </ns4:table-cell>
          <ns4:table-cell ns4:number-columns-repeated="9"/>
        </ns4:table-row>
        <ns4:table-row ns4:style-name="ro1">
          <ns4:table-cell ns0:value-type="string" ns6:value-type="string">
            <ns7:p>382.0</ns7:p>
          </ns4:table-cell>
          <ns4:table-cell ns0:value-type="string" ns6:value-type="string">
            <ns7:p>Erie</ns7:p>
          </ns4:table-cell>
          <ns4:table-cell ns0:value-type="string" ns6:value-type="string">
            <ns7:p>PA</ns7:p>
          </ns4:table-cell>
          <ns4:table-cell ns0:value-type="string" ns6:value-type="string">
            <ns7:p>91838</ns7:p>
          </ns4:table-cell>
          <ns4:table-cell ns4:number-columns-repeated="9"/>
        </ns4:table-row>
        <ns4:table-row ns4:style-name="ro1">
          <ns4:table-cell ns0:value-type="string" ns6:value-type="string">
            <ns7:p>383.0</ns7:p>
          </ns4:table-cell>
          <ns4:table-cell ns0:value-type="string" ns6:value-type="string">
            <ns7:p>Trenton</ns7:p>
          </ns4:table-cell>
          <ns4:table-cell ns0:value-type="string" ns6:value-type="string">
            <ns7:p>NJ</ns7:p>
          </ns4:table-cell>
          <ns4:table-cell ns0:value-type="string" ns6:value-type="string">
            <ns7:p>91506</ns7:p>
          </ns4:table-cell>
          <ns4:table-cell ns4:number-columns-repeated="9"/>
        </ns4:table-row>
        <ns4:table-row ns4:style-name="ro1">
          <ns4:table-cell ns0:value-type="string" ns6:value-type="string">
            <ns7:p>384.0</ns7:p>
          </ns4:table-cell>
          <ns4:table-cell ns0:value-type="string" ns6:value-type="string">
            <ns7:p>Roswell</ns7:p>
          </ns4:table-cell>
          <ns4:table-cell ns0:value-type="string" ns6:value-type="string">
            <ns7:p>GA</ns7:p>
          </ns4:table-cell>
          <ns4:table-cell ns0:value-type="string" ns6:value-type="string">
            <ns7:p>91505</ns7:p>
          </ns4:table-cell>
          <ns4:table-cell ns4:number-columns-repeated="9"/>
        </ns4:table-row>
        <ns4:table-row ns4:style-name="ro1">
          <ns4:table-cell ns0:value-type="string" ns6:value-type="string">
            <ns7:p>385.0</ns7:p>
          </ns4:table-cell>
          <ns4:table-cell ns0:value-type="string" ns6:value-type="string">
            <ns7:p>Champaign</ns7:p>
          </ns4:table-cell>
          <ns4:table-cell ns0:value-type="string" ns6:value-type="string">
            <ns7:p>IL</ns7:p>
          </ns4:table-cell>
          <ns4:table-cell ns0:value-type="string" ns6:value-type="string">
            <ns7:p>91195</ns7:p>
          </ns4:table-cell>
          <ns4:table-cell ns4:number-columns-repeated="9"/>
        </ns4:table-row>
        <ns4:table-row ns4:style-name="ro1">
          <ns4:table-cell ns0:value-type="string" ns6:value-type="string">
            <ns7:p>386.0</ns7:p>
          </ns4:table-cell>
          <ns4:table-cell ns0:value-type="string" ns6:value-type="string">
            <ns7:p>Leander</ns7:p>
          </ns4:table-cell>
          <ns4:table-cell ns0:value-type="string" ns6:value-type="string">
            <ns7:p>TX</ns7:p>
          </ns4:table-cell>
          <ns4:table-cell ns0:value-type="string" ns6:value-type="string">
            <ns7:p>91132</ns7:p>
          </ns4:table-cell>
          <ns4:table-cell ns4:number-columns-repeated="9"/>
        </ns4:table-row>
        <ns4:table-row ns4:style-name="ro1">
          <ns4:table-cell ns0:value-type="string" ns6:value-type="string">
            <ns7:p>387.0</ns7:p>
          </ns4:table-cell>
          <ns4:table-cell ns0:value-type="string" ns6:value-type="string">
            <ns7:p>Clifton</ns7:p>
          </ns4:table-cell>
          <ns4:table-cell ns0:value-type="string" ns6:value-type="string">
            <ns7:p>NJ</ns7:p>
          </ns4:table-cell>
          <ns4:table-cell ns0:value-type="string" ns6:value-type="string">
            <ns7:p>91127</ns7:p>
          </ns4:table-cell>
          <ns4:table-cell ns4:number-columns-repeated="9"/>
        </ns4:table-row>
        <ns4:table-row ns4:style-name="ro1">
          <ns4:table-cell ns0:value-type="string" ns6:value-type="string">
            <ns7:p>388.0</ns7:p>
          </ns4:table-cell>
          <ns4:table-cell ns0:value-type="string" ns6:value-type="string">
            <ns7:p>Fort Smith</ns7:p>
          </ns4:table-cell>
          <ns4:table-cell ns0:value-type="string" ns6:value-type="string">
            <ns7:p>AR</ns7:p>
          </ns4:table-cell>
          <ns4:table-cell ns0:value-type="string" ns6:value-type="string">
            <ns7:p>90855</ns7:p>
          </ns4:table-cell>
          <ns4:table-cell ns4:number-columns-repeated="9"/>
        </ns4:table-row>
        <ns4:table-row ns4:style-name="ro1">
          <ns4:table-cell ns0:value-type="string" ns6:value-type="string">
            <ns7:p>389.0</ns7:p>
          </ns4:table-cell>
          <ns4:table-cell ns0:value-type="string" ns6:value-type="string">
            <ns7:p>Carson</ns7:p>
          </ns4:table-cell>
          <ns4:table-cell ns0:value-type="string" ns6:value-type="string">
            <ns7:p>CA</ns7:p>
          </ns4:table-cell>
          <ns4:table-cell ns0:value-type="string" ns6:value-type="string">
            <ns7:p>90808</ns7:p>
          </ns4:table-cell>
          <ns4:table-cell ns4:number-columns-repeated="9"/>
        </ns4:table-row>
        <ns4:table-row ns4:style-name="ro1">
          <ns4:table-cell ns0:value-type="string" ns6:value-type="string">
            <ns7:p>390.0</ns7:p>
          </ns4:table-cell>
          <ns4:table-cell ns0:value-type="string" ns6:value-type="string">
            <ns7:p>Newton</ns7:p>
          </ns4:table-cell>
          <ns4:table-cell ns0:value-type="string" ns6:value-type="string">
            <ns7:p>MA</ns7:p>
          </ns4:table-cell>
          <ns4:table-cell ns0:value-type="string" ns6:value-type="string">
            <ns7:p>90741</ns7:p>
          </ns4:table-cell>
          <ns4:table-cell ns4:number-columns-repeated="9"/>
        </ns4:table-row>
        <ns4:table-row ns4:style-name="ro1">
          <ns4:table-cell ns0:value-type="string" ns6:value-type="string">
            <ns7:p>391.0</ns7:p>
          </ns4:table-cell>
          <ns4:table-cell ns0:value-type="string" ns6:value-type="string">
            <ns7:p>Springdale</ns7:p>
          </ns4:table-cell>
          <ns4:table-cell ns0:value-type="string" ns6:value-type="string">
            <ns7:p>AR</ns7:p>
          </ns4:table-cell>
          <ns4:table-cell ns0:value-type="string" ns6:value-type="string">
            <ns7:p>90685</ns7:p>
          </ns4:table-cell>
          <ns4:table-cell ns4:number-columns-repeated="9">
            <ns7:p>A Plus Plumbing of NWA</ns7:p>
          </ns4:table-cell>
        </ns4:table-row>
        <ns4:table-row ns4:style-name="ro1">
          <ns4:table-cell ns0:value-type="string" ns6:value-type="string">
            <ns7:p>392.0</ns7:p>
          </ns4:table-cell>
          <ns4:table-cell ns0:value-type="string" ns6:value-type="string">
            <ns7:p>Lawton</ns7:p>
          </ns4:table-cell>
          <ns4:table-cell ns0:value-type="string" ns6:value-type="string">
            <ns7:p>OK</ns7:p>
          </ns4:table-cell>
          <ns4:table-cell ns0:value-type="string" ns6:value-type="string">
            <ns7:p>90503</ns7:p>
          </ns4:table-cell>
          <ns4:table-cell ns4:number-columns-repeated="9"/>
        </ns4:table-row>
        <ns4:table-row ns4:style-name="ro1">
          <ns4:table-cell ns0:value-type="string" ns6:value-type="string">
            <ns7:p>393.0</ns7:p>
          </ns4:table-cell>
          <ns4:table-cell ns0:value-type="string" ns6:value-type="string">
            <ns7:p>Compton</ns7:p>
          </ns4:table-cell>
          <ns4:table-cell ns0:value-type="string" ns6:value-type="string">
            <ns7:p>CA</ns7:p>
          </ns4:table-cell>
          <ns4:table-cell ns0:value-type="string" ns6:value-type="string">
            <ns7:p>90500</ns7:p>
          </ns4:table-cell>
          <ns4:table-cell ns4:number-columns-repeated="9"/>
        </ns4:table-row>
        <ns4:table-row ns4:style-name="ro1">
          <ns4:table-cell ns0:value-type="string" ns6:value-type="string">
            <ns7:p>394.0</ns7:p>
          </ns4:table-cell>
          <ns4:table-cell ns0:value-type="string" ns6:value-type="string">
            <ns7:p>Mission Viejo</ns7:p>
          </ns4:table-cell>
          <ns4:table-cell ns0:value-type="string" ns6:value-type="string">
            <ns7:p>CA</ns7:p>
          </ns4:table-cell>
          <ns4:table-cell ns0:value-type="string" ns6:value-type="string">
            <ns7:p>90484</ns7:p>
          </ns4:table-cell>
          <ns4:table-cell ns4:number-columns-repeated="9"/>
        </ns4:table-row>
        <ns4:table-row ns4:style-name="ro1">
          <ns4:table-cell ns0:value-type="string" ns6:value-type="string">
            <ns7:p>395.0</ns7:p>
          </ns4:table-cell>
          <ns4:table-cell ns0:value-type="string" ns6:value-type="string">
            <ns7:p>Franklin</ns7:p>
          </ns4:table-cell>
          <ns4:table-cell ns0:value-type="string" ns6:value-type="string">
            <ns7:p>TN</ns7:p>
          </ns4:table-cell>
          <ns4:table-cell ns0:value-type="string" ns6:value-type="string">
            <ns7:p>90226</ns7:p>
          </ns4:table-cell>
          <ns4:table-cell ns4:number-columns-repeated="9"/>
        </ns4:table-row>
        <ns4:table-row ns4:style-name="ro1">
          <ns4:table-cell ns0:value-type="string" ns6:value-type="string">
            <ns7:p>396.0</ns7:p>
          </ns4:table-cell>
          <ns4:table-cell ns0:value-type="string" ns6:value-type="string">
            <ns7:p>Santa Monica</ns7:p>
          </ns4:table-cell>
          <ns4:table-cell ns0:value-type="string" ns6:value-type="string">
            <ns7:p>CA</ns7:p>
          </ns4:table-cell>
          <ns4:table-cell ns0:value-type="string" ns6:value-type="string">
            <ns7:p>90082</ns7:p>
          </ns4:table-cell>
          <ns4:table-cell ns4:number-columns-repeated="9"/>
        </ns4:table-row>
        <ns4:table-row ns4:style-name="ro1">
          <ns4:table-cell ns0:value-type="string" ns6:value-type="string">
            <ns7:p>397.0</ns7:p>
          </ns4:table-cell>
          <ns4:table-cell ns0:value-type="string" ns6:value-type="string">
            <ns7:p>South Gate</ns7:p>
          </ns4:table-cell>
          <ns4:table-cell ns0:value-type="string" ns6:value-type="string">
            <ns7:p>CA</ns7:p>
          </ns4:table-cell>
          <ns4:table-cell ns0:value-type="string" ns6:value-type="string">
            <ns7:p>90071</ns7:p>
          </ns4:table-cell>
          <ns4:table-cell ns4:number-columns-repeated="9"/>
        </ns4:table-row>
        <ns4:table-row ns4:style-name="ro1">
          <ns4:table-cell ns0:value-type="string" ns6:value-type="string">
            <ns7:p>398.0</ns7:p>
          </ns4:table-cell>
          <ns4:table-cell ns0:value-type="string" ns6:value-type="string">
            <ns7:p>Santa Fe</ns7:p>
          </ns4:table-cell>
          <ns4:table-cell ns0:value-type="string" ns6:value-type="string">
            <ns7:p>NM</ns7:p>
          </ns4:table-cell>
          <ns4:table-cell ns0:value-type="string" ns6:value-type="string">
            <ns7:p>89837</ns7:p>
          </ns4:table-cell>
          <ns4:table-cell ns4:number-columns-repeated="9">
            <ns7:p>James Plumbing and Heating</ns7:p>
          </ns4:table-cell>
        </ns4:table-row>
        <ns4:table-row ns4:style-name="ro1">
          <ns4:table-cell ns0:value-type="string" ns6:value-type="string">
            <ns7:p>399.0</ns7:p>
          </ns4:table-cell>
          <ns4:table-cell ns0:value-type="string" ns6:value-type="string">
            <ns7:p>Queen Creek</ns7:p>
          </ns4:table-cell>
          <ns4:table-cell ns0:value-type="string" ns6:value-type="string">
            <ns7:p>AZ</ns7:p>
          </ns4:table-cell>
          <ns4:table-cell ns0:value-type="string" ns6:value-type="string">
            <ns7:p>89770</ns7:p>
          </ns4:table-cell>
          <ns4:table-cell ns4:number-columns-repeated="9"/>
        </ns4:table-row>
        <ns4:table-row ns4:style-name="ro1">
          <ns4:table-cell ns0:value-type="string" ns6:value-type="string">
            <ns7:p>400.0</ns7:p>
          </ns4:table-cell>
          <ns4:table-cell ns0:value-type="string" ns6:value-type="string">
            <ns7:p>Ogden</ns7:p>
          </ns4:table-cell>
          <ns4:table-cell ns0:value-type="string" ns6:value-type="string">
            <ns7:p>UT</ns7:p>
          </ns4:table-cell>
          <ns4:table-cell ns0:value-type="string" ns6:value-type="string">
            <ns7:p>89510</ns7:p>
          </ns4:table-cell>
          <ns4:table-cell ns4:number-columns-repeated="9"/>
        </ns4:table-row>
        <ns4:table-row ns4:style-name="ro1">
          <ns4:table-cell ns0:value-type="string" ns6:value-type="string">
            <ns7:p>401.0</ns7:p>
          </ns4:table-cell>
          <ns4:table-cell ns0:value-type="string" ns6:value-type="string">
            <ns7:p>Deerfield Beach</ns7:p>
          </ns4:table-cell>
          <ns4:table-cell ns0:value-type="string" ns6:value-type="string">
            <ns7:p>FL</ns7:p>
          </ns4:table-cell>
          <ns4:table-cell ns0:value-type="string" ns6:value-type="string">
            <ns7:p>89339</ns7:p>
          </ns4:table-cell>
          <ns4:table-cell ns4:number-columns-repeated="9"/>
        </ns4:table-row>
        <ns4:table-row ns4:style-name="ro1">
          <ns4:table-cell ns0:value-type="string" ns6:value-type="string">
            <ns7:p>402.0</ns7:p>
          </ns4:table-cell>
          <ns4:table-cell ns0:value-type="string" ns6:value-type="string">
            <ns7:p>Lawrence</ns7:p>
          </ns4:table-cell>
          <ns4:table-cell ns0:value-type="string" ns6:value-type="string">
            <ns7:p>MA</ns7:p>
          </ns4:table-cell>
          <ns4:table-cell ns0:value-type="string" ns6:value-type="string">
            <ns7:p>89320</ns7:p>
          </ns4:table-cell>
          <ns4:table-cell ns4:number-columns-repeated="9"/>
        </ns4:table-row>
        <ns4:table-row ns4:style-name="ro1">
          <ns4:table-cell ns0:value-type="string" ns6:value-type="string">
            <ns7:p>403.0</ns7:p>
          </ns4:table-cell>
          <ns4:table-cell ns0:value-type="string" ns6:value-type="string">
            <ns7:p>Bloomington</ns7:p>
          </ns4:table-cell>
          <ns4:table-cell ns0:value-type="string" ns6:value-type="string">
            <ns7:p>MN</ns7:p>
          </ns4:table-cell>
          <ns4:table-cell ns0:value-type="string" ns6:value-type="string">
            <ns7:p>89034</ns7:p>
          </ns4:table-cell>
          <ns4:table-cell ns4:number-columns-repeated="9"/>
        </ns4:table-row>
        <ns4:table-row ns4:style-name="ro1">
          <ns4:table-cell ns0:value-type="string" ns6:value-type="string">
            <ns7:p>404.0</ns7:p>
          </ns4:table-cell>
          <ns4:table-cell ns0:value-type="string" ns6:value-type="string">
            <ns7:p>Danbury</ns7:p>
          </ns4:table-cell>
          <ns4:table-cell ns0:value-type="string" ns6:value-type="string">
            <ns7:p>CT</ns7:p>
          </ns4:table-cell>
          <ns4:table-cell ns0:value-type="string" ns6:value-type="string">
            <ns7:p>89033</ns7:p>
          </ns4:table-cell>
          <ns4:table-cell ns4:number-columns-repeated="9"/>
        </ns4:table-row>
        <ns4:table-row ns4:style-name="ro1">
          <ns4:table-cell ns0:value-type="string" ns6:value-type="string">
            <ns7:p>405.0</ns7:p>
          </ns4:table-cell>
          <ns4:table-cell ns0:value-type="string" ns6:value-type="string">
            <ns7:p>Mission</ns7:p>
          </ns4:table-cell>
          <ns4:table-cell ns0:value-type="string" ns6:value-type="string">
            <ns7:p>TX</ns7:p>
          </ns4:table-cell>
          <ns4:table-cell ns0:value-type="string" ns6:value-type="string">
            <ns7:p>88992</ns7:p>
          </ns4:table-cell>
          <ns4:table-cell ns4:number-columns-repeated="9"/>
        </ns4:table-row>
        <ns4:table-row ns4:style-name="ro1">
          <ns4:table-cell ns0:value-type="string" ns6:value-type="string">
            <ns7:p>406.0</ns7:p>
          </ns4:table-cell>
          <ns4:table-cell ns0:value-type="string" ns6:value-type="string">
            <ns7:p>Westminster</ns7:p>
          </ns4:table-cell>
          <ns4:table-cell ns0:value-type="string" ns6:value-type="string">
            <ns7:p>CA</ns7:p>
          </ns4:table-cell>
          <ns4:table-cell ns0:value-type="string" ns6:value-type="string">
            <ns7:p>88966</ns7:p>
          </ns4:table-cell>
          <ns4:table-cell ns4:number-columns-repeated="9"/>
        </ns4:table-row>
        <ns4:table-row ns4:style-name="ro1">
          <ns4:table-cell ns0:value-type="string" ns6:value-type="string">
            <ns7:p>407.0</ns7:p>
          </ns4:table-cell>
          <ns4:table-cell ns0:value-type="string" ns6:value-type="string">
            <ns7:p>Troy</ns7:p>
          </ns4:table-cell>
          <ns4:table-cell ns0:value-type="string" ns6:value-type="string">
            <ns7:p>MI</ns7:p>
          </ns4:table-cell>
          <ns4:table-cell ns0:value-type="string" ns6:value-type="string">
            <ns7:p>88733</ns7:p>
          </ns4:table-cell>
          <ns4:table-cell ns4:number-columns-repeated="9"/>
        </ns4:table-row>
        <ns4:table-row ns4:style-name="ro1">
          <ns4:table-cell ns0:value-type="string" ns6:value-type="string">
            <ns7:p>408.0</ns7:p>
          </ns4:table-cell>
          <ns4:table-cell ns0:value-type="string" ns6:value-type="string">
            <ns7:p>Daytona Beach</ns7:p>
          </ns4:table-cell>
          <ns4:table-cell ns0:value-type="string" ns6:value-type="string">
            <ns7:p>FL</ns7:p>
          </ns4:table-cell>
          <ns4:table-cell ns0:value-type="string" ns6:value-type="string">
            <ns7:p>88471</ns7:p>
          </ns4:table-cell>
          <ns4:table-cell ns4:number-columns-repeated="9"/>
        </ns4:table-row>
        <ns4:table-row ns4:style-name="ro1">
          <ns4:table-cell ns0:value-type="string" ns6:value-type="string">
            <ns7:p>409.0</ns7:p>
          </ns4:table-cell>
          <ns4:table-cell ns0:value-type="string" ns6:value-type="string">
            <ns7:p>Kennewick</ns7:p>
          </ns4:table-cell>
          <ns4:table-cell ns0:value-type="string" ns6:value-type="string">
            <ns7:p>WA</ns7:p>
          </ns4:table-cell>
          <ns4:table-cell ns0:value-type="string" ns6:value-type="string">
            <ns7:p>88366</ns7:p>
          </ns4:table-cell>
          <ns4:table-cell ns4:number-columns-repeated="9"/>
        </ns4:table-row>
        <ns4:table-row ns4:style-name="ro1">
          <ns4:table-cell ns0:value-type="string" ns6:value-type="string">
            <ns7:p>410.0</ns7:p>
          </ns4:table-cell>
          <ns4:table-cell ns0:value-type="string" ns6:value-type="string">
            <ns7:p>Duluth</ns7:p>
          </ns4:table-cell>
          <ns4:table-cell ns0:value-type="string" ns6:value-type="string">
            <ns7:p>MN</ns7:p>
          </ns4:table-cell>
          <ns4:table-cell ns0:value-type="string" ns6:value-type="string">
            <ns7:p>88330</ns7:p>
          </ns4:table-cell>
          <ns4:table-cell ns4:number-columns-repeated="9"/>
        </ns4:table-row>
        <ns4:table-row ns4:style-name="ro1">
          <ns4:table-cell ns0:value-type="string" ns6:value-type="string">
            <ns7:p>411.0</ns7:p>
          </ns4:table-cell>
          <ns4:table-cell ns0:value-type="string" ns6:value-type="string">
            <ns7:p>Waukegan</ns7:p>
          </ns4:table-cell>
          <ns4:table-cell ns0:value-type="string" ns6:value-type="string">
            <ns7:p>IL</ns7:p>
          </ns4:table-cell>
          <ns4:table-cell ns0:value-type="string" ns6:value-type="string">
            <ns7:p>87940</ns7:p>
          </ns4:table-cell>
          <ns4:table-cell ns4:number-columns-repeated="9"/>
        </ns4:table-row>
        <ns4:table-row ns4:style-name="ro1">
          <ns4:table-cell ns0:value-type="string" ns6:value-type="string">
            <ns7:p>412.0</ns7:p>
          </ns4:table-cell>
          <ns4:table-cell ns0:value-type="string" ns6:value-type="string">
            <ns7:p>Warner Robins</ns7:p>
          </ns4:table-cell>
          <ns4:table-cell ns0:value-type="string" ns6:value-type="string">
            <ns7:p>GA</ns7:p>
          </ns4:table-cell>
          <ns4:table-cell ns0:value-type="string" ns6:value-type="string">
            <ns7:p>87761</ns7:p>
          </ns4:table-cell>
          <ns4:table-cell ns4:number-columns-repeated="9"/>
        </ns4:table-row>
        <ns4:table-row ns4:style-name="ro1">
          <ns4:table-cell ns0:value-type="string" ns6:value-type="string">
            <ns7:p>413.0</ns7:p>
          </ns4:table-cell>
          <ns4:table-cell ns0:value-type="string" ns6:value-type="string">
            <ns7:p>South Jordan</ns7:p>
          </ns4:table-cell>
          <ns4:table-cell ns0:value-type="string" ns6:value-type="string">
            <ns7:p>UT</ns7:p>
          </ns4:table-cell>
          <ns4:table-cell ns0:value-type="string" ns6:value-type="string">
            <ns7:p>87614</ns7:p>
          </ns4:table-cell>
          <ns4:table-cell ns4:number-columns-repeated="9"/>
        </ns4:table-row>
        <ns4:table-row ns4:style-name="ro1">
          <ns4:table-cell ns0:value-type="string" ns6:value-type="string">
            <ns7:p>414.0</ns7:p>
          </ns4:table-cell>
          <ns4:table-cell ns0:value-type="string" ns6:value-type="string">
            <ns7:p>Rancho Cordova</ns7:p>
          </ns4:table-cell>
          <ns4:table-cell ns0:value-type="string" ns6:value-type="string">
            <ns7:p>CA</ns7:p>
          </ns4:table-cell>
          <ns4:table-cell ns0:value-type="string" ns6:value-type="string">
            <ns7:p>87554</ns7:p>
          </ns4:table-cell>
          <ns4:table-cell ns4:number-columns-repeated="9"/>
        </ns4:table-row>
        <ns4:table-row ns4:style-name="ro1">
          <ns4:table-cell ns0:value-type="string" ns6:value-type="string">
            <ns7:p>415.0</ns7:p>
          </ns4:table-cell>
          <ns4:table-cell ns0:value-type="string" ns6:value-type="string">
            <ns7:p>Melbourne</ns7:p>
          </ns4:table-cell>
          <ns4:table-cell ns0:value-type="string" ns6:value-type="string">
            <ns7:p>FL</ns7:p>
          </ns4:table-cell>
          <ns4:table-cell ns0:value-type="string" ns6:value-type="string">
            <ns7:p>87097</ns7:p>
          </ns4:table-cell>
          <ns4:table-cell ns4:number-columns-repeated="9"/>
        </ns4:table-row>
        <ns4:table-row ns4:style-name="ro1">
          <ns4:table-cell ns0:value-type="string" ns6:value-type="string">
            <ns7:p>416.0</ns7:p>
          </ns4:table-cell>
          <ns4:table-cell ns0:value-type="string" ns6:value-type="string">
            <ns7:p>Gastonia</ns7:p>
          </ns4:table-cell>
          <ns4:table-cell ns0:value-type="string" ns6:value-type="string">
            <ns7:p>NC</ns7:p>
          </ns4:table-cell>
          <ns4:table-cell ns0:value-type="string" ns6:value-type="string">
            <ns7:p>87067</ns7:p>
          </ns4:table-cell>
          <ns4:table-cell ns4:number-columns-repeated="9"/>
        </ns4:table-row>
        <ns4:table-row ns4:style-name="ro1">
          <ns4:table-cell ns0:value-type="string" ns6:value-type="string">
            <ns7:p>417.0</ns7:p>
          </ns4:table-cell>
          <ns4:table-cell ns0:value-type="string" ns6:value-type="string">
            <ns7:p>Baytown</ns7:p>
          </ns4:table-cell>
          <ns4:table-cell ns0:value-type="string" ns6:value-type="string">
            <ns7:p>TX</ns7:p>
          </ns4:table-cell>
          <ns4:table-cell ns0:value-type="string" ns6:value-type="string">
            <ns7:p>86561</ns7:p>
          </ns4:table-cell>
          <ns4:table-cell ns4:number-columns-repeated="9"/>
        </ns4:table-row>
        <ns4:table-row ns4:style-name="ro1">
          <ns4:table-cell ns0:value-type="string" ns6:value-type="string">
            <ns7:p>418.0</ns7:p>
          </ns4:table-cell>
          <ns4:table-cell ns0:value-type="string" ns6:value-type="string">
            <ns7:p>Medford</ns7:p>
          </ns4:table-cell>
          <ns4:table-cell ns0:value-type="string" ns6:value-type="string">
            <ns7:p>OR</ns7:p>
          </ns4:table-cell>
          <ns4:table-cell ns0:value-type="string" ns6:value-type="string">
            <ns7:p>86494</ns7:p>
          </ns4:table-cell>
          <ns4:table-cell ns4:number-columns-repeated="9"/>
        </ns4:table-row>
        <ns4:table-row ns4:style-name="ro1">
          <ns4:table-cell ns0:value-type="string" ns6:value-type="string">
            <ns7:p>419.0</ns7:p>
          </ns4:table-cell>
          <ns4:table-cell ns0:value-type="string" ns6:value-type="string">
            <ns7:p>Santa Barbara</ns7:p>
          </ns4:table-cell>
          <ns4:table-cell ns0:value-type="string" ns6:value-type="string">
            <ns7:p>CA</ns7:p>
          </ns4:table-cell>
          <ns4:table-cell ns0:value-type="string" ns6:value-type="string">
            <ns7:p>86422</ns7:p>
          </ns4:table-cell>
          <ns4:table-cell ns4:number-columns-repeated="9"/>
        </ns4:table-row>
        <ns4:table-row ns4:style-name="ro1">
          <ns4:table-cell ns0:value-type="string" ns6:value-type="string">
            <ns7:p>420.0</ns7:p>
          </ns4:table-cell>
          <ns4:table-cell ns0:value-type="string" ns6:value-type="string">
            <ns7:p>Sioux City</ns7:p>
          </ns4:table-cell>
          <ns4:table-cell ns0:value-type="string" ns6:value-type="string">
            <ns7:p>IA</ns7:p>
          </ns4:table-cell>
          <ns4:table-cell ns0:value-type="string" ns6:value-type="string">
            <ns7:p>86356</ns7:p>
          </ns4:table-cell>
          <ns4:table-cell ns4:number-columns-repeated="9"/>
        </ns4:table-row>
        <ns4:table-row ns4:style-name="ro1">
          <ns4:table-cell ns0:value-type="string" ns6:value-type="string">
            <ns7:p>421.0</ns7:p>
          </ns4:table-cell>
          <ns4:table-cell ns0:value-type="string" ns6:value-type="string">
            <ns7:p>Citrus Heights</ns7:p>
          </ns4:table-cell>
          <ns4:table-cell ns0:value-type="string" ns6:value-type="string">
            <ns7:p>CA</ns7:p>
          </ns4:table-cell>
          <ns4:table-cell ns0:value-type="string" ns6:value-type="string">
            <ns7:p>86348</ns7:p>
          </ns4:table-cell>
          <ns4:table-cell ns4:number-columns-repeated="9"/>
        </ns4:table-row>
        <ns4:table-row ns4:style-name="ro1">
          <ns4:table-cell ns0:value-type="string" ns6:value-type="string">
            <ns7:p>422.0</ns7:p>
          </ns4:table-cell>
          <ns4:table-cell ns0:value-type="string" ns6:value-type="string">
            <ns7:p>Lake Forest</ns7:p>
          </ns4:table-cell>
          <ns4:table-cell ns0:value-type="string" ns6:value-type="string">
            <ns7:p>CA</ns7:p>
          </ns4:table-cell>
          <ns4:table-cell ns0:value-type="string" ns6:value-type="string">
            <ns7:p>86333</ns7:p>
          </ns4:table-cell>
          <ns4:table-cell ns4:number-columns-repeated="9"/>
        </ns4:table-row>
        <ns4:table-row ns4:style-name="ro1">
          <ns4:table-cell ns0:value-type="string" ns6:value-type="string">
            <ns7:p>423.0</ns7:p>
          </ns4:table-cell>
          <ns4:table-cell ns0:value-type="string" ns6:value-type="string">
            <ns7:p>Auburn</ns7:p>
          </ns4:table-cell>
          <ns4:table-cell ns0:value-type="string" ns6:value-type="string">
            <ns7:p>WA</ns7:p>
          </ns4:table-cell>
          <ns4:table-cell ns0:value-type="string" ns6:value-type="string">
            <ns7:p>86301</ns7:p>
          </ns4:table-cell>
          <ns4:table-cell ns4:number-columns-repeated="9"/>
        </ns4:table-row>
        <ns4:table-row ns4:style-name="ro1">
          <ns4:table-cell ns0:value-type="string" ns6:value-type="string">
            <ns7:p>424.0</ns7:p>
          </ns4:table-cell>
          <ns4:table-cell ns0:value-type="string" ns6:value-type="string">
            <ns7:p>Homestead</ns7:p>
          </ns4:table-cell>
          <ns4:table-cell ns0:value-type="string" ns6:value-type="string">
            <ns7:p>FL</ns7:p>
          </ns4:table-cell>
          <ns4:table-cell ns0:value-type="string" ns6:value-type="string">
            <ns7:p>86242</ns7:p>
          </ns4:table-cell>
          <ns4:table-cell ns4:number-columns-repeated="9"/>
        </ns4:table-row>
        <ns4:table-row ns4:style-name="ro1">
          <ns4:table-cell ns0:value-type="string" ns6:value-type="string">
            <ns7:p>425.0</ns7:p>
          </ns4:table-cell>
          <ns4:table-cell ns0:value-type="string" ns6:value-type="string">
            <ns7:p>San Ramon</ns7:p>
          </ns4:table-cell>
          <ns4:table-cell ns0:value-type="string" ns6:value-type="string">
            <ns7:p>CA</ns7:p>
          </ns4:table-cell>
          <ns4:table-cell ns0:value-type="string" ns6:value-type="string">
            <ns7:p>86209</ns7:p>
          </ns4:table-cell>
          <ns4:table-cell ns4:number-columns-repeated="9"/>
        </ns4:table-row>
        <ns4:table-row ns4:style-name="ro1">
          <ns4:table-cell ns0:value-type="string" ns6:value-type="string">
            <ns7:p>426.0</ns7:p>
          </ns4:table-cell>
          <ns4:table-cell ns0:value-type="string" ns6:value-type="string">
            <ns7:p>New Rochelle</ns7:p>
          </ns4:table-cell>
          <ns4:table-cell ns0:value-type="string" ns6:value-type="string">
            <ns7:p>NY</ns7:p>
          </ns4:table-cell>
          <ns4:table-cell ns0:value-type="string" ns6:value-type="string">
            <ns7:p>85864</ns7:p>
          </ns4:table-cell>
          <ns4:table-cell ns4:number-columns-repeated="9"/>
        </ns4:table-row>
        <ns4:table-row ns4:style-name="ro1">
          <ns4:table-cell ns0:value-type="string" ns6:value-type="string">
            <ns7:p>427.0</ns7:p>
          </ns4:table-cell>
          <ns4:table-cell ns0:value-type="string" ns6:value-type="string">
            <ns7:p>Whittier</ns7:p>
          </ns4:table-cell>
          <ns4:table-cell ns0:value-type="string" ns6:value-type="string">
            <ns7:p>CA</ns7:p>
          </ns4:table-cell>
          <ns4:table-cell ns0:value-type="string" ns6:value-type="string">
            <ns7:p>85815</ns7:p>
          </ns4:table-cell>
          <ns4:table-cell ns4:number-columns-repeated="9"/>
        </ns4:table-row>
        <ns4:table-row ns4:style-name="ro1">
          <ns4:table-cell ns0:value-type="string" ns6:value-type="string">
            <ns7:p>428.0</ns7:p>
          </ns4:table-cell>
          <ns4:table-cell ns0:value-type="string" ns6:value-type="string">
            <ns7:p>Kissimmee</ns7:p>
          </ns4:table-cell>
          <ns4:table-cell ns0:value-type="string" ns6:value-type="string">
            <ns7:p>FL</ns7:p>
          </ns4:table-cell>
          <ns4:table-cell ns0:value-type="string" ns6:value-type="string">
            <ns7:p>85591</ns7:p>
          </ns4:table-cell>
          <ns4:table-cell ns4:number-columns-repeated="9"/>
        </ns4:table-row>
        <ns4:table-row ns4:style-name="ro1">
          <ns4:table-cell ns0:value-type="string" ns6:value-type="string">
            <ns7:p>429.0</ns7:p>
          </ns4:table-cell>
          <ns4:table-cell ns0:value-type="string" ns6:value-type="string">
            <ns7:p>Mountain View</ns7:p>
          </ns4:table-cell>
          <ns4:table-cell ns0:value-type="string" ns6:value-type="string">
            <ns7:p>CA</ns7:p>
          </ns4:table-cell>
          <ns4:table-cell ns0:value-type="string" ns6:value-type="string">
            <ns7:p>85438</ns7:p>
          </ns4:table-cell>
          <ns4:table-cell ns4:number-columns-repeated="9"/>
        </ns4:table-row>
        <ns4:table-row ns4:style-name="ro1">
          <ns4:table-cell ns0:value-type="string" ns6:value-type="string">
            <ns7:p>430.0</ns7:p>
          </ns4:table-cell>
          <ns4:table-cell ns0:value-type="string" ns6:value-type="string">
            <ns7:p>San Leandro</ns7:p>
          </ns4:table-cell>
          <ns4:table-cell ns0:value-type="string" ns6:value-type="string">
            <ns7:p>CA</ns7:p>
          </ns4:table-cell>
          <ns4:table-cell ns0:value-type="string" ns6:value-type="string">
            <ns7:p>85353</ns7:p>
          </ns4:table-cell>
          <ns4:table-cell ns4:number-columns-repeated="9"/>
        </ns4:table-row>
        <ns4:table-row ns4:style-name="ro1">
          <ns4:table-cell ns0:value-type="string" ns6:value-type="string">
            <ns7:p>431.0</ns7:p>
          </ns4:table-cell>
          <ns4:table-cell ns0:value-type="string" ns6:value-type="string">
            <ns7:p>Layton</ns7:p>
          </ns4:table-cell>
          <ns4:table-cell ns0:value-type="string" ns6:value-type="string">
            <ns7:p>UT</ns7:p>
          </ns4:table-cell>
          <ns4:table-cell ns0:value-type="string" ns6:value-type="string">
            <ns7:p>85308</ns7:p>
          </ns4:table-cell>
          <ns4:table-cell ns4:number-columns-repeated="9"/>
        </ns4:table-row>
        <ns4:table-row ns4:style-name="ro1">
          <ns4:table-cell ns0:value-type="string" ns6:value-type="string">
            <ns7:p>432.0</ns7:p>
          </ns4:table-cell>
          <ns4:table-cell ns0:value-type="string" ns6:value-type="string">
            <ns7:p>Auburn</ns7:p>
          </ns4:table-cell>
          <ns4:table-cell ns0:value-type="string" ns6:value-type="string">
            <ns7:p>AL</ns7:p>
          </ns4:table-cell>
          <ns4:table-cell ns0:value-type="string" ns6:value-type="string">
            <ns7:p>85113</ns7:p>
          </ns4:table-cell>
          <ns4:table-cell ns4:number-columns-repeated="9"/>
        </ns4:table-row>
        <ns4:table-row ns4:style-name="ro1">
          <ns4:table-cell ns0:value-type="string" ns6:value-type="string">
            <ns7:p>433.0</ns7:p>
          </ns4:table-cell>
          <ns4:table-cell ns0:value-type="string" ns6:value-type="string">
            <ns7:p>Cranston</ns7:p>
          </ns4:table-cell>
          <ns4:table-cell ns0:value-type="string" ns6:value-type="string">
            <ns7:p>RI</ns7:p>
          </ns4:table-cell>
          <ns4:table-cell ns0:value-type="string" ns6:value-type="string">
            <ns7:p>84647</ns7:p>
          </ns4:table-cell>
          <ns4:table-cell ns4:number-columns-repeated="9"/>
        </ns4:table-row>
        <ns4:table-row ns4:style-name="ro1">
          <ns4:table-cell ns0:value-type="string" ns6:value-type="string">
            <ns7:p>434.0</ns7:p>
          </ns4:table-cell>
          <ns4:table-cell ns0:value-type="string" ns6:value-type="string">
            <ns7:p>Mansfield</ns7:p>
          </ns4:table-cell>
          <ns4:table-cell ns0:value-type="string" ns6:value-type="string">
            <ns7:p>TX</ns7:p>
          </ns4:table-cell>
          <ns4:table-cell ns0:value-type="string" ns6:value-type="string">
            <ns7:p>84444</ns7:p>
          </ns4:table-cell>
          <ns4:table-cell ns4:number-columns-repeated="9"/>
        </ns4:table-row>
        <ns4:table-row ns4:style-name="ro1">
          <ns4:table-cell ns0:value-type="string" ns6:value-type="string">
            <ns7:p>435.0</ns7:p>
          </ns4:table-cell>
          <ns4:table-cell ns0:value-type="string" ns6:value-type="string">
            <ns7:p>Somerville</ns7:p>
          </ns4:table-cell>
          <ns4:table-cell ns0:value-type="string" ns6:value-type="string">
            <ns7:p>MA</ns7:p>
          </ns4:table-cell>
          <ns4:table-cell ns0:value-type="string" ns6:value-type="string">
            <ns7:p>84211</ns7:p>
          </ns4:table-cell>
          <ns4:table-cell ns4:number-columns-repeated="9"/>
        </ns4:table-row>
        <ns4:table-row ns4:style-name="ro1">
          <ns4:table-cell ns0:value-type="string" ns6:value-type="string">
            <ns7:p>436.0</ns7:p>
          </ns4:table-cell>
          <ns4:table-cell ns0:value-type="string" ns6:value-type="string">
            <ns7:p>Warwick</ns7:p>
          </ns4:table-cell>
          <ns4:table-cell ns0:value-type="string" ns6:value-type="string">
            <ns7:p>RI</ns7:p>
          </ns4:table-cell>
          <ns4:table-cell ns0:value-type="string" ns6:value-type="string">
            <ns7:p>84187</ns7:p>
          </ns4:table-cell>
          <ns4:table-cell ns4:number-columns-repeated="9"/>
        </ns4:table-row>
        <ns4:table-row ns4:style-name="ro1">
          <ns4:table-cell ns0:value-type="string" ns6:value-type="string">
            <ns7:p>437.0</ns7:p>
          </ns4:table-cell>
          <ns4:table-cell ns0:value-type="string" ns6:value-type="string">
            <ns7:p>Castle Rock</ns7:p>
          </ns4:table-cell>
          <ns4:table-cell ns0:value-type="string" ns6:value-type="string">
            <ns7:p>CO</ns7:p>
          </ns4:table-cell>
          <ns4:table-cell ns0:value-type="string" ns6:value-type="string">
            <ns7:p>83815</ns7:p>
          </ns4:table-cell>
          <ns4:table-cell ns4:number-columns-repeated="9"/>
        </ns4:table-row>
        <ns4:table-row ns4:style-name="ro1">
          <ns4:table-cell ns0:value-type="string" ns6:value-type="string">
            <ns7:p>438.0</ns7:p>
          </ns4:table-cell>
          <ns4:table-cell ns0:value-type="string" ns6:value-type="string">
            <ns7:p>Brooklyn Park</ns7:p>
          </ns4:table-cell>
          <ns4:table-cell ns0:value-type="string" ns6:value-type="string">
            <ns7:p>MN</ns7:p>
          </ns4:table-cell>
          <ns4:table-cell ns0:value-type="string" ns6:value-type="string">
            <ns7:p>83543</ns7:p>
          </ns4:table-cell>
          <ns4:table-cell ns4:number-columns-repeated="9"/>
        </ns4:table-row>
        <ns4:table-row ns4:style-name="ro1">
          <ns4:table-cell ns0:value-type="string" ns6:value-type="string">
            <ns7:p>439.0</ns7:p>
          </ns4:table-cell>
          <ns4:table-cell ns0:value-type="string" ns6:value-type="string">
            <ns7:p>Livermore</ns7:p>
          </ns4:table-cell>
          <ns4:table-cell ns0:value-type="string" ns6:value-type="string">
            <ns7:p>CA</ns7:p>
          </ns4:table-cell>
          <ns4:table-cell ns0:value-type="string" ns6:value-type="string">
            <ns7:p>83457</ns7:p>
          </ns4:table-cell>
          <ns4:table-cell ns4:number-columns-repeated="9"/>
        </ns4:table-row>
        <ns4:table-row ns4:style-name="ro1">
          <ns4:table-cell ns0:value-type="string" ns6:value-type="string">
            <ns7:p>440.0</ns7:p>
          </ns4:table-cell>
          <ns4:table-cell ns0:value-type="string" ns6:value-type="string">
            <ns7:p>Bloomington</ns7:p>
          </ns4:table-cell>
          <ns4:table-cell ns0:value-type="string" ns6:value-type="string">
            <ns7:p>IN</ns7:p>
          </ns4:table-cell>
          <ns4:table-cell ns0:value-type="string" ns6:value-type="string">
            <ns7:p>83307</ns7:p>
          </ns4:table-cell>
          <ns4:table-cell ns4:number-columns-repeated="9"/>
        </ns4:table-row>
        <ns4:table-row ns4:style-name="ro1">
          <ns4:table-cell ns0:value-type="string" ns6:value-type="string">
            <ns7:p>441.0</ns7:p>
          </ns4:table-cell>
          <ns4:table-cell ns0:value-type="string" ns6:value-type="string">
            <ns7:p>Jonesboro</ns7:p>
          </ns4:table-cell>
          <ns4:table-cell ns0:value-type="string" ns6:value-type="string">
            <ns7:p>AR</ns7:p>
          </ns4:table-cell>
          <ns4:table-cell ns0:value-type="string" ns6:value-type="string">
            <ns7:p>83296</ns7:p>
          </ns4:table-cell>
          <ns4:table-cell ns4:number-columns-repeated="9"/>
        </ns4:table-row>
        <ns4:table-row ns4:style-name="ro1">
          <ns4:table-cell ns0:value-type="string" ns6:value-type="string">
            <ns7:p>442.0</ns7:p>
          </ns4:table-cell>
          <ns4:table-cell ns0:value-type="string" ns6:value-type="string">
            <ns7:p>Farmington Hills</ns7:p>
          </ns4:table-cell>
          <ns4:table-cell ns0:value-type="string" ns6:value-type="string">
            <ns7:p>MI</ns7:p>
          </ns4:table-cell>
          <ns4:table-cell ns0:value-type="string" ns6:value-type="string">
            <ns7:p>83291</ns7:p>
          </ns4:table-cell>
          <ns4:table-cell ns4:number-columns-repeated="9"/>
        </ns4:table-row>
        <ns4:table-row ns4:style-name="ro1">
          <ns4:table-cell ns0:value-type="string" ns6:value-type="string">
            <ns7:p>443.0</ns7:p>
          </ns4:table-cell>
          <ns4:table-cell ns0:value-type="string" ns6:value-type="string">
            <ns7:p>Perris</ns7:p>
          </ns4:table-cell>
          <ns4:table-cell ns0:value-type="string" ns6:value-type="string">
            <ns7:p>CA</ns7:p>
          </ns4:table-cell>
          <ns4:table-cell ns0:value-type="string" ns6:value-type="string">
            <ns7:p>83237</ns7:p>
          </ns4:table-cell>
          <ns4:table-cell ns4:number-columns-repeated="9"/>
        </ns4:table-row>
        <ns4:table-row ns4:style-name="ro1">
          <ns4:table-cell ns0:value-type="string" ns6:value-type="string">
            <ns7:p>444.0</ns7:p>
          </ns4:table-cell>
          <ns4:table-cell ns0:value-type="string" ns6:value-type="string">
            <ns7:p>Longview</ns7:p>
          </ns4:table-cell>
          <ns4:table-cell ns0:value-type="string" ns6:value-type="string">
            <ns7:p>TX</ns7:p>
          </ns4:table-cell>
          <ns4:table-cell ns0:value-type="string" ns6:value-type="string">
            <ns7:p>83236</ns7:p>
          </ns4:table-cell>
          <ns4:table-cell ns4:number-columns-repeated="9"/>
        </ns4:table-row>
        <ns4:table-row ns4:style-name="ro1">
          <ns4:table-cell ns0:value-type="string" ns6:value-type="string">
            <ns7:p>445.0</ns7:p>
          </ns4:table-cell>
          <ns4:table-cell ns0:value-type="string" ns6:value-type="string">
            <ns7:p>Pasco</ns7:p>
          </ns4:table-cell>
          <ns4:table-cell ns0:value-type="string" ns6:value-type="string">
            <ns7:p>WA</ns7:p>
          </ns4:table-cell>
          <ns4:table-cell ns0:value-type="string" ns6:value-type="string">
            <ns7:p>82848</ns7:p>
          </ns4:table-cell>
          <ns4:table-cell ns4:number-columns-repeated="9"/>
        </ns4:table-row>
        <ns4:table-row ns4:style-name="ro1">
          <ns4:table-cell ns0:value-type="string" ns6:value-type="string">
            <ns7:p>446.0</ns7:p>
          </ns4:table-cell>
          <ns4:table-cell ns0:value-type="string" ns6:value-type="string">
            <ns7:p>Hawthorne</ns7:p>
          </ns4:table-cell>
          <ns4:table-cell ns0:value-type="string" ns6:value-type="string">
            <ns7:p>CA</ns7:p>
          </ns4:table-cell>
          <ns4:table-cell ns0:value-type="string" ns6:value-type="string">
            <ns7:p>82741</ns7:p>
          </ns4:table-cell>
          <ns4:table-cell ns4:number-columns-repeated="9"/>
        </ns4:table-row>
        <ns4:table-row ns4:style-name="ro1">
          <ns4:table-cell ns0:value-type="string" ns6:value-type="string">
            <ns7:p>447.0</ns7:p>
          </ns4:table-cell>
          <ns4:table-cell ns0:value-type="string" ns6:value-type="string">
            <ns7:p>Lake Charles</ns7:p>
          </ns4:table-cell>
          <ns4:table-cell ns0:value-type="string" ns6:value-type="string">
            <ns7:p>LA</ns7:p>
          </ns4:table-cell>
          <ns4:table-cell ns0:value-type="string" ns6:value-type="string">
            <ns7:p>82676</ns7:p>
          </ns4:table-cell>
          <ns4:table-cell ns4:number-columns-repeated="9"/>
        </ns4:table-row>
        <ns4:table-row ns4:style-name="ro1">
          <ns4:table-cell ns0:value-type="string" ns6:value-type="string">
            <ns7:p>448.0</ns7:p>
          </ns4:table-cell>
          <ns4:table-cell ns0:value-type="string" ns6:value-type="string">
            <ns7:p>Redmond</ns7:p>
          </ns4:table-cell>
          <ns4:table-cell ns0:value-type="string" ns6:value-type="string">
            <ns7:p>WA</ns7:p>
          </ns4:table-cell>
          <ns4:table-cell ns0:value-type="string" ns6:value-type="string">
            <ns7:p>82506</ns7:p>
          </ns4:table-cell>
          <ns4:table-cell ns4:number-columns-repeated="9"/>
        </ns4:table-row>
        <ns4:table-row ns4:style-name="ro1">
          <ns4:table-cell ns0:value-type="string" ns6:value-type="string">
            <ns7:p>449.0</ns7:p>
          </ns4:table-cell>
          <ns4:table-cell ns0:value-type="string" ns6:value-type="string">
            <ns7:p>Boynton Beach</ns7:p>
          </ns4:table-cell>
          <ns4:table-cell ns0:value-type="string" ns6:value-type="string">
            <ns7:p>FL</ns7:p>
          </ns4:table-cell>
          <ns4:table-cell ns0:value-type="string" ns6:value-type="string">
            <ns7:p>82396</ns7:p>
          </ns4:table-cell>
          <ns4:table-cell ns4:number-columns-repeated="9"/>
        </ns4:table-row>
        <ns4:table-row ns4:style-name="ro1">
          <ns4:table-cell ns0:value-type="string" ns6:value-type="string">
            <ns7:p>450.0</ns7:p>
          </ns4:table-cell>
          <ns4:table-cell ns0:value-type="string" ns6:value-type="string">
            <ns7:p>Westland</ns7:p>
          </ns4:table-cell>
          <ns4:table-cell ns0:value-type="string" ns6:value-type="string">
            <ns7:p>MI</ns7:p>
          </ns4:table-cell>
          <ns4:table-cell ns0:value-type="string" ns6:value-type="string">
            <ns7:p>82333</ns7:p>
          </ns4:table-cell>
          <ns4:table-cell ns4:number-columns-repeated="9"/>
        </ns4:table-row>
        <ns4:table-row ns4:style-name="ro1">
          <ns4:table-cell ns0:value-type="string" ns6:value-type="string">
            <ns7:p>451.0</ns7:p>
          </ns4:table-cell>
          <ns4:table-cell ns0:value-type="string" ns6:value-type="string">
            <ns7:p>Redwood City</ns7:p>
          </ns4:table-cell>
          <ns4:table-cell ns0:value-type="string" ns6:value-type="string">
            <ns7:p>CA</ns7:p>
          </ns4:table-cell>
          <ns4:table-cell ns0:value-type="string" ns6:value-type="string">
            <ns7:p>82178</ns7:p>
          </ns4:table-cell>
          <ns4:table-cell ns4:number-columns-repeated="9"/>
        </ns4:table-row>
        <ns4:table-row ns4:style-name="ro1">
          <ns4:table-cell ns0:value-type="string" ns6:value-type="string">
            <ns7:p>452.0</ns7:p>
          </ns4:table-cell>
          <ns4:table-cell ns0:value-type="string" ns6:value-type="string">
            <ns7:p>Newport Beach</ns7:p>
          </ns4:table-cell>
          <ns4:table-cell ns0:value-type="string" ns6:value-type="string">
            <ns7:p>CA</ns7:p>
          </ns4:table-cell>
          <ns4:table-cell ns0:value-type="string" ns6:value-type="string">
            <ns7:p>81977</ns7:p>
          </ns4:table-cell>
          <ns4:table-cell ns4:number-columns-repeated="9"/>
        </ns4:table-row>
        <ns4:table-row ns4:style-name="ro1">
          <ns4:table-cell ns0:value-type="string" ns6:value-type="string">
            <ns7:p>453.0</ns7:p>
          </ns4:table-cell>
          <ns4:table-cell ns0:value-type="string" ns6:value-type="string">
            <ns7:p>Cicero</ns7:p>
          </ns4:table-cell>
          <ns4:table-cell ns0:value-type="string" ns6:value-type="string">
            <ns7:p>IL</ns7:p>
          </ns4:table-cell>
          <ns4:table-cell ns0:value-type="string" ns6:value-type="string">
            <ns7:p>81858</ns7:p>
          </ns4:table-cell>
          <ns4:table-cell ns4:number-columns-repeated="9"/>
        </ns4:table-row>
        <ns4:table-row ns4:style-name="ro1">
          <ns4:table-cell ns0:value-type="string" ns6:value-type="string">
            <ns7:p>454.0</ns7:p>
          </ns4:table-cell>
          <ns4:table-cell ns0:value-type="string" ns6:value-type="string">
            <ns7:p>Buena Park</ns7:p>
          </ns4:table-cell>
          <ns4:table-cell ns0:value-type="string" ns6:value-type="string">
            <ns7:p>CA</ns7:p>
          </ns4:table-cell>
          <ns4:table-cell ns0:value-type="string" ns6:value-type="string">
            <ns7:p>81741</ns7:p>
          </ns4:table-cell>
          <ns4:table-cell ns4:number-columns-repeated="9"/>
        </ns4:table-row>
        <ns4:table-row ns4:style-name="ro1">
          <ns4:table-cell ns0:value-type="string" ns6:value-type="string">
            <ns7:p>455.0</ns7:p>
          </ns4:table-cell>
          <ns4:table-cell ns0:value-type="string" ns6:value-type="string">
            <ns7:p>Doral</ns7:p>
          </ns4:table-cell>
          <ns4:table-cell ns0:value-type="string" ns6:value-type="string">
            <ns7:p>FL</ns7:p>
          </ns4:table-cell>
          <ns4:table-cell ns0:value-type="string" ns6:value-type="string">
            <ns7:p>81634</ns7:p>
          </ns4:table-cell>
          <ns4:table-cell ns4:number-columns-repeated="9"/>
        </ns4:table-row>
        <ns4:table-row ns4:style-name="ro1">
          <ns4:table-cell ns0:value-type="string" ns6:value-type="string">
            <ns7:p>456.0</ns7:p>
          </ns4:table-cell>
          <ns4:table-cell ns0:value-type="string" ns6:value-type="string">
            <ns7:p>Miami Beach</ns7:p>
          </ns4:table-cell>
          <ns4:table-cell ns0:value-type="string" ns6:value-type="string">
            <ns7:p>FL</ns7:p>
          </ns4:table-cell>
          <ns4:table-cell ns0:value-type="string" ns6:value-type="string">
            <ns7:p>81594</ns7:p>
          </ns4:table-cell>
          <ns4:table-cell ns4:number-columns-repeated="9"/>
        </ns4:table-row>
        <ns4:table-row ns4:style-name="ro1">
          <ns4:table-cell ns0:value-type="string" ns6:value-type="string">
            <ns7:p>457.0</ns7:p>
          </ns4:table-cell>
          <ns4:table-cell ns0:value-type="string" ns6:value-type="string">
            <ns7:p>Woodbury</ns7:p>
          </ns4:table-cell>
          <ns4:table-cell ns0:value-type="string" ns6:value-type="string">
            <ns7:p>MN</ns7:p>
          </ns4:table-cell>
          <ns4:table-cell ns0:value-type="string" ns6:value-type="string">
            <ns7:p>81558</ns7:p>
          </ns4:table-cell>
          <ns4:table-cell ns4:number-columns-repeated="9"/>
        </ns4:table-row>
        <ns4:table-row ns4:style-name="ro1">
          <ns4:table-cell ns0:value-type="string" ns6:value-type="string">
            <ns7:p>458.0</ns7:p>
          </ns4:table-cell>
          <ns4:table-cell ns0:value-type="string" ns6:value-type="string">
            <ns7:p>Loveland</ns7:p>
          </ns4:table-cell>
          <ns4:table-cell ns0:value-type="string" ns6:value-type="string">
            <ns7:p>CO</ns7:p>
          </ns4:table-cell>
          <ns4:table-cell ns0:value-type="string" ns6:value-type="string">
            <ns7:p>81387</ns7:p>
          </ns4:table-cell>
          <ns4:table-cell ns4:number-columns-repeated="9">
            <ns7:p>Loveland Plumbing</ns7:p>
          </ns4:table-cell>
        </ns4:table-row>
        <ns4:table-row ns4:style-name="ro1">
          <ns4:table-cell ns0:value-type="string" ns6:value-type="string">
            <ns7:p>459.0</ns7:p>
          </ns4:table-cell>
          <ns4:table-cell ns0:value-type="string" ns6:value-type="string">
            <ns7:p>Lynchburg</ns7:p>
          </ns4:table-cell>
          <ns4:table-cell ns0:value-type="string" ns6:value-type="string">
            <ns7:p>VA</ns7:p>
          </ns4:table-cell>
          <ns4:table-cell ns0:value-type="string" ns6:value-type="string">
            <ns7:p>81347</ns7:p>
          </ns4:table-cell>
          <ns4:table-cell ns4:number-columns-repeated="9"/>
        </ns4:table-row>
        <ns4:table-row ns4:style-name="ro1">
          <ns4:table-cell ns0:value-type="string" ns6:value-type="string">
            <ns7:p>460.0</ns7:p>
          </ns4:table-cell>
          <ns4:table-cell ns0:value-type="string" ns6:value-type="string">
            <ns7:p>Pharr</ns7:p>
          </ns4:table-cell>
          <ns4:table-cell ns0:value-type="string" ns6:value-type="string">
            <ns7:p>TX</ns7:p>
          </ns4:table-cell>
          <ns4:table-cell ns0:value-type="string" ns6:value-type="string">
            <ns7:p>80830</ns7:p>
          </ns4:table-cell>
          <ns4:table-cell ns4:number-columns-repeated="9"/>
        </ns4:table-row>
        <ns4:table-row ns4:style-name="ro1">
          <ns4:table-cell ns0:value-type="string" ns6:value-type="string">
            <ns7:p>461.0</ns7:p>
          </ns4:table-cell>
          <ns4:table-cell ns0:value-type="string" ns6:value-type="string">
            <ns7:p>Largo</ns7:p>
          </ns4:table-cell>
          <ns4:table-cell ns0:value-type="string" ns6:value-type="string">
            <ns7:p>FL</ns7:p>
          </ns4:table-cell>
          <ns4:table-cell ns0:value-type="string" ns6:value-type="string">
            <ns7:p>80690</ns7:p>
          </ns4:table-cell>
          <ns4:table-cell ns4:number-columns-repeated="9"/>
        </ns4:table-row>
        <ns4:table-row ns4:style-name="ro1">
          <ns4:table-cell ns0:value-type="string" ns6:value-type="string">
            <ns7:p>462.0</ns7:p>
          </ns4:table-cell>
          <ns4:table-cell ns0:value-type="string" ns6:value-type="string">
            <ns7:p>Rapid City</ns7:p>
          </ns4:table-cell>
          <ns4:table-cell ns0:value-type="string" ns6:value-type="string">
            <ns7:p>SD</ns7:p>
          </ns4:table-cell>
          <ns4:table-cell ns0:value-type="string" ns6:value-type="string">
            <ns7:p>80589</ns7:p>
          </ns4:table-cell>
          <ns4:table-cell ns4:number-columns-repeated="9">
            <ns7:p>Loyal Plumbing Heating and Cooling</ns7:p>
          </ns4:table-cell>
        </ns4:table-row>
        <ns4:table-row ns4:style-name="ro1">
          <ns4:table-cell ns0:value-type="string" ns6:value-type="string">
            <ns7:p>463.0</ns7:p>
          </ns4:table-cell>
          <ns4:table-cell ns0:value-type="string" ns6:value-type="string">
            <ns7:p>Apex</ns7:p>
          </ns4:table-cell>
          <ns4:table-cell ns0:value-type="string" ns6:value-type="string">
            <ns7:p>NC</ns7:p>
          </ns4:table-cell>
          <ns4:table-cell ns0:value-type="string" ns6:value-type="string">
            <ns7:p>80419</ns7:p>
          </ns4:table-cell>
          <ns4:table-cell ns4:number-columns-repeated="9"/>
        </ns4:table-row>
        <ns4:table-row ns4:style-name="ro1">
          <ns4:table-cell ns0:value-type="string" ns6:value-type="string">
            <ns7:p>464.0</ns7:p>
          </ns4:table-cell>
          <ns4:table-cell ns0:value-type="string" ns6:value-type="string">
            <ns7:p>Johns Creek</ns7:p>
          </ns4:table-cell>
          <ns4:table-cell ns0:value-type="string" ns6:value-type="string">
            <ns7:p>GA</ns7:p>
          </ns4:table-cell>
          <ns4:table-cell ns0:value-type="string" ns6:value-type="string">
            <ns7:p>80401</ns7:p>
          </ns4:table-cell>
          <ns4:table-cell ns4:number-columns-repeated="9"/>
        </ns4:table-row>
        <ns4:table-row ns4:style-name="ro1">
          <ns4:table-cell ns0:value-type="string" ns6:value-type="string">
            <ns7:p>465.0</ns7:p>
          </ns4:table-cell>
          <ns4:table-cell ns0:value-type="string" ns6:value-type="string">
            <ns7:p>Alhambra</ns7:p>
          </ns4:table-cell>
          <ns4:table-cell ns0:value-type="string" ns6:value-type="string">
            <ns7:p>CA</ns7:p>
          </ns4:table-cell>
          <ns4:table-cell ns0:value-type="string" ns6:value-type="string">
            <ns7:p>79820</ns7:p>
          </ns4:table-cell>
          <ns4:table-cell ns4:number-columns-repeated="9"/>
        </ns4:table-row>
        <ns4:table-row ns4:style-name="ro1">
          <ns4:table-cell ns0:value-type="string" ns6:value-type="string">
            <ns7:p>466.0</ns7:p>
          </ns4:table-cell>
          <ns4:table-cell ns0:value-type="string" ns6:value-type="string">
            <ns7:p>Bethlehem</ns7:p>
          </ns4:table-cell>
          <ns4:table-cell ns0:value-type="string" ns6:value-type="string">
            <ns7:p>PA</ns7:p>
          </ns4:table-cell>
          <ns4:table-cell ns0:value-type="string" ns6:value-type="string">
            <ns7:p>79644</ns7:p>
          </ns4:table-cell>
          <ns4:table-cell ns4:number-columns-repeated="9"/>
        </ns4:table-row>
        <ns4:table-row ns4:style-name="ro1">
          <ns4:table-cell ns0:value-type="string" ns6:value-type="string">
            <ns7:p>467.0</ns7:p>
          </ns4:table-cell>
          <ns4:table-cell ns0:value-type="string" ns6:value-type="string">
            <ns7:p>Flower Mound</ns7:p>
          </ns4:table-cell>
          <ns4:table-cell ns0:value-type="string" ns6:value-type="string">
            <ns7:p>TX</ns7:p>
          </ns4:table-cell>
          <ns4:table-cell ns0:value-type="string" ns6:value-type="string">
            <ns7:p>79540</ns7:p>
          </ns4:table-cell>
          <ns4:table-cell ns4:number-columns-repeated="9"/>
        </ns4:table-row>
        <ns4:table-row ns4:style-name="ro1">
          <ns4:table-cell ns0:value-type="string" ns6:value-type="string">
            <ns7:p>468.0</ns7:p>
          </ns4:table-cell>
          <ns4:table-cell ns0:value-type="string" ns6:value-type="string">
            <ns7:p>Upland</ns7:p>
          </ns4:table-cell>
          <ns4:table-cell ns0:value-type="string" ns6:value-type="string">
            <ns7:p>CA</ns7:p>
          </ns4:table-cell>
          <ns4:table-cell ns0:value-type="string" ns6:value-type="string">
            <ns7:p>79446</ns7:p>
          </ns4:table-cell>
          <ns4:table-cell ns4:number-columns-repeated="9"/>
        </ns4:table-row>
        <ns4:table-row ns4:style-name="ro1">
          <ns4:table-cell ns0:value-type="string" ns6:value-type="string">
            <ns7:p>469.0</ns7:p>
          </ns4:table-cell>
          <ns4:table-cell ns0:value-type="string" ns6:value-type="string">
            <ns7:p>Flint</ns7:p>
          </ns4:table-cell>
          <ns4:table-cell ns0:value-type="string" ns6:value-type="string">
            <ns7:p>MI</ns7:p>
          </ns4:table-cell>
          <ns4:table-cell ns0:value-type="string" ns6:value-type="string">
            <ns7:p>79306</ns7:p>
          </ns4:table-cell>
          <ns4:table-cell ns4:number-columns-repeated="9"/>
        </ns4:table-row>
        <ns4:table-row ns4:style-name="ro1">
          <ns4:table-cell ns0:value-type="string" ns6:value-type="string">
            <ns7:p>470.0</ns7:p>
          </ns4:table-cell>
          <ns4:table-cell ns0:value-type="string" ns6:value-type="string">
            <ns7:p>Lakeville</ns7:p>
          </ns4:table-cell>
          <ns4:table-cell ns0:value-type="string" ns6:value-type="string">
            <ns7:p>MN</ns7:p>
          </ns4:table-cell>
          <ns4:table-cell ns0:value-type="string" ns6:value-type="string">
            <ns7:p>79270</ns7:p>
          </ns4:table-cell>
          <ns4:table-cell ns4:number-columns-repeated="9"/>
        </ns4:table-row>
        <ns4:table-row ns4:style-name="ro1">
          <ns4:table-cell ns0:value-type="string" ns6:value-type="string">
            <ns7:p>471.0</ns7:p>
          </ns4:table-cell>
          <ns4:table-cell ns0:value-type="string" ns6:value-type="string">
            <ns7:p>Broomfield</ns7:p>
          </ns4:table-cell>
          <ns4:table-cell ns0:value-type="string" ns6:value-type="string">
            <ns7:p>CO</ns7:p>
          </ns4:table-cell>
          <ns4:table-cell ns0:value-type="string" ns6:value-type="string">
            <ns7:p>79174</ns7:p>
          </ns4:table-cell>
          <ns4:table-cell ns4:number-columns-repeated="9"/>
        </ns4:table-row>
        <ns4:table-row ns4:style-name="ro1">
          <ns4:table-cell ns0:value-type="string" ns6:value-type="string">
            <ns7:p>472.0</ns7:p>
          </ns4:table-cell>
          <ns4:table-cell ns0:value-type="string" ns6:value-type="string">
            <ns7:p>Cedar Park</ns7:p>
          </ns4:table-cell>
          <ns4:table-cell ns0:value-type="string" ns6:value-type="string">
            <ns7:p>TX</ns7:p>
          </ns4:table-cell>
          <ns4:table-cell ns0:value-type="string" ns6:value-type="string">
            <ns7:p>79032</ns7:p>
          </ns4:table-cell>
          <ns4:table-cell ns4:number-columns-repeated="9"/>
        </ns4:table-row>
        <ns4:table-row ns4:style-name="ro1">
          <ns4:table-cell ns0:value-type="string" ns6:value-type="string">
            <ns7:p>473.0</ns7:p>
          </ns4:table-cell>
          <ns4:table-cell ns0:value-type="string" ns6:value-type="string">
            <ns7:p>Plymouth</ns7:p>
          </ns4:table-cell>
          <ns4:table-cell ns0:value-type="string" ns6:value-type="string">
            <ns7:p>MN</ns7:p>
          </ns4:table-cell>
          <ns4:table-cell ns0:value-type="string" ns6:value-type="string">
            <ns7:p>78942</ns7:p>
          </ns4:table-cell>
          <ns4:table-cell ns4:number-columns-repeated="9"/>
        </ns4:table-row>
        <ns4:table-row ns4:style-name="ro1">
          <ns4:table-cell ns0:value-type="string" ns6:value-type="string">
            <ns7:p>474.0</ns7:p>
          </ns4:table-cell>
          <ns4:table-cell ns0:value-type="string" ns6:value-type="string">
            <ns7:p>Missoula</ns7:p>
          </ns4:table-cell>
          <ns4:table-cell ns0:value-type="string" ns6:value-type="string">
            <ns7:p>MT</ns7:p>
          </ns4:table-cell>
          <ns4:table-cell ns0:value-type="string" ns6:value-type="string">
            <ns7:p>78903</ns7:p>
          </ns4:table-cell>
          <ns4:table-cell ns4:number-columns-repeated="9">
            <ns7:p>Plumb-Tech Plumbing, Heating &amp; Drain Missoula</ns7:p>
          </ns4:table-cell>
        </ns4:table-row>
        <ns4:table-row ns4:style-name="ro1">
          <ns4:table-cell ns0:value-type="string" ns6:value-type="string">
            <ns7:p>475.0</ns7:p>
          </ns4:table-cell>
          <ns4:table-cell ns0:value-type="string" ns6:value-type="string">
            <ns7:p>Mableton</ns7:p>
          </ns4:table-cell>
          <ns4:table-cell ns0:value-type="string" ns6:value-type="string">
            <ns7:p>GA</ns7:p>
          </ns4:table-cell>
          <ns4:table-cell ns0:value-type="string" ns6:value-type="string">
            <ns7:p>78820</ns7:p>
          </ns4:table-cell>
          <ns4:table-cell ns4:number-columns-repeated="9"/>
        </ns4:table-row>
        <ns4:table-row ns4:style-name="ro1">
          <ns4:table-cell ns0:value-type="string" ns6:value-type="string">
            <ns7:p>476.0</ns7:p>
          </ns4:table-cell>
          <ns4:table-cell ns0:value-type="string" ns6:value-type="string">
            <ns7:p>Bloomington</ns7:p>
          </ns4:table-cell>
          <ns4:table-cell ns0:value-type="string" ns6:value-type="string">
            <ns7:p>IL</ns7:p>
          </ns4:table-cell>
          <ns4:table-cell ns0:value-type="string" ns6:value-type="string">
            <ns7:p>78804</ns7:p>
          </ns4:table-cell>
          <ns4:table-cell ns4:number-columns-repeated="9"/>
        </ns4:table-row>
        <ns4:table-row ns4:style-name="ro1">
          <ns4:table-cell ns0:value-type="string" ns6:value-type="string">
            <ns7:p>477.0</ns7:p>
          </ns4:table-cell>
          <ns4:table-cell ns0:value-type="string" ns6:value-type="string">
            <ns7:p>Milpitas</ns7:p>
          </ns4:table-cell>
          <ns4:table-cell ns0:value-type="string" ns6:value-type="string">
            <ns7:p>CA</ns7:p>
          </ns4:table-cell>
          <ns4:table-cell ns0:value-type="string" ns6:value-type="string">
            <ns7:p>78596</ns7:p>
          </ns4:table-cell>
          <ns4:table-cell ns4:number-columns-repeated="9"/>
        </ns4:table-row>
        <ns4:table-row ns4:style-name="ro1">
          <ns4:table-cell ns0:value-type="string" ns6:value-type="string">
            <ns7:p>478.0</ns7:p>
          </ns4:table-cell>
          <ns4:table-cell ns0:value-type="string" ns6:value-type="string">
            <ns7:p>Wyoming</ns7:p>
          </ns4:table-cell>
          <ns4:table-cell ns0:value-type="string" ns6:value-type="string">
            <ns7:p>MI</ns7:p>
          </ns4:table-cell>
          <ns4:table-cell ns0:value-type="string" ns6:value-type="string">
            <ns7:p>78588</ns7:p>
          </ns4:table-cell>
          <ns4:table-cell ns4:number-columns-repeated="9"/>
        </ns4:table-row>
        <ns4:table-row ns4:style-name="ro1">
          <ns4:table-cell ns0:value-type="string" ns6:value-type="string">
            <ns7:p>479.0</ns7:p>
          </ns4:table-cell>
          <ns4:table-cell ns0:value-type="string" ns6:value-type="string">
            <ns7:p>Parma</ns7:p>
          </ns4:table-cell>
          <ns4:table-cell ns0:value-type="string" ns6:value-type="string">
            <ns7:p>OH</ns7:p>
          </ns4:table-cell>
          <ns4:table-cell ns0:value-type="string" ns6:value-type="string">
            <ns7:p>78581</ns7:p>
          </ns4:table-cell>
          <ns4:table-cell ns4:number-columns-repeated="9"/>
        </ns4:table-row>
        <ns4:table-row ns4:style-name="ro1">
          <ns4:table-cell ns0:value-type="string" ns6:value-type="string">
            <ns7:p>480.0</ns7:p>
          </ns4:table-cell>
          <ns4:table-cell ns0:value-type="string" ns6:value-type="string">
            <ns7:p>St. George</ns7:p>
          </ns4:table-cell>
          <ns4:table-cell ns0:value-type="string" ns6:value-type="string">
            <ns7:p>LA</ns7:p>
          </ns4:table-cell>
          <ns4:table-cell ns0:value-type="string" ns6:value-type="string">
            <ns7:p>78536</ns7:p>
          </ns4:table-cell>
          <ns4:table-cell ns4:number-columns-repeated="9"/>
        </ns4:table-row>
        <ns4:table-row ns4:style-name="ro1">
          <ns4:table-cell ns0:value-type="string" ns6:value-type="string">
            <ns7:p>481.0</ns7:p>
          </ns4:table-cell>
          <ns4:table-cell ns0:value-type="string" ns6:value-type="string">
            <ns7:p>Bowling Green</ns7:p>
          </ns4:table-cell>
          <ns4:table-cell ns0:value-type="string" ns6:value-type="string">
            <ns7:p>KY</ns7:p>
          </ns4:table-cell>
          <ns4:table-cell ns0:value-type="string" ns6:value-type="string">
            <ns7:p>78505</ns7:p>
          </ns4:table-cell>
          <ns4:table-cell ns4:number-columns-repeated="9"/>
        </ns4:table-row>
        <ns4:table-row ns4:style-name="ro1">
          <ns4:table-cell ns0:value-type="string" ns6:value-type="string">
            <ns7:p>482.0</ns7:p>
          </ns4:table-cell>
          <ns4:table-cell ns0:value-type="string" ns6:value-type="string">
            <ns7:p>Maricopa</ns7:p>
          </ns4:table-cell>
          <ns4:table-cell ns0:value-type="string" ns6:value-type="string">
            <ns7:p>AZ</ns7:p>
          </ns4:table-cell>
          <ns4:table-cell ns0:value-type="string" ns6:value-type="string">
            <ns7:p>78362</ns7:p>
          </ns4:table-cell>
          <ns4:table-cell ns4:number-columns-repeated="9"/>
        </ns4:table-row>
        <ns4:table-row ns4:style-name="ro1">
          <ns4:table-cell ns0:value-type="string" ns6:value-type="string">
            <ns7:p>483.0</ns7:p>
          </ns4:table-cell>
          <ns4:table-cell ns0:value-type="string" ns6:value-type="string">
            <ns7:p>Lakewood</ns7:p>
          </ns4:table-cell>
          <ns4:table-cell ns0:value-type="string" ns6:value-type="string">
            <ns7:p>CA</ns7:p>
          </ns4:table-cell>
          <ns4:table-cell ns0:value-type="string" ns6:value-type="string">
            <ns7:p>78010</ns7:p>
          </ns4:table-cell>
          <ns4:table-cell ns4:number-columns-repeated="9"/>
        </ns4:table-row>
        <ns4:table-row ns4:style-name="ro1">
          <ns4:table-cell ns0:value-type="string" ns6:value-type="string">
            <ns7:p>484.0</ns7:p>
          </ns4:table-cell>
          <ns4:table-cell ns0:value-type="string" ns6:value-type="string">
            <ns7:p>Bismarck</ns7:p>
          </ns4:table-cell>
          <ns4:table-cell ns0:value-type="string" ns6:value-type="string">
            <ns7:p>ND</ns7:p>
          </ns4:table-cell>
          <ns4:table-cell ns0:value-type="string" ns6:value-type="string">
            <ns7:p>77963</ns7:p>
          </ns4:table-cell>
          <ns4:table-cell ns4:number-columns-repeated="9">
            <ns7:p>Timber Ridge Plumbing &amp; Heating</ns7:p>
          </ns4:table-cell>
        </ns4:table-row>
        <ns4:table-row ns4:style-name="ro1">
          <ns4:table-cell ns0:value-type="string" ns6:value-type="string">
            <ns7:p>485.0</ns7:p>
          </ns4:table-cell>
          <ns4:table-cell ns0:value-type="string" ns6:value-type="string">
            <ns7:p>Racine</ns7:p>
          </ns4:table-cell>
          <ns4:table-cell ns0:value-type="string" ns6:value-type="string">
            <ns7:p>WI</ns7:p>
          </ns4:table-cell>
          <ns4:table-cell ns0:value-type="string" ns6:value-type="string">
            <ns7:p>77908</ns7:p>
          </ns4:table-cell>
          <ns4:table-cell ns4:number-columns-repeated="9"/>
        </ns4:table-row>
        <ns4:table-row ns4:style-name="ro1">
          <ns4:table-cell ns0:value-type="string" ns6:value-type="string">
            <ns7:p>486.0</ns7:p>
          </ns4:table-cell>
          <ns4:table-cell ns0:value-type="string" ns6:value-type="string">
            <ns7:p>Tustin</ns7:p>
          </ns4:table-cell>
          <ns4:table-cell ns0:value-type="string" ns6:value-type="string">
            <ns7:p>CA</ns7:p>
          </ns4:table-cell>
          <ns4:table-cell ns0:value-type="string" ns6:value-type="string">
            <ns7:p>77843</ns7:p>
          </ns4:table-cell>
          <ns4:table-cell ns4:number-columns-repeated="9"/>
        </ns4:table-row>
        <ns4:table-row ns4:style-name="ro1">
          <ns4:table-cell ns0:value-type="string" ns6:value-type="string">
            <ns7:p>487.0</ns7:p>
          </ns4:table-cell>
          <ns4:table-cell ns0:value-type="string" ns6:value-type="string">
            <ns7:p>Ankeny</ns7:p>
          </ns4:table-cell>
          <ns4:table-cell ns0:value-type="string" ns6:value-type="string">
            <ns7:p>IA</ns7:p>
          </ns4:table-cell>
          <ns4:table-cell ns0:value-type="string" ns6:value-type="string">
            <ns7:p>77833</ns7:p>
          </ns4:table-cell>
          <ns4:table-cell ns4:number-columns-repeated="9"/>
        </ns4:table-row>
        <ns4:table-row ns4:style-name="ro1">
          <ns4:table-cell ns0:value-type="string" ns6:value-type="string">
            <ns7:p>488.0</ns7:p>
          </ns4:table-cell>
          <ns4:table-cell ns0:value-type="string" ns6:value-type="string">
            <ns7:p>San Marcos</ns7:p>
          </ns4:table-cell>
          <ns4:table-cell ns0:value-type="string" ns6:value-type="string">
            <ns7:p>TX</ns7:p>
          </ns4:table-cell>
          <ns4:table-cell ns0:value-type="string" ns6:value-type="string">
            <ns7:p>77830</ns7:p>
          </ns4:table-cell>
          <ns4:table-cell ns4:number-columns-repeated="9"/>
        </ns4:table-row>
        <ns4:table-row ns4:style-name="ro1">
          <ns4:table-cell ns0:value-type="string" ns6:value-type="string">
            <ns7:p>489.0</ns7:p>
          </ns4:table-cell>
          <ns4:table-cell ns0:value-type="string" ns6:value-type="string">
            <ns7:p>Marysville</ns7:p>
          </ns4:table-cell>
          <ns4:table-cell ns0:value-type="string" ns6:value-type="string">
            <ns7:p>WA</ns7:p>
          </ns4:table-cell>
          <ns4:table-cell ns0:value-type="string" ns6:value-type="string">
            <ns7:p>77686</ns7:p>
          </ns4:table-cell>
          <ns4:table-cell ns4:number-columns-repeated="9"/>
        </ns4:table-row>
        <ns4:table-row ns4:style-name="ro1">
          <ns4:table-cell ns0:value-type="string" ns6:value-type="string">
            <ns7:p>490.0</ns7:p>
          </ns4:table-cell>
          <ns4:table-cell ns0:value-type="string" ns6:value-type="string">
            <ns7:p>Pittsburg</ns7:p>
          </ns4:table-cell>
          <ns4:table-cell ns0:value-type="string" ns6:value-type="string">
            <ns7:p>CA</ns7:p>
          </ns4:table-cell>
          <ns4:table-cell ns0:value-type="string" ns6:value-type="string">
            <ns7:p>77542</ns7:p>
          </ns4:table-cell>
          <ns4:table-cell ns4:number-columns-repeated="9"/>
        </ns4:table-row>
        <ns4:table-row ns4:style-name="ro1">
          <ns4:table-cell ns0:value-type="string" ns6:value-type="string">
            <ns7:p>491.0</ns7:p>
          </ns4:table-cell>
          <ns4:table-cell ns0:value-type="string" ns6:value-type="string">
            <ns7:p>Rochester Hills</ns7:p>
          </ns4:table-cell>
          <ns4:table-cell ns0:value-type="string" ns6:value-type="string">
            <ns7:p>MI</ns7:p>
          </ns4:table-cell>
          <ns4:table-cell ns0:value-type="string" ns6:value-type="string">
            <ns7:p>77539</ns7:p>
          </ns4:table-cell>
          <ns4:table-cell ns4:number-columns-repeated="9"/>
        </ns4:table-row>
        <ns4:table-row ns4:style-name="ro1">
          <ns4:table-cell ns0:value-type="string" ns6:value-type="string">
            <ns7:p>492.0</ns7:p>
          </ns4:table-cell>
          <ns4:table-cell ns0:value-type="string" ns6:value-type="string">
            <ns7:p>Chino Hills</ns7:p>
          </ns4:table-cell>
          <ns4:table-cell ns0:value-type="string" ns6:value-type="string">
            <ns7:p>CA</ns7:p>
          </ns4:table-cell>
          <ns4:table-cell ns0:value-type="string" ns6:value-type="string">
            <ns7:p>77519</ns7:p>
          </ns4:table-cell>
          <ns4:table-cell ns4:number-columns-repeated="9"/>
        </ns4:table-row>
        <ns4:table-row ns4:style-name="ro1">
          <ns4:table-cell ns0:value-type="string" ns6:value-type="string">
            <ns7:p>493.0</ns7:p>
          </ns4:table-cell>
          <ns4:table-cell ns0:value-type="string" ns6:value-type="string">
            <ns7:p>Missouri City</ns7:p>
          </ns4:table-cell>
          <ns4:table-cell ns0:value-type="string" ns6:value-type="string">
            <ns7:p>TX</ns7:p>
          </ns4:table-cell>
          <ns4:table-cell ns0:value-type="string" ns6:value-type="string">
            <ns7:p>77327</ns7:p>
          </ns4:table-cell>
          <ns4:table-cell ns4:number-columns-repeated="9"/>
        </ns4:table-row>
        <ns4:table-row ns4:style-name="ro1">
          <ns4:table-cell ns0:value-type="string" ns6:value-type="string">
            <ns7:p>494.0</ns7:p>
          </ns4:table-cell>
          <ns4:table-cell ns0:value-type="string" ns6:value-type="string">
            <ns7:p>Flagstaff</ns7:p>
          </ns4:table-cell>
          <ns4:table-cell ns0:value-type="string" ns6:value-type="string">
            <ns7:p>AZ</ns7:p>
          </ns4:table-cell>
          <ns4:table-cell ns0:value-type="string" ns6:value-type="string">
            <ns7:p>77260</ns7:p>
          </ns4:table-cell>
          <ns4:table-cell ns4:number-columns-repeated="9"/>
        </ns4:table-row>
        <ns4:table-row ns4:style-name="ro1">
          <ns4:table-cell ns0:value-type="string" ns6:value-type="string">
            <ns7:p>495.0</ns7:p>
          </ns4:table-cell>
          <ns4:table-cell ns0:value-type="string" ns6:value-type="string">
            <ns7:p>Schaumburg</ns7:p>
          </ns4:table-cell>
          <ns4:table-cell ns0:value-type="string" ns6:value-type="string">
            <ns7:p>IL</ns7:p>
          </ns4:table-cell>
          <ns4:table-cell ns0:value-type="string" ns6:value-type="string">
            <ns7:p>77249</ns7:p>
          </ns4:table-cell>
          <ns4:table-cell ns4:number-columns-repeated="9"/>
        </ns4:table-row>
        <ns4:table-row ns4:style-name="ro1">
          <ns4:table-cell ns0:value-type="string" ns6:value-type="string">
            <ns7:p>496.0</ns7:p>
          </ns4:table-cell>
          <ns4:table-cell ns0:value-type="string" ns6:value-type="string">
            <ns7:p>Pawtucket</ns7:p>
          </ns4:table-cell>
          <ns4:table-cell ns0:value-type="string" ns6:value-type="string">
            <ns7:p>RI</ns7:p>
          </ns4:table-cell>
          <ns4:table-cell ns0:value-type="string" ns6:value-type="string">
            <ns7:p>77065</ns7:p>
          </ns4:table-cell>
          <ns4:table-cell ns4:number-columns-repeated="9"/>
        </ns4:table-row>
        <ns4:table-row ns4:style-name="ro1">
          <ns4:table-cell ns0:value-type="string" ns6:value-type="string">
            <ns7:p>497.0</ns7:p>
          </ns4:table-cell>
          <ns4:table-cell ns0:value-type="string" ns6:value-type="string">
            <ns7:p>Rogers</ns7:p>
          </ns4:table-cell>
          <ns4:table-cell ns0:value-type="string" ns6:value-type="string">
            <ns7:p>AR</ns7:p>
          </ns4:table-cell>
          <ns4:table-cell ns0:value-type="string" ns6:value-type="string">
            <ns7:p>76956</ns7:p>
          </ns4:table-cell>
          <ns4:table-cell ns4:number-columns-repeated="9">
            <ns7:p>Kinty Jones Plumbing</ns7:p>
          </ns4:table-cell>
        </ns4:table-row>
        <ns4:table-row ns4:style-name="ro1">
          <ns4:table-cell ns0:value-type="string" ns6:value-type="string">
            <ns7:p>498.0</ns7:p>
          </ns4:table-cell>
          <ns4:table-cell ns0:value-type="string" ns6:value-type="string">
            <ns7:p>Alameda</ns7:p>
          </ns4:table-cell>
          <ns4:table-cell ns0:value-type="string" ns6:value-type="string">
            <ns7:p>CA</ns7:p>
          </ns4:table-cell>
          <ns4:table-cell ns0:value-type="string" ns6:value-type="string">
            <ns7:p>76876</ns7:p>
          </ns4:table-cell>
          <ns4:table-cell ns4:number-columns-repeated="9"/>
        </ns4:table-row>
        <ns4:table-row ns4:style-name="ro1">
          <ns4:table-cell ns0:value-type="string" ns6:value-type="string">
            <ns7:p>499.0</ns7:p>
          </ns4:table-cell>
          <ns4:table-cell ns0:value-type="string" ns6:value-type="string">
            <ns7:p>Rocklin</ns7:p>
          </ns4:table-cell>
          <ns4:table-cell ns0:value-type="string" ns6:value-type="string">
            <ns7:p>CA</ns7:p>
          </ns4:table-cell>
          <ns4:table-cell ns0:value-type="string" ns6:value-type="string">
            <ns7:p>76821</ns7:p>
          </ns4:table-cell>
          <ns4:table-cell ns4:number-columns-repeated="9"/>
        </ns4:table-row>
        <ns4:table-row ns4:style-name="ro1">
          <ns4:table-cell ns0:value-type="string" ns6:value-type="string">
            <ns7:p>500.0</ns7:p>
          </ns4:table-cell>
          <ns4:table-cell ns0:value-type="string" ns6:value-type="string">
            <ns7:p>Caldwell</ns7:p>
          </ns4:table-cell>
          <ns4:table-cell ns0:value-type="string" ns6:value-type="string">
            <ns7:p>ID</ns7:p>
          </ns4:table-cell>
          <ns4:table-cell ns0:value-type="string" ns6:value-type="string">
            <ns7:p>76629</ns7:p>
          </ns4:table-cell>
          <ns4:table-cell ns4:number-columns-repeated="9"/>
        </ns4:table-row>
        <ns4:table-row ns4:style-name="ro1">
          <ns4:table-cell ns0:value-type="string" ns6:value-type="string">
            <ns7:p>501.0</ns7:p>
          </ns4:table-cell>
          <ns4:table-cell ns0:value-type="string" ns6:value-type="string">
            <ns7:p>Blaine</ns7:p>
          </ns4:table-cell>
          <ns4:table-cell ns0:value-type="string" ns6:value-type="string">
            <ns7:p>MN</ns7:p>
          </ns4:table-cell>
          <ns4:table-cell ns0:value-type="string" ns6:value-type="string">
            <ns7:p>76603</ns7:p>
          </ns4:table-cell>
          <ns4:table-cell ns4:number-columns-repeated="9"/>
        </ns4:table-row>
        <ns4:table-row ns4:style-name="ro1">
          <ns4:table-cell ns0:value-type="string" ns6:value-type="string">
            <ns7:p>502.0</ns7:p>
          </ns4:table-cell>
          <ns4:table-cell ns0:value-type="string" ns6:value-type="string">
            <ns7:p>Napa</ns7:p>
          </ns4:table-cell>
          <ns4:table-cell ns0:value-type="string" ns6:value-type="string">
            <ns7:p>CA</ns7:p>
          </ns4:table-cell>
          <ns4:table-cell ns0:value-type="string" ns6:value-type="string">
            <ns7:p>76562</ns7:p>
          </ns4:table-cell>
          <ns4:table-cell ns4:number-columns-repeated="9"/>
        </ns4:table-row>
        <ns4:table-row ns4:style-name="ro1">
          <ns4:table-cell ns0:value-type="string" ns6:value-type="string">
            <ns7:p>503.0</ns7:p>
          </ns4:table-cell>
          <ns4:table-cell ns0:value-type="string" ns6:value-type="string">
            <ns7:p>Gulfport</ns7:p>
          </ns4:table-cell>
          <ns4:table-cell ns0:value-type="string" ns6:value-type="string">
            <ns7:p>MS</ns7:p>
          </ns4:table-cell>
          <ns4:table-cell ns0:value-type="string" ns6:value-type="string">
            <ns7:p>76506</ns7:p>
          </ns4:table-cell>
          <ns4:table-cell ns4:number-columns-repeated="9">
            <ns7:p>A Royal Flush Plumbing Company</ns7:p>
          </ns4:table-cell>
        </ns4:table-row>
        <ns4:table-row ns4:style-name="ro1">
          <ns4:table-cell ns0:value-type="string" ns6:value-type="string">
            <ns7:p>504.0</ns7:p>
          </ns4:table-cell>
          <ns4:table-cell ns0:value-type="string" ns6:value-type="string">
            <ns7:p>Evanston</ns7:p>
          </ns4:table-cell>
          <ns4:table-cell ns0:value-type="string" ns6:value-type="string">
            <ns7:p>IL</ns7:p>
          </ns4:table-cell>
          <ns4:table-cell ns0:value-type="string" ns6:value-type="string">
            <ns7:p>76380</ns7:p>
          </ns4:table-cell>
          <ns4:table-cell ns4:number-columns-repeated="9"/>
        </ns4:table-row>
        <ns4:table-row ns4:style-name="ro1">
          <ns4:table-cell ns0:value-type="string" ns6:value-type="string">
            <ns7:p>505.0</ns7:p>
          </ns4:table-cell>
          <ns4:table-cell ns0:value-type="string" ns6:value-type="string">
            <ns7:p>New Britain</ns7:p>
          </ns4:table-cell>
          <ns4:table-cell ns0:value-type="string" ns6:value-type="string">
            <ns7:p>CT</ns7:p>
          </ns4:table-cell>
          <ns4:table-cell ns0:value-type="string" ns6:value-type="string">
            <ns7:p>76286</ns7:p>
          </ns4:table-cell>
          <ns4:table-cell ns4:number-columns-repeated="9"/>
        </ns4:table-row>
        <ns4:table-row ns4:style-name="ro1">
          <ns4:table-cell ns0:value-type="string" ns6:value-type="string">
            <ns7:p>506.0</ns7:p>
          </ns4:table-cell>
          <ns4:table-cell ns0:value-type="string" ns6:value-type="string">
            <ns7:p>Iowa City</ns7:p>
          </ns4:table-cell>
          <ns4:table-cell ns0:value-type="string" ns6:value-type="string">
            <ns7:p>IA</ns7:p>
          </ns4:table-cell>
          <ns4:table-cell ns0:value-type="string" ns6:value-type="string">
            <ns7:p>76229</ns7:p>
          </ns4:table-cell>
          <ns4:table-cell ns4:number-columns-repeated="9"/>
        </ns4:table-row>
        <ns4:table-row ns4:style-name="ro1">
          <ns4:table-cell ns0:value-type="string" ns6:value-type="string">
            <ns7:p>507.0</ns7:p>
          </ns4:table-cell>
          <ns4:table-cell ns0:value-type="string" ns6:value-type="string">
            <ns7:p>Arlington Heights</ns7:p>
          </ns4:table-cell>
          <ns4:table-cell ns0:value-type="string" ns6:value-type="string">
            <ns7:p>IL</ns7:p>
          </ns4:table-cell>
          <ns4:table-cell ns0:value-type="string" ns6:value-type="string">
            <ns7:p>76216</ns7:p>
          </ns4:table-cell>
          <ns4:table-cell ns4:number-columns-repeated="9"/>
        </ns4:table-row>
        <ns4:table-row ns4:style-name="ro1">
          <ns4:table-cell ns0:value-type="string" ns6:value-type="string">
            <ns7:p>508.0</ns7:p>
          </ns4:table-cell>
          <ns4:table-cell ns0:value-type="string" ns6:value-type="string">
            <ns7:p>Noblesville</ns7:p>
          </ns4:table-cell>
          <ns4:table-cell ns0:value-type="string" ns6:value-type="string">
            <ns7:p>IN</ns7:p>
          </ns4:table-cell>
          <ns4:table-cell ns0:value-type="string" ns6:value-type="string">
            <ns7:p>76111</ns7:p>
          </ns4:table-cell>
          <ns4:table-cell ns4:number-columns-repeated="9"/>
        </ns4:table-row>
        <ns4:table-row ns4:style-name="ro1">
          <ns4:table-cell ns0:value-type="string" ns6:value-type="string">
            <ns7:p>508.0</ns7:p>
          </ns4:table-cell>
          <ns4:table-cell ns0:value-type="string" ns6:value-type="string">
            <ns7:p>Southfield</ns7:p>
          </ns4:table-cell>
          <ns4:table-cell ns0:value-type="string" ns6:value-type="string">
            <ns7:p>MI</ns7:p>
          </ns4:table-cell>
          <ns4:table-cell ns0:value-type="string" ns6:value-type="string">
            <ns7:p>76111</ns7:p>
          </ns4:table-cell>
          <ns4:table-cell ns4:number-columns-repeated="9"/>
        </ns4:table-row>
        <ns4:table-row ns4:style-name="ro1">
          <ns4:table-cell ns0:value-type="string" ns6:value-type="string">
            <ns7:p>510.0</ns7:p>
          </ns4:table-cell>
          <ns4:table-cell ns0:value-type="string" ns6:value-type="string">
            <ns7:p>Rock Hill</ns7:p>
          </ns4:table-cell>
          <ns4:table-cell ns0:value-type="string" ns6:value-type="string">
            <ns7:p>SC</ns7:p>
          </ns4:table-cell>
          <ns4:table-cell ns0:value-type="string" ns6:value-type="string">
            <ns7:p>75911</ns7:p>
          </ns4:table-cell>
          <ns4:table-cell ns4:number-columns-repeated="9"/>
        </ns4:table-row>
        <ns4:table-row ns4:style-name="ro1">
          <ns4:table-cell ns0:value-type="string" ns6:value-type="string">
            <ns7:p>511.0</ns7:p>
          </ns4:table-cell>
          <ns4:table-cell ns0:value-type="string" ns6:value-type="string">
            <ns7:p>Hammond</ns7:p>
          </ns4:table-cell>
          <ns4:table-cell ns0:value-type="string" ns6:value-type="string">
            <ns7:p>IN</ns7:p>
          </ns4:table-cell>
          <ns4:table-cell ns0:value-type="string" ns6:value-type="string">
            <ns7:p>75712</ns7:p>
          </ns4:table-cell>
          <ns4:table-cell ns4:number-columns-repeated="9"/>
        </ns4:table-row>
        <ns4:table-row ns4:style-name="ro1">
          <ns4:table-cell ns0:value-type="string" ns6:value-type="string">
            <ns7:p>512.0</ns7:p>
          </ns4:table-cell>
          <ns4:table-cell ns0:value-type="string" ns6:value-type="string">
            <ns7:p>Lauderhill</ns7:p>
          </ns4:table-cell>
          <ns4:table-cell ns0:value-type="string" ns6:value-type="string">
            <ns7:p>FL</ns7:p>
          </ns4:table-cell>
          <ns4:table-cell ns0:value-type="string" ns6:value-type="string">
            <ns7:p>75668</ns7:p>
          </ns4:table-cell>
          <ns4:table-cell ns4:number-columns-repeated="9"/>
        </ns4:table-row>
        <ns4:table-row ns4:style-name="ro1">
          <ns4:table-cell ns0:value-type="string" ns6:value-type="string">
            <ns7:p>513.0</ns7:p>
          </ns4:table-cell>
          <ns4:table-cell ns0:value-type="string" ns6:value-type="string">
            <ns7:p>Scranton</ns7:p>
          </ns4:table-cell>
          <ns4:table-cell ns0:value-type="string" ns6:value-type="string">
            <ns7:p>PA</ns7:p>
          </ns4:table-cell>
          <ns4:table-cell ns0:value-type="string" ns6:value-type="string">
            <ns7:p>75514</ns7:p>
          </ns4:table-cell>
          <ns4:table-cell ns4:number-columns-repeated="9"/>
        </ns4:table-row>
        <ns4:table-row ns4:style-name="ro1">
          <ns4:table-cell ns0:value-type="string" ns6:value-type="string">
            <ns7:p>514.0</ns7:p>
          </ns4:table-cell>
          <ns4:table-cell ns0:value-type="string" ns6:value-type="string">
            <ns7:p>Appleton</ns7:p>
          </ns4:table-cell>
          <ns4:table-cell ns0:value-type="string" ns6:value-type="string">
            <ns7:p>WI</ns7:p>
          </ns4:table-cell>
          <ns4:table-cell ns0:value-type="string" ns6:value-type="string">
            <ns7:p>75452</ns7:p>
          </ns4:table-cell>
          <ns4:table-cell ns4:number-columns-repeated="9"/>
        </ns4:table-row>
        <ns4:table-row ns4:style-name="ro1">
          <ns4:table-cell ns0:value-type="string" ns6:value-type="string">
            <ns7:p>515.0</ns7:p>
          </ns4:table-cell>
          <ns4:table-cell ns0:value-type="string" ns6:value-type="string">
            <ns7:p>Greenville</ns7:p>
          </ns4:table-cell>
          <ns4:table-cell ns0:value-type="string" ns6:value-type="string">
            <ns7:p>SC</ns7:p>
          </ns4:table-cell>
          <ns4:table-cell ns0:value-type="string" ns6:value-type="string">
            <ns7:p>75310</ns7:p>
          </ns4:table-cell>
          <ns4:table-cell ns4:number-columns-repeated="9"/>
        </ns4:table-row>
        <ns4:table-row ns4:style-name="ro1">
          <ns4:table-cell ns0:value-type="string" ns6:value-type="string">
            <ns7:p>516.0</ns7:p>
          </ns4:table-cell>
          <ns4:table-cell ns0:value-type="string" ns6:value-type="string">
            <ns7:p>Apple Valley</ns7:p>
          </ns4:table-cell>
          <ns4:table-cell ns0:value-type="string" ns6:value-type="string">
            <ns7:p>CA</ns7:p>
          </ns4:table-cell>
          <ns4:table-cell ns0:value-type="string" ns6:value-type="string">
            <ns7:p>75247</ns7:p>
          </ns4:table-cell>
          <ns4:table-cell ns4:number-columns-repeated="9"/>
        </ns4:table-row>
        <ns4:table-row ns4:style-name="ro1">
          <ns4:table-cell ns0:value-type="string" ns6:value-type="string">
            <ns7:p>517.0</ns7:p>
          </ns4:table-cell>
          <ns4:table-cell ns0:value-type="string" ns6:value-type="string">
            <ns7:p>Lake Elsinore</ns7:p>
          </ns4:table-cell>
          <ns4:table-cell ns0:value-type="string" ns6:value-type="string">
            <ns7:p>CA</ns7:p>
          </ns4:table-cell>
          <ns4:table-cell ns0:value-type="string" ns6:value-type="string">
            <ns7:p>75067</ns7:p>
          </ns4:table-cell>
          <ns4:table-cell ns4:number-columns-repeated="9"/>
        </ns4:table-row>
        <ns4:table-row ns4:style-name="ro1">
          <ns4:table-cell ns0:value-type="string" ns6:value-type="string">
            <ns7:p>518.0</ns7:p>
          </ns4:table-cell>
          <ns4:table-cell ns0:value-type="string" ns6:value-type="string">
            <ns7:p>St. Cloud</ns7:p>
          </ns4:table-cell>
          <ns4:table-cell ns0:value-type="string" ns6:value-type="string">
            <ns7:p>FL</ns7:p>
          </ns4:table-cell>
          <ns4:table-cell ns0:value-type="string" ns6:value-type="string">
            <ns7:p>74960</ns7:p>
          </ns4:table-cell>
          <ns4:table-cell ns4:number-columns-repeated="9"/>
        </ns4:table-row>
        <ns4:table-row ns4:style-name="ro1">
          <ns4:table-cell ns0:value-type="string" ns6:value-type="string">
            <ns7:p>519.0</ns7:p>
          </ns4:table-cell>
          <ns4:table-cell ns0:value-type="string" ns6:value-type="string">
            <ns7:p>Johnson City</ns7:p>
          </ns4:table-cell>
          <ns4:table-cell ns0:value-type="string" ns6:value-type="string">
            <ns7:p>TN</ns7:p>
          </ns4:table-cell>
          <ns4:table-cell ns0:value-type="string" ns6:value-type="string">
            <ns7:p>74943</ns7:p>
          </ns4:table-cell>
          <ns4:table-cell ns4:number-columns-repeated="9"/>
        </ns4:table-row>
        <ns4:table-row ns4:style-name="ro1">
          <ns4:table-cell ns0:value-type="string" ns6:value-type="string">
            <ns7:p>520.0</ns7:p>
          </ns4:table-cell>
          <ns4:table-cell ns0:value-type="string" ns6:value-type="string">
            <ns7:p>Bolingbrook</ns7:p>
          </ns4:table-cell>
          <ns4:table-cell ns0:value-type="string" ns6:value-type="string">
            <ns7:p>IL</ns7:p>
          </ns4:table-cell>
          <ns4:table-cell ns0:value-type="string" ns6:value-type="string">
            <ns7:p>74803</ns7:p>
          </ns4:table-cell>
          <ns4:table-cell ns4:number-columns-repeated="9"/>
        </ns4:table-row>
        <ns4:table-row ns4:style-name="ro1">
          <ns4:table-cell ns0:value-type="string" ns6:value-type="string">
            <ns7:p>521.0</ns7:p>
          </ns4:table-cell>
          <ns4:table-cell ns0:value-type="string" ns6:value-type="string">
            <ns7:p>Bayonne</ns7:p>
          </ns4:table-cell>
          <ns4:table-cell ns0:value-type="string" ns6:value-type="string">
            <ns7:p>NJ</ns7:p>
          </ns4:table-cell>
          <ns4:table-cell ns0:value-type="string" ns6:value-type="string">
            <ns7:p>74744</ns7:p>
          </ns4:table-cell>
          <ns4:table-cell ns4:number-columns-repeated="9"/>
        </ns4:table-row>
        <ns4:table-row ns4:style-name="ro1">
          <ns4:table-cell ns0:value-type="string" ns6:value-type="string">
            <ns7:p>522.0</ns7:p>
          </ns4:table-cell>
          <ns4:table-cell ns0:value-type="string" ns6:value-type="string">
            <ns7:p>Bellflower</ns7:p>
          </ns4:table-cell>
          <ns4:table-cell ns0:value-type="string" ns6:value-type="string">
            <ns7:p>CA</ns7:p>
          </ns4:table-cell>
          <ns4:table-cell ns0:value-type="string" ns6:value-type="string">
            <ns7:p>74719</ns7:p>
          </ns4:table-cell>
          <ns4:table-cell ns4:number-columns-repeated="9"/>
        </ns4:table-row>
        <ns4:table-row ns4:style-name="ro1">
          <ns4:table-cell ns0:value-type="string" ns6:value-type="string">
            <ns7:p>523.0</ns7:p>
          </ns4:table-cell>
          <ns4:table-cell ns0:value-type="string" ns6:value-type="string">
            <ns7:p>Pleasanton</ns7:p>
          </ns4:table-cell>
          <ns4:table-cell ns0:value-type="string" ns6:value-type="string">
            <ns7:p>CA</ns7:p>
          </ns4:table-cell>
          <ns4:table-cell ns0:value-type="string" ns6:value-type="string">
            <ns7:p>74556</ns7:p>
          </ns4:table-cell>
          <ns4:table-cell ns4:number-columns-repeated="9"/>
        </ns4:table-row>
        <ns4:table-row ns4:style-name="ro1">
          <ns4:table-cell ns0:value-type="string" ns6:value-type="string">
            <ns7:p>524.0</ns7:p>
          </ns4:table-cell>
          <ns4:table-cell ns0:value-type="string" ns6:value-type="string">
            <ns7:p>West Des Moines</ns7:p>
          </ns4:table-cell>
          <ns4:table-cell ns0:value-type="string" ns6:value-type="string">
            <ns7:p>IA</ns7:p>
          </ns4:table-cell>
          <ns4:table-cell ns0:value-type="string" ns6:value-type="string">
            <ns7:p>74224</ns7:p>
          </ns4:table-cell>
          <ns4:table-cell ns4:number-columns-repeated="9"/>
        </ns4:table-row>
        <ns4:table-row ns4:style-name="ro1">
          <ns4:table-cell ns0:value-type="string" ns6:value-type="string">
            <ns7:p>525.0</ns7:p>
          </ns4:table-cell>
          <ns4:table-cell ns0:value-type="string" ns6:value-type="string">
            <ns7:p>Tamarac</ns7:p>
          </ns4:table-cell>
          <ns4:table-cell ns0:value-type="string" ns6:value-type="string">
            <ns7:p>FL</ns7:p>
          </ns4:table-cell>
          <ns4:table-cell ns0:value-type="string" ns6:value-type="string">
            <ns7:p>74134</ns7:p>
          </ns4:table-cell>
          <ns4:table-cell ns4:number-columns-repeated="9"/>
        </ns4:table-row>
        <ns4:table-row ns4:style-name="ro1">
          <ns4:table-cell ns0:value-type="string" ns6:value-type="string">
            <ns7:p>526.0</ns7:p>
          </ns4:table-cell>
          <ns4:table-cell ns0:value-type="string" ns6:value-type="string">
            <ns7:p>Redlands</ns7:p>
          </ns4:table-cell>
          <ns4:table-cell ns0:value-type="string" ns6:value-type="string">
            <ns7:p>CA</ns7:p>
          </ns4:table-cell>
          <ns4:table-cell ns0:value-type="string" ns6:value-type="string">
            <ns7:p>74128</ns7:p>
          </ns4:table-cell>
          <ns4:table-cell ns4:number-columns-repeated="9"/>
        </ns4:table-row>
        <ns4:table-row ns4:style-name="ro1">
          <ns4:table-cell ns0:value-type="string" ns6:value-type="string">
            <ns7:p>527.0</ns7:p>
          </ns4:table-cell>
          <ns4:table-cell ns0:value-type="string" ns6:value-type="string">
            <ns7:p>Tulare</ns7:p>
          </ns4:table-cell>
          <ns4:table-cell ns0:value-type="string" ns6:value-type="string">
            <ns7:p>CA</ns7:p>
          </ns4:table-cell>
          <ns4:table-cell ns0:value-type="string" ns6:value-type="string">
            <ns7:p>73907</ns7:p>
          </ns4:table-cell>
          <ns4:table-cell ns4:number-columns-repeated="9"/>
        </ns4:table-row>
        <ns4:table-row ns4:style-name="ro1">
          <ns4:table-cell ns0:value-type="string" ns6:value-type="string">
            <ns7:p>528.0</ns7:p>
          </ns4:table-cell>
          <ns4:table-cell ns0:value-type="string" ns6:value-type="string">
            <ns7:p>Maple Grove</ns7:p>
          </ns4:table-cell>
          <ns4:table-cell ns0:value-type="string" ns6:value-type="string">
            <ns7:p>MN</ns7:p>
          </ns4:table-cell>
          <ns4:table-cell ns0:value-type="string" ns6:value-type="string">
            <ns7:p>73893</ns7:p>
          </ns4:table-cell>
          <ns4:table-cell ns4:number-columns-repeated="9"/>
        </ns4:table-row>
        <ns4:table-row ns4:style-name="ro1">
          <ns4:table-cell ns0:value-type="string" ns6:value-type="string">
            <ns7:p>529.0</ns7:p>
          </ns4:table-cell>
          <ns4:table-cell ns0:value-type="string" ns6:value-type="string">
            <ns7:p>Wilmington</ns7:p>
          </ns4:table-cell>
          <ns4:table-cell ns0:value-type="string" ns6:value-type="string">
            <ns7:p>DE</ns7:p>
          </ns4:table-cell>
          <ns4:table-cell ns0:value-type="string" ns6:value-type="string">
            <ns7:p>73512</ns7:p>
          </ns4:table-cell>
          <ns4:table-cell ns4:number-columns-repeated="9">
            <ns7:p>Benjamin Franklin Plumbing of Wilmington DE</ns7:p>
          </ns4:table-cell>
        </ns4:table-row>
        <ns4:table-row ns4:style-name="ro1">
          <ns4:table-cell ns0:value-type="string" ns6:value-type="string">
            <ns7:p>530.0</ns7:p>
          </ns4:table-cell>
          <ns4:table-cell ns0:value-type="string" ns6:value-type="string">
            <ns7:p>Framingham</ns7:p>
          </ns4:table-cell>
          <ns4:table-cell ns0:value-type="string" ns6:value-type="string">
            <ns7:p>MA</ns7:p>
          </ns4:table-cell>
          <ns4:table-cell ns0:value-type="string" ns6:value-type="string">
            <ns7:p>73021</ns7:p>
          </ns4:table-cell>
          <ns4:table-cell ns4:number-columns-repeated="9"/>
        </ns4:table-row>
        <ns4:table-row ns4:style-name="ro1">
          <ns4:table-cell ns0:value-type="string" ns6:value-type="string">
            <ns7:p>531.0</ns7:p>
          </ns4:table-cell>
          <ns4:table-cell ns0:value-type="string" ns6:value-type="string">
            <ns7:p>Turlock</ns7:p>
          </ns4:table-cell>
          <ns4:table-cell ns0:value-type="string" ns6:value-type="string">
            <ns7:p>CA</ns7:p>
          </ns4:table-cell>
          <ns4:table-cell ns0:value-type="string" ns6:value-type="string">
            <ns7:p>72864</ns7:p>
          </ns4:table-cell>
          <ns4:table-cell ns4:number-columns-repeated="9"/>
        </ns4:table-row>
        <ns4:table-row ns4:style-name="ro1">
          <ns4:table-cell ns0:value-type="string" ns6:value-type="string">
            <ns7:p>532.0</ns7:p>
          </ns4:table-cell>
          <ns4:table-cell ns0:value-type="string" ns6:value-type="string">
            <ns7:p>Jacksonville</ns7:p>
          </ns4:table-cell>
          <ns4:table-cell ns0:value-type="string" ns6:value-type="string">
            <ns7:p>NC</ns7:p>
          </ns4:table-cell>
          <ns4:table-cell ns0:value-type="string" ns6:value-type="string">
            <ns7:p>72732</ns7:p>
          </ns4:table-cell>
          <ns4:table-cell ns4:number-columns-repeated="9"/>
        </ns4:table-row>
        <ns4:table-row ns4:style-name="ro1">
          <ns4:table-cell ns0:value-type="string" ns6:value-type="string">
            <ns7:p>533.0</ns7:p>
          </ns4:table-cell>
          <ns4:table-cell ns0:value-type="string" ns6:value-type="string">
            <ns7:p>Kalamazoo</ns7:p>
          </ns4:table-cell>
          <ns4:table-cell ns0:value-type="string" ns6:value-type="string">
            <ns7:p>MI</ns7:p>
          </ns4:table-cell>
          <ns4:table-cell ns0:value-type="string" ns6:value-type="string">
            <ns7:p>72683</ns7:p>
          </ns4:table-cell>
          <ns4:table-cell ns4:number-columns-repeated="9"/>
        </ns4:table-row>
        <ns4:table-row ns4:style-name="ro1">
          <ns4:table-cell ns0:value-type="string" ns6:value-type="string">
            <ns7:p>534.0</ns7:p>
          </ns4:table-cell>
          <ns4:table-cell ns0:value-type="string" ns6:value-type="string">
            <ns7:p>St. Cloud</ns7:p>
          </ns4:table-cell>
          <ns4:table-cell ns0:value-type="string" ns6:value-type="string">
            <ns7:p>MN</ns7:p>
          </ns4:table-cell>
          <ns4:table-cell ns0:value-type="string" ns6:value-type="string">
            <ns7:p>72647</ns7:p>
          </ns4:table-cell>
          <ns4:table-cell ns4:number-columns-repeated="9"/>
        </ns4:table-row>
        <ns4:table-row ns4:style-name="ro1">
          <ns4:table-cell ns0:value-type="string" ns6:value-type="string">
            <ns7:p>535.0</ns7:p>
          </ns4:table-cell>
          <ns4:table-cell ns0:value-type="string" ns6:value-type="string">
            <ns7:p>St. Charles</ns7:p>
          </ns4:table-cell>
          <ns4:table-cell ns0:value-type="string" ns6:value-type="string">
            <ns7:p>MO</ns7:p>
          </ns4:table-cell>
          <ns4:table-cell ns0:value-type="string" ns6:value-type="string">
            <ns7:p>72561</ns7:p>
          </ns4:table-cell>
          <ns4:table-cell ns4:number-columns-repeated="9">
            <ns7:p>Pierson Plumbing Sewer &amp; Drain L.L.C</ns7:p>
          </ns4:table-cell>
        </ns4:table-row>
        <ns4:table-row ns4:style-name="ro1">
          <ns4:table-cell ns0:value-type="string" ns6:value-type="string">
            <ns7:p>536.0</ns7:p>
          </ns4:table-cell>
          <ns4:table-cell ns0:value-type="string" ns6:value-type="string">
            <ns7:p>Harlingen</ns7:p>
          </ns4:table-cell>
          <ns4:table-cell ns0:value-type="string" ns6:value-type="string">
            <ns7:p>TX</ns7:p>
          </ns4:table-cell>
          <ns4:table-cell ns0:value-type="string" ns6:value-type="string">
            <ns7:p>72467</ns7:p>
          </ns4:table-cell>
          <ns4:table-cell ns4:number-columns-repeated="9"/>
        </ns4:table-row>
        <ns4:table-row ns4:style-name="ro1">
          <ns4:table-cell ns0:value-type="string" ns6:value-type="string">
            <ns7:p>537.0</ns7:p>
          </ns4:table-cell>
          <ns4:table-cell ns0:value-type="string" ns6:value-type="string">
            <ns7:p>Eau Claire</ns7:p>
          </ns4:table-cell>
          <ns4:table-cell ns0:value-type="string" ns6:value-type="string">
            <ns7:p>WI</ns7:p>
          </ns4:table-cell>
          <ns4:table-cell ns0:value-type="string" ns6:value-type="string">
            <ns7:p>72465</ns7:p>
          </ns4:table-cell>
          <ns4:table-cell ns4:number-columns-repeated="9"/>
        </ns4:table-row>
        <ns4:table-row ns4:style-name="ro1">
          <ns4:table-cell ns0:value-type="string" ns6:value-type="string">
            <ns7:p>538.0</ns7:p>
          </ns4:table-cell>
          <ns4:table-cell ns0:value-type="string" ns6:value-type="string">
            <ns7:p>Commerce City</ns7:p>
          </ns4:table-cell>
          <ns4:table-cell ns0:value-type="string" ns6:value-type="string">
            <ns7:p>CO</ns7:p>
          </ns4:table-cell>
          <ns4:table-cell ns0:value-type="string" ns6:value-type="string">
            <ns7:p>72345</ns7:p>
          </ns4:table-cell>
          <ns4:table-cell ns4:number-columns-repeated="9"/>
        </ns4:table-row>
        <ns4:table-row ns4:style-name="ro1">
          <ns4:table-cell ns0:value-type="string" ns6:value-type="string">
            <ns7:p>539.0</ns7:p>
          </ns4:table-cell>
          <ns4:table-cell ns0:value-type="string" ns6:value-type="string">
            <ns7:p>Conway</ns7:p>
          </ns4:table-cell>
          <ns4:table-cell ns0:value-type="string" ns6:value-type="string">
            <ns7:p>AR</ns7:p>
          </ns4:table-cell>
          <ns4:table-cell ns0:value-type="string" ns6:value-type="string">
            <ns7:p>72328</ns7:p>
          </ns4:table-cell>
          <ns4:table-cell ns4:number-columns-repeated="9"/>
        </ns4:table-row>
        <ns4:table-row ns4:style-name="ro1">
          <ns4:table-cell ns0:value-type="string" ns6:value-type="string">
            <ns7:p>540.0</ns7:p>
          </ns4:table-cell>
          <ns4:table-cell ns0:value-type="string" ns6:value-type="string">
            <ns7:p>Mount Vernon</ns7:p>
          </ns4:table-cell>
          <ns4:table-cell ns0:value-type="string" ns6:value-type="string">
            <ns7:p>NY</ns7:p>
          </ns4:table-cell>
          <ns4:table-cell ns0:value-type="string" ns6:value-type="string">
            <ns7:p>72304</ns7:p>
          </ns4:table-cell>
          <ns4:table-cell ns4:number-columns-repeated="9"/>
        </ns4:table-row>
        <ns4:table-row ns4:style-name="ro1">
          <ns4:table-cell ns0:value-type="string" ns6:value-type="string">
            <ns7:p>541.0</ns7:p>
          </ns4:table-cell>
          <ns4:table-cell ns0:value-type="string" ns6:value-type="string">
            <ns7:p>East Orange</ns7:p>
          </ns4:table-cell>
          <ns4:table-cell ns0:value-type="string" ns6:value-type="string">
            <ns7:p>NJ</ns7:p>
          </ns4:table-cell>
          <ns4:table-cell ns0:value-type="string" ns6:value-type="string">
            <ns7:p>72159</ns7:p>
          </ns4:table-cell>
          <ns4:table-cell ns4:number-columns-repeated="9"/>
        </ns4:table-row>
        <ns4:table-row ns4:style-name="ro1">
          <ns4:table-cell ns0:value-type="string" ns6:value-type="string">
            <ns7:p>542.0</ns7:p>
          </ns4:table-cell>
          <ns4:table-cell ns0:value-type="string" ns6:value-type="string">
            <ns7:p>Dothan</ns7:p>
          </ns4:table-cell>
          <ns4:table-cell ns0:value-type="string" ns6:value-type="string">
            <ns7:p>AL</ns7:p>
          </ns4:table-cell>
          <ns4:table-cell ns0:value-type="string" ns6:value-type="string">
            <ns7:p>72060</ns7:p>
          </ns4:table-cell>
          <ns4:table-cell ns4:number-columns-repeated="9"/>
        </ns4:table-row>
        <ns4:table-row ns4:style-name="ro1">
          <ns4:table-cell ns0:value-type="string" ns6:value-type="string">
            <ns7:p>543.0</ns7:p>
          </ns4:table-cell>
          <ns4:table-cell ns0:value-type="string" ns6:value-type="string">
            <ns7:p>Grand Junction</ns7:p>
          </ns4:table-cell>
          <ns4:table-cell ns0:value-type="string" ns6:value-type="string">
            <ns7:p>CO</ns7:p>
          </ns4:table-cell>
          <ns4:table-cell ns0:value-type="string" ns6:value-type="string">
            <ns7:p>71827</ns7:p>
          </ns4:table-cell>
          <ns4:table-cell ns4:number-columns-repeated="9"/>
        </ns4:table-row>
        <ns4:table-row ns4:style-name="ro1">
          <ns4:table-cell ns0:value-type="string" ns6:value-type="string">
            <ns7:p>544.0</ns7:p>
          </ns4:table-cell>
          <ns4:table-cell ns0:value-type="string" ns6:value-type="string">
            <ns7:p>Idaho Falls</ns7:p>
          </ns4:table-cell>
          <ns4:table-cell ns0:value-type="string" ns6:value-type="string">
            <ns7:p>ID</ns7:p>
          </ns4:table-cell>
          <ns4:table-cell ns0:value-type="string" ns6:value-type="string">
            <ns7:p>71785</ns7:p>
          </ns4:table-cell>
          <ns4:table-cell ns4:number-columns-repeated="9"/>
        </ns4:table-row>
        <ns4:table-row ns4:style-name="ro1">
          <ns4:table-cell ns0:value-type="string" ns6:value-type="string">
            <ns7:p>545.0</ns7:p>
          </ns4:table-cell>
          <ns4:table-cell ns0:value-type="string" ns6:value-type="string">
            <ns7:p>Ocala</ns7:p>
          </ns4:table-cell>
          <ns4:table-cell ns0:value-type="string" ns6:value-type="string">
            <ns7:p>FL</ns7:p>
          </ns4:table-cell>
          <ns4:table-cell ns0:value-type="string" ns6:value-type="string">
            <ns7:p>71753</ns7:p>
          </ns4:table-cell>
          <ns4:table-cell ns4:number-columns-repeated="9"/>
        </ns4:table-row>
        <ns4:table-row ns4:style-name="ro1">
          <ns4:table-cell ns0:value-type="string" ns6:value-type="string">
            <ns7:p>546.0</ns7:p>
          </ns4:table-cell>
          <ns4:table-cell ns0:value-type="string" ns6:value-type="string">
            <ns7:p>Dublin</ns7:p>
          </ns4:table-cell>
          <ns4:table-cell ns0:value-type="string" ns6:value-type="string">
            <ns7:p>CA</ns7:p>
          </ns4:table-cell>
          <ns4:table-cell ns0:value-type="string" ns6:value-type="string">
            <ns7:p>71602</ns7:p>
          </ns4:table-cell>
          <ns4:table-cell ns4:number-columns-repeated="9"/>
        </ns4:table-row>
        <ns4:table-row ns4:style-name="ro1">
          <ns4:table-cell ns0:value-type="string" ns6:value-type="string">
            <ns7:p>547.0</ns7:p>
          </ns4:table-cell>
          <ns4:table-cell ns0:value-type="string" ns6:value-type="string">
            <ns7:p>Camden</ns7:p>
          </ns4:table-cell>
          <ns4:table-cell ns0:value-type="string" ns6:value-type="string">
            <ns7:p>NJ</ns7:p>
          </ns4:table-cell>
          <ns4:table-cell ns0:value-type="string" ns6:value-type="string">
            <ns7:p>71430</ns7:p>
          </ns4:table-cell>
          <ns4:table-cell ns4:number-columns-repeated="9"/>
        </ns4:table-row>
        <ns4:table-row ns4:style-name="ro1">
          <ns4:table-cell ns0:value-type="string" ns6:value-type="string">
            <ns7:p>548.0</ns7:p>
          </ns4:table-cell>
          <ns4:table-cell ns0:value-type="string" ns6:value-type="string">
            <ns7:p>Passaic</ns7:p>
          </ns4:table-cell>
          <ns4:table-cell ns0:value-type="string" ns6:value-type="string">
            <ns7:p>NJ</ns7:p>
          </ns4:table-cell>
          <ns4:table-cell ns0:value-type="string" ns6:value-type="string">
            <ns7:p>71337</ns7:p>
          </ns4:table-cell>
          <ns4:table-cell ns4:number-columns-repeated="9"/>
        </ns4:table-row>
        <ns4:table-row ns4:style-name="ro1">
          <ns4:table-cell ns0:value-type="string" ns6:value-type="string">
            <ns7:p>549.0</ns7:p>
          </ns4:table-cell>
          <ns4:table-cell ns0:value-type="string" ns6:value-type="string">
            <ns7:p>Lafayette</ns7:p>
          </ns4:table-cell>
          <ns4:table-cell ns0:value-type="string" ns6:value-type="string">
            <ns7:p>IN</ns7:p>
          </ns4:table-cell>
          <ns4:table-cell ns0:value-type="string" ns6:value-type="string">
            <ns7:p>71238</ns7:p>
          </ns4:table-cell>
          <ns4:table-cell ns4:number-columns-repeated="9"/>
        </ns4:table-row>
        <ns4:table-row ns4:style-name="ro1">
          <ns4:table-cell ns0:value-type="string" ns6:value-type="string">
            <ns7:p>550.0</ns7:p>
          </ns4:table-cell>
          <ns4:table-cell ns0:value-type="string" ns6:value-type="string">
            <ns7:p>Gaithersburg</ns7:p>
          </ns4:table-cell>
          <ns4:table-cell ns0:value-type="string" ns6:value-type="string">
            <ns7:p>MD</ns7:p>
          </ns4:table-cell>
          <ns4:table-cell ns0:value-type="string" ns6:value-type="string">
            <ns7:p>71113</ns7:p>
          </ns4:table-cell>
          <ns4:table-cell ns4:number-columns-repeated="9"/>
        </ns4:table-row>
        <ns4:table-row ns4:style-name="ro1">
          <ns4:table-cell ns0:value-type="string" ns6:value-type="string">
            <ns7:p>551.0</ns7:p>
          </ns4:table-cell>
          <ns4:table-cell ns0:value-type="string" ns6:value-type="string">
            <ns7:p>St. Joseph</ns7:p>
          </ns4:table-cell>
          <ns4:table-cell ns0:value-type="string" ns6:value-type="string">
            <ns7:p>MO</ns7:p>
          </ns4:table-cell>
          <ns4:table-cell ns0:value-type="string" ns6:value-type="string">
            <ns7:p>71001</ns7:p>
          </ns4:table-cell>
          <ns4:table-cell ns4:number-columns-repeated="9"/>
        </ns4:table-row>
        <ns4:table-row ns4:style-name="ro1">
          <ns4:table-cell ns0:value-type="string" ns6:value-type="string">
            <ns7:p>552.0</ns7:p>
          </ns4:table-cell>
          <ns4:table-cell ns0:value-type="string" ns6:value-type="string">
            <ns7:p>Waukesha</ns7:p>
          </ns4:table-cell>
          <ns4:table-cell ns0:value-type="string" ns6:value-type="string">
            <ns7:p>WI</ns7:p>
          </ns4:table-cell>
          <ns4:table-cell ns0:value-type="string" ns6:value-type="string">
            <ns7:p>70872</ns7:p>
          </ns4:table-cell>
          <ns4:table-cell ns4:number-columns-repeated="9"/>
        </ns4:table-row>
        <ns4:table-row ns4:style-name="ro1">
          <ns4:table-cell ns0:value-type="string" ns6:value-type="string">
            <ns7:p>553.0</ns7:p>
          </ns4:table-cell>
          <ns4:table-cell ns0:value-type="string" ns6:value-type="string">
            <ns7:p>North Richland Hills</ns7:p>
          </ns4:table-cell>
          <ns4:table-cell ns0:value-type="string" ns6:value-type="string">
            <ns7:p>TX</ns7:p>
          </ns4:table-cell>
          <ns4:table-cell ns0:value-type="string" ns6:value-type="string">
            <ns7:p>70843</ns7:p>
          </ns4:table-cell>
          <ns4:table-cell ns4:number-columns-repeated="9"/>
        </ns4:table-row>
        <ns4:table-row ns4:style-name="ro1">
          <ns4:table-cell ns0:value-type="string" ns6:value-type="string">
            <ns7:p>554.0</ns7:p>
          </ns4:table-cell>
          <ns4:table-cell ns0:value-type="string" ns6:value-type="string">
            <ns7:p>Eastvale</ns7:p>
          </ns4:table-cell>
          <ns4:table-cell ns0:value-type="string" ns6:value-type="string">
            <ns7:p>CA</ns7:p>
          </ns4:table-cell>
          <ns4:table-cell ns0:value-type="string" ns6:value-type="string">
            <ns7:p>70594</ns7:p>
          </ns4:table-cell>
          <ns4:table-cell ns4:number-columns-repeated="9"/>
        </ns4:table-row>
        <ns4:table-row ns4:style-name="ro1">
          <ns4:table-cell ns0:value-type="string" ns6:value-type="string">
            <ns7:p>555.0</ns7:p>
          </ns4:table-cell>
          <ns4:table-cell ns0:value-type="string" ns6:value-type="string">
            <ns7:p>Walnut Creek</ns7:p>
          </ns4:table-cell>
          <ns4:table-cell ns0:value-type="string" ns6:value-type="string">
            <ns7:p>CA</ns7:p>
          </ns4:table-cell>
          <ns4:table-cell ns0:value-type="string" ns6:value-type="string">
            <ns7:p>70012</ns7:p>
          </ns4:table-cell>
          <ns4:table-cell ns4:number-columns-repeated="9"/>
        </ns4:table-row>
        <ns4:table-row ns4:style-name="ro1">
          <ns4:table-cell ns0:value-type="string" ns6:value-type="string">
            <ns7:p>556.0</ns7:p>
          </ns4:table-cell>
          <ns4:table-cell ns0:value-type="string" ns6:value-type="string">
            <ns7:p>Kyle</ns7:p>
          </ns4:table-cell>
          <ns4:table-cell ns0:value-type="string" ns6:value-type="string">
            <ns7:p>TX</ns7:p>
          </ns4:table-cell>
          <ns4:table-cell ns0:value-type="string" ns6:value-type="string">
            <ns7:p>69917</ns7:p>
          </ns4:table-cell>
          <ns4:table-cell ns4:number-columns-repeated="9"/>
        </ns4:table-row>
        <ns4:table-row ns4:style-name="ro1">
          <ns4:table-cell ns0:value-type="string" ns6:value-type="string">
            <ns7:p>557.0</ns7:p>
          </ns4:table-cell>
          <ns4:table-cell ns0:value-type="string" ns6:value-type="string">
            <ns7:p>Portland</ns7:p>
          </ns4:table-cell>
          <ns4:table-cell ns0:value-type="string" ns6:value-type="string">
            <ns7:p>ME</ns7:p>
          </ns4:table-cell>
          <ns4:table-cell ns0:value-type="string" ns6:value-type="string">
            <ns7:p>69911</ns7:p>
          </ns4:table-cell>
          <ns4:table-cell ns4:number-columns-repeated="9">
            <ns7:p>Heritage Home Service</ns7:p>
          </ns4:table-cell>
        </ns4:table-row>
        <ns4:table-row ns4:style-name="ro1">
          <ns4:table-cell ns0:value-type="string" ns6:value-type="string">
            <ns7:p>558.0</ns7:p>
          </ns4:table-cell>
          <ns4:table-cell ns0:value-type="string" ns6:value-type="string">
            <ns7:p>Shawnee</ns7:p>
          </ns4:table-cell>
          <ns4:table-cell ns0:value-type="string" ns6:value-type="string">
            <ns7:p>KS</ns7:p>
          </ns4:table-cell>
          <ns4:table-cell ns0:value-type="string" ns6:value-type="string">
            <ns7:p>69848</ns7:p>
          </ns4:table-cell>
          <ns4:table-cell ns4:number-columns-repeated="9"/>
        </ns4:table-row>
        <ns4:table-row ns4:style-name="ro1">
          <ns4:table-cell ns0:value-type="string" ns6:value-type="string">
            <ns7:p>559.0</ns7:p>
          </ns4:table-cell>
          <ns4:table-cell ns0:value-type="string" ns6:value-type="string">
            <ns7:p>Delray Beach</ns7:p>
          </ns4:table-cell>
          <ns4:table-cell ns0:value-type="string" ns6:value-type="string">
            <ns7:p>FL</ns7:p>
          </ns4:table-cell>
          <ns4:table-cell ns0:value-type="string" ns6:value-type="string">
            <ns7:p>69809</ns7:p>
          </ns4:table-cell>
          <ns4:table-cell ns4:number-columns-repeated="9"/>
        </ns4:table-row>
        <ns4:table-row ns4:style-name="ro1">
          <ns4:table-cell ns0:value-type="string" ns6:value-type="string">
            <ns7:p>560.0</ns7:p>
          </ns4:table-cell>
          <ns4:table-cell ns0:value-type="string" ns6:value-type="string">
            <ns7:p>Casa Grande</ns7:p>
          </ns4:table-cell>
          <ns4:table-cell ns0:value-type="string" ns6:value-type="string">
            <ns7:p>AZ</ns7:p>
          </ns4:table-cell>
          <ns4:table-cell ns0:value-type="string" ns6:value-type="string">
            <ns7:p>69753</ns7:p>
          </ns4:table-cell>
          <ns4:table-cell ns4:number-columns-repeated="9"/>
        </ns4:table-row>
        <ns4:table-row ns4:style-name="ro1">
          <ns4:table-cell ns0:value-type="string" ns6:value-type="string">
            <ns7:p>561.0</ns7:p>
          </ns4:table-cell>
          <ns4:table-cell ns0:value-type="string" ns6:value-type="string">
            <ns7:p>Weston</ns7:p>
          </ns4:table-cell>
          <ns4:table-cell ns0:value-type="string" ns6:value-type="string">
            <ns7:p>FL</ns7:p>
          </ns4:table-cell>
          <ns4:table-cell ns0:value-type="string" ns6:value-type="string">
            <ns7:p>69588</ns7:p>
          </ns4:table-cell>
          <ns4:table-cell ns4:number-columns-repeated="9"/>
        </ns4:table-row>
        <ns4:table-row ns4:style-name="ro1">
          <ns4:table-cell ns0:value-type="string" ns6:value-type="string">
            <ns7:p>562.0</ns7:p>
          </ns4:table-cell>
          <ns4:table-cell ns0:value-type="string" ns6:value-type="string">
            <ns7:p>Yuba City</ns7:p>
          </ns4:table-cell>
          <ns4:table-cell ns0:value-type="string" ns6:value-type="string">
            <ns7:p>CA</ns7:p>
          </ns4:table-cell>
          <ns4:table-cell ns0:value-type="string" ns6:value-type="string">
            <ns7:p>69485</ns7:p>
          </ns4:table-cell>
          <ns4:table-cell ns4:number-columns-repeated="9"/>
        </ns4:table-row>
        <ns4:table-row ns4:style-name="ro1">
          <ns4:table-cell ns0:value-type="string" ns6:value-type="string">
            <ns7:p>563.0</ns7:p>
          </ns4:table-cell>
          <ns4:table-cell ns0:value-type="string" ns6:value-type="string">
            <ns7:p>Schenectady</ns7:p>
          </ns4:table-cell>
          <ns4:table-cell ns0:value-type="string" ns6:value-type="string">
            <ns7:p>NY</ns7:p>
          </ns4:table-cell>
          <ns4:table-cell ns0:value-type="string" ns6:value-type="string">
            <ns7:p>69471</ns7:p>
          </ns4:table-cell>
          <ns4:table-cell ns4:number-columns-repeated="9"/>
        </ns4:table-row>
        <ns4:table-row ns4:style-name="ro1">
          <ns4:table-cell ns0:value-type="string" ns6:value-type="string">
            <ns7:p>564.0</ns7:p>
          </ns4:table-cell>
          <ns4:table-cell ns0:value-type="string" ns6:value-type="string">
            <ns7:p>Greenwood</ns7:p>
          </ns4:table-cell>
          <ns4:table-cell ns0:value-type="string" ns6:value-type="string">
            <ns7:p>IN</ns7:p>
          </ns4:table-cell>
          <ns4:table-cell ns0:value-type="string" ns6:value-type="string">
            <ns7:p>69349</ns7:p>
          </ns4:table-cell>
          <ns4:table-cell ns4:number-columns-repeated="9"/>
        </ns4:table-row>
        <ns4:table-row ns4:style-name="ro1">
          <ns4:table-cell ns0:value-type="string" ns6:value-type="string">
            <ns7:p>565.0</ns7:p>
          </ns4:table-cell>
          <ns4:table-cell ns0:value-type="string" ns6:value-type="string">
            <ns7:p>Jackson</ns7:p>
          </ns4:table-cell>
          <ns4:table-cell ns0:value-type="string" ns6:value-type="string">
            <ns7:p>TN</ns7:p>
          </ns4:table-cell>
          <ns4:table-cell ns0:value-type="string" ns6:value-type="string">
            <ns7:p>69339</ns7:p>
          </ns4:table-cell>
          <ns4:table-cell ns4:number-columns-repeated="9"/>
        </ns4:table-row>
        <ns4:table-row ns4:style-name="ro1">
          <ns4:table-cell ns0:value-type="string" ns6:value-type="string">
            <ns7:p>566.0</ns7:p>
          </ns4:table-cell>
          <ns4:table-cell ns0:value-type="string" ns6:value-type="string">
            <ns7:p>Lodi</ns7:p>
          </ns4:table-cell>
          <ns4:table-cell ns0:value-type="string" ns6:value-type="string">
            <ns7:p>CA</ns7:p>
          </ns4:table-cell>
          <ns4:table-cell ns0:value-type="string" ns6:value-type="string">
            <ns7:p>69100</ns7:p>
          </ns4:table-cell>
          <ns4:table-cell ns4:number-columns-repeated="9"/>
        </ns4:table-row>
        <ns4:table-row ns4:style-name="ro1">
          <ns4:table-cell ns0:value-type="string" ns6:value-type="string">
            <ns7:p>567.0</ns7:p>
          </ns4:table-cell>
          <ns4:table-cell ns0:value-type="string" ns6:value-type="string">
            <ns7:p>Madera</ns7:p>
          </ns4:table-cell>
          <ns4:table-cell ns0:value-type="string" ns6:value-type="string">
            <ns7:p>CA</ns7:p>
          </ns4:table-cell>
          <ns4:table-cell ns0:value-type="string" ns6:value-type="string">
            <ns7:p>69017</ns7:p>
          </ns4:table-cell>
          <ns4:table-cell ns4:number-columns-repeated="9"/>
        </ns4:table-row>
        <ns4:table-row ns4:style-name="ro1">
          <ns4:table-cell ns0:value-type="string" ns6:value-type="string">
            <ns7:p>568.0</ns7:p>
          </ns4:table-cell>
          <ns4:table-cell ns0:value-type="string" ns6:value-type="string">
            <ns7:p>Canton</ns7:p>
          </ns4:table-cell>
          <ns4:table-cell ns0:value-type="string" ns6:value-type="string">
            <ns7:p>OH</ns7:p>
          </ns4:table-cell>
          <ns4:table-cell ns0:value-type="string" ns6:value-type="string">
            <ns7:p>69001</ns7:p>
          </ns4:table-cell>
          <ns4:table-cell ns4:number-columns-repeated="9"/>
        </ns4:table-row>
        <ns4:table-row ns4:style-name="ro1">
          <ns4:table-cell ns0:value-type="string" ns6:value-type="string">
            <ns7:p>569.0</ns7:p>
          </ns4:table-cell>
          <ns4:table-cell ns0:value-type="string" ns6:value-type="string">
            <ns7:p>Baldwin Park</ns7:p>
          </ns4:table-cell>
          <ns4:table-cell ns0:value-type="string" ns6:value-type="string">
            <ns7:p>CA</ns7:p>
          </ns4:table-cell>
          <ns4:table-cell ns0:value-type="string" ns6:value-type="string">
            <ns7:p>68880</ns7:p>
          </ns4:table-cell>
          <ns4:table-cell ns4:number-columns-repeated="9"/>
        </ns4:table-row>
        <ns4:table-row ns4:style-name="ro1">
          <ns4:table-cell ns0:value-type="string" ns6:value-type="string">
            <ns7:p>570.0</ns7:p>
          </ns4:table-cell>
          <ns4:table-cell ns0:value-type="string" ns6:value-type="string">
            <ns7:p>Camarillo</ns7:p>
          </ns4:table-cell>
          <ns4:table-cell ns0:value-type="string" ns6:value-type="string">
            <ns7:p>CA</ns7:p>
          </ns4:table-cell>
          <ns4:table-cell ns0:value-type="string" ns6:value-type="string">
            <ns7:p>68652</ns7:p>
          </ns4:table-cell>
          <ns4:table-cell ns4:number-columns-repeated="9"/>
        </ns4:table-row>
        <ns4:table-row ns4:style-name="ro1">
          <ns4:table-cell ns0:value-type="string" ns6:value-type="string">
            <ns7:p>571.0</ns7:p>
          </ns4:table-cell>
          <ns4:table-cell ns0:value-type="string" ns6:value-type="string">
            <ns7:p>Huntersville</ns7:p>
          </ns4:table-cell>
          <ns4:table-cell ns0:value-type="string" ns6:value-type="string">
            <ns7:p>NC</ns7:p>
          </ns4:table-cell>
          <ns4:table-cell ns0:value-type="string" ns6:value-type="string">
            <ns7:p>68535</ns7:p>
          </ns4:table-cell>
          <ns4:table-cell ns4:number-columns-repeated="9"/>
        </ns4:table-row>
        <ns4:table-row ns4:style-name="ro1">
          <ns4:table-cell ns0:value-type="string" ns6:value-type="string">
            <ns7:p>572.0</ns7:p>
          </ns4:table-cell>
          <ns4:table-cell ns0:value-type="string" ns6:value-type="string">
            <ns7:p>Haverhill</ns7:p>
          </ns4:table-cell>
          <ns4:table-cell ns0:value-type="string" ns6:value-type="string">
            <ns7:p>MA</ns7:p>
          </ns4:table-cell>
          <ns4:table-cell ns0:value-type="string" ns6:value-type="string">
            <ns7:p>68361</ns7:p>
          </ns4:table-cell>
          <ns4:table-cell ns4:number-columns-repeated="9"/>
        </ns4:table-row>
        <ns4:table-row ns4:style-name="ro1">
          <ns4:table-cell ns0:value-type="string" ns6:value-type="string">
            <ns7:p>573.0</ns7:p>
          </ns4:table-cell>
          <ns4:table-cell ns0:value-type="string" ns6:value-type="string">
            <ns7:p>Pflugerville</ns7:p>
          </ns4:table-cell>
          <ns4:table-cell ns0:value-type="string" ns6:value-type="string">
            <ns7:p>TX</ns7:p>
          </ns4:table-cell>
          <ns4:table-cell ns0:value-type="string" ns6:value-type="string">
            <ns7:p>68316</ns7:p>
          </ns4:table-cell>
          <ns4:table-cell ns4:number-columns-repeated="9"/>
        </ns4:table-row>
        <ns4:table-row ns4:style-name="ro1">
          <ns4:table-cell ns0:value-type="string" ns6:value-type="string">
            <ns7:p>574.0</ns7:p>
          </ns4:table-cell>
          <ns4:table-cell ns0:value-type="string" ns6:value-type="string">
            <ns7:p>Ames</ns7:p>
          </ns4:table-cell>
          <ns4:table-cell ns0:value-type="string" ns6:value-type="string">
            <ns7:p>IA</ns7:p>
          </ns4:table-cell>
          <ns4:table-cell ns0:value-type="string" ns6:value-type="string">
            <ns7:p>68220</ns7:p>
          </ns4:table-cell>
          <ns4:table-cell ns4:number-columns-repeated="9"/>
        </ns4:table-row>
        <ns4:table-row ns4:style-name="ro1">
          <ns4:table-cell ns0:value-type="string" ns6:value-type="string">
            <ns7:p>575.0</ns7:p>
          </ns4:table-cell>
          <ns4:table-cell ns0:value-type="string" ns6:value-type="string">
            <ns7:p>Madison</ns7:p>
          </ns4:table-cell>
          <ns4:table-cell ns0:value-type="string" ns6:value-type="string">
            <ns7:p>AL</ns7:p>
          </ns4:table-cell>
          <ns4:table-cell ns0:value-type="string" ns6:value-type="string">
            <ns7:p>67968</ns7:p>
          </ns4:table-cell>
          <ns4:table-cell ns4:number-columns-repeated="9"/>
        </ns4:table-row>
        <ns4:table-row ns4:style-name="ro1">
          <ns4:table-cell ns0:value-type="string" ns6:value-type="string">
            <ns7:p>576.0</ns7:p>
          </ns4:table-cell>
          <ns4:table-cell ns0:value-type="string" ns6:value-type="string">
            <ns7:p>Rowlett</ns7:p>
          </ns4:table-cell>
          <ns4:table-cell ns0:value-type="string" ns6:value-type="string">
            <ns7:p>TX</ns7:p>
          </ns4:table-cell>
          <ns4:table-cell ns0:value-type="string" ns6:value-type="string">
            <ns7:p>67890</ns7:p>
          </ns4:table-cell>
          <ns4:table-cell ns4:number-columns-repeated="9"/>
        </ns4:table-row>
        <ns4:table-row ns4:style-name="ro1">
          <ns4:table-cell ns0:value-type="string" ns6:value-type="string">
            <ns7:p>577.0</ns7:p>
          </ns4:table-cell>
          <ns4:table-cell ns0:value-type="string" ns6:value-type="string">
            <ns7:p>Decatur</ns7:p>
          </ns4:table-cell>
          <ns4:table-cell ns0:value-type="string" ns6:value-type="string">
            <ns7:p>IL</ns7:p>
          </ns4:table-cell>
          <ns4:table-cell ns0:value-type="string" ns6:value-type="string">
            <ns7:p>67884</ns7:p>
          </ns4:table-cell>
          <ns4:table-cell ns4:number-columns-repeated="9"/>
        </ns4:table-row>
        <ns4:table-row ns4:style-name="ro1">
          <ns4:table-cell ns0:value-type="string" ns6:value-type="string">
            <ns7:p>578.0</ns7:p>
          </ns4:table-cell>
          <ns4:table-cell ns0:value-type="string" ns6:value-type="string">
            <ns7:p>Palo Alto</ns7:p>
          </ns4:table-cell>
          <ns4:table-cell ns0:value-type="string" ns6:value-type="string">
            <ns7:p>CA</ns7:p>
          </ns4:table-cell>
          <ns4:table-cell ns0:value-type="string" ns6:value-type="string">
            <ns7:p>67609</ns7:p>
          </ns4:table-cell>
          <ns4:table-cell ns4:number-columns-repeated="9"/>
        </ns4:table-row>
        <ns4:table-row ns4:style-name="ro1">
          <ns4:table-cell ns0:value-type="string" ns6:value-type="string">
            <ns7:p>579.0</ns7:p>
          </ns4:table-cell>
          <ns4:table-cell ns0:value-type="string" ns6:value-type="string">
            <ns7:p>Rockville</ns7:p>
          </ns4:table-cell>
          <ns4:table-cell ns0:value-type="string" ns6:value-type="string">
            <ns7:p>MD</ns7:p>
          </ns4:table-cell>
          <ns4:table-cell ns0:value-type="string" ns6:value-type="string">
            <ns7:p>67563</ns7:p>
          </ns4:table-cell>
          <ns4:table-cell ns4:number-columns-repeated="9"/>
        </ns4:table-row>
        <ns4:table-row ns4:style-name="ro1">
          <ns4:table-cell ns0:value-type="string" ns6:value-type="string">
            <ns7:p>580.0</ns7:p>
          </ns4:table-cell>
          <ns4:table-cell ns0:value-type="string" ns6:value-type="string">
            <ns7:p>Sanford</ns7:p>
          </ns4:table-cell>
          <ns4:table-cell ns0:value-type="string" ns6:value-type="string">
            <ns7:p>FL</ns7:p>
          </ns4:table-cell>
          <ns4:table-cell ns0:value-type="string" ns6:value-type="string">
            <ns7:p>67483</ns7:p>
          </ns4:table-cell>
          <ns4:table-cell ns4:number-columns-repeated="9"/>
        </ns4:table-row>
        <ns4:table-row ns4:style-name="ro1">
          <ns4:table-cell ns0:value-type="string" ns6:value-type="string">
            <ns7:p>581.0</ns7:p>
          </ns4:table-cell>
          <ns4:table-cell ns0:value-type="string" ns6:value-type="string">
            <ns7:p>Oshkosh</ns7:p>
          </ns4:table-cell>
          <ns4:table-cell ns0:value-type="string" ns6:value-type="string">
            <ns7:p>WI</ns7:p>
          </ns4:table-cell>
          <ns4:table-cell ns0:value-type="string" ns6:value-type="string">
            <ns7:p>67460</ns7:p>
          </ns4:table-cell>
          <ns4:table-cell ns4:number-columns-repeated="9"/>
        </ns4:table-row>
        <ns4:table-row ns4:style-name="ro1">
          <ns4:table-cell ns0:value-type="string" ns6:value-type="string">
            <ns7:p>582.0</ns7:p>
          </ns4:table-cell>
          <ns4:table-cell ns0:value-type="string" ns6:value-type="string">
            <ns7:p>Novi</ns7:p>
          </ns4:table-cell>
          <ns4:table-cell ns0:value-type="string" ns6:value-type="string">
            <ns7:p>MI</ns7:p>
          </ns4:table-cell>
          <ns4:table-cell ns0:value-type="string" ns6:value-type="string">
            <ns7:p>67319</ns7:p>
          </ns4:table-cell>
          <ns4:table-cell ns4:number-columns-repeated="9"/>
        </ns4:table-row>
        <ns4:table-row ns4:style-name="ro1">
          <ns4:table-cell ns0:value-type="string" ns6:value-type="string">
            <ns7:p>583.0</ns7:p>
          </ns4:table-cell>
          <ns4:table-cell ns0:value-type="string" ns6:value-type="string">
            <ns7:p>Gary</ns7:p>
          </ns4:table-cell>
          <ns4:table-cell ns0:value-type="string" ns6:value-type="string">
            <ns7:p>IN</ns7:p>
          </ns4:table-cell>
          <ns4:table-cell ns0:value-type="string" ns6:value-type="string">
            <ns7:p>67289</ns7:p>
          </ns4:table-cell>
          <ns4:table-cell ns4:number-columns-repeated="9"/>
        </ns4:table-row>
        <ns4:table-row ns4:style-name="ro1">
          <ns4:table-cell ns0:value-type="string" ns6:value-type="string">
            <ns7:p>584.0</ns7:p>
          </ns4:table-cell>
          <ns4:table-cell ns0:value-type="string" ns6:value-type="string">
            <ns7:p>Redondo Beach</ns7:p>
          </ns4:table-cell>
          <ns4:table-cell ns0:value-type="string" ns6:value-type="string">
            <ns7:p>CA</ns7:p>
          </ns4:table-cell>
          <ns4:table-cell ns0:value-type="string" ns6:value-type="string">
            <ns7:p>67281</ns7:p>
          </ns4:table-cell>
          <ns4:table-cell ns4:number-columns-repeated="9"/>
        </ns4:table-row>
        <ns4:table-row ns4:style-name="ro1">
          <ns4:table-cell ns0:value-type="string" ns6:value-type="string">
            <ns7:p>585.0</ns7:p>
          </ns4:table-cell>
          <ns4:table-cell ns0:value-type="string" ns6:value-type="string">
            <ns7:p>Eagan</ns7:p>
          </ns4:table-cell>
          <ns4:table-cell ns0:value-type="string" ns6:value-type="string">
            <ns7:p>MN</ns7:p>
          </ns4:table-cell>
          <ns4:table-cell ns0:value-type="string" ns6:value-type="string">
            <ns7:p>67109</ns7:p>
          </ns4:table-cell>
          <ns4:table-cell ns4:number-columns-repeated="9"/>
        </ns4:table-row>
        <ns4:table-row ns4:style-name="ro1">
          <ns4:table-cell ns0:value-type="string" ns6:value-type="string">
            <ns7:p>586.0</ns7:p>
          </ns4:table-cell>
          <ns4:table-cell ns0:value-type="string" ns6:value-type="string">
            <ns7:p>Janesville</ns7:p>
          </ns4:table-cell>
          <ns4:table-cell ns0:value-type="string" ns6:value-type="string">
            <ns7:p>WI</ns7:p>
          </ns4:table-cell>
          <ns4:table-cell ns0:value-type="string" ns6:value-type="string">
            <ns7:p>66929</ns7:p>
          </ns4:table-cell>
          <ns4:table-cell ns4:number-columns-repeated="9"/>
        </ns4:table-row>
        <ns4:table-row ns4:style-name="ro1">
          <ns4:table-cell ns0:value-type="string" ns6:value-type="string">
            <ns7:p>587.0</ns7:p>
          </ns4:table-cell>
          <ns4:table-cell ns0:value-type="string" ns6:value-type="string">
            <ns7:p>Alpharetta</ns7:p>
          </ns4:table-cell>
          <ns4:table-cell ns0:value-type="string" ns6:value-type="string">
            <ns7:p>GA</ns7:p>
          </ns4:table-cell>
          <ns4:table-cell ns0:value-type="string" ns6:value-type="string">
            <ns7:p>66921</ns7:p>
          </ns4:table-cell>
          <ns4:table-cell ns4:number-columns-repeated="9"/>
        </ns4:table-row>
        <ns4:table-row ns4:style-name="ro1">
          <ns4:table-cell ns0:value-type="string" ns6:value-type="string">
            <ns7:p>588.0</ns7:p>
          </ns4:table-cell>
          <ns4:table-cell ns0:value-type="string" ns6:value-type="string">
            <ns7:p>Waterloo</ns7:p>
          </ns4:table-cell>
          <ns4:table-cell ns0:value-type="string" ns6:value-type="string">
            <ns7:p>IA</ns7:p>
          </ns4:table-cell>
          <ns4:table-cell ns0:value-type="string" ns6:value-type="string">
            <ns7:p>66919</ns7:p>
          </ns4:table-cell>
          <ns4:table-cell ns4:number-columns-repeated="9"/>
        </ns4:table-row>
        <ns4:table-row ns4:style-name="ro1">
          <ns4:table-cell ns0:value-type="string" ns6:value-type="string">
            <ns7:p>589.0</ns7:p>
          </ns4:table-cell>
          <ns4:table-cell ns0:value-type="string" ns6:value-type="string">
            <ns7:p>Albany</ns7:p>
          </ns4:table-cell>
          <ns4:table-cell ns0:value-type="string" ns6:value-type="string">
            <ns7:p>GA</ns7:p>
          </ns4:table-cell>
          <ns4:table-cell ns0:value-type="string" ns6:value-type="string">
            <ns7:p>66907</ns7:p>
          </ns4:table-cell>
          <ns4:table-cell ns4:number-columns-repeated="9"/>
        </ns4:table-row>
        <ns4:table-row ns4:style-name="ro1">
          <ns4:table-cell ns0:value-type="string" ns6:value-type="string">
            <ns7:p>590.0</ns7:p>
          </ns4:table-cell>
          <ns4:table-cell ns0:value-type="string" ns6:value-type="string">
            <ns7:p>Union City</ns7:p>
          </ns4:table-cell>
          <ns4:table-cell ns0:value-type="string" ns6:value-type="string">
            <ns7:p>NJ</ns7:p>
          </ns4:table-cell>
          <ns4:table-cell ns0:value-type="string" ns6:value-type="string">
            <ns7:p>66656</ns7:p>
          </ns4:table-cell>
          <ns4:table-cell ns4:number-columns-repeated="9"/>
        </ns4:table-row>
        <ns4:table-row ns4:style-name="ro1">
          <ns4:table-cell ns0:value-type="string" ns6:value-type="string">
            <ns7:p>591.0</ns7:p>
          </ns4:table-cell>
          <ns4:table-cell ns0:value-type="string" ns6:value-type="string">
            <ns7:p>Brentwood</ns7:p>
          </ns4:table-cell>
          <ns4:table-cell ns0:value-type="string" ns6:value-type="string">
            <ns7:p>CA</ns7:p>
          </ns4:table-cell>
          <ns4:table-cell ns0:value-type="string" ns6:value-type="string">
            <ns7:p>66607</ns7:p>
          </ns4:table-cell>
          <ns4:table-cell ns4:number-columns-repeated="9"/>
        </ns4:table-row>
        <ns4:table-row ns4:style-name="ro1">
          <ns4:table-cell ns0:value-type="string" ns6:value-type="string">
            <ns7:p>592.0</ns7:p>
          </ns4:table-cell>
          <ns4:table-cell ns0:value-type="string" ns6:value-type="string">
            <ns7:p>Eagle Mountain</ns7:p>
          </ns4:table-cell>
          <ns4:table-cell ns0:value-type="string" ns6:value-type="string">
            <ns7:p>UT</ns7:p>
          </ns4:table-cell>
          <ns4:table-cell ns0:value-type="string" ns6:value-type="string">
            <ns7:p>66557</ns7:p>
          </ns4:table-cell>
          <ns4:table-cell ns4:number-columns-repeated="9"/>
        </ns4:table-row>
        <ns4:table-row ns4:style-name="ro1">
          <ns4:table-cell ns0:value-type="string" ns6:value-type="string">
            <ns7:p>593.0</ns7:p>
          </ns4:table-cell>
          <ns4:table-cell ns0:value-type="string" ns6:value-type="string">
            <ns7:p>Skokie</ns7:p>
          </ns4:table-cell>
          <ns4:table-cell ns0:value-type="string" ns6:value-type="string">
            <ns7:p>IL</ns7:p>
          </ns4:table-cell>
          <ns4:table-cell ns0:value-type="string" ns6:value-type="string">
            <ns7:p>66544</ns7:p>
          </ns4:table-cell>
          <ns4:table-cell ns4:number-columns-repeated="9"/>
        </ns4:table-row>
        <ns4:table-row ns4:style-name="ro1">
          <ns4:table-cell ns0:value-type="string" ns6:value-type="string">
            <ns7:p>594.0</ns7:p>
          </ns4:table-cell>
          <ns4:table-cell ns0:value-type="string" ns6:value-type="string">
            <ns7:p>Shoreline</ns7:p>
          </ns4:table-cell>
          <ns4:table-cell ns0:value-type="string" ns6:value-type="string">
            <ns7:p>WA</ns7:p>
          </ns4:table-cell>
          <ns4:table-cell ns0:value-type="string" ns6:value-type="string">
            <ns7:p>66542</ns7:p>
          </ns4:table-cell>
          <ns4:table-cell ns4:number-columns-repeated="9"/>
        </ns4:table-row>
        <ns4:table-row ns4:style-name="ro1">
          <ns4:table-cell ns0:value-type="string" ns6:value-type="string">
            <ns7:p>595.0</ns7:p>
          </ns4:table-cell>
          <ns4:table-cell ns0:value-type="string" ns6:value-type="string">
            <ns7:p>Cheyenne</ns7:p>
          </ns4:table-cell>
          <ns4:table-cell ns0:value-type="string" ns6:value-type="string">
            <ns7:p>WY</ns7:p>
          </ns4:table-cell>
          <ns4:table-cell ns0:value-type="string" ns6:value-type="string">
            <ns7:p>66507</ns7:p>
          </ns4:table-cell>
          <ns4:table-cell ns4:number-columns-repeated="9">
            <ns7:p>Aspen Mountain Plumbing</ns7:p>
          </ns4:table-cell>
        </ns4:table-row>
        <ns4:table-row ns4:style-name="ro1">
          <ns4:table-cell ns0:value-type="string" ns6:value-type="string">
            <ns7:p>596.0</ns7:p>
          </ns4:table-cell>
          <ns4:table-cell ns0:value-type="string" ns6:value-type="string">
            <ns7:p>Victoria</ns7:p>
          </ns4:table-cell>
          <ns4:table-cell ns0:value-type="string" ns6:value-type="string">
            <ns7:p>TX</ns7:p>
          </ns4:table-cell>
          <ns4:table-cell ns0:value-type="string" ns6:value-type="string">
            <ns7:p>66500</ns7:p>
          </ns4:table-cell>
          <ns4:table-cell ns4:number-columns-repeated="9"/>
        </ns4:table-row>
        <ns4:table-row ns4:style-name="ro1">
          <ns4:table-cell ns0:value-type="string" ns6:value-type="string">
            <ns7:p>597.0</ns7:p>
          </ns4:table-cell>
          <ns4:table-cell ns0:value-type="string" ns6:value-type="string">
            <ns7:p>Port Orange</ns7:p>
          </ns4:table-cell>
          <ns4:table-cell ns0:value-type="string" ns6:value-type="string">
            <ns7:p>FL</ns7:p>
          </ns4:table-cell>
          <ns4:table-cell ns0:value-type="string" ns6:value-type="string">
            <ns7:p>66395</ns7:p>
          </ns4:table-cell>
          <ns4:table-cell ns4:number-columns-repeated="9"/>
        </ns4:table-row>
        <ns4:table-row ns4:style-name="ro1">
          <ns4:table-cell ns0:value-type="string" ns6:value-type="string">
            <ns7:p>598.0</ns7:p>
          </ns4:table-cell>
          <ns4:table-cell ns0:value-type="string" ns6:value-type="string">
            <ns7:p>Malden</ns7:p>
          </ns4:table-cell>
          <ns4:table-cell ns0:value-type="string" ns6:value-type="string">
            <ns7:p>MA</ns7:p>
          </ns4:table-cell>
          <ns4:table-cell ns0:value-type="string" ns6:value-type="string">
            <ns7:p>66370</ns7:p>
          </ns4:table-cell>
          <ns4:table-cell ns4:number-columns-repeated="9"/>
        </ns4:table-row>
        <ns4:table-row ns4:style-name="ro1">
          <ns4:table-cell ns0:value-type="string" ns6:value-type="string">
            <ns7:p>599.0</ns7:p>
          </ns4:table-cell>
          <ns4:table-cell ns0:value-type="string" ns6:value-type="string">
            <ns7:p>Westfield</ns7:p>
          </ns4:table-cell>
          <ns4:table-cell ns0:value-type="string" ns6:value-type="string">
            <ns7:p>IN</ns7:p>
          </ns4:table-cell>
          <ns4:table-cell ns0:value-type="string" ns6:value-type="string">
            <ns7:p>66258</ns7:p>
          </ns4:table-cell>
          <ns4:table-cell ns4:number-columns-repeated="9"/>
        </ns4:table-row>
        <ns4:table-row ns4:style-name="ro1">
          <ns4:table-cell ns0:value-type="string" ns6:value-type="string">
            <ns7:p>600.0</ns7:p>
          </ns4:table-cell>
          <ns4:table-cell ns0:value-type="string" ns6:value-type="string">
            <ns7:p>Davis</ns7:p>
          </ns4:table-cell>
          <ns4:table-cell ns0:value-type="string" ns6:value-type="string">
            <ns7:p>CA</ns7:p>
          </ns4:table-cell>
          <ns4:table-cell ns0:value-type="string" ns6:value-type="string">
            <ns7:p>66110</ns7:p>
          </ns4:table-cell>
          <ns4:table-cell ns4:number-columns-repeated="9"/>
        </ns4:table-row>
        <ns4:table-row ns4:style-name="ro1">
          <ns4:table-cell ns0:value-type="string" ns6:value-type="string">
            <ns7:p>600.0</ns7:p>
          </ns4:table-cell>
          <ns4:table-cell ns0:value-type="string" ns6:value-type="string">
            <ns7:p>Sammamish</ns7:p>
          </ns4:table-cell>
          <ns4:table-cell ns0:value-type="string" ns6:value-type="string">
            <ns7:p>WA</ns7:p>
          </ns4:table-cell>
          <ns4:table-cell ns0:value-type="string" ns6:value-type="string">
            <ns7:p>66110</ns7:p>
          </ns4:table-cell>
          <ns4:table-cell ns4:number-columns-repeated="9"/>
        </ns4:table-row>
        <ns4:table-row ns4:style-name="ro1">
          <ns4:table-cell ns0:value-type="string" ns6:value-type="string">
            <ns7:p>602.0</ns7:p>
          </ns4:table-cell>
          <ns4:table-cell ns0:value-type="string" ns6:value-type="string">
            <ns7:p>Parker</ns7:p>
          </ns4:table-cell>
          <ns4:table-cell ns0:value-type="string" ns6:value-type="string">
            <ns7:p>CO</ns7:p>
          </ns4:table-cell>
          <ns4:table-cell ns0:value-type="string" ns6:value-type="string">
            <ns7:p>65985</ns7:p>
          </ns4:table-cell>
          <ns4:table-cell ns4:number-columns-repeated="9"/>
        </ns4:table-row>
        <ns4:table-row ns4:style-name="ro1">
          <ns4:table-cell ns0:value-type="string" ns6:value-type="string">
            <ns7:p>603.0</ns7:p>
          </ns4:table-cell>
          <ns4:table-cell ns0:value-type="string" ns6:value-type="string">
            <ns7:p>Palatine</ns7:p>
          </ns4:table-cell>
          <ns4:table-cell ns0:value-type="string" ns6:value-type="string">
            <ns7:p>IL</ns7:p>
          </ns4:table-cell>
          <ns4:table-cell ns0:value-type="string" ns6:value-type="string">
            <ns7:p>65842</ns7:p>
          </ns4:table-cell>
          <ns4:table-cell ns4:number-columns-repeated="9"/>
        </ns4:table-row>
        <ns4:table-row ns4:style-name="ro1">
          <ns4:table-cell ns0:value-type="string" ns6:value-type="string">
            <ns7:p>604.0</ns7:p>
          </ns4:table-cell>
          <ns4:table-cell ns0:value-type="string" ns6:value-type="string">
            <ns7:p>Yorba Linda</ns7:p>
          </ns4:table-cell>
          <ns4:table-cell ns0:value-type="string" ns6:value-type="string">
            <ns7:p>CA</ns7:p>
          </ns4:table-cell>
          <ns4:table-cell ns0:value-type="string" ns6:value-type="string">
            <ns7:p>65632</ns7:p>
          </ns4:table-cell>
          <ns4:table-cell ns4:number-columns-repeated="9"/>
        </ns4:table-row>
        <ns4:table-row ns4:style-name="ro1">
          <ns4:table-cell ns0:value-type="string" ns6:value-type="string">
            <ns7:p>605.0</ns7:p>
          </ns4:table-cell>
          <ns4:table-cell ns0:value-type="string" ns6:value-type="string">
            <ns7:p>Apopka</ns7:p>
          </ns4:table-cell>
          <ns4:table-cell ns0:value-type="string" ns6:value-type="string">
            <ns7:p>FL</ns7:p>
          </ns4:table-cell>
          <ns4:table-cell ns0:value-type="string" ns6:value-type="string">
            <ns7:p>65552</ns7:p>
          </ns4:table-cell>
          <ns4:table-cell ns4:number-columns-repeated="9"/>
        </ns4:table-row>
        <ns4:table-row ns4:style-name="ro1">
          <ns4:table-cell ns0:value-type="string" ns6:value-type="string">
            <ns7:p>606.0</ns7:p>
          </ns4:table-cell>
          <ns4:table-cell ns0:value-type="string" ns6:value-type="string">
            <ns7:p>Marana</ns7:p>
          </ns4:table-cell>
          <ns4:table-cell ns0:value-type="string" ns6:value-type="string">
            <ns7:p>AZ</ns7:p>
          </ns4:table-cell>
          <ns4:table-cell ns0:value-type="string" ns6:value-type="string">
            <ns7:p>65523</ns7:p>
          </ns4:table-cell>
          <ns4:table-cell ns4:number-columns-repeated="9"/>
        </ns4:table-row>
        <ns4:table-row ns4:style-name="ro1">
          <ns4:table-cell ns0:value-type="string" ns6:value-type="string">
            <ns7:p>607.0</ns7:p>
          </ns4:table-cell>
          <ns4:table-cell ns0:value-type="string" ns6:value-type="string">
            <ns7:p>Muncie</ns7:p>
          </ns4:table-cell>
          <ns4:table-cell ns0:value-type="string" ns6:value-type="string">
            <ns7:p>IN</ns7:p>
          </ns4:table-cell>
          <ns4:table-cell ns0:value-type="string" ns6:value-type="string">
            <ns7:p>65466</ns7:p>
          </ns4:table-cell>
          <ns4:table-cell ns4:number-columns-repeated="9"/>
        </ns4:table-row>
        <ns4:table-row ns4:style-name="ro1">
          <ns4:table-cell ns0:value-type="string" ns6:value-type="string">
            <ns7:p>608.0</ns7:p>
          </ns4:table-cell>
          <ns4:table-cell ns0:value-type="string" ns6:value-type="string">
            <ns7:p>Lorain</ns7:p>
          </ns4:table-cell>
          <ns4:table-cell ns0:value-type="string" ns6:value-type="string">
            <ns7:p>OH</ns7:p>
          </ns4:table-cell>
          <ns4:table-cell ns0:value-type="string" ns6:value-type="string">
            <ns7:p>65366</ns7:p>
          </ns4:table-cell>
          <ns4:table-cell ns4:number-columns-repeated="9"/>
        </ns4:table-row>
        <ns4:table-row ns4:style-name="ro1">
          <ns4:table-cell ns0:value-type="string" ns6:value-type="string">
            <ns7:p>609.0</ns7:p>
          </ns4:table-cell>
          <ns4:table-cell ns0:value-type="string" ns6:value-type="string">
            <ns7:p>Union City</ns7:p>
          </ns4:table-cell>
          <ns4:table-cell ns0:value-type="string" ns6:value-type="string">
            <ns7:p>CA</ns7:p>
          </ns4:table-cell>
          <ns4:table-cell ns0:value-type="string" ns6:value-type="string">
            <ns7:p>65282</ns7:p>
          </ns4:table-cell>
          <ns4:table-cell ns4:number-columns-repeated="9"/>
        </ns4:table-row>
        <ns4:table-row ns4:style-name="ro1">
          <ns4:table-cell ns0:value-type="string" ns6:value-type="string">
            <ns7:p>610.0</ns7:p>
          </ns4:table-cell>
          <ns4:table-cell ns0:value-type="string" ns6:value-type="string">
            <ns7:p>Richland</ns7:p>
          </ns4:table-cell>
          <ns4:table-cell ns0:value-type="string" ns6:value-type="string">
            <ns7:p>WA</ns7:p>
          </ns4:table-cell>
          <ns4:table-cell ns0:value-type="string" ns6:value-type="string">
            <ns7:p>65258</ns7:p>
          </ns4:table-cell>
          <ns4:table-cell ns4:number-columns-repeated="9"/>
        </ns4:table-row>
        <ns4:table-row ns4:style-name="ro1">
          <ns4:table-cell ns0:value-type="string" ns6:value-type="string">
            <ns7:p>611.0</ns7:p>
          </ns4:table-cell>
          <ns4:table-cell ns0:value-type="string" ns6:value-type="string">
            <ns7:p>Burnsville</ns7:p>
          </ns4:table-cell>
          <ns4:table-cell ns0:value-type="string" ns6:value-type="string">
            <ns7:p>MN</ns7:p>
          </ns4:table-cell>
          <ns4:table-cell ns0:value-type="string" ns6:value-type="string">
            <ns7:p>65244</ns7:p>
          </ns4:table-cell>
          <ns4:table-cell ns4:number-columns-repeated="9"/>
        </ns4:table-row>
        <ns4:table-row ns4:style-name="ro1">
          <ns4:table-cell ns0:value-type="string" ns6:value-type="string">
            <ns7:p>612.0</ns7:p>
          </ns4:table-cell>
          <ns4:table-cell ns0:value-type="string" ns6:value-type="string">
            <ns7:p>Kenner</ns7:p>
          </ns4:table-cell>
          <ns4:table-cell ns0:value-type="string" ns6:value-type="string">
            <ns7:p>LA</ns7:p>
          </ns4:table-cell>
          <ns4:table-cell ns0:value-type="string" ns6:value-type="string">
            <ns7:p>65136</ns7:p>
          </ns4:table-cell>
          <ns4:table-cell ns4:number-columns-repeated="9"/>
        </ns4:table-row>
        <ns4:table-row ns4:style-name="ro1">
          <ns4:table-cell ns0:value-type="string" ns6:value-type="string">
            <ns7:p>613.0</ns7:p>
          </ns4:table-cell>
          <ns4:table-cell ns0:value-type="string" ns6:value-type="string">
            <ns7:p>North Little Rock</ns7:p>
          </ns4:table-cell>
          <ns4:table-cell ns0:value-type="string" ns6:value-type="string">
            <ns7:p>AR</ns7:p>
          </ns4:table-cell>
          <ns4:table-cell ns0:value-type="string" ns6:value-type="string">
            <ns7:p>65120</ns7:p>
          </ns4:table-cell>
          <ns4:table-cell ns4:number-columns-repeated="9"/>
        </ns4:table-row>
        <ns4:table-row ns4:style-name="ro1">
          <ns4:table-cell ns0:value-type="string" ns6:value-type="string">
            <ns7:p>614.0</ns7:p>
          </ns4:table-cell>
          <ns4:table-cell ns0:value-type="string" ns6:value-type="string">
            <ns7:p>Waltham</ns7:p>
          </ns4:table-cell>
          <ns4:table-cell ns0:value-type="string" ns6:value-type="string">
            <ns7:p>MA</ns7:p>
          </ns4:table-cell>
          <ns4:table-cell ns0:value-type="string" ns6:value-type="string">
            <ns7:p>65037</ns7:p>
          </ns4:table-cell>
          <ns4:table-cell ns4:number-columns-repeated="9"/>
        </ns4:table-row>
        <ns4:table-row ns4:style-name="ro1">
          <ns4:table-cell ns0:value-type="string" ns6:value-type="string">
            <ns7:p>615.0</ns7:p>
          </ns4:table-cell>
          <ns4:table-cell ns0:value-type="string" ns6:value-type="string">
            <ns7:p>South San Francisco</ns7:p>
          </ns4:table-cell>
          <ns4:table-cell ns0:value-type="string" ns6:value-type="string">
            <ns7:p>CA</ns7:p>
          </ns4:table-cell>
          <ns4:table-cell ns0:value-type="string" ns6:value-type="string">
            <ns7:p>64941</ns7:p>
          </ns4:table-cell>
          <ns4:table-cell ns4:number-columns-repeated="9"/>
        </ns4:table-row>
        <ns4:table-row ns4:style-name="ro1">
          <ns4:table-cell ns0:value-type="string" ns6:value-type="string">
            <ns7:p>616.0</ns7:p>
          </ns4:table-cell>
          <ns4:table-cell ns0:value-type="string" ns6:value-type="string">
            <ns7:p>Bellevue</ns7:p>
          </ns4:table-cell>
          <ns4:table-cell ns0:value-type="string" ns6:value-type="string">
            <ns7:p>NE</ns7:p>
          </ns4:table-cell>
          <ns4:table-cell ns0:value-type="string" ns6:value-type="string">
            <ns7:p>64863</ns7:p>
          </ns4:table-cell>
          <ns4:table-cell ns4:number-columns-repeated="9"/>
        </ns4:table-row>
        <ns4:table-row ns4:style-name="ro1">
          <ns4:table-cell ns0:value-type="string" ns6:value-type="string">
            <ns7:p>617.0</ns7:p>
          </ns4:table-cell>
          <ns4:table-cell ns0:value-type="string" ns6:value-type="string">
            <ns7:p>Hamilton</ns7:p>
          </ns4:table-cell>
          <ns4:table-cell ns0:value-type="string" ns6:value-type="string">
            <ns7:p>OH</ns7:p>
          </ns4:table-cell>
          <ns4:table-cell ns0:value-type="string" ns6:value-type="string">
            <ns7:p>64644</ns7:p>
          </ns4:table-cell>
          <ns4:table-cell ns4:number-columns-repeated="9"/>
        </ns4:table-row>
        <ns4:table-row ns4:style-name="ro1">
          <ns4:table-cell ns0:value-type="string" ns6:value-type="string">
            <ns7:p>618.0</ns7:p>
          </ns4:table-cell>
          <ns4:table-cell ns0:value-type="string" ns6:value-type="string">
            <ns7:p>Fulshear</ns7:p>
          </ns4:table-cell>
          <ns4:table-cell ns0:value-type="string" ns6:value-type="string">
            <ns7:p>TX</ns7:p>
          </ns4:table-cell>
          <ns4:table-cell ns0:value-type="string" ns6:value-type="string">
            <ns7:p>64630</ns7:p>
          </ns4:table-cell>
          <ns4:table-cell ns4:number-columns-repeated="9"/>
        </ns4:table-row>
        <ns4:table-row ns4:style-name="ro1">
          <ns4:table-cell ns0:value-type="string" ns6:value-type="string">
            <ns7:p>619.0</ns7:p>
          </ns4:table-cell>
          <ns4:table-cell ns0:value-type="string" ns6:value-type="string">
            <ns7:p>Celina</ns7:p>
          </ns4:table-cell>
          <ns4:table-cell ns0:value-type="string" ns6:value-type="string">
            <ns7:p>TX</ns7:p>
          </ns4:table-cell>
          <ns4:table-cell ns0:value-type="string" ns6:value-type="string">
            <ns7:p>64427</ns7:p>
          </ns4:table-cell>
          <ns4:table-cell ns4:number-columns-repeated="9"/>
        </ns4:table-row>
        <ns4:table-row ns4:style-name="ro1">
          <ns4:table-cell ns0:value-type="string" ns6:value-type="string">
            <ns7:p>620.0</ns7:p>
          </ns4:table-cell>
          <ns4:table-cell ns0:value-type="string" ns6:value-type="string">
            <ns7:p>Hendersonville</ns7:p>
          </ns4:table-cell>
          <ns4:table-cell ns0:value-type="string" ns6:value-type="string">
            <ns7:p>TN</ns7:p>
          </ns4:table-cell>
          <ns4:table-cell ns0:value-type="string" ns6:value-type="string">
            <ns7:p>64266</ns7:p>
          </ns4:table-cell>
          <ns4:table-cell ns4:number-columns-repeated="9"/>
        </ns4:table-row>
        <ns4:table-row ns4:style-name="ro1">
          <ns4:table-cell ns0:value-type="string" ns6:value-type="string">
            <ns7:p>621.0</ns7:p>
          </ns4:table-cell>
          <ns4:table-cell ns0:value-type="string" ns6:value-type="string">
            <ns7:p>Coon Rapids</ns7:p>
          </ns4:table-cell>
          <ns4:table-cell ns0:value-type="string" ns6:value-type="string">
            <ns7:p>MN</ns7:p>
          </ns4:table-cell>
          <ns4:table-cell ns0:value-type="string" ns6:value-type="string">
            <ns7:p>64193</ns7:p>
          </ns4:table-cell>
          <ns4:table-cell ns4:number-columns-repeated="9"/>
        </ns4:table-row>
        <ns4:table-row ns4:style-name="ro1">
          <ns4:table-cell ns0:value-type="string" ns6:value-type="string">
            <ns7:p>622.0</ns7:p>
          </ns4:table-cell>
          <ns4:table-cell ns0:value-type="string" ns6:value-type="string">
            <ns7:p>Laguna Niguel</ns7:p>
          </ns4:table-cell>
          <ns4:table-cell ns0:value-type="string" ns6:value-type="string">
            <ns7:p>CA</ns7:p>
          </ns4:table-cell>
          <ns4:table-cell ns0:value-type="string" ns6:value-type="string">
            <ns7:p>64107</ns7:p>
          </ns4:table-cell>
          <ns4:table-cell ns4:number-columns-repeated="9"/>
        </ns4:table-row>
        <ns4:table-row ns4:style-name="ro1">
          <ns4:table-cell ns0:value-type="string" ns6:value-type="string">
            <ns7:p>623.0</ns7:p>
          </ns4:table-cell>
          <ns4:table-cell ns0:value-type="string" ns6:value-type="string">
            <ns7:p>Millcreek</ns7:p>
          </ns4:table-cell>
          <ns4:table-cell ns0:value-type="string" ns6:value-type="string">
            <ns7:p>UT</ns7:p>
          </ns4:table-cell>
          <ns4:table-cell ns0:value-type="string" ns6:value-type="string">
            <ns7:p>63926</ns7:p>
          </ns4:table-cell>
          <ns4:table-cell ns4:number-columns-repeated="9"/>
        </ns4:table-row>
        <ns4:table-row ns4:style-name="ro1">
          <ns4:table-cell ns0:value-type="string" ns6:value-type="string">
            <ns7:p>624.0</ns7:p>
          </ns4:table-cell>
          <ns4:table-cell ns0:value-type="string" ns6:value-type="string">
            <ns7:p>Palm Beach Gardens</ns7:p>
          </ns4:table-cell>
          <ns4:table-cell ns0:value-type="string" ns6:value-type="string">
            <ns7:p>FL</ns7:p>
          </ns4:table-cell>
          <ns4:table-cell ns0:value-type="string" ns6:value-type="string">
            <ns7:p>63883</ns7:p>
          </ns4:table-cell>
          <ns4:table-cell ns4:number-columns-repeated="9"/>
        </ns4:table-row>
        <ns4:table-row ns4:style-name="ro1">
          <ns4:table-cell ns0:value-type="string" ns6:value-type="string">
            <ns7:p>625.0</ns7:p>
          </ns4:table-cell>
          <ns4:table-cell ns0:value-type="string" ns6:value-type="string">
            <ns7:p>Wylie</ns7:p>
          </ns4:table-cell>
          <ns4:table-cell ns0:value-type="string" ns6:value-type="string">
            <ns7:p>TX</ns7:p>
          </ns4:table-cell>
          <ns4:table-cell ns0:value-type="string" ns6:value-type="string">
            <ns7:p>63842</ns7:p>
          </ns4:table-cell>
          <ns4:table-cell ns4:number-columns-repeated="9"/>
        </ns4:table-row>
        <ns4:table-row ns4:style-name="ro1">
          <ns4:table-cell ns0:value-type="string" ns6:value-type="string">
            <ns7:p>626.0</ns7:p>
          </ns4:table-cell>
          <ns4:table-cell ns0:value-type="string" ns6:value-type="string">
            <ns7:p>Moore</ns7:p>
          </ns4:table-cell>
          <ns4:table-cell ns0:value-type="string" ns6:value-type="string">
            <ns7:p>OK</ns7:p>
          </ns4:table-cell>
          <ns4:table-cell ns0:value-type="string" ns6:value-type="string">
            <ns7:p>63609</ns7:p>
          </ns4:table-cell>
          <ns4:table-cell ns4:number-columns-repeated="9"/>
        </ns4:table-row>
        <ns4:table-row ns4:style-name="ro1">
          <ns4:table-cell ns0:value-type="string" ns6:value-type="string">
            <ns7:p>627.0</ns7:p>
          </ns4:table-cell>
          <ns4:table-cell ns0:value-type="string" ns6:value-type="string">
            <ns7:p>Marietta</ns7:p>
          </ns4:table-cell>
          <ns4:table-cell ns0:value-type="string" ns6:value-type="string">
            <ns7:p>GA</ns7:p>
          </ns4:table-cell>
          <ns4:table-cell ns0:value-type="string" ns6:value-type="string">
            <ns7:p>63574</ns7:p>
          </ns4:table-cell>
          <ns4:table-cell ns4:number-columns-repeated="9"/>
        </ns4:table-row>
        <ns4:table-row ns4:style-name="ro1">
          <ns4:table-cell ns0:value-type="string" ns6:value-type="string">
            <ns7:p>628.0</ns7:p>
          </ns4:table-cell>
          <ns4:table-cell ns0:value-type="string" ns6:value-type="string">
            <ns7:p>Chapel Hill</ns7:p>
          </ns4:table-cell>
          <ns4:table-cell ns0:value-type="string" ns6:value-type="string">
            <ns7:p>NC</ns7:p>
          </ns4:table-cell>
          <ns4:table-cell ns0:value-type="string" ns6:value-type="string">
            <ns7:p>63565</ns7:p>
          </ns4:table-cell>
          <ns4:table-cell ns4:number-columns-repeated="9"/>
        </ns4:table-row>
        <ns4:table-row ns4:style-name="ro1">
          <ns4:table-cell ns0:value-type="string" ns6:value-type="string">
            <ns7:p>629.0</ns7:p>
          </ns4:table-cell>
          <ns4:table-cell ns0:value-type="string" ns6:value-type="string">
            <ns7:p>Lynwood</ns7:p>
          </ns4:table-cell>
          <ns4:table-cell ns0:value-type="string" ns6:value-type="string">
            <ns7:p>CA</ns7:p>
          </ns4:table-cell>
          <ns4:table-cell ns0:value-type="string" ns6:value-type="string">
            <ns7:p>63512</ns7:p>
          </ns4:table-cell>
          <ns4:table-cell ns4:number-columns-repeated="9"/>
        </ns4:table-row>
        <ns4:table-row ns4:style-name="ro1">
          <ns4:table-cell ns0:value-type="string" ns6:value-type="string">
            <ns7:p>630.0</ns7:p>
          </ns4:table-cell>
          <ns4:table-cell ns0:value-type="string" ns6:value-type="string">
            <ns7:p>Smyrna</ns7:p>
          </ns4:table-cell>
          <ns4:table-cell ns0:value-type="string" ns6:value-type="string">
            <ns7:p>TN</ns7:p>
          </ns4:table-cell>
          <ns4:table-cell ns0:value-type="string" ns6:value-type="string">
            <ns7:p>63321</ns7:p>
          </ns4:table-cell>
          <ns4:table-cell ns4:number-columns-repeated="9"/>
        </ns4:table-row>
        <ns4:table-row ns4:style-name="ro1">
          <ns4:table-cell ns0:value-type="string" ns6:value-type="string">
            <ns7:p>631.0</ns7:p>
          </ns4:table-cell>
          <ns4:table-cell ns0:value-type="string" ns6:value-type="string">
            <ns7:p>Herriman</ns7:p>
          </ns4:table-cell>
          <ns4:table-cell ns0:value-type="string" ns6:value-type="string">
            <ns7:p>UT</ns7:p>
          </ns4:table-cell>
          <ns4:table-cell ns0:value-type="string" ns6:value-type="string">
            <ns7:p>63282</ns7:p>
          </ns4:table-cell>
          <ns4:table-cell ns4:number-columns-repeated="9"/>
        </ns4:table-row>
        <ns4:table-row ns4:style-name="ro1">
          <ns4:table-cell ns0:value-type="string" ns6:value-type="string">
            <ns7:p>632.0</ns7:p>
          </ns4:table-cell>
          <ns4:table-cell ns0:value-type="string" ns6:value-type="string">
            <ns7:p>Bossier City</ns7:p>
          </ns4:table-cell>
          <ns4:table-cell ns0:value-type="string" ns6:value-type="string">
            <ns7:p>LA</ns7:p>
          </ns4:table-cell>
          <ns4:table-cell ns0:value-type="string" ns6:value-type="string">
            <ns7:p>63259</ns7:p>
          </ns4:table-cell>
          <ns4:table-cell ns4:number-columns-repeated="9"/>
        </ns4:table-row>
        <ns4:table-row ns4:style-name="ro1">
          <ns4:table-cell ns0:value-type="string" ns6:value-type="string">
            <ns7:p>633.0</ns7:p>
          </ns4:table-cell>
          <ns4:table-cell ns0:value-type="string" ns6:value-type="string">
            <ns7:p>Porterville</ns7:p>
          </ns4:table-cell>
          <ns4:table-cell ns0:value-type="string" ns6:value-type="string">
            <ns7:p>CA</ns7:p>
          </ns4:table-cell>
          <ns4:table-cell ns0:value-type="string" ns6:value-type="string">
            <ns7:p>63088</ns7:p>
          </ns4:table-cell>
          <ns4:table-cell ns4:number-columns-repeated="9"/>
        </ns4:table-row>
        <ns4:table-row ns4:style-name="ro1">
          <ns4:table-cell ns0:value-type="string" ns6:value-type="string">
            <ns7:p>634.0</ns7:p>
          </ns4:table-cell>
          <ns4:table-cell ns0:value-type="string" ns6:value-type="string">
            <ns7:p>Eden Prairie</ns7:p>
          </ns4:table-cell>
          <ns4:table-cell ns0:value-type="string" ns6:value-type="string">
            <ns7:p>MN</ns7:p>
          </ns4:table-cell>
          <ns4:table-cell ns0:value-type="string" ns6:value-type="string">
            <ns7:p>63075</ns7:p>
          </ns4:table-cell>
          <ns4:table-cell ns4:number-columns-repeated="9"/>
        </ns4:table-row>
        <ns4:table-row ns4:style-name="ro1">
          <ns4:table-cell ns0:value-type="string" ns6:value-type="string">
            <ns7:p>635.0</ns7:p>
          </ns4:table-cell>
          <ns4:table-cell ns0:value-type="string" ns6:value-type="string">
            <ns7:p>Bentonville</ns7:p>
          </ns4:table-cell>
          <ns4:table-cell ns0:value-type="string" ns6:value-type="string">
            <ns7:p>AR</ns7:p>
          </ns4:table-cell>
          <ns4:table-cell ns0:value-type="string" ns6:value-type="string">
            <ns7:p>63057</ns7:p>
          </ns4:table-cell>
          <ns4:table-cell ns4:number-columns-repeated="9">
            <ns7:p>Smith Bros. Plumbing</ns7:p>
          </ns4:table-cell>
        </ns4:table-row>
        <ns4:table-row ns4:style-name="ro1">
          <ns4:table-cell ns0:value-type="string" ns6:value-type="string">
            <ns7:p>636.0</ns7:p>
          </ns4:table-cell>
          <ns4:table-cell ns0:value-type="string" ns6:value-type="string">
            <ns7:p>Utica</ns7:p>
          </ns4:table-cell>
          <ns4:table-cell ns0:value-type="string" ns6:value-type="string">
            <ns7:p>NY</ns7:p>
          </ns4:table-cell>
          <ns4:table-cell ns0:value-type="string" ns6:value-type="string">
            <ns7:p>62978</ns7:p>
          </ns4:table-cell>
          <ns4:table-cell ns4:number-columns-repeated="9"/>
        </ns4:table-row>
        <ns4:table-row ns4:style-name="ro1">
          <ns4:table-cell ns0:value-type="string" ns6:value-type="string">
            <ns7:p>637.0</ns7:p>
          </ns4:table-cell>
          <ns4:table-cell ns0:value-type="string" ns6:value-type="string">
            <ns7:p>White Plains</ns7:p>
          </ns4:table-cell>
          <ns4:table-cell ns0:value-type="string" ns6:value-type="string">
            <ns7:p>NY</ns7:p>
          </ns4:table-cell>
          <ns4:table-cell ns0:value-type="string" ns6:value-type="string">
            <ns7:p>62871</ns7:p>
          </ns4:table-cell>
          <ns4:table-cell ns4:number-columns-repeated="9"/>
        </ns4:table-row>
        <ns4:table-row ns4:style-name="ro1">
          <ns4:table-cell ns0:value-type="string" ns6:value-type="string">
            <ns7:p>638.0</ns7:p>
          </ns4:table-cell>
          <ns4:table-cell ns0:value-type="string" ns6:value-type="string">
            <ns7:p>Lakewood</ns7:p>
          </ns4:table-cell>
          <ns4:table-cell ns0:value-type="string" ns6:value-type="string">
            <ns7:p>WA</ns7:p>
          </ns4:table-cell>
          <ns4:table-cell ns0:value-type="string" ns6:value-type="string">
            <ns7:p>62755</ns7:p>
          </ns4:table-cell>
          <ns4:table-cell ns4:number-columns-repeated="9"/>
        </ns4:table-row>
        <ns4:table-row ns4:style-name="ro1">
          <ns4:table-cell ns0:value-type="string" ns6:value-type="string">
            <ns7:p>639.0</ns7:p>
          </ns4:table-cell>
          <ns4:table-cell ns0:value-type="string" ns6:value-type="string">
            <ns7:p>Little Elm</ns7:p>
          </ns4:table-cell>
          <ns4:table-cell ns0:value-type="string" ns6:value-type="string">
            <ns7:p>TX</ns7:p>
          </ns4:table-cell>
          <ns4:table-cell ns0:value-type="string" ns6:value-type="string">
            <ns7:p>62727</ns7:p>
          </ns4:table-cell>
          <ns4:table-cell ns4:number-columns-repeated="9"/>
        </ns4:table-row>
        <ns4:table-row ns4:style-name="ro1">
          <ns4:table-cell ns0:value-type="string" ns6:value-type="string">
            <ns7:p>640.0</ns7:p>
          </ns4:table-cell>
          <ns4:table-cell ns0:value-type="string" ns6:value-type="string">
            <ns7:p>Vineland</ns7:p>
          </ns4:table-cell>
          <ns4:table-cell ns0:value-type="string" ns6:value-type="string">
            <ns7:p>NJ</ns7:p>
          </ns4:table-cell>
          <ns4:table-cell ns0:value-type="string" ns6:value-type="string">
            <ns7:p>62703</ns7:p>
          </ns4:table-cell>
          <ns4:table-cell ns4:number-columns-repeated="9"/>
        </ns4:table-row>
        <ns4:table-row ns4:style-name="ro1">
          <ns4:table-cell ns0:value-type="string" ns6:value-type="string">
            <ns7:p>641.0</ns7:p>
          </ns4:table-cell>
          <ns4:table-cell ns0:value-type="string" ns6:value-type="string">
            <ns7:p>Council Bluffs</ns7:p>
          </ns4:table-cell>
          <ns4:table-cell ns0:value-type="string" ns6:value-type="string">
            <ns7:p>IA</ns7:p>
          </ns4:table-cell>
          <ns4:table-cell ns0:value-type="string" ns6:value-type="string">
            <ns7:p>62680</ns7:p>
          </ns4:table-cell>
          <ns4:table-cell ns4:number-columns-repeated="9"/>
        </ns4:table-row>
        <ns4:table-row ns4:style-name="ro1">
          <ns4:table-cell ns0:value-type="string" ns6:value-type="string">
            <ns7:p>642.0</ns7:p>
          </ns4:table-cell>
          <ns4:table-cell ns0:value-type="string" ns6:value-type="string">
            <ns7:p>Wellington</ns7:p>
          </ns4:table-cell>
          <ns4:table-cell ns0:value-type="string" ns6:value-type="string">
            <ns7:p>FL</ns7:p>
          </ns4:table-cell>
          <ns4:table-cell ns0:value-type="string" ns6:value-type="string">
            <ns7:p>62662</ns7:p>
          </ns4:table-cell>
          <ns4:table-cell ns4:number-columns-repeated="9"/>
        </ns4:table-row>
        <ns4:table-row ns4:style-name="ro1">
          <ns4:table-cell ns0:value-type="string" ns6:value-type="string">
            <ns7:p>643.0</ns7:p>
          </ns4:table-cell>
          <ns4:table-cell ns0:value-type="string" ns6:value-type="string">
            <ns7:p>Taunton</ns7:p>
          </ns4:table-cell>
          <ns4:table-cell ns0:value-type="string" ns6:value-type="string">
            <ns7:p>MA</ns7:p>
          </ns4:table-cell>
          <ns4:table-cell ns0:value-type="string" ns6:value-type="string">
            <ns7:p>62522</ns7:p>
          </ns4:table-cell>
          <ns4:table-cell ns4:number-columns-repeated="9"/>
        </ns4:table-row>
        <ns4:table-row ns4:style-name="ro1">
          <ns4:table-cell ns0:value-type="string" ns6:value-type="string">
            <ns7:p>644.0</ns7:p>
          </ns4:table-cell>
          <ns4:table-cell ns0:value-type="string" ns6:value-type="string">
            <ns7:p>Woodland</ns7:p>
          </ns4:table-cell>
          <ns4:table-cell ns0:value-type="string" ns6:value-type="string">
            <ns7:p>CA</ns7:p>
          </ns4:table-cell>
          <ns4:table-cell ns0:value-type="string" ns6:value-type="string">
            <ns7:p>62513</ns7:p>
          </ns4:table-cell>
          <ns4:table-cell ns4:number-columns-repeated="9"/>
        </ns4:table-row>
        <ns4:table-row ns4:style-name="ro1">
          <ns4:table-cell ns0:value-type="string" ns6:value-type="string">
            <ns7:p>645.0</ns7:p>
          </ns4:table-cell>
          <ns4:table-cell ns0:value-type="string" ns6:value-type="string">
            <ns7:p>Jupiter</ns7:p>
          </ns4:table-cell>
          <ns4:table-cell ns0:value-type="string" ns6:value-type="string">
            <ns7:p>FL</ns7:p>
          </ns4:table-cell>
          <ns4:table-cell ns0:value-type="string" ns6:value-type="string">
            <ns7:p>62350</ns7:p>
          </ns4:table-cell>
          <ns4:table-cell ns4:number-columns-repeated="9"/>
        </ns4:table-row>
        <ns4:table-row ns4:style-name="ro1">
          <ns4:table-cell ns0:value-type="string" ns6:value-type="string">
            <ns7:p>646.0</ns7:p>
          </ns4:table-cell>
          <ns4:table-cell ns0:value-type="string" ns6:value-type="string">
            <ns7:p>Bristol</ns7:p>
          </ns4:table-cell>
          <ns4:table-cell ns0:value-type="string" ns6:value-type="string">
            <ns7:p>CT</ns7:p>
          </ns4:table-cell>
          <ns4:table-cell ns0:value-type="string" ns6:value-type="string">
            <ns7:p>62341</ns7:p>
          </ns4:table-cell>
          <ns4:table-cell ns4:number-columns-repeated="9"/>
        </ns4:table-row>
        <ns4:table-row ns4:style-name="ro1">
          <ns4:table-cell ns0:value-type="string" ns6:value-type="string">
            <ns7:p>647.0</ns7:p>
          </ns4:table-cell>
          <ns4:table-cell ns0:value-type="string" ns6:value-type="string">
            <ns7:p>Winter Haven</ns7:p>
          </ns4:table-cell>
          <ns4:table-cell ns0:value-type="string" ns6:value-type="string">
            <ns7:p>FL</ns7:p>
          </ns4:table-cell>
          <ns4:table-cell ns0:value-type="string" ns6:value-type="string">
            <ns7:p>62313</ns7:p>
          </ns4:table-cell>
          <ns4:table-cell ns4:number-columns-repeated="9"/>
        </ns4:table-row>
        <ns4:table-row ns4:style-name="ro1">
          <ns4:table-cell ns0:value-type="string" ns6:value-type="string">
            <ns7:p>648.0</ns7:p>
          </ns4:table-cell>
          <ns4:table-cell ns0:value-type="string" ns6:value-type="string">
            <ns7:p>Hanford</ns7:p>
          </ns4:table-cell>
          <ns4:table-cell ns0:value-type="string" ns6:value-type="string">
            <ns7:p>CA</ns7:p>
          </ns4:table-cell>
          <ns4:table-cell ns0:value-type="string" ns6:value-type="string">
            <ns7:p>62229</ns7:p>
          </ns4:table-cell>
          <ns4:table-cell ns4:number-columns-repeated="9"/>
        </ns4:table-row>
        <ns4:table-row ns4:style-name="ro1">
          <ns4:table-cell ns0:value-type="string" ns6:value-type="string">
            <ns7:p>649.0</ns7:p>
          </ns4:table-cell>
          <ns4:table-cell ns0:value-type="string" ns6:value-type="string">
            <ns7:p>San Clemente</ns7:p>
          </ns4:table-cell>
          <ns4:table-cell ns0:value-type="string" ns6:value-type="string">
            <ns7:p>CA</ns7:p>
          </ns4:table-cell>
          <ns4:table-cell ns0:value-type="string" ns6:value-type="string">
            <ns7:p>62226</ns7:p>
          </ns4:table-cell>
          <ns4:table-cell ns4:number-columns-repeated="9"/>
        </ns4:table-row>
        <ns4:table-row ns4:style-name="ro1">
          <ns4:table-cell ns0:value-type="string" ns6:value-type="string">
            <ns7:p>650.0</ns7:p>
          </ns4:table-cell>
          <ns4:table-cell ns0:value-type="string" ns6:value-type="string">
            <ns7:p>Pontiac</ns7:p>
          </ns4:table-cell>
          <ns4:table-cell ns0:value-type="string" ns6:value-type="string">
            <ns7:p>MI</ns7:p>
          </ns4:table-cell>
          <ns4:table-cell ns0:value-type="string" ns6:value-type="string">
            <ns7:p>62077</ns7:p>
          </ns4:table-cell>
          <ns4:table-cell ns4:number-columns-repeated="9"/>
        </ns4:table-row>
        <ns4:table-row ns4:style-name="ro1">
          <ns4:table-cell ns0:value-type="string" ns6:value-type="string">
            <ns7:p>651.0</ns7:p>
          </ns4:table-cell>
          <ns4:table-cell ns0:value-type="string" ns6:value-type="string">
            <ns7:p>Santa Cruz</ns7:p>
          </ns4:table-cell>
          <ns4:table-cell ns0:value-type="string" ns6:value-type="string">
            <ns7:p>CA</ns7:p>
          </ns4:table-cell>
          <ns4:table-cell ns0:value-type="string" ns6:value-type="string">
            <ns7:p>61797</ns7:p>
          </ns4:table-cell>
          <ns4:table-cell ns4:number-columns-repeated="9"/>
        </ns4:table-row>
        <ns4:table-row ns4:style-name="ro1">
          <ns4:table-cell ns0:value-type="string" ns6:value-type="string">
            <ns7:p>652.0</ns7:p>
          </ns4:table-cell>
          <ns4:table-cell ns0:value-type="string" ns6:value-type="string">
            <ns7:p>Kannapolis</ns7:p>
          </ns4:table-cell>
          <ns4:table-cell ns0:value-type="string" ns6:value-type="string">
            <ns7:p>NC</ns7:p>
          </ns4:table-cell>
          <ns4:table-cell ns0:value-type="string" ns6:value-type="string">
            <ns7:p>61708</ns7:p>
          </ns4:table-cell>
          <ns4:table-cell ns4:number-columns-repeated="9"/>
        </ns4:table-row>
        <ns4:table-row ns4:style-name="ro1">
          <ns4:table-cell ns0:value-type="string" ns6:value-type="string">
            <ns7:p>653.0</ns7:p>
          </ns4:table-cell>
          <ns4:table-cell ns0:value-type="string" ns6:value-type="string">
            <ns7:p>Blue Springs</ns7:p>
          </ns4:table-cell>
          <ns4:table-cell ns0:value-type="string" ns6:value-type="string">
            <ns7:p>MO</ns7:p>
          </ns4:table-cell>
          <ns4:table-cell ns0:value-type="string" ns6:value-type="string">
            <ns7:p>61632</ns7:p>
          </ns4:table-cell>
          <ns4:table-cell ns4:number-columns-repeated="9"/>
        </ns4:table-row>
        <ns4:table-row ns4:style-name="ro1">
          <ns4:table-cell ns0:value-type="string" ns6:value-type="string">
            <ns7:p>654.0</ns7:p>
          </ns4:table-cell>
          <ns4:table-cell ns0:value-type="string" ns6:value-type="string">
            <ns7:p>Corvallis</ns7:p>
          </ns4:table-cell>
          <ns4:table-cell ns0:value-type="string" ns6:value-type="string">
            <ns7:p>OR</ns7:p>
          </ns4:table-cell>
          <ns4:table-cell ns0:value-type="string" ns6:value-type="string">
            <ns7:p>61499</ns7:p>
          </ns4:table-cell>
          <ns4:table-cell ns4:number-columns-repeated="9"/>
        </ns4:table-row>
        <ns4:table-row ns4:style-name="ro1">
          <ns4:table-cell ns0:value-type="string" ns6:value-type="string">
            <ns7:p>655.0</ns7:p>
          </ns4:table-cell>
          <ns4:table-cell ns0:value-type="string" ns6:value-type="string">
            <ns7:p>Burlington</ns7:p>
          </ns4:table-cell>
          <ns4:table-cell ns0:value-type="string" ns6:value-type="string">
            <ns7:p>NC</ns7:p>
          </ns4:table-cell>
          <ns4:table-cell ns0:value-type="string" ns6:value-type="string">
            <ns7:p>61496</ns7:p>
          </ns4:table-cell>
          <ns4:table-cell ns4:number-columns-repeated="9"/>
        </ns4:table-row>
        <ns4:table-row ns4:style-name="ro1">
          <ns4:table-cell ns0:value-type="string" ns6:value-type="string">
            <ns7:p>656.0</ns7:p>
          </ns4:table-cell>
          <ns4:table-cell ns0:value-type="string" ns6:value-type="string">
            <ns7:p>St. Peters</ns7:p>
          </ns4:table-cell>
          <ns4:table-cell ns0:value-type="string" ns6:value-type="string">
            <ns7:p>MO</ns7:p>
          </ns4:table-cell>
          <ns4:table-cell ns0:value-type="string" ns6:value-type="string">
            <ns7:p>61479</ns7:p>
          </ns4:table-cell>
          <ns4:table-cell ns4:number-columns-repeated="9"/>
        </ns4:table-row>
        <ns4:table-row ns4:style-name="ro1">
          <ns4:table-cell ns0:value-type="string" ns6:value-type="string">
            <ns7:p>657.0</ns7:p>
          </ns4:table-cell>
          <ns4:table-cell ns0:value-type="string" ns6:value-type="string">
            <ns7:p>Springfield</ns7:p>
          </ns4:table-cell>
          <ns4:table-cell ns0:value-type="string" ns6:value-type="string">
            <ns7:p>OR</ns7:p>
          </ns4:table-cell>
          <ns4:table-cell ns0:value-type="string" ns6:value-type="string">
            <ns7:p>61431</ns7:p>
          </ns4:table-cell>
          <ns4:table-cell ns4:number-columns-repeated="9"/>
        </ns4:table-row>
        <ns4:table-row ns4:style-name="ro1">
          <ns4:table-cell ns0:value-type="string" ns6:value-type="string">
            <ns7:p>658.0</ns7:p>
          </ns4:table-cell>
          <ns4:table-cell ns0:value-type="string" ns6:value-type="string">
            <ns7:p>Saratoga Springs</ns7:p>
          </ns4:table-cell>
          <ns4:table-cell ns0:value-type="string" ns6:value-type="string">
            <ns7:p>UT</ns7:p>
          </ns4:table-cell>
          <ns4:table-cell ns0:value-type="string" ns6:value-type="string">
            <ns7:p>61397</ns7:p>
          </ns4:table-cell>
          <ns4:table-cell ns4:number-columns-repeated="9"/>
        </ns4:table-row>
        <ns4:table-row ns4:style-name="ro1">
          <ns4:table-cell ns0:value-type="string" ns6:value-type="string">
            <ns7:p>659.0</ns7:p>
          </ns4:table-cell>
          <ns4:table-cell ns0:value-type="string" ns6:value-type="string">
            <ns7:p>Stonecrest</ns7:p>
          </ns4:table-cell>
          <ns4:table-cell ns0:value-type="string" ns6:value-type="string">
            <ns7:p>GA</ns7:p>
          </ns4:table-cell>
          <ns4:table-cell ns0:value-type="string" ns6:value-type="string">
            <ns7:p>61337</ns7:p>
          </ns4:table-cell>
          <ns4:table-cell ns4:number-columns-repeated="9"/>
        </ns4:table-row>
        <ns4:table-row ns4:style-name="ro1">
          <ns4:table-cell ns0:value-type="string" ns6:value-type="string">
            <ns7:p>660.0</ns7:p>
          </ns4:table-cell>
          <ns4:table-cell ns0:value-type="string" ns6:value-type="string">
            <ns7:p>Spring Hill</ns7:p>
          </ns4:table-cell>
          <ns4:table-cell ns0:value-type="string" ns6:value-type="string">
            <ns7:p>TN</ns7:p>
          </ns4:table-cell>
          <ns4:table-cell ns0:value-type="string" ns6:value-type="string">
            <ns7:p>61336</ns7:p>
          </ns4:table-cell>
          <ns4:table-cell ns4:number-columns-repeated="9"/>
        </ns4:table-row>
        <ns4:table-row ns4:style-name="ro1">
          <ns4:table-cell ns0:value-type="string" ns6:value-type="string">
            <ns7:p>661.0</ns7:p>
          </ns4:table-cell>
          <ns4:table-cell ns0:value-type="string" ns6:value-type="string">
            <ns7:p>Taylor</ns7:p>
          </ns4:table-cell>
          <ns4:table-cell ns0:value-type="string" ns6:value-type="string">
            <ns7:p>MI</ns7:p>
          </ns4:table-cell>
          <ns4:table-cell ns0:value-type="string" ns6:value-type="string">
            <ns7:p>61279</ns7:p>
          </ns4:table-cell>
          <ns4:table-cell ns4:number-columns-repeated="9"/>
        </ns4:table-row>
        <ns4:table-row ns4:style-name="ro1">
          <ns4:table-cell ns0:value-type="string" ns6:value-type="string">
            <ns7:p>662.0</ns7:p>
          </ns4:table-cell>
          <ns4:table-cell ns0:value-type="string" ns6:value-type="string">
            <ns7:p>La Habra</ns7:p>
          </ns4:table-cell>
          <ns4:table-cell ns0:value-type="string" ns6:value-type="string">
            <ns7:p>CA</ns7:p>
          </ns4:table-cell>
          <ns4:table-cell ns0:value-type="string" ns6:value-type="string">
            <ns7:p>60908</ns7:p>
          </ns4:table-cell>
          <ns4:table-cell ns4:number-columns-repeated="9"/>
        </ns4:table-row>
        <ns4:table-row ns4:style-name="ro1">
          <ns4:table-cell ns0:value-type="string" ns6:value-type="string">
            <ns7:p>663.0</ns7:p>
          </ns4:table-cell>
          <ns4:table-cell ns0:value-type="string" ns6:value-type="string">
            <ns7:p>Owensboro</ns7:p>
          </ns4:table-cell>
          <ns4:table-cell ns0:value-type="string" ns6:value-type="string">
            <ns7:p>KY</ns7:p>
          </ns4:table-cell>
          <ns4:table-cell ns0:value-type="string" ns6:value-type="string">
            <ns7:p>60892</ns7:p>
          </ns4:table-cell>
          <ns4:table-cell ns4:number-columns-repeated="9"/>
        </ns4:table-row>
        <ns4:table-row ns4:style-name="ro1">
          <ns4:table-cell ns0:value-type="string" ns6:value-type="string">
            <ns7:p>664.0</ns7:p>
          </ns4:table-cell>
          <ns4:table-cell ns0:value-type="string" ns6:value-type="string">
            <ns7:p>North Miami</ns7:p>
          </ns4:table-cell>
          <ns4:table-cell ns0:value-type="string" ns6:value-type="string">
            <ns7:p>FL</ns7:p>
          </ns4:table-cell>
          <ns4:table-cell ns0:value-type="string" ns6:value-type="string">
            <ns7:p>60884</ns7:p>
          </ns4:table-cell>
          <ns4:table-cell ns4:number-columns-repeated="9"/>
        </ns4:table-row>
        <ns4:table-row ns4:style-name="ro1">
          <ns4:table-cell ns0:value-type="string" ns6:value-type="string">
            <ns7:p>665.0</ns7:p>
          </ns4:table-cell>
          <ns4:table-cell ns0:value-type="string" ns6:value-type="string">
            <ns7:p>Beaumont</ns7:p>
          </ns4:table-cell>
          <ns4:table-cell ns0:value-type="string" ns6:value-type="string">
            <ns7:p>CA</ns7:p>
          </ns4:table-cell>
          <ns4:table-cell ns0:value-type="string" ns6:value-type="string">
            <ns7:p>60835</ns7:p>
          </ns4:table-cell>
          <ns4:table-cell ns4:number-columns-repeated="9"/>
        </ns4:table-row>
        <ns4:table-row ns4:style-name="ro1">
          <ns4:table-cell ns0:value-type="string" ns6:value-type="string">
            <ns7:p>666.0</ns7:p>
          </ns4:table-cell>
          <ns4:table-cell ns0:value-type="string" ns6:value-type="string">
            <ns7:p>Meriden</ns7:p>
          </ns4:table-cell>
          <ns4:table-cell ns0:value-type="string" ns6:value-type="string">
            <ns7:p>CT</ns7:p>
          </ns4:table-cell>
          <ns4:table-cell ns0:value-type="string" ns6:value-type="string">
            <ns7:p>60810</ns7:p>
          </ns4:table-cell>
          <ns4:table-cell ns4:number-columns-repeated="9"/>
        </ns4:table-row>
        <ns4:table-row ns4:style-name="ro1">
          <ns4:table-cell ns0:value-type="string" ns6:value-type="string">
            <ns7:p>667.0</ns7:p>
          </ns4:table-cell>
          <ns4:table-cell ns0:value-type="string" ns6:value-type="string">
            <ns7:p>Gilroy</ns7:p>
          </ns4:table-cell>
          <ns4:table-cell ns0:value-type="string" ns6:value-type="string">
            <ns7:p>CA</ns7:p>
          </ns4:table-cell>
          <ns4:table-cell ns0:value-type="string" ns6:value-type="string">
            <ns7:p>60764</ns7:p>
          </ns4:table-cell>
          <ns4:table-cell ns4:number-columns-repeated="9"/>
        </ns4:table-row>
        <ns4:table-row ns4:style-name="ro1">
          <ns4:table-cell ns0:value-type="string" ns6:value-type="string">
            <ns7:p>668.0</ns7:p>
          </ns4:table-cell>
          <ns4:table-cell ns0:value-type="string" ns6:value-type="string">
            <ns7:p>Encinitas</ns7:p>
          </ns4:table-cell>
          <ns4:table-cell ns0:value-type="string" ns6:value-type="string">
            <ns7:p>CA</ns7:p>
          </ns4:table-cell>
          <ns4:table-cell ns0:value-type="string" ns6:value-type="string">
            <ns7:p>60736</ns7:p>
          </ns4:table-cell>
          <ns4:table-cell ns4:number-columns-repeated="9"/>
        </ns4:table-row>
        <ns4:table-row ns4:style-name="ro1">
          <ns4:table-cell ns0:value-type="string" ns6:value-type="string">
            <ns7:p>669.0</ns7:p>
          </ns4:table-cell>
          <ns4:table-cell ns0:value-type="string" ns6:value-type="string">
            <ns7:p>Montebello</ns7:p>
          </ns4:table-cell>
          <ns4:table-cell ns0:value-type="string" ns6:value-type="string">
            <ns7:p>CA</ns7:p>
          </ns4:table-cell>
          <ns4:table-cell ns0:value-type="string" ns6:value-type="string">
            <ns7:p>60693</ns7:p>
          </ns4:table-cell>
          <ns4:table-cell ns4:number-columns-repeated="9"/>
        </ns4:table-row>
        <ns4:table-row ns4:style-name="ro1">
          <ns4:table-cell ns0:value-type="string" ns6:value-type="string">
            <ns7:p>670.0</ns7:p>
          </ns4:table-cell>
          <ns4:table-cell ns0:value-type="string" ns6:value-type="string">
            <ns7:p>Dearborn Heights</ns7:p>
          </ns4:table-cell>
          <ns4:table-cell ns0:value-type="string" ns6:value-type="string">
            <ns7:p>MI</ns7:p>
          </ns4:table-cell>
          <ns4:table-cell ns0:value-type="string" ns6:value-type="string">
            <ns7:p>60664</ns7:p>
          </ns4:table-cell>
          <ns4:table-cell ns4:number-columns-repeated="9"/>
        </ns4:table-row>
        <ns4:table-row ns4:style-name="ro1">
          <ns4:table-cell ns0:value-type="string" ns6:value-type="string">
            <ns7:p>671.0</ns7:p>
          </ns4:table-cell>
          <ns4:table-cell ns0:value-type="string" ns6:value-type="string">
            <ns7:p>Lenexa</ns7:p>
          </ns4:table-cell>
          <ns4:table-cell ns0:value-type="string" ns6:value-type="string">
            <ns7:p>KS</ns7:p>
          </ns4:table-cell>
          <ns4:table-cell ns0:value-type="string" ns6:value-type="string">
            <ns7:p>60506</ns7:p>
          </ns4:table-cell>
          <ns4:table-cell ns4:number-columns-repeated="9"/>
        </ns4:table-row>
        <ns4:table-row ns4:style-name="ro1">
          <ns4:table-cell ns0:value-type="string" ns6:value-type="string">
            <ns7:p>672.0</ns7:p>
          </ns4:table-cell>
          <ns4:table-cell ns0:value-type="string" ns6:value-type="string">
            <ns7:p>Grand Forks</ns7:p>
          </ns4:table-cell>
          <ns4:table-cell ns0:value-type="string" ns6:value-type="string">
            <ns7:p>ND</ns7:p>
          </ns4:table-cell>
          <ns4:table-cell ns0:value-type="string" ns6:value-type="string">
            <ns7:p>60365</ns7:p>
          </ns4:table-cell>
          <ns4:table-cell ns4:number-columns-repeated="9"/>
        </ns4:table-row>
        <ns4:table-row ns4:style-name="ro1">
          <ns4:table-cell ns0:value-type="string" ns6:value-type="string">
            <ns7:p>673.0</ns7:p>
          </ns4:table-cell>
          <ns4:table-cell ns0:value-type="string" ns6:value-type="string">
            <ns7:p>Great Falls</ns7:p>
          </ns4:table-cell>
          <ns4:table-cell ns0:value-type="string" ns6:value-type="string">
            <ns7:p>MT</ns7:p>
          </ns4:table-cell>
          <ns4:table-cell ns0:value-type="string" ns6:value-type="string">
            <ns7:p>60208</ns7:p>
          </ns4:table-cell>
          <ns4:table-cell ns4:number-columns-repeated="9"/>
        </ns4:table-row>
        <ns4:table-row ns4:style-name="ro1">
          <ns4:table-cell ns0:value-type="string" ns6:value-type="string">
            <ns7:p>674.0</ns7:p>
          </ns4:table-cell>
          <ns4:table-cell ns0:value-type="string" ns6:value-type="string">
            <ns7:p>Revere</ns7:p>
          </ns4:table-cell>
          <ns4:table-cell ns0:value-type="string" ns6:value-type="string">
            <ns7:p>MA</ns7:p>
          </ns4:table-cell>
          <ns4:table-cell ns0:value-type="string" ns6:value-type="string">
            <ns7:p>60141</ns7:p>
          </ns4:table-cell>
          <ns4:table-cell ns4:number-columns-repeated="9"/>
        </ns4:table-row>
        <ns4:table-row ns4:style-name="ro1">
          <ns4:table-cell ns0:value-type="string" ns6:value-type="string">
            <ns7:p>675.0</ns7:p>
          </ns4:table-cell>
          <ns4:table-cell ns0:value-type="string" ns6:value-type="string">
            <ns7:p>West Allis</ns7:p>
          </ns4:table-cell>
          <ns4:table-cell ns0:value-type="string" ns6:value-type="string">
            <ns7:p>WI</ns7:p>
          </ns4:table-cell>
          <ns4:table-cell ns0:value-type="string" ns6:value-type="string">
            <ns7:p>60119</ns7:p>
          </ns4:table-cell>
          <ns4:table-cell ns4:number-columns-repeated="9"/>
        </ns4:table-row>
        <ns4:table-row ns4:style-name="ro1">
          <ns4:table-cell ns0:value-type="string" ns6:value-type="string">
            <ns7:p>676.0</ns7:p>
          </ns4:table-cell>
          <ns4:table-cell ns0:value-type="string" ns6:value-type="string">
            <ns7:p>Margate</ns7:p>
          </ns4:table-cell>
          <ns4:table-cell ns0:value-type="string" ns6:value-type="string">
            <ns7:p>FL</ns7:p>
          </ns4:table-cell>
          <ns4:table-cell ns0:value-type="string" ns6:value-type="string">
            <ns7:p>60070</ns7:p>
          </ns4:table-cell>
          <ns4:table-cell ns4:number-columns-repeated="9"/>
        </ns4:table-row>
        <ns4:table-row ns4:style-name="ro1">
          <ns4:table-cell ns0:value-type="string" ns6:value-type="string">
            <ns7:p>677.0</ns7:p>
          </ns4:table-cell>
          <ns4:table-cell ns0:value-type="string" ns6:value-type="string">
            <ns7:p>Euless</ns7:p>
          </ns4:table-cell>
          <ns4:table-cell ns0:value-type="string" ns6:value-type="string">
            <ns7:p>TX</ns7:p>
          </ns4:table-cell>
          <ns4:table-cell ns0:value-type="string" ns6:value-type="string">
            <ns7:p>60008</ns7:p>
          </ns4:table-cell>
          <ns4:table-cell ns4:number-columns-repeated="9"/>
        </ns4:table-row>
        <ns4:table-row ns4:style-name="ro1">
          <ns4:table-cell ns0:value-type="string" ns6:value-type="string">
            <ns7:p>678.0</ns7:p>
          </ns4:table-cell>
          <ns4:table-cell ns0:value-type="string" ns6:value-type="string">
            <ns7:p>Kokomo</ns7:p>
          </ns4:table-cell>
          <ns4:table-cell ns0:value-type="string" ns6:value-type="string">
            <ns7:p>IN</ns7:p>
          </ns4:table-cell>
          <ns4:table-cell ns0:value-type="string" ns6:value-type="string">
            <ns7:p>59999</ns7:p>
          </ns4:table-cell>
          <ns4:table-cell ns4:number-columns-repeated="9"/>
        </ns4:table-row>
        <ns4:table-row ns4:style-name="ro1">
          <ns4:table-cell ns0:value-type="string" ns6:value-type="string">
            <ns7:p>679.0</ns7:p>
          </ns4:table-cell>
          <ns4:table-cell ns0:value-type="string" ns6:value-type="string">
            <ns7:p>La Mesa</ns7:p>
          </ns4:table-cell>
          <ns4:table-cell ns0:value-type="string" ns6:value-type="string">
            <ns7:p>CA</ns7:p>
          </ns4:table-cell>
          <ns4:table-cell ns0:value-type="string" ns6:value-type="string">
            <ns7:p>59914</ns7:p>
          </ns4:table-cell>
          <ns4:table-cell ns4:number-columns-repeated="9"/>
        </ns4:table-row>
        <ns4:table-row ns4:style-name="ro1">
          <ns4:table-cell ns0:value-type="string" ns6:value-type="string">
            <ns7:p>680.0</ns7:p>
          </ns4:table-cell>
          <ns4:table-cell ns0:value-type="string" ns6:value-type="string">
            <ns7:p>Medford</ns7:p>
          </ns4:table-cell>
          <ns4:table-cell ns0:value-type="string" ns6:value-type="string">
            <ns7:p>MA</ns7:p>
          </ns4:table-cell>
          <ns4:table-cell ns0:value-type="string" ns6:value-type="string">
            <ns7:p>59834</ns7:p>
          </ns4:table-cell>
          <ns4:table-cell ns4:number-columns-repeated="9"/>
        </ns4:table-row>
        <ns4:table-row ns4:style-name="ro1">
          <ns4:table-cell ns0:value-type="string" ns6:value-type="string">
            <ns7:p>681.0</ns7:p>
          </ns4:table-cell>
          <ns4:table-cell ns0:value-type="string" ns6:value-type="string">
            <ns7:p>Hempstead</ns7:p>
          </ns4:table-cell>
          <ns4:table-cell ns0:value-type="string" ns6:value-type="string">
            <ns7:p>NY</ns7:p>
          </ns4:table-cell>
          <ns4:table-cell ns0:value-type="string" ns6:value-type="string">
            <ns7:p>59819</ns7:p>
          </ns4:table-cell>
          <ns4:table-cell ns4:number-columns-repeated="9"/>
        </ns4:table-row>
        <ns4:table-row ns4:style-name="ro1">
          <ns4:table-cell ns0:value-type="string" ns6:value-type="string">
            <ns7:p>682.0</ns7:p>
          </ns4:table-cell>
          <ns4:table-cell ns0:value-type="string" ns6:value-type="string">
            <ns7:p>Weymouth Town</ns7:p>
          </ns4:table-cell>
          <ns4:table-cell ns0:value-type="string" ns6:value-type="string">
            <ns7:p>MA</ns7:p>
          </ns4:table-cell>
          <ns4:table-cell ns0:value-type="string" ns6:value-type="string">
            <ns7:p>59759</ns7:p>
          </ns4:table-cell>
          <ns4:table-cell ns4:number-columns-repeated="9"/>
        </ns4:table-row>
        <ns4:table-row ns4:style-name="ro1">
          <ns4:table-cell ns0:value-type="string" ns6:value-type="string">
            <ns7:p>683.0</ns7:p>
          </ns4:table-cell>
          <ns4:table-cell ns0:value-type="string" ns6:value-type="string">
            <ns7:p>Texas City</ns7:p>
          </ns4:table-cell>
          <ns4:table-cell ns0:value-type="string" ns6:value-type="string">
            <ns7:p>TX</ns7:p>
          </ns4:table-cell>
          <ns4:table-cell ns0:value-type="string" ns6:value-type="string">
            <ns7:p>59733</ns7:p>
          </ns4:table-cell>
          <ns4:table-cell ns4:number-columns-repeated="9"/>
        </ns4:table-row>
        <ns4:table-row ns4:style-name="ro1">
          <ns4:table-cell ns0:value-type="string" ns6:value-type="string">
            <ns7:p>684.0</ns7:p>
          </ns4:table-cell>
          <ns4:table-cell ns0:value-type="string" ns6:value-type="string">
            <ns7:p>Petaluma</ns7:p>
          </ns4:table-cell>
          <ns4:table-cell ns0:value-type="string" ns6:value-type="string">
            <ns7:p>CA</ns7:p>
          </ns4:table-cell>
          <ns4:table-cell ns0:value-type="string" ns6:value-type="string">
            <ns7:p>59688</ns7:p>
          </ns4:table-cell>
          <ns4:table-cell ns4:number-columns-repeated="9"/>
        </ns4:table-row>
        <ns4:table-row ns4:style-name="ro1">
          <ns4:table-cell ns0:value-type="string" ns6:value-type="string">
            <ns7:p>685.0</ns7:p>
          </ns4:table-cell>
          <ns4:table-cell ns0:value-type="string" ns6:value-type="string">
            <ns7:p>Brookhaven</ns7:p>
          </ns4:table-cell>
          <ns4:table-cell ns0:value-type="string" ns6:value-type="string">
            <ns7:p>GA</ns7:p>
          </ns4:table-cell>
          <ns4:table-cell ns0:value-type="string" ns6:value-type="string">
            <ns7:p>59643</ns7:p>
          </ns4:table-cell>
          <ns4:table-cell ns4:number-columns-repeated="9"/>
        </ns4:table-row>
        <ns4:table-row ns4:style-name="ro1">
          <ns4:table-cell ns0:value-type="string" ns6:value-type="string">
            <ns7:p>686.0</ns7:p>
          </ns4:table-cell>
          <ns4:table-cell ns0:value-type="string" ns6:value-type="string">
            <ns7:p>San Rafael</ns7:p>
          </ns4:table-cell>
          <ns4:table-cell ns0:value-type="string" ns6:value-type="string">
            <ns7:p>CA</ns7:p>
          </ns4:table-cell>
          <ns4:table-cell ns0:value-type="string" ns6:value-type="string">
            <ns7:p>59410</ns7:p>
          </ns4:table-cell>
          <ns4:table-cell ns4:number-columns-repeated="9"/>
        </ns4:table-row>
        <ns4:table-row ns4:style-name="ro1">
          <ns4:table-cell ns0:value-type="string" ns6:value-type="string">
            <ns7:p>687.0</ns7:p>
          </ns4:table-cell>
          <ns4:table-cell ns0:value-type="string" ns6:value-type="string">
            <ns7:p>Lake Havasu City</ns7:p>
          </ns4:table-cell>
          <ns4:table-cell ns0:value-type="string" ns6:value-type="string">
            <ns7:p>AZ</ns7:p>
          </ns4:table-cell>
          <ns4:table-cell ns0:value-type="string" ns6:value-type="string">
            <ns7:p>59358</ns7:p>
          </ns4:table-cell>
          <ns4:table-cell ns4:number-columns-repeated="9"/>
        </ns4:table-row>
        <ns4:table-row ns4:style-name="ro1">
          <ns4:table-cell ns0:value-type="string" ns6:value-type="string">
            <ns7:p>688.0</ns7:p>
          </ns4:table-cell>
          <ns4:table-cell ns0:value-type="string" ns6:value-type="string">
            <ns7:p>Dubuque</ns7:p>
          </ns4:table-cell>
          <ns4:table-cell ns0:value-type="string" ns6:value-type="string">
            <ns7:p>IA</ns7:p>
          </ns4:table-cell>
          <ns4:table-cell ns0:value-type="string" ns6:value-type="string">
            <ns7:p>59148</ns7:p>
          </ns4:table-cell>
          <ns4:table-cell ns4:number-columns-repeated="9"/>
        </ns4:table-row>
        <ns4:table-row ns4:style-name="ro1">
          <ns4:table-cell ns0:value-type="string" ns6:value-type="string">
            <ns7:p>689.0</ns7:p>
          </ns4:table-cell>
          <ns4:table-cell ns0:value-type="string" ns6:value-type="string">
            <ns7:p>Hoboken</ns7:p>
          </ns4:table-cell>
          <ns4:table-cell ns0:value-type="string" ns6:value-type="string">
            <ns7:p>NJ</ns7:p>
          </ns4:table-cell>
          <ns4:table-cell ns0:value-type="string" ns6:value-type="string">
            <ns7:p>59027</ns7:p>
          </ns4:table-cell>
          <ns4:table-cell ns4:number-columns-repeated="9"/>
        </ns4:table-row>
        <ns4:table-row ns4:style-name="ro1">
          <ns4:table-cell ns0:value-type="string" ns6:value-type="string">
            <ns7:p>690.0</ns7:p>
          </ns4:table-cell>
          <ns4:table-cell ns0:value-type="string" ns6:value-type="string">
            <ns7:p>Pico Rivera</ns7:p>
          </ns4:table-cell>
          <ns4:table-cell ns0:value-type="string" ns6:value-type="string">
            <ns7:p>CA</ns7:p>
          </ns4:table-cell>
          <ns4:table-cell ns0:value-type="string" ns6:value-type="string">
            <ns7:p>58915</ns7:p>
          </ns4:table-cell>
          <ns4:table-cell ns4:number-columns-repeated="9"/>
        </ns4:table-row>
        <ns4:table-row ns4:style-name="ro1">
          <ns4:table-cell ns0:value-type="string" ns6:value-type="string">
            <ns7:p>691.0</ns7:p>
          </ns4:table-cell>
          <ns4:table-cell ns0:value-type="string" ns6:value-type="string">
            <ns7:p>Lacey</ns7:p>
          </ns4:table-cell>
          <ns4:table-cell ns0:value-type="string" ns6:value-type="string">
            <ns7:p>WA</ns7:p>
          </ns4:table-cell>
          <ns4:table-cell ns0:value-type="string" ns6:value-type="string">
            <ns7:p>58833</ns7:p>
          </ns4:table-cell>
          <ns4:table-cell ns4:number-columns-repeated="9"/>
        </ns4:table-row>
        <ns4:table-row ns4:style-name="ro1">
          <ns4:table-cell ns0:value-type="string" ns6:value-type="string">
            <ns7:p>692.0</ns7:p>
          </ns4:table-cell>
          <ns4:table-cell ns0:value-type="string" ns6:value-type="string">
            <ns7:p>Youngstown</ns7:p>
          </ns4:table-cell>
          <ns4:table-cell ns0:value-type="string" ns6:value-type="string">
            <ns7:p>OH</ns7:p>
          </ns4:table-cell>
          <ns4:table-cell ns0:value-type="string" ns6:value-type="string">
            <ns7:p>58832</ns7:p>
          </ns4:table-cell>
          <ns4:table-cell ns4:number-columns-repeated="9"/>
        </ns4:table-row>
        <ns4:table-row ns4:style-name="ro1">
          <ns4:table-cell ns0:value-type="string" ns6:value-type="string">
            <ns7:p>693.0</ns7:p>
          </ns4:table-cell>
          <ns4:table-cell ns0:value-type="string" ns6:value-type="string">
            <ns7:p>Bozeman</ns7:p>
          </ns4:table-cell>
          <ns4:table-cell ns0:value-type="string" ns6:value-type="string">
            <ns7:p>MT</ns7:p>
          </ns4:table-cell>
          <ns4:table-cell ns0:value-type="string" ns6:value-type="string">
            <ns7:p>58814</ns7:p>
          </ns4:table-cell>
          <ns4:table-cell ns4:number-columns-repeated="9"/>
        </ns4:table-row>
        <ns4:table-row ns4:style-name="ro1">
          <ns4:table-cell ns0:value-type="string" ns6:value-type="string">
            <ns7:p>694.0</ns7:p>
          </ns4:table-cell>
          <ns4:table-cell ns0:value-type="string" ns6:value-type="string">
            <ns7:p>Midwest City</ns7:p>
          </ns4:table-cell>
          <ns4:table-cell ns0:value-type="string" ns6:value-type="string">
            <ns7:p>OK</ns7:p>
          </ns4:table-cell>
          <ns4:table-cell ns0:value-type="string" ns6:value-type="string">
            <ns7:p>58799</ns7:p>
          </ns4:table-cell>
          <ns4:table-cell ns4:number-columns-repeated="9"/>
        </ns4:table-row>
        <ns4:table-row ns4:style-name="ro1">
          <ns4:table-cell ns0:value-type="string" ns6:value-type="string">
            <ns7:p>695.0</ns7:p>
          </ns4:table-cell>
          <ns4:table-cell ns0:value-type="string" ns6:value-type="string">
            <ns7:p>Des Plaines</ns7:p>
          </ns4:table-cell>
          <ns4:table-cell ns0:value-type="string" ns6:value-type="string">
            <ns7:p>IL</ns7:p>
          </ns4:table-cell>
          <ns4:table-cell ns0:value-type="string" ns6:value-type="string">
            <ns7:p>58772</ns7:p>
          </ns4:table-cell>
          <ns4:table-cell ns4:number-columns-repeated="9"/>
        </ns4:table-row>
        <ns4:table-row ns4:style-name="ro1">
          <ns4:table-cell ns0:value-type="string" ns6:value-type="string">
            <ns7:p>696.0</ns7:p>
          </ns4:table-cell>
          <ns4:table-cell ns0:value-type="string" ns6:value-type="string">
            <ns7:p>Pocatello</ns7:p>
          </ns4:table-cell>
          <ns4:table-cell ns0:value-type="string" ns6:value-type="string">
            <ns7:p>ID</ns7:p>
          </ns4:table-cell>
          <ns4:table-cell ns0:value-type="string" ns6:value-type="string">
            <ns7:p>58771</ns7:p>
          </ns4:table-cell>
          <ns4:table-cell ns4:number-columns-repeated="9"/>
        </ns4:table-row>
        <ns4:table-row ns4:style-name="ro1">
          <ns4:table-cell ns0:value-type="string" ns6:value-type="string">
            <ns7:p>696.0</ns7:p>
          </ns4:table-cell>
          <ns4:table-cell ns0:value-type="string" ns6:value-type="string">
            <ns7:p>Casper</ns7:p>
          </ns4:table-cell>
          <ns4:table-cell ns0:value-type="string" ns6:value-type="string">
            <ns7:p>WY</ns7:p>
          </ns4:table-cell>
          <ns4:table-cell ns0:value-type="string" ns6:value-type="string">
            <ns7:p>58771</ns7:p>
          </ns4:table-cell>
          <ns4:table-cell ns4:number-columns-repeated="9"/>
        </ns4:table-row>
        <ns4:table-row ns4:style-name="ro1">
          <ns4:table-cell ns0:value-type="string" ns6:value-type="string">
            <ns7:p>698.0</ns7:p>
          </ns4:table-cell>
          <ns4:table-cell ns0:value-type="string" ns6:value-type="string">
            <ns7:p>Terre Haute</ns7:p>
          </ns4:table-cell>
          <ns4:table-cell ns0:value-type="string" ns6:value-type="string">
            <ns7:p>IN</ns7:p>
          </ns4:table-cell>
          <ns4:table-cell ns0:value-type="string" ns6:value-type="string">
            <ns7:p>58764</ns7:p>
          </ns4:table-cell>
          <ns4:table-cell ns4:number-columns-repeated="9"/>
        </ns4:table-row>
        <ns4:table-row ns4:style-name="ro1">
          <ns4:table-cell ns0:value-type="string" ns6:value-type="string">
            <ns7:p>699.0</ns7:p>
          </ns4:table-cell>
          <ns4:table-cell ns0:value-type="string" ns6:value-type="string">
            <ns7:p>Coconut Creek</ns7:p>
          </ns4:table-cell>
          <ns4:table-cell ns0:value-type="string" ns6:value-type="string">
            <ns7:p>FL</ns7:p>
          </ns4:table-cell>
          <ns4:table-cell ns0:value-type="string" ns6:value-type="string">
            <ns7:p>58626</ns7:p>
          </ns4:table-cell>
          <ns4:table-cell ns4:number-columns-repeated="9"/>
        </ns4:table-row>
        <ns4:table-row ns4:style-name="ro1">
          <ns4:table-cell ns0:value-type="string" ns6:value-type="string">
            <ns7:p>700.0</ns7:p>
          </ns4:table-cell>
          <ns4:table-cell ns0:value-type="string" ns6:value-type="string">
            <ns7:p>Carson City</ns7:p>
          </ns4:table-cell>
          <ns4:table-cell ns0:value-type="string" ns6:value-type="string">
            <ns7:p>NV</ns7:p>
          </ns4:table-cell>
          <ns4:table-cell ns0:value-type="string" ns6:value-type="string">
            <ns7:p>58571</ns7:p>
          </ns4:table-cell>
          <ns4:table-cell ns4:number-columns-repeated="9"/>
        </ns4:table-row>
        <ns4:table-row ns4:style-name="ro1">
          <ns4:table-cell ns0:value-type="string" ns6:value-type="string">
            <ns7:p>701.0</ns7:p>
          </ns4:table-cell>
          <ns4:table-cell ns0:value-type="string" ns6:value-type="string">
            <ns7:p>Gardena</ns7:p>
          </ns4:table-cell>
          <ns4:table-cell ns0:value-type="string" ns6:value-type="string">
            <ns7:p>CA</ns7:p>
          </ns4:table-cell>
          <ns4:table-cell ns0:value-type="string" ns6:value-type="string">
            <ns7:p>58460</ns7:p>
          </ns4:table-cell>
          <ns4:table-cell ns4:number-columns-repeated="9"/>
        </ns4:table-row>
        <ns4:table-row ns4:style-name="ro1">
          <ns4:table-cell ns0:value-type="string" ns6:value-type="string">
            <ns7:p>702.0</ns7:p>
          </ns4:table-cell>
          <ns4:table-cell ns0:value-type="string" ns6:value-type="string">
            <ns7:p>Sarasota</ns7:p>
          </ns4:table-cell>
          <ns4:table-cell ns0:value-type="string" ns6:value-type="string">
            <ns7:p>FL</ns7:p>
          </ns4:table-cell>
          <ns4:table-cell ns0:value-type="string" ns6:value-type="string">
            <ns7:p>58458</ns7:p>
          </ns4:table-cell>
          <ns4:table-cell ns4:number-columns-repeated="9"/>
        </ns4:table-row>
        <ns4:table-row ns4:style-name="ro1">
          <ns4:table-cell ns0:value-type="string" ns6:value-type="string">
            <ns7:p>703.0</ns7:p>
          </ns4:table-cell>
          <ns4:table-cell ns0:value-type="string" ns6:value-type="string">
            <ns7:p>Bowie</ns7:p>
          </ns4:table-cell>
          <ns4:table-cell ns0:value-type="string" ns6:value-type="string">
            <ns7:p>MD</ns7:p>
          </ns4:table-cell>
          <ns4:table-cell ns0:value-type="string" ns6:value-type="string">
            <ns7:p>58383</ns7:p>
          </ns4:table-cell>
          <ns4:table-cell ns4:number-columns-repeated="9"/>
        </ns4:table-row>
        <ns4:table-row ns4:style-name="ro1">
          <ns4:table-cell ns0:value-type="string" ns6:value-type="string">
            <ns7:p>704.0</ns7:p>
          </ns4:table-cell>
          <ns4:table-cell ns0:value-type="string" ns6:value-type="string">
            <ns7:p>Lancaster</ns7:p>
          </ns4:table-cell>
          <ns4:table-cell ns0:value-type="string" ns6:value-type="string">
            <ns7:p>PA</ns7:p>
          </ns4:table-cell>
          <ns4:table-cell ns0:value-type="string" ns6:value-type="string">
            <ns7:p>58366</ns7:p>
          </ns4:table-cell>
          <ns4:table-cell ns4:number-columns-repeated="9"/>
        </ns4:table-row>
        <ns4:table-row ns4:style-name="ro1">
          <ns4:table-cell ns0:value-type="string" ns6:value-type="string">
            <ns7:p>705.0</ns7:p>
          </ns4:table-cell>
          <ns4:table-cell ns0:value-type="string" ns6:value-type="string">
            <ns7:p>Cupertino</ns7:p>
          </ns4:table-cell>
          <ns4:table-cell ns0:value-type="string" ns6:value-type="string">
            <ns7:p>CA</ns7:p>
          </ns4:table-cell>
          <ns4:table-cell ns0:value-type="string" ns6:value-type="string">
            <ns7:p>58333</ns7:p>
          </ns4:table-cell>
          <ns4:table-cell ns4:number-columns-repeated="9"/>
        </ns4:table-row>
        <ns4:table-row ns4:style-name="ro1">
          <ns4:table-cell ns0:value-type="string" ns6:value-type="string">
            <ns7:p>706.0</ns7:p>
          </ns4:table-cell>
          <ns4:table-cell ns0:value-type="string" ns6:value-type="string">
            <ns7:p>Springfield</ns7:p>
          </ns4:table-cell>
          <ns4:table-cell ns0:value-type="string" ns6:value-type="string">
            <ns7:p>OH</ns7:p>
          </ns4:table-cell>
          <ns4:table-cell ns0:value-type="string" ns6:value-type="string">
            <ns7:p>58281</ns7:p>
          </ns4:table-cell>
          <ns4:table-cell ns4:number-columns-repeated="9"/>
        </ns4:table-row>
        <ns4:table-row ns4:style-name="ro1">
          <ns4:table-cell ns0:value-type="string" ns6:value-type="string">
            <ns7:p>707.0</ns7:p>
          </ns4:table-cell>
          <ns4:table-cell ns0:value-type="string" ns6:value-type="string">
            <ns7:p>Santee</ns7:p>
          </ns4:table-cell>
          <ns4:table-cell ns0:value-type="string" ns6:value-type="string">
            <ns7:p>CA</ns7:p>
          </ns4:table-cell>
          <ns4:table-cell ns0:value-type="string" ns6:value-type="string">
            <ns7:p>58205</ns7:p>
          </ns4:table-cell>
          <ns4:table-cell ns4:number-columns-repeated="9"/>
        </ns4:table-row>
        <ns4:table-row ns4:style-name="ro1">
          <ns4:table-cell ns0:value-type="string" ns6:value-type="string">
            <ns7:p>708.0</ns7:p>
          </ns4:table-cell>
          <ns4:table-cell ns0:value-type="string" ns6:value-type="string">
            <ns7:p>Coeur d'Alene</ns7:p>
          </ns4:table-cell>
          <ns4:table-cell ns0:value-type="string" ns6:value-type="string">
            <ns7:p>ID</ns7:p>
          </ns4:table-cell>
          <ns4:table-cell ns0:value-type="string" ns6:value-type="string">
            <ns7:p>58179</ns7:p>
          </ns4:table-cell>
          <ns4:table-cell ns4:number-columns-repeated="9"/>
        </ns4:table-row>
        <ns4:table-row ns4:style-name="ro1">
          <ns4:table-cell ns0:value-type="string" ns6:value-type="string">
            <ns7:p>709.0</ns7:p>
          </ns4:table-cell>
          <ns4:table-cell ns0:value-type="string" ns6:value-type="string">
            <ns7:p>Wake Forest</ns7:p>
          </ns4:table-cell>
          <ns4:table-cell ns0:value-type="string" ns6:value-type="string">
            <ns7:p>NC</ns7:p>
          </ns4:table-cell>
          <ns4:table-cell ns0:value-type="string" ns6:value-type="string">
            <ns7:p>58147</ns7:p>
          </ns4:table-cell>
          <ns4:table-cell ns4:number-columns-repeated="9"/>
        </ns4:table-row>
        <ns4:table-row ns4:style-name="ro1">
          <ns4:table-cell ns0:value-type="string" ns6:value-type="string">
            <ns7:p>710.0</ns7:p>
          </ns4:table-cell>
          <ns4:table-cell ns0:value-type="string" ns6:value-type="string">
            <ns7:p>Decatur</ns7:p>
          </ns4:table-cell>
          <ns4:table-cell ns0:value-type="string" ns6:value-type="string">
            <ns7:p>AL</ns7:p>
          </ns4:table-cell>
          <ns4:table-cell ns0:value-type="string" ns6:value-type="string">
            <ns7:p>58056</ns7:p>
          </ns4:table-cell>
          <ns4:table-cell ns4:number-columns-repeated="9"/>
        </ns4:table-row>
        <ns4:table-row ns4:style-name="ro1">
          <ns4:table-cell ns0:value-type="string" ns6:value-type="string">
            <ns7:p>711.0</ns7:p>
          </ns4:table-cell>
          <ns4:table-cell ns0:value-type="string" ns6:value-type="string">
            <ns7:p>Bradenton</ns7:p>
          </ns4:table-cell>
          <ns4:table-cell ns0:value-type="string" ns6:value-type="string">
            <ns7:p>FL</ns7:p>
          </ns4:table-cell>
          <ns4:table-cell ns0:value-type="string" ns6:value-type="string">
            <ns7:p>58014</ns7:p>
          </ns4:table-cell>
          <ns4:table-cell ns4:number-columns-repeated="9"/>
        </ns4:table-row>
        <ns4:table-row ns4:style-name="ro1">
          <ns4:table-cell ns0:value-type="string" ns6:value-type="string">
            <ns7:p>712.0</ns7:p>
          </ns4:table-cell>
          <ns4:table-cell ns0:value-type="string" ns6:value-type="string">
            <ns7:p>Orland Park</ns7:p>
          </ns4:table-cell>
          <ns4:table-cell ns0:value-type="string" ns6:value-type="string">
            <ns7:p>IL</ns7:p>
          </ns4:table-cell>
          <ns4:table-cell ns0:value-type="string" ns6:value-type="string">
            <ns7:p>57954</ns7:p>
          </ns4:table-cell>
          <ns4:table-cell ns4:number-columns-repeated="9"/>
        </ns4:table-row>
        <ns4:table-row ns4:style-name="ro1">
          <ns4:table-cell ns0:value-type="string" ns6:value-type="string">
            <ns7:p>713.0</ns7:p>
          </ns4:table-cell>
          <ns4:table-cell ns0:value-type="string" ns6:value-type="string">
            <ns7:p>Tigard</ns7:p>
          </ns4:table-cell>
          <ns4:table-cell ns0:value-type="string" ns6:value-type="string">
            <ns7:p>OR</ns7:p>
          </ns4:table-cell>
          <ns4:table-cell ns0:value-type="string" ns6:value-type="string">
            <ns7:p>57929</ns7:p>
          </ns4:table-cell>
          <ns4:table-cell ns4:number-columns-repeated="9"/>
        </ns4:table-row>
        <ns4:table-row ns4:style-name="ro1">
          <ns4:table-cell ns0:value-type="string" ns6:value-type="string">
            <ns7:p>714.0</ns7:p>
          </ns4:table-cell>
          <ns4:table-cell ns0:value-type="string" ns6:value-type="string">
            <ns7:p>St. Clair Shores</ns7:p>
          </ns4:table-cell>
          <ns4:table-cell ns0:value-type="string" ns6:value-type="string">
            <ns7:p>MI</ns7:p>
          </ns4:table-cell>
          <ns4:table-cell ns0:value-type="string" ns6:value-type="string">
            <ns7:p>57872</ns7:p>
          </ns4:table-cell>
          <ns4:table-cell ns4:number-columns-repeated="9"/>
        </ns4:table-row>
        <ns4:table-row ns4:style-name="ro1">
          <ns4:table-cell ns0:value-type="string" ns6:value-type="string">
            <ns7:p>715.0</ns7:p>
          </ns4:table-cell>
          <ns4:table-cell ns0:value-type="string" ns6:value-type="string">
            <ns7:p>Southaven</ns7:p>
          </ns4:table-cell>
          <ns4:table-cell ns0:value-type="string" ns6:value-type="string">
            <ns7:p>MS</ns7:p>
          </ns4:table-cell>
          <ns4:table-cell ns0:value-type="string" ns6:value-type="string">
            <ns7:p>57819</ns7:p>
          </ns4:table-cell>
          <ns4:table-cell ns4:number-columns-repeated="9"/>
        </ns4:table-row>
        <ns4:table-row ns4:style-name="ro1">
          <ns4:table-cell ns0:value-type="string" ns6:value-type="string">
            <ns7:p>716.0</ns7:p>
          </ns4:table-cell>
          <ns4:table-cell ns0:value-type="string" ns6:value-type="string">
            <ns7:p>National City</ns7:p>
          </ns4:table-cell>
          <ns4:table-cell ns0:value-type="string" ns6:value-type="string">
            <ns7:p>CA</ns7:p>
          </ns4:table-cell>
          <ns4:table-cell ns0:value-type="string" ns6:value-type="string">
            <ns7:p>57807</ns7:p>
          </ns4:table-cell>
          <ns4:table-cell ns4:number-columns-repeated="9"/>
        </ns4:table-row>
        <ns4:table-row ns4:style-name="ro1">
          <ns4:table-cell ns0:value-type="string" ns6:value-type="string">
            <ns7:p>717.0</ns7:p>
          </ns4:table-cell>
          <ns4:table-cell ns0:value-type="string" ns6:value-type="string">
            <ns7:p>Bonita Springs</ns7:p>
          </ns4:table-cell>
          <ns4:table-cell ns0:value-type="string" ns6:value-type="string">
            <ns7:p>FL</ns7:p>
          </ns4:table-cell>
          <ns4:table-cell ns0:value-type="string" ns6:value-type="string">
            <ns7:p>57634</ns7:p>
          </ns4:table-cell>
          <ns4:table-cell ns4:number-columns-repeated="9"/>
        </ns4:table-row>
        <ns4:table-row ns4:style-name="ro1">
          <ns4:table-cell ns0:value-type="string" ns6:value-type="string">
            <ns7:p>718.0</ns7:p>
          </ns4:table-cell>
          <ns4:table-cell ns0:value-type="string" ns6:value-type="string">
            <ns7:p>Highland</ns7:p>
          </ns4:table-cell>
          <ns4:table-cell ns0:value-type="string" ns6:value-type="string">
            <ns7:p>CA</ns7:p>
          </ns4:table-cell>
          <ns4:table-cell ns0:value-type="string" ns6:value-type="string">
            <ns7:p>57614</ns7:p>
          </ns4:table-cell>
          <ns4:table-cell ns4:number-columns-repeated="9"/>
        </ns4:table-row>
        <ns4:table-row ns4:style-name="ro1">
          <ns4:table-cell ns0:value-type="string" ns6:value-type="string">
            <ns7:p>719.0</ns7:p>
          </ns4:table-cell>
          <ns4:table-cell ns0:value-type="string" ns6:value-type="string">
            <ns7:p>Royal Oak</ns7:p>
          </ns4:table-cell>
          <ns4:table-cell ns0:value-type="string" ns6:value-type="string">
            <ns7:p>MI</ns7:p>
          </ns4:table-cell>
          <ns4:table-cell ns0:value-type="string" ns6:value-type="string">
            <ns7:p>57583</ns7:p>
          </ns4:table-cell>
          <ns4:table-cell ns4:number-columns-repeated="9"/>
        </ns4:table-row>
        <ns4:table-row ns4:style-name="ro1">
          <ns4:table-cell ns0:value-type="string" ns6:value-type="string">
            <ns7:p>720.0</ns7:p>
          </ns4:table-cell>
          <ns4:table-cell ns0:value-type="string" ns6:value-type="string">
            <ns7:p>Kingsport</ns7:p>
          </ns4:table-cell>
          <ns4:table-cell ns0:value-type="string" ns6:value-type="string">
            <ns7:p>TN</ns7:p>
          </ns4:table-cell>
          <ns4:table-cell ns0:value-type="string" ns6:value-type="string">
            <ns7:p>57530</ns7:p>
          </ns4:table-cell>
          <ns4:table-cell ns4:number-columns-repeated="9"/>
        </ns4:table-row>
        <ns4:table-row ns4:style-name="ro1">
          <ns4:table-cell ns0:value-type="string" ns6:value-type="string">
            <ns7:p>721.0</ns7:p>
          </ns4:table-cell>
          <ns4:table-cell ns0:value-type="string" ns6:value-type="string">
            <ns7:p>Smyrna</ns7:p>
          </ns4:table-cell>
          <ns4:table-cell ns0:value-type="string" ns6:value-type="string">
            <ns7:p>GA</ns7:p>
          </ns4:table-cell>
          <ns4:table-cell ns0:value-type="string" ns6:value-type="string">
            <ns7:p>57513</ns7:p>
          </ns4:table-cell>
          <ns4:table-cell ns4:number-columns-repeated="9"/>
        </ns4:table-row>
        <ns4:table-row ns4:style-name="ro1">
          <ns4:table-cell ns0:value-type="string" ns6:value-type="string">
            <ns7:p>722.0</ns7:p>
          </ns4:table-cell>
          <ns4:table-cell ns0:value-type="string" ns6:value-type="string">
            <ns7:p>Taylorsville</ns7:p>
          </ns4:table-cell>
          <ns4:table-cell ns0:value-type="string" ns6:value-type="string">
            <ns7:p>UT</ns7:p>
          </ns4:table-cell>
          <ns4:table-cell ns0:value-type="string" ns6:value-type="string">
            <ns7:p>57484</ns7:p>
          </ns4:table-cell>
          <ns4:table-cell ns4:number-columns-repeated="9"/>
        </ns4:table-row>
        <ns4:table-row ns4:style-name="ro1">
          <ns4:table-cell ns0:value-type="string" ns6:value-type="string">
            <ns7:p>723.0</ns7:p>
          </ns4:table-cell>
          <ns4:table-cell ns0:value-type="string" ns6:value-type="string">
            <ns7:p>Monterey Park</ns7:p>
          </ns4:table-cell>
          <ns4:table-cell ns0:value-type="string" ns6:value-type="string">
            <ns7:p>CA</ns7:p>
          </ns4:table-cell>
          <ns4:table-cell ns0:value-type="string" ns6:value-type="string">
            <ns7:p>57457</ns7:p>
          </ns4:table-cell>
          <ns4:table-cell ns4:number-columns-repeated="9"/>
        </ns4:table-row>
        <ns4:table-row ns4:style-name="ro1">
          <ns4:table-cell ns0:value-type="string" ns6:value-type="string">
            <ns7:p>724.0</ns7:p>
          </ns4:table-cell>
          <ns4:table-cell ns0:value-type="string" ns6:value-type="string">
            <ns7:p>Kettering</ns7:p>
          </ns4:table-cell>
          <ns4:table-cell ns0:value-type="string" ns6:value-type="string">
            <ns7:p>OH</ns7:p>
          </ns4:table-cell>
          <ns4:table-cell ns0:value-type="string" ns6:value-type="string">
            <ns7:p>57396</ns7:p>
          </ns4:table-cell>
          <ns4:table-cell ns4:number-columns-repeated="9"/>
        </ns4:table-row>
        <ns4:table-row ns4:style-name="ro1">
          <ns4:table-cell ns0:value-type="string" ns6:value-type="string">
            <ns7:p>725.0</ns7:p>
          </ns4:table-cell>
          <ns4:table-cell ns0:value-type="string" ns6:value-type="string">
            <ns7:p>Lincoln</ns7:p>
          </ns4:table-cell>
          <ns4:table-cell ns0:value-type="string" ns6:value-type="string">
            <ns7:p>CA</ns7:p>
          </ns4:table-cell>
          <ns4:table-cell ns0:value-type="string" ns6:value-type="string">
            <ns7:p>57367</ns7:p>
          </ns4:table-cell>
          <ns4:table-cell ns4:number-columns-repeated="9"/>
        </ns4:table-row>
        <ns4:table-row ns4:style-name="ro1">
          <ns4:table-cell ns0:value-type="string" ns6:value-type="string">
            <ns7:p>726.0</ns7:p>
          </ns4:table-cell>
          <ns4:table-cell ns0:value-type="string" ns6:value-type="string">
            <ns7:p>Plainfield</ns7:p>
          </ns4:table-cell>
          <ns4:table-cell ns0:value-type="string" ns6:value-type="string">
            <ns7:p>NJ</ns7:p>
          </ns4:table-cell>
          <ns4:table-cell ns0:value-type="string" ns6:value-type="string">
            <ns7:p>57141</ns7:p>
          </ns4:table-cell>
          <ns4:table-cell ns4:number-columns-repeated="9"/>
        </ns4:table-row>
        <ns4:table-row ns4:style-name="ro1">
          <ns4:table-cell ns0:value-type="string" ns6:value-type="string">
            <ns7:p>727.0</ns7:p>
          </ns4:table-cell>
          <ns4:table-cell ns0:value-type="string" ns6:value-type="string">
            <ns7:p>New Brunswick</ns7:p>
          </ns4:table-cell>
          <ns4:table-cell ns0:value-type="string" ns6:value-type="string">
            <ns7:p>NJ</ns7:p>
          </ns4:table-cell>
          <ns4:table-cell ns0:value-type="string" ns6:value-type="string">
            <ns7:p>57133</ns7:p>
          </ns4:table-cell>
          <ns4:table-cell ns4:number-columns-repeated="9"/>
        </ns4:table-row>
        <ns4:table-row ns4:style-name="ro1">
          <ns4:table-cell ns0:value-type="string" ns6:value-type="string">
            <ns7:p>728.0</ns7:p>
          </ns4:table-cell>
          <ns4:table-cell ns0:value-type="string" ns6:value-type="string">
            <ns7:p>Burleson</ns7:p>
          </ns4:table-cell>
          <ns4:table-cell ns0:value-type="string" ns6:value-type="string">
            <ns7:p>TX</ns7:p>
          </ns4:table-cell>
          <ns4:table-cell ns0:value-type="string" ns6:value-type="string">
            <ns7:p>56907</ns7:p>
          </ns4:table-cell>
          <ns4:table-cell ns4:number-columns-repeated="9"/>
        </ns4:table-row>
        <ns4:table-row ns4:style-name="ro1">
          <ns4:table-cell ns0:value-type="string" ns6:value-type="string">
            <ns7:p>729.0</ns7:p>
          </ns4:table-cell>
          <ns4:table-cell ns0:value-type="string" ns6:value-type="string">
            <ns7:p>Albany</ns7:p>
          </ns4:table-cell>
          <ns4:table-cell ns0:value-type="string" ns6:value-type="string">
            <ns7:p>OR</ns7:p>
          </ns4:table-cell>
          <ns4:table-cell ns0:value-type="string" ns6:value-type="string">
            <ns7:p>56894</ns7:p>
          </ns4:table-cell>
          <ns4:table-cell ns4:number-columns-repeated="9"/>
        </ns4:table-row>
        <ns4:table-row ns4:style-name="ro1">
          <ns4:table-cell ns0:value-type="string" ns6:value-type="string">
            <ns7:p>730.0</ns7:p>
          </ns4:table-cell>
          <ns4:table-cell ns0:value-type="string" ns6:value-type="string">
            <ns7:p>Perth Amboy</ns7:p>
          </ns4:table-cell>
          <ns4:table-cell ns0:value-type="string" ns6:value-type="string">
            <ns7:p>NJ</ns7:p>
          </ns4:table-cell>
          <ns4:table-cell ns0:value-type="string" ns6:value-type="string">
            <ns7:p>56739</ns7:p>
          </ns4:table-cell>
          <ns4:table-cell ns4:number-columns-repeated="9"/>
        </ns4:table-row>
        <ns4:table-row ns4:style-name="ro1">
          <ns4:table-cell ns0:value-type="string" ns6:value-type="string">
            <ns7:p>731.0</ns7:p>
          </ns4:table-cell>
          <ns4:table-cell ns0:value-type="string" ns6:value-type="string">
            <ns7:p>Olympia</ns7:p>
          </ns4:table-cell>
          <ns4:table-cell ns0:value-type="string" ns6:value-type="string">
            <ns7:p>WA</ns7:p>
          </ns4:table-cell>
          <ns4:table-cell ns0:value-type="string" ns6:value-type="string">
            <ns7:p>56724</ns7:p>
          </ns4:table-cell>
          <ns4:table-cell ns4:number-columns-repeated="9"/>
        </ns4:table-row>
        <ns4:table-row ns4:style-name="ro1">
          <ns4:table-cell ns0:value-type="string" ns6:value-type="string">
            <ns7:p>732.0</ns7:p>
          </ns4:table-cell>
          <ns4:table-cell ns0:value-type="string" ns6:value-type="string">
            <ns7:p>DeSoto</ns7:p>
          </ns4:table-cell>
          <ns4:table-cell ns0:value-type="string" ns6:value-type="string">
            <ns7:p>TX</ns7:p>
          </ns4:table-cell>
          <ns4:table-cell ns0:value-type="string" ns6:value-type="string">
            <ns7:p>56681</ns7:p>
          </ns4:table-cell>
          <ns4:table-cell ns4:number-columns-repeated="9"/>
        </ns4:table-row>
        <ns4:table-row ns4:style-name="ro1">
          <ns4:table-cell ns0:value-type="string" ns6:value-type="string">
            <ns7:p>733.0</ns7:p>
          </ns4:table-cell>
          <ns4:table-cell ns0:value-type="string" ns6:value-type="string">
            <ns7:p>Oak Lawn</ns7:p>
          </ns4:table-cell>
          <ns4:table-cell ns0:value-type="string" ns6:value-type="string">
            <ns7:p>IL</ns7:p>
          </ns4:table-cell>
          <ns4:table-cell ns0:value-type="string" ns6:value-type="string">
            <ns7:p>56450</ns7:p>
          </ns4:table-cell>
          <ns4:table-cell ns4:number-columns-repeated="9"/>
        </ns4:table-row>
        <ns4:table-row ns4:style-name="ro1">
          <ns4:table-cell ns0:value-type="string" ns6:value-type="string">
            <ns7:p>734.0</ns7:p>
          </ns4:table-cell>
          <ns4:table-cell ns0:value-type="string" ns6:value-type="string">
            <ns7:p>Bartlett</ns7:p>
          </ns4:table-cell>
          <ns4:table-cell ns0:value-type="string" ns6:value-type="string">
            <ns7:p>TN</ns7:p>
          </ns4:table-cell>
          <ns4:table-cell ns0:value-type="string" ns6:value-type="string">
            <ns7:p>56416</ns7:p>
          </ns4:table-cell>
          <ns4:table-cell ns4:number-columns-repeated="9"/>
        </ns4:table-row>
        <ns4:table-row ns4:style-name="ro1">
          <ns4:table-cell ns0:value-type="string" ns6:value-type="string">
            <ns7:p>735.0</ns7:p>
          </ns4:table-cell>
          <ns4:table-cell ns0:value-type="string" ns6:value-type="string">
            <ns7:p>West Sacramento</ns7:p>
          </ns4:table-cell>
          <ns4:table-cell ns0:value-type="string" ns6:value-type="string">
            <ns7:p>CA</ns7:p>
          </ns4:table-cell>
          <ns4:table-cell ns0:value-type="string" ns6:value-type="string">
            <ns7:p>56216</ns7:p>
          </ns4:table-cell>
          <ns4:table-cell ns4:number-columns-repeated="9"/>
        </ns4:table-row>
        <ns4:table-row ns4:style-name="ro1">
          <ns4:table-cell ns0:value-type="string" ns6:value-type="string">
            <ns7:p>735.0</ns7:p>
          </ns4:table-cell>
          <ns4:table-cell ns0:value-type="string" ns6:value-type="string">
            <ns7:p>Twin Falls</ns7:p>
          </ns4:table-cell>
          <ns4:table-cell ns0:value-type="string" ns6:value-type="string">
            <ns7:p>ID</ns7:p>
          </ns4:table-cell>
          <ns4:table-cell ns0:value-type="string" ns6:value-type="string">
            <ns7:p>56216</ns7:p>
          </ns4:table-cell>
          <ns4:table-cell ns4:number-columns-repeated="9"/>
        </ns4:table-row>
        <ns4:table-row ns4:style-name="ro1">
          <ns4:table-cell ns0:value-type="string" ns6:value-type="string">
            <ns7:p>737.0</ns7:p>
          </ns4:table-cell>
          <ns4:table-cell ns0:value-type="string" ns6:value-type="string">
            <ns7:p>Valdosta</ns7:p>
          </ns4:table-cell>
          <ns4:table-cell ns0:value-type="string" ns6:value-type="string">
            <ns7:p>GA</ns7:p>
          </ns4:table-cell>
          <ns4:table-cell ns0:value-type="string" ns6:value-type="string">
            <ns7:p>56186</ns7:p>
          </ns4:table-cell>
          <ns4:table-cell ns4:number-columns-repeated="9"/>
        </ns4:table-row>
        <ns4:table-row ns4:style-name="ro1">
          <ns4:table-cell ns0:value-type="string" ns6:value-type="string">
            <ns7:p>738.0</ns7:p>
          </ns4:table-cell>
          <ns4:table-cell ns0:value-type="string" ns6:value-type="string">
            <ns7:p>Anderson</ns7:p>
          </ns4:table-cell>
          <ns4:table-cell ns0:value-type="string" ns6:value-type="string">
            <ns7:p>IN</ns7:p>
          </ns4:table-cell>
          <ns4:table-cell ns0:value-type="string" ns6:value-type="string">
            <ns7:p>56153</ns7:p>
          </ns4:table-cell>
          <ns4:table-cell ns4:number-columns-repeated="9"/>
        </ns4:table-row>
        <ns4:table-row ns4:style-name="ro1">
          <ns4:table-cell ns0:value-type="string" ns6:value-type="string">
            <ns7:p>739.0</ns7:p>
          </ns4:table-cell>
          <ns4:table-cell ns0:value-type="string" ns6:value-type="string">
            <ns7:p>San Jacinto</ns7:p>
          </ns4:table-cell>
          <ns4:table-cell ns0:value-type="string" ns6:value-type="string">
            <ns7:p>CA</ns7:p>
          </ns4:table-cell>
          <ns4:table-cell ns0:value-type="string" ns6:value-type="string">
            <ns7:p>56014</ns7:p>
          </ns4:table-cell>
          <ns4:table-cell ns4:number-columns-repeated="9"/>
        </ns4:table-row>
        <ns4:table-row ns4:style-name="ro1">
          <ns4:table-cell ns0:value-type="string" ns6:value-type="string">
            <ns7:p>740.0</ns7:p>
          </ns4:table-cell>
          <ns4:table-cell ns0:value-type="string" ns6:value-type="string">
            <ns7:p>Peabody</ns7:p>
          </ns4:table-cell>
          <ns4:table-cell ns0:value-type="string" ns6:value-type="string">
            <ns7:p>MA</ns7:p>
          </ns4:table-cell>
          <ns4:table-cell ns0:value-type="string" ns6:value-type="string">
            <ns7:p>55953</ns7:p>
          </ns4:table-cell>
          <ns4:table-cell ns4:number-columns-repeated="9"/>
        </ns4:table-row>
        <ns4:table-row ns4:style-name="ro1">
          <ns4:table-cell ns0:value-type="string" ns6:value-type="string">
            <ns7:p>741.0</ns7:p>
          </ns4:table-cell>
          <ns4:table-cell ns0:value-type="string" ns6:value-type="string">
            <ns7:p>Mooresville</ns7:p>
          </ns4:table-cell>
          <ns4:table-cell ns0:value-type="string" ns6:value-type="string">
            <ns7:p>NC</ns7:p>
          </ns4:table-cell>
          <ns4:table-cell ns0:value-type="string" ns6:value-type="string">
            <ns7:p>55842</ns7:p>
          </ns4:table-cell>
          <ns4:table-cell ns4:number-columns-repeated="9"/>
        </ns4:table-row>
        <ns4:table-row ns4:style-name="ro1">
          <ns4:table-cell ns0:value-type="string" ns6:value-type="string">
            <ns7:p>742.0</ns7:p>
          </ns4:table-cell>
          <ns4:table-cell ns0:value-type="string" ns6:value-type="string">
            <ns7:p>Port Arthur</ns7:p>
          </ns4:table-cell>
          <ns4:table-cell ns0:value-type="string" ns6:value-type="string">
            <ns7:p>TX</ns7:p>
          </ns4:table-cell>
          <ns4:table-cell ns0:value-type="string" ns6:value-type="string">
            <ns7:p>55804</ns7:p>
          </ns4:table-cell>
          <ns4:table-cell ns4:number-columns-repeated="9"/>
        </ns4:table-row>
        <ns4:table-row ns4:style-name="ro1">
          <ns4:table-cell ns0:value-type="string" ns6:value-type="string">
            <ns7:p>743.0</ns7:p>
          </ns4:table-cell>
          <ns4:table-cell ns0:value-type="string" ns6:value-type="string">
            <ns7:p>Logan</ns7:p>
          </ns4:table-cell>
          <ns4:table-cell ns0:value-type="string" ns6:value-type="string">
            <ns7:p>UT</ns7:p>
          </ns4:table-cell>
          <ns4:table-cell ns0:value-type="string" ns6:value-type="string">
            <ns7:p>55576</ns7:p>
          </ns4:table-cell>
          <ns4:table-cell ns4:number-columns-repeated="9"/>
        </ns4:table-row>
        <ns4:table-row ns4:style-name="ro1">
          <ns4:table-cell ns0:value-type="string" ns6:value-type="string">
            <ns7:p>744.0</ns7:p>
          </ns4:table-cell>
          <ns4:table-cell ns0:value-type="string" ns6:value-type="string">
            <ns7:p>Fountain Valley</ns7:p>
          </ns4:table-cell>
          <ns4:table-cell ns0:value-type="string" ns6:value-type="string">
            <ns7:p>CA</ns7:p>
          </ns4:table-cell>
          <ns4:table-cell ns0:value-type="string" ns6:value-type="string">
            <ns7:p>55508</ns7:p>
          </ns4:table-cell>
          <ns4:table-cell ns4:number-columns-repeated="9"/>
        </ns4:table-row>
        <ns4:table-row ns4:style-name="ro1">
          <ns4:table-cell ns0:value-type="string" ns6:value-type="string">
            <ns7:p>745.0</ns7:p>
          </ns4:table-cell>
          <ns4:table-cell ns0:value-type="string" ns6:value-type="string">
            <ns7:p>Mount Prospect</ns7:p>
          </ns4:table-cell>
          <ns4:table-cell ns0:value-type="string" ns6:value-type="string">
            <ns7:p>IL</ns7:p>
          </ns4:table-cell>
          <ns4:table-cell ns0:value-type="string" ns6:value-type="string">
            <ns7:p>55395</ns7:p>
          </ns4:table-cell>
          <ns4:table-cell ns4:number-columns-repeated="9"/>
        </ns4:table-row>
        <ns4:table-row ns4:style-name="ro1">
          <ns4:table-cell ns0:value-type="string" ns6:value-type="string">
            <ns7:p>746.0</ns7:p>
          </ns4:table-cell>
          <ns4:table-cell ns0:value-type="string" ns6:value-type="string">
            <ns7:p>West Haven</ns7:p>
          </ns4:table-cell>
          <ns4:table-cell ns0:value-type="string" ns6:value-type="string">
            <ns7:p>CT</ns7:p>
          </ns4:table-cell>
          <ns4:table-cell ns0:value-type="string" ns6:value-type="string">
            <ns7:p>55351</ns7:p>
          </ns4:table-cell>
          <ns4:table-cell ns4:number-columns-repeated="9"/>
        </ns4:table-row>
        <ns4:table-row ns4:style-name="ro1">
          <ns4:table-cell ns0:value-type="string" ns6:value-type="string">
            <ns7:p>747.0</ns7:p>
          </ns4:table-cell>
          <ns4:table-cell ns0:value-type="string" ns6:value-type="string">
            <ns7:p>Chicopee</ns7:p>
          </ns4:table-cell>
          <ns4:table-cell ns0:value-type="string" ns6:value-type="string">
            <ns7:p>MA</ns7:p>
          </ns4:table-cell>
          <ns4:table-cell ns0:value-type="string" ns6:value-type="string">
            <ns7:p>55310</ns7:p>
          </ns4:table-cell>
          <ns4:table-cell ns4:number-columns-repeated="9"/>
        </ns4:table-row>
        <ns4:table-row ns4:style-name="ro1">
          <ns4:table-cell ns0:value-type="string" ns6:value-type="string">
            <ns7:p>748.0</ns7:p>
          </ns4:table-cell>
          <ns4:table-cell ns0:value-type="string" ns6:value-type="string">
            <ns7:p>Apple Valley</ns7:p>
          </ns4:table-cell>
          <ns4:table-cell ns0:value-type="string" ns6:value-type="string">
            <ns7:p>MN</ns7:p>
          </ns4:table-cell>
          <ns4:table-cell ns0:value-type="string" ns6:value-type="string">
            <ns7:p>55248</ns7:p>
          </ns4:table-cell>
          <ns4:table-cell ns4:number-columns-repeated="9"/>
        </ns4:table-row>
        <ns4:table-row ns4:style-name="ro1">
          <ns4:table-cell ns0:value-type="string" ns6:value-type="string">
            <ns7:p>749.0</ns7:p>
          </ns4:table-cell>
          <ns4:table-cell ns0:value-type="string" ns6:value-type="string">
            <ns7:p>Tinley Park</ns7:p>
          </ns4:table-cell>
          <ns4:table-cell ns0:value-type="string" ns6:value-type="string">
            <ns7:p>IL</ns7:p>
          </ns4:table-cell>
          <ns4:table-cell ns0:value-type="string" ns6:value-type="string">
            <ns7:p>55140</ns7:p>
          </ns4:table-cell>
          <ns4:table-cell ns4:number-columns-repeated="9"/>
        </ns4:table-row>
        <ns4:table-row ns4:style-name="ro1">
          <ns4:table-cell ns0:value-type="string" ns6:value-type="string">
            <ns7:p>750.0</ns7:p>
          </ns4:table-cell>
          <ns4:table-cell ns0:value-type="string" ns6:value-type="string">
            <ns7:p>Rocky Mount</ns7:p>
          </ns4:table-cell>
          <ns4:table-cell ns0:value-type="string" ns6:value-type="string">
            <ns7:p>NC</ns7:p>
          </ns4:table-cell>
          <ns4:table-cell ns0:value-type="string" ns6:value-type="string">
            <ns7:p>55120</ns7:p>
          </ns4:table-cell>
          <ns4:table-cell ns4:number-columns-repeated="9"/>
        </ns4:table-row>
        <ns4:table-row ns4:style-name="ro1">
          <ns4:table-cell ns0:value-type="string" ns6:value-type="string">
            <ns7:p>751.0</ns7:p>
          </ns4:table-cell>
          <ns4:table-cell ns0:value-type="string" ns6:value-type="string">
            <ns7:p>Berwyn</ns7:p>
          </ns4:table-cell>
          <ns4:table-cell ns0:value-type="string" ns6:value-type="string">
            <ns7:p>IL</ns7:p>
          </ns4:table-cell>
          <ns4:table-cell ns0:value-type="string" ns6:value-type="string">
            <ns7:p>55001</ns7:p>
          </ns4:table-cell>
          <ns4:table-cell ns4:number-columns-repeated="9"/>
        </ns4:table-row>
        <ns4:table-row ns4:style-name="ro1">
          <ns4:table-cell ns0:value-type="string" ns6:value-type="string">
            <ns7:p>752.0</ns7:p>
          </ns4:table-cell>
          <ns4:table-cell ns0:value-type="string" ns6:value-type="string">
            <ns7:p>Yucaipa</ns7:p>
          </ns4:table-cell>
          <ns4:table-cell ns0:value-type="string" ns6:value-type="string">
            <ns7:p>CA</ns7:p>
          </ns4:table-cell>
          <ns4:table-cell ns0:value-type="string" ns6:value-type="string">
            <ns7:p>54953</ns7:p>
          </ns4:table-cell>
          <ns4:table-cell ns4:number-columns-repeated="9"/>
        </ns4:table-row>
        <ns4:table-row ns4:style-name="ro1">
          <ns4:table-cell ns0:value-type="string" ns6:value-type="string">
            <ns7:p>753.0</ns7:p>
          </ns4:table-cell>
          <ns4:table-cell ns0:value-type="string" ns6:value-type="string">
            <ns7:p>Placentia</ns7:p>
          </ns4:table-cell>
          <ns4:table-cell ns0:value-type="string" ns6:value-type="string">
            <ns7:p>CA</ns7:p>
          </ns4:table-cell>
          <ns4:table-cell ns0:value-type="string" ns6:value-type="string">
            <ns7:p>54911</ns7:p>
          </ns4:table-cell>
          <ns4:table-cell ns4:number-columns-repeated="9"/>
        </ns4:table-row>
        <ns4:table-row ns4:style-name="ro1">
          <ns4:table-cell ns0:value-type="string" ns6:value-type="string">
            <ns7:p>754.0</ns7:p>
          </ns4:table-cell>
          <ns4:table-cell ns0:value-type="string" ns6:value-type="string">
            <ns7:p>Kentwood</ns7:p>
          </ns4:table-cell>
          <ns4:table-cell ns0:value-type="string" ns6:value-type="string">
            <ns7:p>MI</ns7:p>
          </ns4:table-cell>
          <ns4:table-cell ns0:value-type="string" ns6:value-type="string">
            <ns7:p>54776</ns7:p>
          </ns4:table-cell>
          <ns4:table-cell ns4:number-columns-repeated="9"/>
        </ns4:table-row>
        <ns4:table-row ns4:style-name="ro1">
          <ns4:table-cell ns0:value-type="string" ns6:value-type="string">
            <ns7:p>755.0</ns7:p>
          </ns4:table-cell>
          <ns4:table-cell ns0:value-type="string" ns6:value-type="string">
            <ns7:p>Manhattan</ns7:p>
          </ns4:table-cell>
          <ns4:table-cell ns0:value-type="string" ns6:value-type="string">
            <ns7:p>KS</ns7:p>
          </ns4:table-cell>
          <ns4:table-cell ns0:value-type="string" ns6:value-type="string">
            <ns7:p>54673</ns7:p>
          </ns4:table-cell>
          <ns4:table-cell ns4:number-columns-repeated="9"/>
        </ns4:table-row>
        <ns4:table-row ns4:style-name="ro1">
          <ns4:table-cell ns0:value-type="string" ns6:value-type="string">
            <ns7:p>756.0</ns7:p>
          </ns4:table-cell>
          <ns4:table-cell ns0:value-type="string" ns6:value-type="string">
            <ns7:p>Gallatin</ns7:p>
          </ns4:table-cell>
          <ns4:table-cell ns0:value-type="string" ns6:value-type="string">
            <ns7:p>TN</ns7:p>
          </ns4:table-cell>
          <ns4:table-cell ns0:value-type="string" ns6:value-type="string">
            <ns7:p>54590</ns7:p>
          </ns4:table-cell>
          <ns4:table-cell ns4:number-columns-repeated="9"/>
        </ns4:table-row>
        <ns4:table-row ns4:style-name="ro1">
          <ns4:table-cell ns0:value-type="string" ns6:value-type="string">
            <ns7:p>757.0</ns7:p>
          </ns4:table-cell>
          <ns4:table-cell ns0:value-type="string" ns6:value-type="string">
            <ns7:p>Methuen</ns7:p>
          </ns4:table-cell>
          <ns4:table-cell ns0:value-type="string" ns6:value-type="string">
            <ns7:p>MA</ns7:p>
          </ns4:table-cell>
          <ns4:table-cell ns0:value-type="string" ns6:value-type="string">
            <ns7:p>54584</ns7:p>
          </ns4:table-cell>
          <ns4:table-cell ns4:number-columns-repeated="9"/>
        </ns4:table-row>
        <ns4:table-row ns4:style-name="ro1">
          <ns4:table-cell ns0:value-type="string" ns6:value-type="string">
            <ns7:p>758.0</ns7:p>
          </ns4:table-cell>
          <ns4:table-cell ns0:value-type="string" ns6:value-type="string">
            <ns7:p>Edina</ns7:p>
          </ns4:table-cell>
          <ns4:table-cell ns0:value-type="string" ns6:value-type="string">
            <ns7:p>MN</ns7:p>
          </ns4:table-cell>
          <ns4:table-cell ns0:value-type="string" ns6:value-type="string">
            <ns7:p>54356</ns7:p>
          </ns4:table-cell>
          <ns4:table-cell ns4:number-columns-repeated="9"/>
        </ns4:table-row>
        <ns4:table-row ns4:style-name="ro1">
          <ns4:table-cell ns0:value-type="string" ns6:value-type="string">
            <ns7:p>759.0</ns7:p>
          </ns4:table-cell>
          <ns4:table-cell ns0:value-type="string" ns6:value-type="string">
            <ns7:p>Jeffersonville</ns7:p>
          </ns4:table-cell>
          <ns4:table-cell ns0:value-type="string" ns6:value-type="string">
            <ns7:p>IN</ns7:p>
          </ns4:table-cell>
          <ns4:table-cell ns0:value-type="string" ns6:value-type="string">
            <ns7:p>54134</ns7:p>
          </ns4:table-cell>
          <ns4:table-cell ns4:number-columns-repeated="9"/>
        </ns4:table-row>
        <ns4:table-row ns4:style-name="ro1">
          <ns4:table-cell ns0:value-type="string" ns6:value-type="string">
            <ns7:p>760.0</ns7:p>
          </ns4:table-cell>
          <ns4:table-cell ns0:value-type="string" ns6:value-type="string">
            <ns7:p>Arcadia</ns7:p>
          </ns4:table-cell>
          <ns4:table-cell ns0:value-type="string" ns6:value-type="string">
            <ns7:p>CA</ns7:p>
          </ns4:table-cell>
          <ns4:table-cell ns0:value-type="string" ns6:value-type="string">
            <ns7:p>54117</ns7:p>
          </ns4:table-cell>
          <ns4:table-cell ns4:number-columns-repeated="9"/>
        </ns4:table-row>
        <ns4:table-row ns4:style-name="ro1">
          <ns4:table-cell ns0:value-type="string" ns6:value-type="string">
            <ns7:p>761.0</ns7:p>
          </ns4:table-cell>
          <ns4:table-cell ns0:value-type="string" ns6:value-type="string">
            <ns7:p>Elkhart</ns7:p>
          </ns4:table-cell>
          <ns4:table-cell ns0:value-type="string" ns6:value-type="string">
            <ns7:p>IN</ns7:p>
          </ns4:table-cell>
          <ns4:table-cell ns0:value-type="string" ns6:value-type="string">
            <ns7:p>54092</ns7:p>
          </ns4:table-cell>
          <ns4:table-cell ns4:number-columns-repeated="9"/>
        </ns4:table-row>
        <ns4:table-row ns4:style-name="ro1">
          <ns4:table-cell ns0:value-type="string" ns6:value-type="string">
            <ns7:p>762.0</ns7:p>
          </ns4:table-cell>
          <ns4:table-cell ns0:value-type="string" ns6:value-type="string">
            <ns7:p>Wheaton</ns7:p>
          </ns4:table-cell>
          <ns4:table-cell ns0:value-type="string" ns6:value-type="string">
            <ns7:p>IL</ns7:p>
          </ns4:table-cell>
          <ns4:table-cell ns0:value-type="string" ns6:value-type="string">
            <ns7:p>54065</ns7:p>
          </ns4:table-cell>
          <ns4:table-cell ns4:number-columns-repeated="9"/>
        </ns4:table-row>
        <ns4:table-row ns4:style-name="ro1">
          <ns4:table-cell ns0:value-type="string" ns6:value-type="string">
            <ns7:p>763.0</ns7:p>
          </ns4:table-cell>
          <ns4:table-cell ns0:value-type="string" ns6:value-type="string">
            <ns7:p>Rockwall</ns7:p>
          </ns4:table-cell>
          <ns4:table-cell ns0:value-type="string" ns6:value-type="string">
            <ns7:p>TX</ns7:p>
          </ns4:table-cell>
          <ns4:table-cell ns0:value-type="string" ns6:value-type="string">
            <ns7:p>53980</ns7:p>
          </ns4:table-cell>
          <ns4:table-cell ns4:number-columns-repeated="9"/>
        </ns4:table-row>
        <ns4:table-row ns4:style-name="ro1">
          <ns4:table-cell ns0:value-type="string" ns6:value-type="string">
            <ns7:p>764.0</ns7:p>
          </ns4:table-cell>
          <ns4:table-cell ns0:value-type="string" ns6:value-type="string">
            <ns7:p>Minnetonka</ns7:p>
          </ns4:table-cell>
          <ns4:table-cell ns0:value-type="string" ns6:value-type="string">
            <ns7:p>MN</ns7:p>
          </ns4:table-cell>
          <ns4:table-cell ns0:value-type="string" ns6:value-type="string">
            <ns7:p>53969</ns7:p>
          </ns4:table-cell>
          <ns4:table-cell ns4:number-columns-repeated="9"/>
        </ns4:table-row>
        <ns4:table-row ns4:style-name="ro1">
          <ns4:table-cell ns0:value-type="string" ns6:value-type="string">
            <ns7:p>765.0</ns7:p>
          </ns4:table-cell>
          <ns4:table-cell ns0:value-type="string" ns6:value-type="string">
            <ns7:p>Grand Island</ns7:p>
          </ns4:table-cell>
          <ns4:table-cell ns0:value-type="string" ns6:value-type="string">
            <ns7:p>NE</ns7:p>
          </ns4:table-cell>
          <ns4:table-cell ns0:value-type="string" ns6:value-type="string">
            <ns7:p>53943</ns7:p>
          </ns4:table-cell>
          <ns4:table-cell ns4:number-columns-repeated="9"/>
        </ns4:table-row>
        <ns4:table-row ns4:style-name="ro1">
          <ns4:table-cell ns0:value-type="string" ns6:value-type="string">
            <ns7:p>766.0</ns7:p>
          </ns4:table-cell>
          <ns4:table-cell ns0:value-type="string" ns6:value-type="string">
            <ns7:p>Joplin</ns7:p>
          </ns4:table-cell>
          <ns4:table-cell ns0:value-type="string" ns6:value-type="string">
            <ns7:p>MO</ns7:p>
          </ns4:table-cell>
          <ns4:table-cell ns0:value-type="string" ns6:value-type="string">
            <ns7:p>53930</ns7:p>
          </ns4:table-cell>
          <ns4:table-cell ns4:number-columns-repeated="9">
            <ns7:p>Next Generation Gaylen Plumbing</ns7:p>
          </ns4:table-cell>
        </ns4:table-row>
        <ns4:table-row ns4:style-name="ro1">
          <ns4:table-cell ns0:value-type="string" ns6:value-type="string">
            <ns7:p>767.0</ns7:p>
          </ns4:table-cell>
          <ns4:table-cell ns0:value-type="string" ns6:value-type="string">
            <ns7:p>Pensacola</ns7:p>
          </ns4:table-cell>
          <ns4:table-cell ns0:value-type="string" ns6:value-type="string">
            <ns7:p>FL</ns7:p>
          </ns4:table-cell>
          <ns4:table-cell ns0:value-type="string" ns6:value-type="string">
            <ns7:p>53817</ns7:p>
          </ns4:table-cell>
          <ns4:table-cell ns4:number-columns-repeated="9"/>
        </ns4:table-row>
        <ns4:table-row ns4:style-name="ro1">
          <ns4:table-cell ns0:value-type="string" ns6:value-type="string">
            <ns7:p>768.0</ns7:p>
          </ns4:table-cell>
          <ns4:table-cell ns0:value-type="string" ns6:value-type="string">
            <ns7:p>Galveston</ns7:p>
          </ns4:table-cell>
          <ns4:table-cell ns0:value-type="string" ns6:value-type="string">
            <ns7:p>TX</ns7:p>
          </ns4:table-cell>
          <ns4:table-cell ns0:value-type="string" ns6:value-type="string">
            <ns7:p>53636</ns7:p>
          </ns4:table-cell>
          <ns4:table-cell ns4:number-columns-repeated="9"/>
        </ns4:table-row>
        <ns4:table-row ns4:style-name="ro1">
          <ns4:table-cell ns0:value-type="string" ns6:value-type="string">
            <ns7:p>769.0</ns7:p>
          </ns4:table-cell>
          <ns4:table-cell ns0:value-type="string" ns6:value-type="string">
            <ns7:p>Elyria</ns7:p>
          </ns4:table-cell>
          <ns4:table-cell ns0:value-type="string" ns6:value-type="string">
            <ns7:p>OH</ns7:p>
          </ns4:table-cell>
          <ns4:table-cell ns0:value-type="string" ns6:value-type="string">
            <ns7:p>53634</ns7:p>
          </ns4:table-cell>
          <ns4:table-cell ns4:number-columns-repeated="9"/>
        </ns4:table-row>
        <ns4:table-row ns4:style-name="ro1">
          <ns4:table-cell ns0:value-type="string" ns6:value-type="string">
            <ns7:p>770.0</ns7:p>
          </ns4:table-cell>
          <ns4:table-cell ns0:value-type="string" ns6:value-type="string">
            <ns7:p>Milford</ns7:p>
          </ns4:table-cell>
          <ns4:table-cell ns0:value-type="string" ns6:value-type="string">
            <ns7:p>CT</ns7:p>
          </ns4:table-cell>
          <ns4:table-cell ns0:value-type="string" ns6:value-type="string">
            <ns7:p>53606</ns7:p>
          </ns4:table-cell>
          <ns4:table-cell ns4:number-columns-repeated="9"/>
        </ns4:table-row>
        <ns4:table-row ns4:style-name="ro1">
          <ns4:table-cell ns0:value-type="string" ns6:value-type="string">
            <ns7:p>771.0</ns7:p>
          </ns4:table-cell>
          <ns4:table-cell ns0:value-type="string" ns6:value-type="string">
            <ns7:p>Everett</ns7:p>
          </ns4:table-cell>
          <ns4:table-cell ns0:value-type="string" ns6:value-type="string">
            <ns7:p>MA</ns7:p>
          </ns4:table-cell>
          <ns4:table-cell ns0:value-type="string" ns6:value-type="string">
            <ns7:p>53572</ns7:p>
          </ns4:table-cell>
          <ns4:table-cell ns4:number-columns-repeated="9"/>
        </ns4:table-row>
        <ns4:table-row ns4:style-name="ro1">
          <ns4:table-cell ns0:value-type="string" ns6:value-type="string">
            <ns7:p>772.0</ns7:p>
          </ns4:table-cell>
          <ns4:table-cell ns0:value-type="string" ns6:value-type="string">
            <ns7:p>Lebanon</ns7:p>
          </ns4:table-cell>
          <ns4:table-cell ns0:value-type="string" ns6:value-type="string">
            <ns7:p>TN</ns7:p>
          </ns4:table-cell>
          <ns4:table-cell ns0:value-type="string" ns6:value-type="string">
            <ns7:p>53412</ns7:p>
          </ns4:table-cell>
          <ns4:table-cell ns4:number-columns-repeated="9"/>
        </ns4:table-row>
        <ns4:table-row ns4:style-name="ro1">
          <ns4:table-cell ns0:value-type="string" ns6:value-type="string">
            <ns7:p>773.0</ns7:p>
          </ns4:table-cell>
          <ns4:table-cell ns0:value-type="string" ns6:value-type="string">
            <ns7:p>Colton</ns7:p>
          </ns4:table-cell>
          <ns4:table-cell ns0:value-type="string" ns6:value-type="string">
            <ns7:p>CA</ns7:p>
          </ns4:table-cell>
          <ns4:table-cell ns0:value-type="string" ns6:value-type="string">
            <ns7:p>53383</ns7:p>
          </ns4:table-cell>
          <ns4:table-cell ns4:number-columns-repeated="9"/>
        </ns4:table-row>
        <ns4:table-row ns4:style-name="ro1">
          <ns4:table-cell ns0:value-type="string" ns6:value-type="string">
            <ns7:p>774.0</ns7:p>
          </ns4:table-cell>
          <ns4:table-cell ns0:value-type="string" ns6:value-type="string">
            <ns7:p>Murray</ns7:p>
          </ns4:table-cell>
          <ns4:table-cell ns0:value-type="string" ns6:value-type="string">
            <ns7:p>UT</ns7:p>
          </ns4:table-cell>
          <ns4:table-cell ns0:value-type="string" ns6:value-type="string">
            <ns7:p>53297</ns7:p>
          </ns4:table-cell>
          <ns4:table-cell ns4:number-columns-repeated="9"/>
        </ns4:table-row>
        <ns4:table-row ns4:style-name="ro1">
          <ns4:table-cell ns0:value-type="string" ns6:value-type="string">
            <ns7:p>775.0</ns7:p>
          </ns4:table-cell>
          <ns4:table-cell ns0:value-type="string" ns6:value-type="string">
            <ns7:p>Normal</ns7:p>
          </ns4:table-cell>
          <ns4:table-cell ns0:value-type="string" ns6:value-type="string">
            <ns7:p>IL</ns7:p>
          </ns4:table-cell>
          <ns4:table-cell ns0:value-type="string" ns6:value-type="string">
            <ns7:p>53275</ns7:p>
          </ns4:table-cell>
          <ns4:table-cell ns4:number-columns-repeated="9"/>
        </ns4:table-row>
        <ns4:table-row ns4:style-name="ro1">
          <ns4:table-cell ns0:value-type="string" ns6:value-type="string">
            <ns7:p>776.0</ns7:p>
          </ns4:table-cell>
          <ns4:table-cell ns0:value-type="string" ns6:value-type="string">
            <ns7:p>Palm Desert</ns7:p>
          </ns4:table-cell>
          <ns4:table-cell ns0:value-type="string" ns6:value-type="string">
            <ns7:p>CA</ns7:p>
          </ns4:table-cell>
          <ns4:table-cell ns0:value-type="string" ns6:value-type="string">
            <ns7:p>53259</ns7:p>
          </ns4:table-cell>
          <ns4:table-cell ns4:number-columns-repeated="9"/>
        </ns4:table-row>
        <ns4:table-row ns4:style-name="ro1">
          <ns4:table-cell ns0:value-type="string" ns6:value-type="string">
            <ns7:p>777.0</ns7:p>
          </ns4:table-cell>
          <ns4:table-cell ns0:value-type="string" ns6:value-type="string">
            <ns7:p>West New York</ns7:p>
          </ns4:table-cell>
          <ns4:table-cell ns0:value-type="string" ns6:value-type="string">
            <ns7:p>NJ</ns7:p>
          </ns4:table-cell>
          <ns4:table-cell ns0:value-type="string" ns6:value-type="string">
            <ns7:p>53192</ns7:p>
          </ns4:table-cell>
          <ns4:table-cell ns4:number-columns-repeated="9"/>
        </ns4:table-row>
        <ns4:table-row ns4:style-name="ro1">
          <ns4:table-cell ns0:value-type="string" ns6:value-type="string">
            <ns7:p>778.0</ns7:p>
          </ns4:table-cell>
          <ns4:table-cell ns0:value-type="string" ns6:value-type="string">
            <ns7:p>Summerville</ns7:p>
          </ns4:table-cell>
          <ns4:table-cell ns0:value-type="string" ns6:value-type="string">
            <ns7:p>SC</ns7:p>
          </ns4:table-cell>
          <ns4:table-cell ns0:value-type="string" ns6:value-type="string">
            <ns7:p>53177</ns7:p>
          </ns4:table-cell>
          <ns4:table-cell ns4:number-columns-repeated="9"/>
        </ns4:table-row>
        <ns4:table-row ns4:style-name="ro1">
          <ns4:table-cell ns0:value-type="string" ns6:value-type="string">
            <ns7:p>779.0</ns7:p>
          </ns4:table-cell>
          <ns4:table-cell ns0:value-type="string" ns6:value-type="string">
            <ns7:p>Oak Park</ns7:p>
          </ns4:table-cell>
          <ns4:table-cell ns0:value-type="string" ns6:value-type="string">
            <ns7:p>IL</ns7:p>
          </ns4:table-cell>
          <ns4:table-cell ns0:value-type="string" ns6:value-type="string">
            <ns7:p>52823</ns7:p>
          </ns4:table-cell>
          <ns4:table-cell ns4:number-columns-repeated="9"/>
        </ns4:table-row>
        <ns4:table-row ns4:style-name="ro1">
          <ns4:table-cell ns0:value-type="string" ns6:value-type="string">
            <ns7:p>780.0</ns7:p>
          </ns4:table-cell>
          <ns4:table-cell ns0:value-type="string" ns6:value-type="string">
            <ns7:p>Clermont</ns7:p>
          </ns4:table-cell>
          <ns4:table-cell ns0:value-type="string" ns6:value-type="string">
            <ns7:p>FL</ns7:p>
          </ns4:table-cell>
          <ns4:table-cell ns0:value-type="string" ns6:value-type="string">
            <ns7:p>52812</ns7:p>
          </ns4:table-cell>
          <ns4:table-cell ns4:number-columns-repeated="9"/>
        </ns4:table-row>
        <ns4:table-row ns4:style-name="ro1">
          <ns4:table-cell ns0:value-type="string" ns6:value-type="string">
            <ns7:p>781.0</ns7:p>
          </ns4:table-cell>
          <ns4:table-cell ns0:value-type="string" ns6:value-type="string">
            <ns7:p>Columbus</ns7:p>
          </ns4:table-cell>
          <ns4:table-cell ns0:value-type="string" ns6:value-type="string">
            <ns7:p>IN</ns7:p>
          </ns4:table-cell>
          <ns4:table-cell ns0:value-type="string" ns6:value-type="string">
            <ns7:p>52655</ns7:p>
          </ns4:table-cell>
          <ns4:table-cell ns4:number-columns-repeated="9"/>
        </ns4:table-row>
        <ns4:table-row ns4:style-name="ro1">
          <ns4:table-cell ns0:value-type="string" ns6:value-type="string">
            <ns7:p>782.0</ns7:p>
          </ns4:table-cell>
          <ns4:table-cell ns0:value-type="string" ns6:value-type="string">
            <ns7:p>Prescott Valley</ns7:p>
          </ns4:table-cell>
          <ns4:table-cell ns0:value-type="string" ns6:value-type="string">
            <ns7:p>AZ</ns7:p>
          </ns4:table-cell>
          <ns4:table-cell ns0:value-type="string" ns6:value-type="string">
            <ns7:p>52423</ns7:p>
          </ns4:table-cell>
          <ns4:table-cell ns4:number-columns-repeated="9"/>
        </ns4:table-row>
        <ns4:table-row ns4:style-name="ro1">
          <ns4:table-cell ns0:value-type="string" ns6:value-type="string">
            <ns7:p>783.0</ns7:p>
          </ns4:table-cell>
          <ns4:table-cell ns0:value-type="string" ns6:value-type="string">
            <ns7:p>Sherman</ns7:p>
          </ns4:table-cell>
          <ns4:table-cell ns0:value-type="string" ns6:value-type="string">
            <ns7:p>TX</ns7:p>
          </ns4:table-cell>
          <ns4:table-cell ns0:value-type="string" ns6:value-type="string">
            <ns7:p>52417</ns7:p>
          </ns4:table-cell>
          <ns4:table-cell ns4:number-columns-repeated="9"/>
        </ns4:table-row>
        <ns4:table-row ns4:style-name="ro1">
          <ns4:table-cell ns0:value-type="string" ns6:value-type="string">
            <ns7:p>784.0</ns7:p>
          </ns4:table-cell>
          <ns4:table-cell ns0:value-type="string" ns6:value-type="string">
            <ns7:p>Cathedral City</ns7:p>
          </ns4:table-cell>
          <ns4:table-cell ns0:value-type="string" ns6:value-type="string">
            <ns7:p>CA</ns7:p>
          </ns4:table-cell>
          <ns4:table-cell ns0:value-type="string" ns6:value-type="string">
            <ns7:p>52375</ns7:p>
          </ns4:table-cell>
          <ns4:table-cell ns4:number-columns-repeated="9"/>
        </ns4:table-row>
        <ns4:table-row ns4:style-name="ro1">
          <ns4:table-cell ns0:value-type="string" ns6:value-type="string">
            <ns7:p>785.0</ns7:p>
          </ns4:table-cell>
          <ns4:table-cell ns0:value-type="string" ns6:value-type="string">
            <ns7:p>Delano</ns7:p>
          </ns4:table-cell>
          <ns4:table-cell ns0:value-type="string" ns6:value-type="string">
            <ns7:p>CA</ns7:p>
          </ns4:table-cell>
          <ns4:table-cell ns0:value-type="string" ns6:value-type="string">
            <ns7:p>52334</ns7:p>
          </ns4:table-cell>
          <ns4:table-cell ns4:number-columns-repeated="9"/>
        </ns4:table-row>
        <ns4:table-row ns4:style-name="ro1">
          <ns4:table-cell ns0:value-type="string" ns6:value-type="string">
            <ns7:p>786.0</ns7:p>
          </ns4:table-cell>
          <ns4:table-cell ns0:value-type="string" ns6:value-type="string">
            <ns7:p>Pinellas Park</ns7:p>
          </ns4:table-cell>
          <ns4:table-cell ns0:value-type="string" ns6:value-type="string">
            <ns7:p>FL</ns7:p>
          </ns4:table-cell>
          <ns4:table-cell ns0:value-type="string" ns6:value-type="string">
            <ns7:p>52295</ns7:p>
          </ns4:table-cell>
          <ns4:table-cell ns4:number-columns-repeated="9"/>
        </ns4:table-row>
        <ns4:table-row ns4:style-name="ro1">
          <ns4:table-cell ns0:value-type="string" ns6:value-type="string">
            <ns7:p>787.0</ns7:p>
          </ns4:table-cell>
          <ns4:table-cell ns0:value-type="string" ns6:value-type="string">
            <ns7:p>Bothell</ns7:p>
          </ns4:table-cell>
          <ns4:table-cell ns0:value-type="string" ns6:value-type="string">
            <ns7:p>WA</ns7:p>
          </ns4:table-cell>
          <ns4:table-cell ns0:value-type="string" ns6:value-type="string">
            <ns7:p>52199</ns7:p>
          </ns4:table-cell>
          <ns4:table-cell ns4:number-columns-repeated="9"/>
        </ns4:table-row>
        <ns4:table-row ns4:style-name="ro1">
          <ns4:table-cell ns0:value-type="string" ns6:value-type="string">
            <ns7:p>788.0</ns7:p>
          </ns4:table-cell>
          <ns4:table-cell ns0:value-type="string" ns6:value-type="string">
            <ns7:p>Middletown</ns7:p>
          </ns4:table-cell>
          <ns4:table-cell ns0:value-type="string" ns6:value-type="string">
            <ns7:p>OH</ns7:p>
          </ns4:table-cell>
          <ns4:table-cell ns0:value-type="string" ns6:value-type="string">
            <ns7:p>52146</ns7:p>
          </ns4:table-cell>
          <ns4:table-cell ns4:number-columns-repeated="9"/>
        </ns4:table-row>
        <ns4:table-row ns4:style-name="ro1">
          <ns4:table-cell ns0:value-type="string" ns6:value-type="string">
            <ns7:p>789.0</ns7:p>
          </ns4:table-cell>
          <ns4:table-cell ns0:value-type="string" ns6:value-type="string">
            <ns7:p>Battle Creek</ns7:p>
          </ns4:table-cell>
          <ns4:table-cell ns0:value-type="string" ns6:value-type="string">
            <ns7:p>MI</ns7:p>
          </ns4:table-cell>
          <ns4:table-cell ns0:value-type="string" ns6:value-type="string">
            <ns7:p>52021</ns7:p>
          </ns4:table-cell>
          <ns4:table-cell ns4:number-columns-repeated="9"/>
        </ns4:table-row>
        <ns4:table-row ns4:style-name="ro1">
          <ns4:table-cell ns0:value-type="string" ns6:value-type="string">
            <ns7:p>790.0</ns7:p>
          </ns4:table-cell>
          <ns4:table-cell ns0:value-type="string" ns6:value-type="string">
            <ns7:p>Goose Creek</ns7:p>
          </ns4:table-cell>
          <ns4:table-cell ns0:value-type="string" ns6:value-type="string">
            <ns7:p>SC</ns7:p>
          </ns4:table-cell>
          <ns4:table-cell ns0:value-type="string" ns6:value-type="string">
            <ns7:p>52010</ns7:p>
          </ns4:table-cell>
          <ns4:table-cell ns4:number-columns-repeated="9"/>
        </ns4:table-row>
        <ns4:table-row ns4:style-name="ro1">
          <ns4:table-cell ns0:value-type="string" ns6:value-type="string">
            <ns7:p>791.0</ns7:p>
          </ns4:table-cell>
          <ns4:table-cell ns0:value-type="string" ns6:value-type="string">
            <ns7:p>Novato</ns7:p>
          </ns4:table-cell>
          <ns4:table-cell ns0:value-type="string" ns6:value-type="string">
            <ns7:p>CA</ns7:p>
          </ns4:table-cell>
          <ns4:table-cell ns0:value-type="string" ns6:value-type="string">
            <ns7:p>51947</ns7:p>
          </ns4:table-cell>
          <ns4:table-cell ns4:number-columns-repeated="9"/>
        </ns4:table-row>
        <ns4:table-row ns4:style-name="ro1">
          <ns4:table-cell ns0:value-type="string" ns6:value-type="string">
            <ns7:p>792.0</ns7:p>
          </ns4:table-cell>
          <ns4:table-cell ns0:value-type="string" ns6:value-type="string">
            <ns7:p>Ocoee</ns7:p>
          </ns4:table-cell>
          <ns4:table-cell ns0:value-type="string" ns6:value-type="string">
            <ns7:p>FL</ns7:p>
          </ns4:table-cell>
          <ns4:table-cell ns0:value-type="string" ns6:value-type="string">
            <ns7:p>51932</ns7:p>
          </ns4:table-cell>
          <ns4:table-cell ns4:number-columns-repeated="9"/>
        </ns4:table-row>
        <ns4:table-row ns4:style-name="ro1">
          <ns4:table-cell ns0:value-type="string" ns6:value-type="string">
            <ns7:p>793.0</ns7:p>
          </ns4:table-cell>
          <ns4:table-cell ns0:value-type="string" ns6:value-type="string">
            <ns7:p>Collierville</ns7:p>
          </ns4:table-cell>
          <ns4:table-cell ns0:value-type="string" ns6:value-type="string">
            <ns7:p>TN</ns7:p>
          </ns4:table-cell>
          <ns4:table-cell ns0:value-type="string" ns6:value-type="string">
            <ns7:p>51909</ns7:p>
          </ns4:table-cell>
          <ns4:table-cell ns4:number-columns-repeated="9"/>
        </ns4:table-row>
        <ns4:table-row ns4:style-name="ro1">
          <ns4:table-cell ns0:value-type="string" ns6:value-type="string">
            <ns7:p>794.0</ns7:p>
          </ns4:table-cell>
          <ns4:table-cell ns0:value-type="string" ns6:value-type="string">
            <ns7:p>Diamond Bar</ns7:p>
          </ns4:table-cell>
          <ns4:table-cell ns0:value-type="string" ns6:value-type="string">
            <ns7:p>CA</ns7:p>
          </ns4:table-cell>
          <ns4:table-cell ns0:value-type="string" ns6:value-type="string">
            <ns7:p>51884</ns7:p>
          </ns4:table-cell>
          <ns4:table-cell ns4:number-columns-repeated="9"/>
        </ns4:table-row>
        <ns4:table-row ns4:style-name="ro1">
          <ns4:table-cell ns0:value-type="string" ns6:value-type="string">
            <ns7:p>795.0</ns7:p>
          </ns4:table-cell>
          <ns4:table-cell ns0:value-type="string" ns6:value-type="string">
            <ns7:p>Burien</ns7:p>
          </ns4:table-cell>
          <ns4:table-cell ns0:value-type="string" ns6:value-type="string">
            <ns7:p>WA</ns7:p>
          </ns4:table-cell>
          <ns4:table-cell ns0:value-type="string" ns6:value-type="string">
            <ns7:p>51859</ns7:p>
          </ns4:table-cell>
          <ns4:table-cell ns4:number-columns-repeated="9"/>
        </ns4:table-row>
        <ns4:table-row ns4:style-name="ro1">
          <ns4:table-cell ns0:value-type="string" ns6:value-type="string">
            <ns7:p>796.0</ns7:p>
          </ns4:table-cell>
          <ns4:table-cell ns0:value-type="string" ns6:value-type="string">
            <ns7:p>Dunwoody</ns7:p>
          </ns4:table-cell>
          <ns4:table-cell ns0:value-type="string" ns6:value-type="string">
            <ns7:p>GA</ns7:p>
          </ns4:table-cell>
          <ns4:table-cell ns0:value-type="string" ns6:value-type="string">
            <ns7:p>51792</ns7:p>
          </ns4:table-cell>
          <ns4:table-cell ns4:number-columns-repeated="9"/>
        </ns4:table-row>
        <ns4:table-row ns4:style-name="ro1">
          <ns4:table-cell ns0:value-type="string" ns6:value-type="string">
            <ns7:p>797.0</ns7:p>
          </ns4:table-cell>
          <ns4:table-cell ns0:value-type="string" ns6:value-type="string">
            <ns7:p>Fort Pierce</ns7:p>
          </ns4:table-cell>
          <ns4:table-cell ns0:value-type="string" ns6:value-type="string">
            <ns7:p>FL</ns7:p>
          </ns4:table-cell>
          <ns4:table-cell ns0:value-type="string" ns6:value-type="string">
            <ns7:p>51737</ns7:p>
          </ns4:table-cell>
          <ns4:table-cell ns4:number-columns-repeated="9"/>
        </ns4:table-row>
        <ns4:table-row ns4:style-name="ro1">
          <ns4:table-cell ns0:value-type="string" ns6:value-type="string">
            <ns7:p>798.0</ns7:p>
          </ns4:table-cell>
          <ns4:table-cell ns0:value-type="string" ns6:value-type="string">
            <ns7:p>Huntington Park</ns7:p>
          </ns4:table-cell>
          <ns4:table-cell ns0:value-type="string" ns6:value-type="string">
            <ns7:p>CA</ns7:p>
          </ns4:table-cell>
          <ns4:table-cell ns0:value-type="string" ns6:value-type="string">
            <ns7:p>51544</ns7:p>
          </ns4:table-cell>
          <ns4:table-cell ns4:number-columns-repeated="9"/>
        </ns4:table-row>
        <ns4:table-row ns4:style-name="ro1">
          <ns4:table-cell ns0:value-type="string" ns6:value-type="string">
            <ns7:p>799.0</ns7:p>
          </ns4:table-cell>
          <ns4:table-cell ns0:value-type="string" ns6:value-type="string">
            <ns7:p>Newark</ns7:p>
          </ns4:table-cell>
          <ns4:table-cell ns0:value-type="string" ns6:value-type="string">
            <ns7:p>OH</ns7:p>
          </ns4:table-cell>
          <ns4:table-cell ns0:value-type="string" ns6:value-type="string">
            <ns7:p>51473</ns7:p>
          </ns4:table-cell>
          <ns4:table-cell ns4:number-columns-repeated="9"/>
        </ns4:table-row>
        <ns4:table-row ns4:style-name="ro1">
          <ns4:table-cell ns0:value-type="string" ns6:value-type="string">
            <ns7:p>800.0</ns7:p>
          </ns4:table-cell>
          <ns4:table-cell ns0:value-type="string" ns6:value-type="string">
            <ns7:p>Mishawaka</ns7:p>
          </ns4:table-cell>
          <ns4:table-cell ns0:value-type="string" ns6:value-type="string">
            <ns7:p>IN</ns7:p>
          </ns4:table-cell>
          <ns4:table-cell ns0:value-type="string" ns6:value-type="string">
            <ns7:p>51226</ns7:p>
          </ns4:table-cell>
          <ns4:table-cell ns4:number-columns-repeated="9"/>
        </ns4:table-row>
        <ns4:table-row ns4:style-name="ro1">
          <ns4:table-cell ns0:value-type="string" ns6:value-type="string">
            <ns7:p>801.0</ns7:p>
          </ns4:table-cell>
          <ns4:table-cell ns0:value-type="string" ns6:value-type="string">
            <ns7:p>Cleveland</ns7:p>
          </ns4:table-cell>
          <ns4:table-cell ns0:value-type="string" ns6:value-type="string">
            <ns7:p>TN</ns7:p>
          </ns4:table-cell>
          <ns4:table-cell ns0:value-type="string" ns6:value-type="string">
            <ns7:p>51172</ns7:p>
          </ns4:table-cell>
          <ns4:table-cell ns4:number-columns-repeated="9"/>
        </ns4:table-row>
        <ns4:table-row ns4:style-name="ro1">
          <ns4:table-cell ns0:value-type="string" ns6:value-type="string">
            <ns7:p>802.0</ns7:p>
          </ns4:table-cell>
          <ns4:table-cell ns0:value-type="string" ns6:value-type="string">
            <ns7:p>Florissant</ns7:p>
          </ns4:table-cell>
          <ns4:table-cell ns0:value-type="string" ns6:value-type="string">
            <ns7:p>MO</ns7:p>
          </ns4:table-cell>
          <ns4:table-cell ns0:value-type="string" ns6:value-type="string">
            <ns7:p>51124</ns7:p>
          </ns4:table-cell>
          <ns4:table-cell ns4:number-columns-repeated="9"/>
        </ns4:table-row>
        <ns4:table-row ns4:style-name="ro1">
          <ns4:table-cell ns0:value-type="string" ns6:value-type="string">
            <ns7:p>803.0</ns7:p>
          </ns4:table-cell>
          <ns4:table-cell ns0:value-type="string" ns6:value-type="string">
            <ns7:p>Cuyahoga Falls</ns7:p>
          </ns4:table-cell>
          <ns4:table-cell ns0:value-type="string" ns6:value-type="string">
            <ns7:p>OH</ns7:p>
          </ns4:table-cell>
          <ns4:table-cell ns0:value-type="string" ns6:value-type="string">
            <ns7:p>50975</ns7:p>
          </ns4:table-cell>
          <ns4:table-cell ns4:number-columns-repeated="9"/>
        </ns4:table-row>
        <ns4:table-row ns4:style-name="ro1">
          <ns4:table-cell ns0:value-type="string" ns6:value-type="string">
            <ns7:p>804.0</ns7:p>
          </ns4:table-cell>
          <ns4:table-cell ns0:value-type="string" ns6:value-type="string">
            <ns7:p>Troy</ns7:p>
          </ns4:table-cell>
          <ns4:table-cell ns0:value-type="string" ns6:value-type="string">
            <ns7:p>NY</ns7:p>
          </ns4:table-cell>
          <ns4:table-cell ns0:value-type="string" ns6:value-type="string">
            <ns7:p>50912</ns7:p>
          </ns4:table-cell>
          <ns4:table-cell ns4:number-columns-repeated="9"/>
        </ns4:table-row>
        <ns4:table-row ns4:style-name="ro1">
          <ns4:table-cell ns0:value-type="string" ns6:value-type="string">
            <ns7:p>805.0</ns7:p>
          </ns4:table-cell>
          <ns4:table-cell ns0:value-type="string" ns6:value-type="string">
            <ns7:p>Hoffman Estates</ns7:p>
          </ns4:table-cell>
          <ns4:table-cell ns0:value-type="string" ns6:value-type="string">
            <ns7:p>IL</ns7:p>
          </ns4:table-cell>
          <ns4:table-cell ns0:value-type="string" ns6:value-type="string">
            <ns7:p>50858</ns7:p>
          </ns4:table-cell>
          <ns4:table-cell ns4:number-columns-repeated="9"/>
        </ns4:table-row>
        <ns4:table-row ns4:style-name="ro1">
          <ns4:table-cell ns0:value-type="string" ns6:value-type="string">
            <ns7:p>806.0</ns7:p>
          </ns4:table-cell>
          <ns4:table-cell ns0:value-type="string" ns6:value-type="string">
            <ns7:p>Harrisonburg</ns7:p>
          </ns4:table-cell>
          <ns4:table-cell ns0:value-type="string" ns6:value-type="string">
            <ns7:p>VA</ns7:p>
          </ns4:table-cell>
          <ns4:table-cell ns0:value-type="string" ns6:value-type="string">
            <ns7:p>50839</ns7:p>
          </ns4:table-cell>
          <ns4:table-cell ns4:number-columns-repeated="9"/>
        </ns4:table-row>
        <ns4:table-row ns4:style-name="ro1">
          <ns4:table-cell ns0:value-type="string" ns6:value-type="string">
            <ns7:p>807.0</ns7:p>
          </ns4:table-cell>
          <ns4:table-cell ns0:value-type="string" ns6:value-type="string">
            <ns7:p>La Crosse</ns7:p>
          </ns4:table-cell>
          <ns4:table-cell ns0:value-type="string" ns6:value-type="string">
            <ns7:p>WI</ns7:p>
          </ns4:table-cell>
          <ns4:table-cell ns0:value-type="string" ns6:value-type="string">
            <ns7:p>50784</ns7:p>
          </ns4:table-cell>
          <ns4:table-cell ns4:number-columns-repeated="9"/>
        </ns4:table-row>
        <ns4:table-row ns4:style-name="ro1">
          <ns4:table-cell ns0:value-type="string" ns6:value-type="string">
            <ns7:p>808.0</ns7:p>
          </ns4:table-cell>
          <ns4:table-cell ns0:value-type="string" ns6:value-type="string">
            <ns7:p>Paramount</ns7:p>
          </ns4:table-cell>
          <ns4:table-cell ns0:value-type="string" ns6:value-type="string">
            <ns7:p>CA</ns7:p>
          </ns4:table-cell>
          <ns4:table-cell ns0:value-type="string" ns6:value-type="string">
            <ns7:p>50755</ns7:p>
          </ns4:table-cell>
          <ns4:table-cell ns4:number-columns-repeated="9"/>
        </ns4:table-row>
        <ns4:table-row ns4:style-name="ro1">
          <ns4:table-cell ns0:value-type="string" ns6:value-type="string">
            <ns7:p>809.0</ns7:p>
          </ns4:table-cell>
          <ns4:table-cell ns0:value-type="string" ns6:value-type="string">
            <ns7:p>Watsonville</ns7:p>
          </ns4:table-cell>
          <ns4:table-cell ns0:value-type="string" ns6:value-type="string">
            <ns7:p>CA</ns7:p>
          </ns4:table-cell>
          <ns4:table-cell ns0:value-type="string" ns6:value-type="string">
            <ns7:p>50716</ns7:p>
          </ns4:table-cell>
          <ns4:table-cell ns4:number-columns-repeated="9"/>
        </ns4:table-row>
        <ns4:table-row ns4:style-name="ro1">
          <ns4:table-cell ns0:value-type="string" ns6:value-type="string">
            <ns7:p>810.0</ns7:p>
          </ns4:table-cell>
          <ns4:table-cell ns0:value-type="string" ns6:value-type="string">
            <ns7:p>Grapevine</ns7:p>
          </ns4:table-cell>
          <ns4:table-cell ns0:value-type="string" ns6:value-type="string">
            <ns7:p>TX</ns7:p>
          </ns4:table-cell>
          <ns4:table-cell ns0:value-type="string" ns6:value-type="string">
            <ns7:p>50714</ns7:p>
          </ns4:table-cell>
          <ns4:table-cell ns4:number-columns-repeated="9"/>
        </ns4:table-row>
        <ns4:table-row ns4:style-name="ro1">
          <ns4:table-cell ns0:value-type="string" ns6:value-type="string">
            <ns7:p>811.0</ns7:p>
          </ns4:table-cell>
          <ns4:table-cell ns0:value-type="string" ns6:value-type="string">
            <ns7:p>Draper</ns7:p>
          </ns4:table-cell>
          <ns4:table-cell ns0:value-type="string" ns6:value-type="string">
            <ns7:p>UT</ns7:p>
          </ns4:table-cell>
          <ns4:table-cell ns0:value-type="string" ns6:value-type="string">
            <ns7:p>50652</ns7:p>
          </ns4:table-cell>
          <ns4:table-cell ns4:number-columns-repeated="9"/>
        </ns4:table-row>
        <ns4:table-row ns4:style-name="ro1">
          <ns4:table-cell ns0:value-type="string" ns6:value-type="string">
            <ns7:p>812.0</ns7:p>
          </ns4:table-cell>
          <ns4:table-cell ns0:value-type="string" ns6:value-type="string">
            <ns7:p>San Luis Obispo</ns7:p>
          </ns4:table-cell>
          <ns4:table-cell ns0:value-type="string" ns6:value-type="string">
            <ns7:p>CA</ns7:p>
          </ns4:table-cell>
          <ns4:table-cell ns0:value-type="string" ns6:value-type="string">
            <ns7:p>50636</ns7:p>
          </ns4:table-cell>
          <ns4:table-cell ns4:number-columns-repeated="9"/>
        </ns4:table-row>
        <ns4:table-row ns4:style-name="ro1">
          <ns4:table-cell ns0:value-type="string" ns6:value-type="string">
            <ns7:p>813.0</ns7:p>
          </ns4:table-cell>
          <ns4:table-cell ns0:value-type="string" ns6:value-type="string">
            <ns7:p>Harrisburg</ns7:p>
          </ns4:table-cell>
          <ns4:table-cell ns0:value-type="string" ns6:value-type="string">
            <ns7:p>PA</ns7:p>
          </ns4:table-cell>
          <ns4:table-cell ns0:value-type="string" ns6:value-type="string">
            <ns7:p>50522</ns7:p>
          </ns4:table-cell>
          <ns4:table-cell ns4:number-columns-repeated="9"/>
        </ns4:table-row>
        <ns4:table-row ns4:style-name="ro1">
          <ns4:table-cell ns0:value-type="string" ns6:value-type="string">
            <ns7:p>814.0</ns7:p>
          </ns4:table-cell>
          <ns4:table-cell ns0:value-type="string" ns6:value-type="string">
            <ns7:p>Lawrence</ns7:p>
          </ns4:table-cell>
          <ns4:table-cell ns0:value-type="string" ns6:value-type="string">
            <ns7:p>IN</ns7:p>
          </ns4:table-cell>
          <ns4:table-cell ns0:value-type="string" ns6:value-type="string">
            <ns7:p>50420</ns7:p>
          </ns4:table-cell>
          <ns4:table-cell ns4:number-columns-repeated="9"/>
        </ns4:table-row>
        <ns4:table-row ns4:style-name="ro1">
          <ns4:table-cell ns0:value-type="string" ns6:value-type="string">
            <ns7:p>815.0</ns7:p>
          </ns4:table-cell>
          <ns4:table-cell ns0:value-type="string" ns6:value-type="string">
            <ns7:p>Downers Grove</ns7:p>
          </ns4:table-cell>
          <ns4:table-cell ns0:value-type="string" ns6:value-type="string">
            <ns7:p>IL</ns7:p>
          </ns4:table-cell>
          <ns4:table-cell ns0:value-type="string" ns6:value-type="string">
            <ns7:p>50365</ns7:p>
          </ns4:table-cell>
          <ns4:table-cell ns4:number-columns-repeated="9"/>
        </ns4:table-row>
        <ns4:table-row ns4:style-name="ro1">
          <ns4:table-cell ns0:value-type="string" ns6:value-type="string">
            <ns7:p>816.0</ns7:p>
          </ns4:table-cell>
          <ns4:table-cell ns0:value-type="string" ns6:value-type="string">
            <ns7:p>Enid</ns7:p>
          </ns4:table-cell>
          <ns4:table-cell ns0:value-type="string" ns6:value-type="string">
            <ns7:p>OK</ns7:p>
          </ns4:table-cell>
          <ns4:table-cell ns0:value-type="string" ns6:value-type="string">
            <ns7:p>50297</ns7:p>
          </ns4:table-cell>
          <ns4:table-cell ns4:number-columns-repeated="9"/>
        </ns4:table-row>
        <ns4:table-row ns4:style-name="ro1">
          <ns4:table-cell ns0:value-type="string" ns6:value-type="string">
            <ns7:p>817.0</ns7:p>
          </ns4:table-cell>
          <ns4:table-cell ns0:value-type="string" ns6:value-type="string">
            <ns7:p>Holly Springs</ns7:p>
          </ns4:table-cell>
          <ns4:table-cell ns0:value-type="string" ns6:value-type="string">
            <ns7:p>NC</ns7:p>
          </ns4:table-cell>
          <ns4:table-cell ns0:value-type="string" ns6:value-type="string">
            <ns7:p>50288</ns7:p>
          </ns4:table-cell>
          <ns4:table-cell ns4:number-columns-repeated="9"/>
        </ns4:table-row>
        <ns4:table-row ns4:style-name="ro1">
          <ns4:table-cell ns0:value-type="string" ns6:value-type="string">
            <ns7:p>818.0</ns7:p>
          </ns4:table-cell>
          <ns4:table-cell ns0:value-type="string" ns6:value-type="string">
            <ns7:p>Barnstable Town</ns7:p>
          </ns4:table-cell>
          <ns4:table-cell ns0:value-type="string" ns6:value-type="string">
            <ns7:p>MA</ns7:p>
          </ns4:table-cell>
          <ns4:table-cell ns0:value-type="string" ns6:value-type="string">
            <ns7:p>50101</ns7:p>
          </ns4:table-cell>
          <ns4:table-cell ns4:number-columns-repeated="9"/>
        </ns4:table-row>
        <ns4:table-row ns4:style-name="ro1">
          <ns4:table-cell ns0:value-type="string" ns6:value-type="string">
            <ns7:p>819.0</ns7:p>
          </ns4:table-cell>
          <ns4:table-cell ns0:value-type="string" ns6:value-type="string">
            <ns7:p>Waxahachie</ns7:p>
          </ns4:table-cell>
          <ns4:table-cell ns0:value-type="string" ns6:value-type="string">
            <ns7:p>TX</ns7:p>
          </ns4:table-cell>
          <ns4:table-cell ns0:value-type="string" ns6:value-type="string">
            <ns7:p>50090</ns7:p>
          </ns4:table-cell>
          <ns4:table-cell ns4:number-columns-repeated="9"/>
        </ns4:table-row>
        <ns4:table-row ns4:style-name="ro1">
          <ns4:table-cell ns0:value-type="string" ns6:value-type="string">
            <ns7:p>820.0</ns7:p>
          </ns4:table-cell>
          <ns4:table-cell ns0:value-type="string" ns6:value-type="string">
            <ns7:p>Columbia</ns7:p>
          </ns4:table-cell>
          <ns4:table-cell ns0:value-type="string" ns6:value-type="string">
            <ns7:p>TN</ns7:p>
          </ns4:table-cell>
          <ns4:table-cell ns0:value-type="string" ns6:value-type="string">
            <ns7:p>50072</ns7:p>
          </ns4:table-cell>
          <ns4:table-cell ns4:number-columns-repeated="9"/>
        </ns4:table-row>
        <ns4:table-row ns4:style-name="ro1">
          <ns4:table-cell ns0:value-type="string" ns6:value-type="string">
            <ns7:p>821.0</ns7:p>
          </ns4:table-cell>
          <ns4:table-cell ns0:value-type="string" ns6:value-type="string">
            <ns7:p>Stillwater</ns7:p>
          </ns4:table-cell>
          <ns4:table-cell ns0:value-type="string" ns6:value-type="string">
            <ns7:p>OK</ns7:p>
          </ns4:table-cell>
          <ns4:table-cell ns0:value-type="string" ns6:value-type="string">
            <ns7:p>50046</ns7:p>
          </ns4:table-cell>
          <ns4:table-cell ns4:number-columns-repeated="9"/>
        </ns4:table-row>
        <ns4:table-row ns4:style-name="ro1">
          <ns4:table-cell ns0:value-type="string" ns6:value-type="string">
            <ns7:p>822.0</ns7:p>
          </ns4:table-cell>
          <ns4:table-cell ns0:value-type="string" ns6:value-type="string">
            <ns7:p>Plainfield</ns7:p>
          </ns4:table-cell>
          <ns4:table-cell ns0:value-type="string" ns6:value-type="string">
            <ns7:p>IL</ns7:p>
          </ns4:table-cell>
          <ns4:table-cell ns0:value-type="string" ns6:value-type="string">
            <ns7:p>50043</ns7:p>
          </ns4:table-cell>
          <ns4:table-cell ns4:number-columns-repeated="9"/>
        </ns4:table-row>
        <ns4:table-row ns4:style-name="ro1">
          <ns4:table-cell ns0:value-type="string" ns6:value-type="string">
            <ns7:p>823.0</ns7:p>
          </ns4:table-cell>
          <ns4:table-cell ns0:value-type="string" ns6:value-type="string">
            <ns7:p>St. Louis Park</ns7:p>
          </ns4:table-cell>
          <ns4:table-cell ns0:value-type="string" ns6:value-type="string">
            <ns7:p>MN</ns7:p>
          </ns4:table-cell>
          <ns4:table-cell ns0:value-type="string" ns6:value-type="string">
            <ns7:p>50027</ns7:p>
          </ns4:table-cell>
          <ns4:table-cell ns4:number-columns-repeated="9"/>
        </ns4:table-row>
        <ns4:table-row ns4:style-name="ro1">
          <ns4:table-cell ns0:value-type="string" ns6:value-type="string">
            <ns7:p/>
          </ns4:table-cell>
          <ns4:table-cell ns0:value-type="string" ns6:value-type="string">
            <ns7:p>Huntington</ns7:p>
          </ns4:table-cell>
          <ns4:table-cell ns0:value-type="string" ns6:value-type="string">
            <ns7:p>WV</ns7:p>
          </ns4:table-cell>
          <ns4:table-cell ns0:value-type="float" ns0:value="45877" ns6:value-type="float">
            <ns7:p>45877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Burlington</ns7:p>
          </ns4:table-cell>
          <ns4:table-cell ns0:value-type="string" ns6:value-type="string">
            <ns7:p>VT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South Burlington</ns7:p>
          </ns4:table-cell>
          <ns4:table-cell ns0:value-type="string" ns6:value-type="string">
            <ns7:p>VT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Charleston</ns7:p>
          </ns4:table-cell>
          <ns4:table-cell ns0:value-type="string" ns6:value-type="string">
            <ns7:p>WV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 ns4:number-rows-repeated="1047748">
          <ns4:table-cell ns4:number-columns-repeated="13"/>
        </ns4:table-row>
        <ns4:table-row ns4:style-name="ro1">
          <ns4:table-cell ns4:number-columns-repeated="13"/>
        </ns4:table-row>
        <ns4:table-row>
          <ns4:table-cell>
            <ns7:p/>
          </ns4:table-cell>
          <ns4:table-cell>
            <ns7:p>Saint Paul</ns7:p>
          </ns4:table-cell>
          <ns4:table-cell>
            <ns7:p>MN</ns7:p>
          </ns4:table-cell>
          <ns4:table-cell>
            <ns7:p/>
          </ns4:table-cell>
          <ns4:table-cell>
            <ns7:p>Kelly Plumbing &amp; Heating</ns7:p>
          </ns4:table-cell>
          <ns4:table-cell>
            <ns7:p>(651) 645-5401</ns7:p>
          </ns4:table-cell>
          <ns4:table-cell>
            <ns7:p/>
          </ns4:table-cell>
          <ns4:table-cell>
            <ns7:p>kellyplumbinginc.com</ns7:p>
          </ns4:table-cell>
          <ns4:table-cell>
            <ns7:p>Saint Paul, MN</ns7:p>
          </ns4:table-cell>
          <ns4:table-cell>
            <ns7:p>4.7+/5</ns7:p>
          </ns4:table-cell>
          <ns4:table-cell>
            <ns7:p>YES (1973)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Saint Louis</ns7:p>
          </ns4:table-cell>
          <ns4:table-cell>
            <ns7:p>MO</ns7:p>
          </ns4:table-cell>
          <ns4:table-cell>
            <ns7:p/>
          </ns4:table-cell>
          <ns4:table-cell>
            <ns7:p>Tony LaMartina Plumbing</ns7:p>
          </ns4:table-cell>
          <ns4:table-cell>
            <ns7:p>(314) 965-9377</ns7:p>
          </ns4:table-cell>
          <ns4:table-cell>
            <ns7:p>pl_a_055-300x200@2x.jpeg</ns7:p>
          </ns4:table-cell>
          <ns4:table-cell>
            <ns7:p>tonylamartinaplumbing.com</ns7:p>
          </ns4:table-cell>
          <ns4:table-cell>
            <ns7:p>Saint Louis, MO</ns7:p>
          </ns4:table-cell>
          <ns4:table-cell>
            <ns7:p>4.7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Lexington</ns7:p>
          </ns4:table-cell>
          <ns4:table-cell>
            <ns7:p>KY</ns7:p>
          </ns4:table-cell>
          <ns4:table-cell>
            <ns7:p/>
          </ns4:table-cell>
          <ns4:table-cell>
            <ns7:p>Dauenhauer Plumbing</ns7:p>
          </ns4:table-cell>
          <ns4:table-cell>
            <ns7:p>(859) 559-0625</ns7:p>
          </ns4:table-cell>
          <ns4:table-cell>
            <ns7:p/>
          </ns4:table-cell>
          <ns4:table-cell>
            <ns7:p>dauenhauerplumbing.com</ns7:p>
          </ns4:table-cell>
          <ns4:table-cell>
            <ns7:p>Lexington, KY</ns7:p>
          </ns4:table-cell>
          <ns4:table-cell>
            <ns7:p>4.6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Saint Petersburg</ns7:p>
          </ns4:table-cell>
          <ns4:table-cell>
            <ns7:p>FL</ns7:p>
          </ns4:table-cell>
          <ns4:table-cell>
            <ns7:p/>
          </ns4:table-cell>
          <ns4:table-cell>
            <ns7:p>St Pete Plumbing</ns7:p>
          </ns4:table-cell>
          <ns4:table-cell>
            <ns7:p/>
          </ns4:table-cell>
          <ns4:table-cell>
            <ns7:p/>
          </ns4:table-cell>
          <ns4:table-cell>
            <ns7:p/>
          </ns4:table-cell>
          <ns4:table-cell>
            <ns7:p>Saint Petersburg, FL</ns7:p>
          </ns4:table-cell>
          <ns4:table-cell>
            <ns7:p>4.7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Arlington</ns7:p>
          </ns4:table-cell>
          <ns4:table-cell>
            <ns7:p>VA</ns7:p>
          </ns4:table-cell>
          <ns4:table-cell>
            <ns7:p/>
          </ns4:table-cell>
          <ns4:table-cell>
            <ns7:p>Chandler's Plumbing &amp; Heating</ns7:p>
          </ns4:table-cell>
          <ns4:table-cell>
            <ns7:p>(703) 536-4750</ns7:p>
          </ns4:table-cell>
          <ns4:table-cell>
            <ns7:p/>
          </ns4:table-cell>
          <ns4:table-cell>
            <ns7:p>chandlersplumbing.com</ns7:p>
          </ns4:table-cell>
          <ns4:table-cell>
            <ns7:p>Arlington, VA</ns7:p>
          </ns4:table-cell>
          <ns4:table-cell>
            <ns7:p>4.6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Lexington</ns7:p>
          </ns4:table-cell>
          <ns4:table-cell>
            <ns7:p>KY</ns7:p>
          </ns4:table-cell>
          <ns4:table-cell>
            <ns7:p/>
          </ns4:table-cell>
          <ns4:table-cell>
            <ns7:p>Dauenhauer Plumbing</ns7:p>
          </ns4:table-cell>
          <ns4:table-cell>
            <ns7:p>(859) 559-0625</ns7:p>
          </ns4:table-cell>
          <ns4:table-cell>
            <ns7:p/>
          </ns4:table-cell>
          <ns4:table-cell>
            <ns7:p>dauenhauerplumbing.com</ns7:p>
          </ns4:table-cell>
          <ns4:table-cell>
            <ns7:p>Lexington, KY</ns7:p>
          </ns4:table-cell>
          <ns4:table-cell>
            <ns7:p>4.6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Godot Springs</ns7:p>
          </ns4:table-cell>
          <ns4:table-cell>
            <ns7:p>CO</ns7:p>
          </ns4:table-cell>
          <ns4:table-cell>
            <ns7:p/>
          </ns4:table-cell>
          <ns4:table-cell>
            <ns7:p>Godot Springs Plumbing</ns7:p>
          </ns4:table-cell>
          <ns4:table-cell>
            <ns7:p/>
          </ns4:table-cell>
          <ns4:table-cell>
            <ns7:p/>
          </ns4:table-cell>
          <ns4:table-cell>
            <ns7:p/>
          </ns4:table-cell>
          <ns4:table-cell>
            <ns7:p>Godot Springs, CO</ns7:p>
          </ns4:table-cell>
          <ns4:table-cell>
            <ns7:p>4.6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Arlington</ns7:p>
          </ns4:table-cell>
          <ns4:table-cell>
            <ns7:p>VA</ns7:p>
          </ns4:table-cell>
          <ns4:table-cell>
            <ns7:p/>
          </ns4:table-cell>
          <ns4:table-cell>
            <ns7:p>Chandler's Plumbing &amp; Heating</ns7:p>
          </ns4:table-cell>
          <ns4:table-cell>
            <ns7:p>(703) 536-4750</ns7:p>
          </ns4:table-cell>
          <ns4:table-cell>
            <ns7:p/>
          </ns4:table-cell>
          <ns4:table-cell>
            <ns7:p>chandlersplumbing.com</ns7:p>
          </ns4:table-cell>
          <ns4:table-cell>
            <ns7:p>Arlington, VA</ns7:p>
          </ns4:table-cell>
          <ns4:table-cell>
            <ns7:p>4.6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Port St Lucie</ns7:p>
          </ns4:table-cell>
          <ns4:table-cell>
            <ns7:p>FL</ns7:p>
          </ns4:table-cell>
          <ns4:table-cell>
            <ns7:p/>
          </ns4:table-cell>
          <ns4:table-cell>
            <ns7:p>Port St Lucie Plumbing</ns7:p>
          </ns4:table-cell>
          <ns4:table-cell>
            <ns7:p/>
          </ns4:table-cell>
          <ns4:table-cell>
            <ns7:p/>
          </ns4:table-cell>
          <ns4:table-cell>
            <ns7:p/>
          </ns4:table-cell>
          <ns4:table-cell>
            <ns7:p>Port St. Lucie, FL</ns7:p>
          </ns4:table-cell>
          <ns4:table-cell>
            <ns7:p>4.7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Saint Paul</ns7:p>
          </ns4:table-cell>
          <ns4:table-cell>
            <ns7:p>MN</ns7:p>
          </ns4:table-cell>
          <ns4:table-cell>
            <ns7:p/>
          </ns4:table-cell>
          <ns4:table-cell>
            <ns7:p>St Paul Plumbing</ns7:p>
          </ns4:table-cell>
          <ns4:table-cell>
            <ns7:p/>
          </ns4:table-cell>
          <ns4:table-cell>
            <ns7:p/>
          </ns4:table-cell>
          <ns4:table-cell>
            <ns7:p/>
          </ns4:table-cell>
          <ns4:table-cell>
            <ns7:p>Saint Paul, MN</ns7:p>
          </ns4:table-cell>
          <ns4:table-cell>
            <ns7:p>4.7+/5</ns7:p>
          </ns4:table-cell>
          <ns4:table-cell>
            <ns7:p>YES</ns7:p>
          </ns4:table-cell>
          <ns4:table-cell>
            <ns7:p/>
          </ns4:table-cell>
          <ns4:table-cell>
            <ns7:p>Google</ns7:p>
          </ns4:table-cell>
        </ns4:table-row>
        <ns4:table-row>
          <ns4:table-cell>
            <ns7:p/>
          </ns4:table-cell>
          <ns4:table-cell>
            <ns7:p>Boise</ns7:p>
          </ns4:table-cell>
          <ns4:table-cell>
            <ns7:p>ID</ns7:p>
          </ns4:table-cell>
          <ns4:table-cell>
            <ns7:p/>
          </ns4:table-cell>
          <ns4:table-cell>
            <ns7:p>Boise Family Plumbing LLC</ns7:p>
          </ns4:table-cell>
          <ns4:table-cell>
            <ns7:p>(208) 949-3307</ns7:p>
          </ns4:table-cell>
          <ns4:table-cell>
            <ns7:p/>
          </ns4:table-cell>
          <ns4:table-cell>
            <ns7:p>boisefamilyplumbing.com</ns7:p>
          </ns4:table-cell>
          <ns4:table-cell>
            <ns7:p>210 E 37th St #3, Boise, ID</ns7:p>
          </ns4:table-cell>
          <ns4:table-cell>
            <ns7:p>4.9</ns7:p>
          </ns4:table-cell>
          <ns4:table-cell>
            <ns7:p/>
          </ns4:table-cell>
          <ns4:table-cell>
            <ns7:p/>
          </ns4:table-cell>
          <ns4:table-cell>
            <ns7:p/>
          </ns4:table-cell>
        </ns4:table-row>
      </ns4:table>
      <ns4:named-expressions/>
    </ns0:spreadsheet>
  </ns0:body>
</ns0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