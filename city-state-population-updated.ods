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xmlns:xlink="http://www.w3.org/1999/xlink" office:version="1.2">
  <office:automatic-styles>
    <ns1:style ns1:name="InternetLink" ns1:family="text">
      <ns1:text-properties ns2:color="#0563C1" ns2:underline="single" ns2:underline-color="#0563C1"/>
    </ns1:style>
    <ns1:style ns1:name="VisitedInternetLink" ns1:family="text">
      <ns1:text-properties ns2:color="#800080" ns2:underline="single"/>
    </ns1:style>
  </office:automatic-styles>
  <office:body>
    <office:spreadsheet>
      <table:table table:name="Sheet1">
        <table:table-row>
          <table:table-cell>
            <text:p>rank</text:p>
          </table:table-cell>
          <table:table-cell>
            <text:p>city</text:p>
          </table:table-cell>
          <table:table-cell>
            <text:p>state_abbr</text:p>
          </table:table-cell>
          <table:table-cell>
            <text:p>pop_current</text:p>
          </table:table-cell>
          <table:table-cell>
            <text:p>company</text:p>
          </table:table-cell>
          <table:table-cell>
            <text:p>phone</text:p>
          </table:table-cell>
          <table:table-cell>
            <text:p>email</text:p>
          </table:table-cell>
          <table:table-cell>
            <text:p>website link</text:p>
          </table:table-cell>
          <table:table-cell>
            <text:p>address</text:p>
          </table:table-cell>
          <table:table-cell>
            <text:p>star rating</text:p>
          </table:table-cell>
          <table:table-cell>
            <text:p>family owned</text:p>
          </table:table-cell>
          <table:table-cell>
            <text:p>year in biz</text:p>
          </table:table-cell>
          <table:table-cell>
            <text:p>platform found on</text:p>
          </table:table-cell>
        </table:table-row>
        <table:table-row>
          <table:table-cell>
            <text:p>1.0</text:p>
          </table:table-cell>
          <table:table-cell>
            <text:p>New York</text:p>
          </table:table-cell>
          <table:table-cell>
            <text:p>NY</text:p>
          </table:table-cell>
          <table:table-cell>
            <text:p>8584629</text:p>
          </table:table-cell>
          <table:table-cell>
            <text:p>A Good Plumber Inc.</text:p>
          </table:table-cell>
          <table:table-cell>
            <text:p>(718) 648-6838</text:p>
          </table:table-cell>
          <table:table-cell>
            <text:p>info@agoodplumber.com</text:p>
          </table:table-cell>
          <table:table-cell>
            <text:p><text:a xlink:href="https://agoodplumber.com" xlink:type="simple" xlink:actuate="onRequest" office:target-frame="_blank" text:style-name="InternetLink">agoodplumber.com</text:a></text:p>
          </table:table-cell>
          <table:table-cell>
            <text:p>2114 E 27th St, Brooklyn, NY 11229</text:p>
          </table:table-cell>
          <table:table-cell>
            <text:p>4.7/5 (Angi)</text:p>
          </table:table-cell>
          <table:table-cell>
            <text:p>YES</text:p>
          </table:table-cell>
          <table:table-cell>
            <text:p/>
          </table:table-cell>
          <table:table-cell>
            <text:p>LinkedIn</text:p>
          </table:table-cell>
        </table:table-row>
        <table:table-row>
          <table:table-cell>
            <text:p>2.0</text:p>
          </table:table-cell>
          <table:table-cell>
            <text:p>Los Angeles</text:p>
          </table:table-cell>
          <table:table-cell>
            <text:p>CA</text:p>
          </table:table-cell>
          <table:table-cell>
            <text:p>3869089</text:p>
          </table:table-cell>
          <table:table-cell>
            <text:p>Advantage Plumbing &amp; Rooter</text:p>
          </table:table-cell>
          <table:table-cell>
            <text:p>(626) 956-3708</text:p>
          </table:table-cell>
          <table:table-cell>
            <text:p/>
          </table:table-cell>
          <table:table-cell>
            <text:p><text:a xlink:href="https://advantageplumbingrooter.com" xlink:type="simple" xlink:actuate="onRequest" office:target-frame="_blank" text:style-name="InternetLink">advantageplumbingrooter.com</text:a></text:p>
          </table:table-cell>
          <table:table-cell>
            <text:p>2361 Barton Lane, Montrose, CA 91020</text:p>
          </table:table-cell>
          <table:table-cell>
            <text:p>5.0/5</text:p>
          </table:table-cell>
          <table:table-cell>
            <text:p>YES (27 yrs)</text:p>
          </table:table-cell>
          <table:table-cell>
            <text:p/>
          </table:table-cell>
          <table:table-cell>
            <text:p>Facebook</text:p>
          </table:table-cell>
        </table:table-row>
        <table:table-row>
          <table:table-cell>
            <text:p>3.0</text:p>
          </table:table-cell>
          <table:table-cell>
            <text:p>Chicago</text:p>
          </table:table-cell>
          <table:table-cell>
            <text:p>IL</text:p>
          </table:table-cell>
          <table:table-cell>
            <text:p>2731585</text:p>
          </table:table-cell>
          <table:table-cell>
            <text:p>Jim Wagner Plumbing Inc.</text:p>
          </table:table-cell>
          <table:table-cell>
            <text:p>(630) 454-1510</text:p>
          </table:table-cell>
          <table:table-cell>
            <text:p/>
          </table:table-cell>
          <table:table-cell>
            <text:p><text:a xlink:href="https://jimwagnerplumbing.com" xlink:type="simple" xlink:actuate="onRequest" office:target-frame="_blank" text:style-name="InternetLink">jimwagnerplumbing.com</text:a></text:p>
          </table:table-cell>
          <table:table-cell>
            <text:p>West Chicago, IL</text:p>
          </table:table-cell>
          <table:table-cell>
            <text:p>4.8/5 (1000+ reviews)</text:p>
          </table:table-cell>
          <table:table-cell>
            <text:p>YES (3r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.0</text:p>
          </table:table-cell>
          <table:table-cell>
            <text:p>Houston</text:p>
          </table:table-cell>
          <table:table-cell>
            <text:p>TX</text:p>
          </table:table-cell>
          <table:table-cell>
            <text:p>2397315</text:p>
          </table:table-cell>
          <table:table-cell>
            <text:p>Texas Quality Plumbing</text:p>
          </table:table-cell>
          <table:table-cell>
            <text:p>(713) 385-0349</text:p>
          </table:table-cell>
          <table:table-cell>
            <text:p/>
          </table:table-cell>
          <table:table-cell>
            <text:p><text:a xlink:href="https://texasqualityplumbing.com" xlink:type="simple" xlink:actuate="onRequest" office:target-frame="_blank" text:style-name="InternetLink">texasqualityplumbing.com</text:a></text:p>
          </table:table-cell>
          <table:table-cell>
            <text:p>Houston, TX</text:p>
          </table:table-cell>
          <table:table-cell>
            <text:p>4.9/5 (Best Pick)</text:p>
          </table:table-cell>
          <table:table-cell>
            <text:p>YES (2007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.0</text:p>
          </table:table-cell>
          <table:table-cell>
            <text:p>Phoenix</text:p>
          </table:table-cell>
          <table:table-cell>
            <text:p>AZ</text:p>
          </table:table-cell>
          <table:table-cell>
            <text:p>1665481</text:p>
          </table:table-cell>
          <table:table-cell>
            <text:p>Lawson Family Plumbing</text:p>
          </table:table-cell>
          <table:table-cell>
            <text:p>(602) 413-5790</text:p>
          </table:table-cell>
          <table:table-cell>
            <text:p/>
          </table:table-cell>
          <table:table-cell>
            <text:p><text:a xlink:href="https://lawsonfamilyplumbing.com" xlink:type="simple" xlink:actuate="onRequest" office:target-frame="_blank" text:style-name="InternetLink">lawsonfamilyplumbing.com</text:a></text:p>
          </table:table-cell>
          <table:table-cell>
            <text:p>1497 E Baseline Rd, Gilbert, AZ 85233</text:p>
          </table:table-cell>
          <table:table-cell>
            <text:p>4.9/5 (1,547 reviews)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.0</text:p>
          </table:table-cell>
          <table:table-cell>
            <text:p>Philadelphia</text:p>
          </table:table-cell>
          <table:table-cell>
            <text:p>PA</text:p>
          </table:table-cell>
          <table:table-cell>
            <text:p>1574281</text:p>
          </table:table-cell>
          <table:table-cell>
            <text:p>Goodman Plumbing</text:p>
          </table:table-cell>
          <table:table-cell>
            <text:p>(215) 364-7775</text:p>
          </table:table-cell>
          <table:table-cell>
            <text:p/>
          </table:table-cell>
          <table:table-cell>
            <text:p><text:a xlink:href="https://goodmanplumbers.com" xlink:type="simple" xlink:actuate="onRequest" office:target-frame="_blank" text:style-name="InternetLink">goodmanplumbers.com</text:a></text:p>
          </table:table-cell>
          <table:table-cell>
            <text:p>Philadelphia &amp; Feasterville-Trevose, PA</text:p>
          </table:table-cell>
          <table:table-cell>
            <text:p>4.5+/5</text:p>
          </table:table-cell>
          <table:table-cell>
            <text:p>YES (60+ yrs, 2n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.0</text:p>
          </table:table-cell>
          <table:table-cell>
            <text:p>San Antonio</text:p>
          </table:table-cell>
          <table:table-cell>
            <text:p>TX</text:p>
          </table:table-cell>
          <table:table-cell>
            <text:p>1548422</text:p>
          </table:table-cell>
          <table:table-cell>
            <text:p>Chambliss Plumbing</text:p>
          </table:table-cell>
          <table:table-cell>
            <text:p>(210) 797-7471</text:p>
          </table:table-cell>
          <table:table-cell>
            <text:p/>
          </table:table-cell>
          <table:table-cell>
            <text:p><text:a xlink:href="https://chamblissplumbing.com" xlink:type="simple" xlink:actuate="onRequest" office:target-frame="_blank" text:style-name="InternetLink">chamblissplumbing.com</text:a></text:p>
          </table:table-cell>
          <table:table-cell>
            <text:p>San Antonio, TX</text:p>
          </table:table-cell>
          <table:table-cell>
            <text:p>5.0/5 (1,400+ reviews)</text:p>
          </table:table-cell>
          <table:table-cell>
            <text:p>YES (199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.0</text:p>
          </table:table-cell>
          <table:table-cell>
            <text:p>San Diego</text:p>
          </table:table-cell>
          <table:table-cell>
            <text:p>CA</text:p>
          </table:table-cell>
          <table:table-cell>
            <text:p>1406106</text:p>
          </table:table-cell>
          <table:table-cell>
            <text:p>American Plumbing Co</text:p>
          </table:table-cell>
          <table:table-cell>
            <text:p>(619) 723-1114</text:p>
          </table:table-cell>
          <table:table-cell>
            <text:p>info@plumbersandiegoonline.com</text:p>
          </table:table-cell>
          <table:table-cell>
            <text:p><text:a xlink:href="https://plumbersandiegoonline.com" xlink:type="simple" xlink:actuate="onRequest" office:target-frame="_blank" text:style-name="InternetLink">plumbersandiegoonline.com</text:a></text:p>
          </table:table-cell>
          <table:table-cell>
            <text:p>San Diego, CA</text:p>
          </table:table-cell>
          <table:table-cell>
            <text:p>5.0/5 (40+ years)</text:p>
          </table:table-cell>
          <table:table-cell>
            <text:p>YES</text:p>
          </table:table-cell>
          <table:table-cell>
            <text:p/>
          </table:table-cell>
          <table:table-cell>
            <text:p>Google/Yelp</text:p>
          </table:table-cell>
        </table:table-row>
        <table:table-row>
          <table:table-cell>
            <text:p>9.0</text:p>
          </table:table-cell>
          <table:table-cell>
            <text:p>Dallas</text:p>
          </table:table-cell>
          <table:table-cell>
            <text:p>TX</text:p>
          </table:table-cell>
          <table:table-cell>
            <text:p>1329491</text:p>
          </table:table-cell>
          <table:table-cell>
            <text:p>Baker Brothers Plumbing</text:p>
          </table:table-cell>
          <table:table-cell>
            <text:p>(214) 324-8811</text:p>
          </table:table-cell>
          <table:table-cell>
            <text:p/>
          </table:table-cell>
          <table:table-cell>
            <text:p><text:a xlink:href="https://bakerbrothersplumbing.com" xlink:type="simple" xlink:actuate="onRequest" office:target-frame="_blank" text:style-name="InternetLink">bakerbrothersplumbing.com</text:a></text:p>
          </table:table-cell>
          <table:table-cell>
            <text:p>Dallas/DFW, TX</text:p>
          </table:table-cell>
          <table:table-cell>
            <text:p>4.9/5 (24,000+ reviews)</text:p>
          </table:table-cell>
          <table:table-cell>
            <text:p>YES (8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.0</text:p>
          </table:table-cell>
          <table:table-cell>
            <text:p>Fort Worth</text:p>
          </table:table-cell>
          <table:table-cell>
            <text:p>TX</text:p>
          </table:table-cell>
          <table:table-cell>
            <text:p>1028117</text:p>
          </table:table-cell>
          <table:table-cell>
            <text:p>Larry Stinson Plumbing &amp; Water Heater Repair</text:p>
          </table:table-cell>
          <table:table-cell>
            <text:p>(817) 508-2631</text:p>
          </table:table-cell>
          <table:table-cell>
            <text:p/>
          </table:table-cell>
          <table:table-cell>
            <text:p><text:a xlink:href="https://larrystinson.com" xlink:type="simple" xlink:actuate="onRequest" office:target-frame="_blank" text:style-name="InternetLink">larrystinson.com</text:a></text:p>
          </table:table-cell>
          <table:table-cell>
            <text:p>Fort Worth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.0</text:p>
          </table:table-cell>
          <table:table-cell>
            <text:p>Jacksonville</text:p>
          </table:table-cell>
          <table:table-cell>
            <text:p>FL</text:p>
          </table:table-cell>
          <table:table-cell>
            <text:p>1017689</text:p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.0</text:p>
          </table:table-cell>
          <table:table-cell>
            <text:p>Austin</text:p>
          </table:table-cell>
          <table:table-cell>
            <text:p>TX</text:p>
          </table:table-cell>
          <table:table-cell>
            <text:p>1002632</text:p>
          </table:table-cell>
          <table:table-cell>
            <text:p>Austin's Best Plumbing</text:p>
          </table:table-cell>
          <table:table-cell>
            <text:p>(512) 377-9919</text:p>
          </table:table-cell>
          <table:table-cell>
            <text:p/>
          </table:table-cell>
          <table:table-cell>
            <text:p><text:a xlink:href="https://austinsgreatestplumbing.com" xlink:type="simple" xlink:actuate="onRequest" office:target-frame="_blank" text:style-name="InternetLink">austinsgreatestplumbing.com</text:a></text:p>
          </table:table-cell>
          <table:table-cell>
            <text:p>Austin, TX</text:p>
          </table:table-cell>
          <table:table-cell>
            <text:p>4.8/5+</text:p>
          </table:table-cell>
          <table:table-cell>
            <text:p>YES (1978)</text:p>
          </table:table-cell>
          <table:table-cell>
            <text:p/>
          </table:table-cell>
          <table:table-cell>
            <text:p>Nextdoor</text:p>
          </table:table-cell>
        </table:table-row>
        <table:table-row>
          <table:table-cell>
            <text:p>13.0</text:p>
          </table:table-cell>
          <table:table-cell>
            <text:p>San Jose</text:p>
          </table:table-cell>
          <table:table-cell>
            <text:p>CA</text:p>
          </table:table-cell>
          <table:table-cell>
            <text:p>989814</text:p>
          </table:table-cell>
          <table:table-cell>
            <text:p>San Jose Plumbing Inc.</text:p>
          </table:table-cell>
          <table:table-cell>
            <text:p>(408) 296-1820</text:p>
          </table:table-cell>
          <table:table-cell>
            <text:p/>
          </table:table-cell>
          <table:table-cell>
            <text:p><text:a xlink:href="https://sanjoseplumbinginc.com" xlink:type="simple" xlink:actuate="onRequest" office:target-frame="_blank" text:style-name="InternetLink">sanjoseplumbinginc.com</text:a></text:p>
          </table:table-cell>
          <table:table-cell>
            <text:p>San Jose, CA</text:p>
          </table:table-cell>
          <table:table-cell>
            <text:p>4.8/5</text:p>
          </table:table-cell>
          <table:table-cell>
            <text:p>YES (3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.0</text:p>
          </table:table-cell>
          <table:table-cell>
            <text:p>Charlotte</text:p>
          </table:table-cell>
          <table:table-cell>
            <text:p>NC</text:p>
          </table:table-cell>
          <table:table-cell>
            <text:p>964784</text:p>
          </table:table-cell>
          <table:table-cell>
            <text:p>WyattWorks Plumbing Charlotte</text:p>
          </table:table-cell>
          <table:table-cell>
            <text:p>(704) 825-5000</text:p>
          </table:table-cell>
          <table:table-cell>
            <text:p/>
          </table:table-cell>
          <table:table-cell>
            <text:p><text:a xlink:href="https://wyattworksplumbing.com" xlink:type="simple" xlink:actuate="onRequest" office:target-frame="_blank" text:style-name="InternetLink">wyattworksplumbing.com</text:a></text:p>
          </table:table-cell>
          <table:table-cell>
            <text:p>Charlotte, NC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.0</text:p>
          </table:table-cell>
          <table:table-cell>
            <text:p>Columbus</text:p>
          </table:table-cell>
          <table:table-cell>
            <text:p>OH</text:p>
          </table:table-cell>
          <table:table-cell>
            <text:p>938396</text:p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.0</text:p>
          </table:table-cell>
          <table:table-cell>
            <text:p>Indianapolis</text:p>
          </table:table-cell>
          <table:table-cell>
            <text:p>IN</text:p>
          </table:table-cell>
          <table:table-cell>
            <text:p>910638</text:p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.0</text:p>
          </table:table-cell>
          <table:table-cell>
            <text:p>San Francisco</text:p>
          </table:table-cell>
          <table:table-cell>
            <text:p>CA</text:p>
          </table:table-cell>
          <table:table-cell>
            <text:p>826079</text:p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.0</text:p>
          </table:table-cell>
          <table:table-cell>
            <text:p>Louisville</text:p>
          </table:table-cell>
          <table:table-cell>
            <text:p>KY</text:p>
          </table:table-cell>
          <table:table-cell>
            <text:p>795222</text:p>
          </table:table-cell>
          <table:table-cell>
            <text:p>Bryant &amp; Sons Plumbing</text:p>
          </table:table-cell>
          <table:table-cell>
            <text:p>(812) 284-2109</text:p>
          </table:table-cell>
          <table:table-cell>
            <text:p/>
          </table:table-cell>
          <table:table-cell>
            <text:p><text:a xlink:href="https://bryantsplumbingandwaterheaters.com" xlink:type="simple" xlink:actuate="onRequest" office:target-frame="_blank" text:style-name="InternetLink">bryantsplumbingandwaterheaters.com</text:a></text:p>
          </table:table-cell>
          <table:table-cell>
            <text:p>Louisville, KY</text:p>
          </table:table-cell>
          <table:table-cell>
            <text:p>4.7+/5</text:p>
          </table:table-cell>
          <table:table-cell>
            <text:p>YES (4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9.0</text:p>
          </table:table-cell>
          <table:table-cell>
            <text:p>Seattle</text:p>
          </table:table-cell>
          <table:table-cell>
            <text:p>WA</text:p>
          </table:table-cell>
          <table:table-cell>
            <text:p>784777</text:p>
          </table:table-cell>
          <table:table-cell>
            <text:p>Ballard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ballardplumbing.com" xlink:type="simple" xlink:actuate="onRequest" office:target-frame="_blank" text:style-name="InternetLink">ballardplumbing.com</text:a></text:p>
          </table:table-cell>
          <table:table-cell>
            <text:p>Seattle, WA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0.0</text:p>
          </table:table-cell>
          <table:table-cell>
            <text:p>Nashville</text:p>
          </table:table-cell>
          <table:table-cell>
            <text:p>TN</text:p>
          </table:table-cell>
          <table:table-cell>
            <text:p>745904</text:p>
          </table:table-cell>
          <table:table-cell>
            <text:p>Southern Plumbing Works</text:p>
          </table:table-cell>
          <table:table-cell>
            <text:p>(615) 205-7656</text:p>
          </table:table-cell>
          <table:table-cell>
            <text:p>jonathan@loftyrankings.com</text:p>
          </table:table-cell>
          <table:table-cell>
            <text:p><text:a xlink:href="https://southernplumbingworks.com" xlink:type="simple" xlink:actuate="onRequest" office:target-frame="_blank" text:style-name="InternetLink">southernplumbingworks.com</text:a></text:p>
          </table:table-cell>
          <table:table-cell>
            <text:p>Nashville, TN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1.0</text:p>
          </table:table-cell>
          <table:table-cell>
            <text:p>Denver</text:p>
          </table:table-cell>
          <table:table-cell>
            <text:p>CO</text:p>
          </table:table-cell>
          <table:table-cell>
            <text:p>740613</text:p>
          </table:table-cell>
          <table:table-cell>
            <text:p>Applewood Plumbing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applewoodfixit.com" xlink:type="simple" xlink:actuate="onRequest" office:target-frame="_blank" text:style-name="InternetLink">applewoodfixit.com</text:a></text:p>
          </table:table-cell>
          <table:table-cell>
            <text:p>Denver/Boulder, CO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2.0</text:p>
          </table:table-cell>
          <table:table-cell>
            <text:p>Oklahoma City</text:p>
          </table:table-cell>
          <table:table-cell>
            <text:p>OK</text:p>
          </table:table-cell>
          <table:table-cell>
            <text:p>719849</text:p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.0</text:p>
          </table:table-cell>
          <table:table-cell>
            <text:p>El Paso</text:p>
          </table:table-cell>
          <table:table-cell>
            <text:p>TX</text:p>
          </table:table-cell>
          <table:table-cell>
            <text:p>683012</text:p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.0</text:p>
          </table:table-cell>
          <table:table-cell>
            <text:p>Las Vegas</text:p>
          </table:table-cell>
          <table:table-cell>
            <text:p>NV</text:p>
          </table:table-cell>
          <table:table-cell>
            <text:p>679817</text:p>
          </table:table-cell>
          <table:table-cell>
            <text:p>Vegas Valley Plumbing</text:p>
          </table:table-cell>
          <table:table-cell>
            <text:p>(702) 766-8827</text:p>
          </table:table-cell>
          <table:table-cell>
            <text:p/>
          </table:table-cell>
          <table:table-cell>
            <text:p><text:a xlink:href="https://vegasvalley.com" xlink:type="simple" xlink:actuate="onRequest" office:target-frame="_blank" text:style-name="InternetLink">vegasvalley.com</text:a></text:p>
          </table:table-cell>
          <table:table-cell>
            <text:p>Las Vegas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6.0</text:p>
          </table:table-cell>
          <table:table-cell>
            <text:p>Boston</text:p>
          </table:table-cell>
          <table:table-cell>
            <text:p>MA</text:p>
          </table:table-cell>
          <table:table-cell>
            <text:p>672973</text:p>
          </table:table-cell>
          <table:table-cell>
            <text:p>Vaughan Plumbing &amp; Heating</text:p>
          </table:table-cell>
          <table:table-cell>
            <text:p>(781) 686-5049</text:p>
          </table:table-cell>
          <table:table-cell>
            <text:p>accounts@vaughanplumbing.com</text:p>
          </table:table-cell>
          <table:table-cell>
            <text:p><text:a xlink:href="https://vaughanplumbing.com" xlink:type="simple" xlink:actuate="onRequest" office:target-frame="_blank" text:style-name="InternetLink">vaughanplumbing.com</text:a></text:p>
          </table:table-cell>
          <table:table-cell>
            <text:p>Boston, MA</text:p>
          </table:table-cell>
          <table:table-cell>
            <text:p>4.6+/5</text:p>
          </table:table-cell>
          <table:table-cell>
            <text:p>YES (10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7.0</text:p>
          </table:table-cell>
          <table:table-cell>
            <text:p>Detroit</text:p>
          </table:table-cell>
          <table:table-cell>
            <text:p>MI</text:p>
          </table:table-cell>
          <table:table-cell>
            <text:p>649095</text:p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.0</text:p>
          </table:table-cell>
          <table:table-cell>
            <text:p>Portland</text:p>
          </table:table-cell>
          <table:table-cell>
            <text:p>OR</text:p>
          </table:table-cell>
          <table:table-cell>
            <text:p>635109</text:p>
          </table:table-cell>
          <table:table-cell>
            <text:p>Service Plus Plumbing</text:p>
          </table:table-cell>
          <table:table-cell>
            <text:p>(503) 927-4482</text:p>
          </table:table-cell>
          <table:table-cell>
            <text:p/>
          </table:table-cell>
          <table:table-cell>
            <text:p><text:a xlink:href="https://serviceplusplumbing.com" xlink:type="simple" xlink:actuate="onRequest" office:target-frame="_blank" text:style-name="InternetLink">serviceplusplumbing.com</text:a></text:p>
          </table:table-cell>
          <table:table-cell>
            <text:p>Portland, OR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9.0</text:p>
          </table:table-cell>
          <table:table-cell>
            <text:p>Memphis</text:p>
          </table:table-cell>
          <table:table-cell>
            <text:p>TN</text:p>
          </table:table-cell>
          <table:table-cell>
            <text:p>609647</text:p>
          </table:table-cell>
          <table:table-cell>
            <text:p>Memphi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mphis, T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0.0</text:p>
          </table:table-cell>
          <table:table-cell>
            <text:p>Baltimore</text:p>
          </table:table-cell>
          <table:table-cell>
            <text:p>MD</text:p>
          </table:table-cell>
          <table:table-cell>
            <text:p>569997</text:p>
          </table:table-cell>
          <table:table-cell>
            <text:p>Lyons Plumbing</text:p>
          </table:table-cell>
          <table:table-cell>
            <text:p>(301) 253-4090</text:p>
          </table:table-cell>
          <table:table-cell>
            <text:p/>
          </table:table-cell>
          <table:table-cell>
            <text:p><text:a xlink:href="https://lyonsplumbing.com" xlink:type="simple" xlink:actuate="onRequest" office:target-frame="_blank" text:style-name="InternetLink">lyonsplumbing.com</text:a></text:p>
          </table:table-cell>
          <table:table-cell>
            <text:p>Baltimore, MD</text:p>
          </table:table-cell>
          <table:table-cell>
            <text:p>4.6+/5</text:p>
          </table:table-cell>
          <table:table-cell>
            <text:p>YES (1959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1.0</text:p>
          </table:table-cell>
          <table:table-cell>
            <text:p>Milwaukee</text:p>
          </table:table-cell>
          <table:table-cell>
            <text:p>WI</text:p>
          </table:table-cell>
          <table:table-cell>
            <text:p>562407</text:p>
          </table:table-cell>
          <table:table-cell>
            <text:p>J J's Plumbing Repair</text:p>
          </table:table-cell>
          <table:table-cell>
            <text:p>(262) 377-7161</text:p>
          </table:table-cell>
          <table:table-cell>
            <text:p/>
          </table:table-cell>
          <table:table-cell>
            <text:p><text:a xlink:href="https://jjsplumbing.com" xlink:type="simple" xlink:actuate="onRequest" office:target-frame="_blank" text:style-name="InternetLink">jjsplumbing.com</text:a></text:p>
          </table:table-cell>
          <table:table-cell>
            <text:p>Milwaukee, WI</text:p>
          </table:table-cell>
          <table:table-cell>
            <text:p>4.7+/5</text:p>
          </table:table-cell>
          <table:table-cell>
            <text:p>YES (1985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2.0</text:p>
          </table:table-cell>
          <table:table-cell>
            <text:p>Albuquerque</text:p>
          </table:table-cell>
          <table:table-cell>
            <text:p>NM</text:p>
          </table:table-cell>
          <table:table-cell>
            <text:p>556588</text:p>
          </table:table-cell>
          <table:table-cell>
            <text:p>TLC Plumbing Heating Cooling Electrical</text:p>
          </table:table-cell>
          <table:table-cell>
            <text:p>(505) 761-9644</text:p>
          </table:table-cell>
          <table:table-cell>
            <text:p/>
          </table:table-cell>
          <table:table-cell>
            <text:p><text:a xlink:href="https://tlcnm.com" xlink:type="simple" xlink:actuate="onRequest" office:target-frame="_blank" text:style-name="InternetLink">tlcnm.com</text:a></text:p>
          </table:table-cell>
          <table:table-cell>
            <text:p>5000 Edith Blvd NE, Albuquerqu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.0</text:p>
          </table:table-cell>
          <table:table-cell>
            <text:p>Fresno</text:p>
          </table:table-cell>
          <table:table-cell>
            <text:p>CA</text:p>
          </table:table-cell>
          <table:table-cell>
            <text:p>555549</text:p>
          </table:table-cell>
          <table:table-cell>
            <text:p>Fres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sn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4.0</text:p>
          </table:table-cell>
          <table:table-cell>
            <text:p>Tucson</text:p>
          </table:table-cell>
          <table:table-cell>
            <text:p>AZ</text:p>
          </table:table-cell>
          <table:table-cell>
            <text:p>548371</text:p>
          </table:table-cell>
          <table:table-cell>
            <text:p>Jobe &amp; Sons Plumbing</text:p>
          </table:table-cell>
          <table:table-cell>
            <text:p>(520) 850-4552</text:p>
          </table:table-cell>
          <table:table-cell>
            <text:p>impallari@gmail.com</text:p>
          </table:table-cell>
          <table:table-cell>
            <text:p><text:a xlink:href="https://jobeandsonsplumbing.com" xlink:type="simple" xlink:actuate="onRequest" office:target-frame="_blank" text:style-name="InternetLink">jobeandsonsplumbing.com</text:a></text:p>
          </table:table-cell>
          <table:table-cell>
            <text:p>Tucson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5.0</text:p>
          </table:table-cell>
          <table:table-cell>
            <text:p>Sacramento</text:p>
          </table:table-cell>
          <table:table-cell>
            <text:p>CA</text:p>
          </table:table-cell>
          <table:table-cell>
            <text:p>536449</text:p>
          </table:table-cell>
          <table:table-cell>
            <text:p>Sacramento Plumbing</text:p>
          </table:table-cell>
          <table:table-cell>
            <text:p>(916) 606-6331</text:p>
          </table:table-cell>
          <table:table-cell>
            <text:p/>
          </table:table-cell>
          <table:table-cell>
            <text:p><text:a xlink:href="https://allsacramento.com" xlink:type="simple" xlink:actuate="onRequest" office:target-frame="_blank" text:style-name="InternetLink">allsacramento.com</text:a></text:p>
          </table:table-cell>
          <table:table-cell>
            <text:p>Sacramen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6.0</text:p>
          </table:table-cell>
          <table:table-cell>
            <text:p>Atlanta</text:p>
          </table:table-cell>
          <table:table-cell>
            <text:p>GA</text:p>
          </table:table-cell>
          <table:table-cell>
            <text:p>529110</text:p>
          </table:table-cell>
          <table:table-cell>
            <text:p>Head's Plumbing Sales &amp; Service</text:p>
          </table:table-cell>
          <table:table-cell>
            <text:p>(404) 696-3175</text:p>
          </table:table-cell>
          <table:table-cell>
            <text:p/>
          </table:table-cell>
          <table:table-cell>
            <text:p><text:a xlink:href="https://headsplumbing.com" xlink:type="simple" xlink:actuate="onRequest" office:target-frame="_blank" text:style-name="InternetLink">headsplumbing.com</text:a></text:p>
          </table:table-cell>
          <table:table-cell>
            <text:p>Atlanta, GA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7.0</text:p>
          </table:table-cell>
          <table:table-cell>
            <text:p>Kansas City</text:p>
          </table:table-cell>
          <table:table-cell>
            <text:p>MO</text:p>
          </table:table-cell>
          <table:table-cell>
            <text:p>521220</text:p>
          </table:table-cell>
          <table:table-cell>
            <text:p>Stine-Nichols Plumbing</text:p>
          </table:table-cell>
          <table:table-cell>
            <text:p>(816) 348-3481</text:p>
          </table:table-cell>
          <table:table-cell>
            <text:p/>
          </table:table-cell>
          <table:table-cell>
            <text:p><text:a xlink:href="https://stinenichols.com" xlink:type="simple" xlink:actuate="onRequest" office:target-frame="_blank" text:style-name="InternetLink">stinenichols.com</text:a></text:p>
          </table:table-cell>
          <table:table-cell>
            <text:p>Kansas City, M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8.0</text:p>
          </table:table-cell>
          <table:table-cell>
            <text:p>Mesa</text:p>
          </table:table-cell>
          <table:table-cell>
            <text:p>AZ</text:p>
          </table:table-cell>
          <table:table-cell>
            <text:p>513656</text:p>
          </table:table-cell>
          <table:table-cell>
            <text:p>Goettl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goettl.com" xlink:type="simple" xlink:actuate="onRequest" office:target-frame="_blank" text:style-name="InternetLink">goettl.com</text:a></text:p>
          </table:table-cell>
          <table:table-cell>
            <text:p>Mesa, AZ</text:p>
          </table:table-cell>
          <table:table-cell>
            <text:p>4.5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9.0</text:p>
          </table:table-cell>
          <table:table-cell>
            <text:p>Raleigh</text:p>
          </table:table-cell>
          <table:table-cell>
            <text:p>NC</text:p>
          </table:table-cell>
          <table:table-cell>
            <text:p>506306</text:p>
          </table:table-cell>
          <table:table-cell>
            <text:p>William Parrish Plumbing</text:p>
          </table:table-cell>
          <table:table-cell>
            <text:p>(919) 343-0783</text:p>
          </table:table-cell>
          <table:table-cell>
            <text:p/>
          </table:table-cell>
          <table:table-cell>
            <text:p><text:a xlink:href="https://williamparrishplumbing.com" xlink:type="simple" xlink:actuate="onRequest" office:target-frame="_blank" text:style-name="InternetLink">williamparrishplumbing.com</text:a></text:p>
          </table:table-cell>
          <table:table-cell>
            <text:p>Raleigh, NC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0.0</text:p>
          </table:table-cell>
          <table:table-cell>
            <text:p>Colorado Springs</text:p>
          </table:table-cell>
          <table:table-cell>
            <text:p>CO</text:p>
          </table:table-cell>
          <table:table-cell>
            <text:p>494743</text:p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.0</text:p>
          </table:table-cell>
          <table:table-cell>
            <text:p>Miami</text:p>
          </table:table-cell>
          <table:table-cell>
            <text:p>FL</text:p>
          </table:table-cell>
          <table:table-cell>
            <text:p>489812</text:p>
          </table:table-cell>
          <table:table-cell>
            <text:p>Miami Dade Plumbing</text:p>
          </table:table-cell>
          <table:table-cell>
            <text:p>(786) 756-3185</text:p>
          </table:table-cell>
          <table:table-cell>
            <text:p/>
          </table:table-cell>
          <table:table-cell>
            <text:p><text:a xlink:href="https://miamidadeplumbing.com" xlink:type="simple" xlink:actuate="onRequest" office:target-frame="_blank" text:style-name="InternetLink">miamidadeplumbing.com</text:a></text:p>
          </table:table-cell>
          <table:table-cell>
            <text:p>Miami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2.0</text:p>
          </table:table-cell>
          <table:table-cell>
            <text:p>Omaha</text:p>
          </table:table-cell>
          <table:table-cell>
            <text:p>NE</text:p>
          </table:table-cell>
          <table:table-cell>
            <text:p>488797</text:p>
          </table:table-cell>
          <table:table-cell>
            <text:p>Grayson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maha, NE</text:p>
          </table:table-cell>
          <table:table-cell>
            <text:p>4.6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3.0</text:p>
          </table:table-cell>
          <table:table-cell>
            <text:p>Virginia Beach</text:p>
          </table:table-cell>
          <table:table-cell>
            <text:p>VA</text:p>
          </table:table-cell>
          <table:table-cell>
            <text:p>453737</text:p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.0</text:p>
          </table:table-cell>
          <table:table-cell>
            <text:p>Long Beach</text:p>
          </table:table-cell>
          <table:table-cell>
            <text:p>CA</text:p>
          </table:table-cell>
          <table:table-cell>
            <text:p>450469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>info@thefamilyplumber.com</text:p>
          </table:table-cell>
          <table:table-cell>
            <text:p><text:a xlink:href="https://thefamilyplumber.com" xlink:type="simple" xlink:actuate="onRequest" office:target-frame="_blank" text:style-name="InternetLink">thefamilyplumber.com</text:a></text:p>
          </table:table-cell>
          <table:table-cell>
            <text:p>Long Beach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.0</text:p>
          </table:table-cell>
          <table:table-cell>
            <text:p>Oakland</text:p>
          </table:table-cell>
          <table:table-cell>
            <text:p>CA</text:p>
          </table:table-cell>
          <table:table-cell>
            <text:p>440838</text:p>
          </table:table-cell>
          <table:table-cell>
            <text:p>Fazule and Sons Plumbing</text:p>
          </table:table-cell>
          <table:table-cell>
            <text:p>(510) 534-5480</text:p>
          </table:table-cell>
          <table:table-cell>
            <text:p/>
          </table:table-cell>
          <table:table-cell>
            <text:p/>
          </table:table-cell>
          <table:table-cell>
            <text:p>Oaklan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6.0</text:p>
          </table:table-cell>
          <table:table-cell>
            <text:p>Minneapolis</text:p>
          </table:table-cell>
          <table:table-cell>
            <text:p>MN</text:p>
          </table:table-cell>
          <table:table-cell>
            <text:p>430324</text:p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.0</text:p>
          </table:table-cell>
          <table:table-cell>
            <text:p>Bakersfield</text:p>
          </table:table-cell>
          <table:table-cell>
            <text:p>CA</text:p>
          </table:table-cell>
          <table:table-cell>
            <text:p>422165</text:p>
          </table:table-cell>
          <table:table-cell>
            <text:p>Cisneros Brothers Plumbing</text:p>
          </table:table-cell>
          <table:table-cell>
            <text:p>(661) 768-0616</text:p>
          </table:table-cell>
          <table:table-cell>
            <text:p/>
          </table:table-cell>
          <table:table-cell>
            <text:p><text:a xlink:href="https://cisnerosbrothersplumbing.com" xlink:type="simple" xlink:actuate="onRequest" office:target-frame="_blank" text:style-name="InternetLink">cisnerosbrothersplumbing.com</text:a></text:p>
          </table:table-cell>
          <table:table-cell>
            <text:p>Bakersfiel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8.0</text:p>
          </table:table-cell>
          <table:table-cell>
            <text:p>Tulsa</text:p>
          </table:table-cell>
          <table:table-cell>
            <text:p>OK</text:p>
          </table:table-cell>
          <table:table-cell>
            <text:p>416209</text:p>
          </table:table-cell>
          <table:table-cell>
            <text:p>Williams Plumbing &amp; Drain Service</text:p>
          </table:table-cell>
          <table:table-cell>
            <text:p>(918) 505-7332</text:p>
          </table:table-cell>
          <table:table-cell>
            <text:p/>
          </table:table-cell>
          <table:table-cell>
            <text:p><text:a xlink:href="https://williamsplumbing.com" xlink:type="simple" xlink:actuate="onRequest" office:target-frame="_blank" text:style-name="InternetLink">williamsplumbing.com</text:a></text:p>
          </table:table-cell>
          <table:table-cell>
            <text:p>Tulsa, OK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9.0</text:p>
          </table:table-cell>
          <table:table-cell>
            <text:p>Tampa</text:p>
          </table:table-cell>
          <table:table-cell>
            <text:p>FL</text:p>
          </table:table-cell>
          <table:table-cell>
            <text:p>413554</text:p>
          </table:table-cell>
          <table:table-cell>
            <text:p>Olin Plumbing Inc.</text:p>
          </table:table-cell>
          <table:table-cell>
            <text:p>(813) 443-5820</text:p>
          </table:table-cell>
          <table:table-cell>
            <text:p>info@olinplumbinginc.com</text:p>
          </table:table-cell>
          <table:table-cell>
            <text:p><text:a xlink:href="https://olinplumbing.com" xlink:type="simple" xlink:actuate="onRequest" office:target-frame="_blank" text:style-name="InternetLink">olinplumbing.com</text:a></text:p>
          </table:table-cell>
          <table:table-cell>
            <text:p>Tampa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0.0</text:p>
          </table:table-cell>
          <table:table-cell>
            <text:p>Aurora</text:p>
          </table:table-cell>
          <table:table-cell>
            <text:p>CO</text:p>
          </table:table-cell>
          <table:table-cell>
            <text:p>410053</text:p>
          </table:table-cell>
          <table:table-cell>
            <text:p>Aurora Plumbing Company</text:p>
          </table:table-cell>
          <table:table-cell>
            <text:p>(303) 366-5828</text:p>
          </table:table-cell>
          <table:table-cell>
            <text:p/>
          </table:table-cell>
          <table:table-cell>
            <text:p><text:a xlink:href="https://auroraplumbing.com" xlink:type="simple" xlink:actuate="onRequest" office:target-frame="_blank" text:style-name="InternetLink">auroraplumbing.com</text:a></text:p>
          </table:table-cell>
          <table:table-cell>
            <text:p>Aurora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1.0</text:p>
          </table:table-cell>
          <table:table-cell>
            <text:p>Arlington</text:p>
          </table:table-cell>
          <table:table-cell>
            <text:p>TX</text:p>
          </table:table-cell>
          <table:table-cell>
            <text:p>402134</text:p>
          </table:table-cell>
          <table:table-cell>
            <text:p>Family Friends Plumbing Service</text:p>
          </table:table-cell>
          <table:table-cell>
            <text:p>(817) 819-1471</text:p>
          </table:table-cell>
          <table:table-cell>
            <text:p>e7d54b729aaf49ea8b2f80dae22860aa@sentry.zipify.com</text:p>
          </table:table-cell>
          <table:table-cell>
            <text:p><text:a xlink:href="https://familyfriends.com" xlink:type="simple" xlink:actuate="onRequest" office:target-frame="_blank" text:style-name="InternetLink">familyfriends.com</text:a></text:p>
          </table:table-cell>
          <table:table-cell>
            <text:p>Arlington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2.0</text:p>
          </table:table-cell>
          <table:table-cell>
            <text:p>Wichita</text:p>
          </table:table-cell>
          <table:table-cell>
            <text:p>KS</text:p>
          </table:table-cell>
          <table:table-cell>
            <text:p>400987</text:p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.0</text:p>
          </table:table-cell>
          <table:table-cell>
            <text:p>Cleveland</text:p>
          </table:table-cell>
          <table:table-cell>
            <text:p>OH</text:p>
          </table:table-cell>
          <table:table-cell>
            <text:p>363608</text:p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.0</text:p>
          </table:table-cell>
          <table:table-cell>
            <text:p>New Orleans</text:p>
          </table:table-cell>
          <table:table-cell>
            <text:p>LA</text:p>
          </table:table-cell>
          <table:table-cell>
            <text:p>362154</text:p>
          </table:table-cell>
          <table:table-cell>
            <text:p>Noel's Plumbing, LLC.</text:p>
          </table:table-cell>
          <table:table-cell>
            <text:p>(504) 445-7222</text:p>
          </table:table-cell>
          <table:table-cell>
            <text:p/>
          </table:table-cell>
          <table:table-cell>
            <text:p/>
          </table:table-cell>
          <table:table-cell>
            <text:p>New Orleans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5.0</text:p>
          </table:table-cell>
          <table:table-cell>
            <text:p>Henderson</text:p>
          </table:table-cell>
          <table:table-cell>
            <text:p>NV</text:p>
          </table:table-cell>
          <table:table-cell>
            <text:p>353289</text:p>
          </table:table-cell>
          <table:table-cell>
            <text:p>Robinson Family Plumbing &amp; HVAC</text:p>
          </table:table-cell>
          <table:table-cell>
            <text:p>(725) 234-3100</text:p>
          </table:table-cell>
          <table:table-cell>
            <text:p/>
          </table:table-cell>
          <table:table-cell>
            <text:p><text:a xlink:href="https://robinsonfamilyplumbinghvac.com" xlink:type="simple" xlink:actuate="onRequest" office:target-frame="_blank" text:style-name="InternetLink">robinsonfamilyplumbinghvac.com</text:a></text:p>
          </table:table-cell>
          <table:table-cell>
            <text:p>Henderson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6.0</text:p>
          </table:table-cell>
          <table:table-cell>
            <text:p>Honolulu</text:p>
          </table:table-cell>
          <table:table-cell>
            <text:p>HI</text:p>
          </table:table-cell>
          <table:table-cell>
            <text:p>341868</text:p>
          </table:table-cell>
          <table:table-cell>
            <text:p>Allens Plumbing</text:p>
          </table:table-cell>
          <table:table-cell>
            <text:p>(808) 599-5511</text:p>
          </table:table-cell>
          <table:table-cell>
            <text:p/>
          </table:table-cell>
          <table:table-cell>
            <text:p><text:a xlink:href="https://allensplumbinghi.com" xlink:type="simple" xlink:actuate="onRequest" office:target-frame="_blank" text:style-name="InternetLink">allensplumbinghi.com</text:a></text:p>
          </table:table-cell>
          <table:table-cell>
            <text:p>Honolulu, H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7.0</text:p>
          </table:table-cell>
          <table:table-cell>
            <text:p>Anaheim</text:p>
          </table:table-cell>
          <table:table-cell>
            <text:p>CA</text:p>
          </table:table-cell>
          <table:table-cell>
            <text:p>341008</text:p>
          </table:table-cell>
          <table:table-cell>
            <text:p>Barker and Sons Plumbing &amp; Rooter</text:p>
          </table:table-cell>
          <table:table-cell>
            <text:p>(714) 667-7800</text:p>
          </table:table-cell>
          <table:table-cell>
            <text:p/>
          </table:table-cell>
          <table:table-cell>
            <text:p><text:a xlink:href="https://barkerandsonsplumbing.com" xlink:type="simple" xlink:actuate="onRequest" office:target-frame="_blank" text:style-name="InternetLink">barkerandsonsplumbing.com</text:a></text:p>
          </table:table-cell>
          <table:table-cell>
            <text:p>Anaheim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8.0</text:p>
          </table:table-cell>
          <table:table-cell>
            <text:p>Orlando</text:p>
          </table:table-cell>
          <table:table-cell>
            <text:p>FL</text:p>
          </table:table-cell>
          <table:table-cell>
            <text:p>333888</text:p>
          </table:table-cell>
          <table:table-cell>
            <text:p>Choice Plumbing Orlando</text:p>
          </table:table-cell>
          <table:table-cell>
            <text:p>(407) 422-7443</text:p>
          </table:table-cell>
          <table:table-cell>
            <text:p/>
          </table:table-cell>
          <table:table-cell>
            <text:p><text:a xlink:href="https://choiceplumbingorlando.com" xlink:type="simple" xlink:actuate="onRequest" office:target-frame="_blank" text:style-name="InternetLink">choiceplumbingorlando.com</text:a></text:p>
          </table:table-cell>
          <table:table-cell>
            <text:p>Orlando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9.0</text:p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>329751</text:p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.0</text:p>
          </table:table-cell>
          <table:table-cell>
            <text:p>Stockton</text:p>
          </table:table-cell>
          <table:table-cell>
            <text:p>CA</text:p>
          </table:table-cell>
          <table:table-cell>
            <text:p>324597</text:p>
          </table:table-cell>
          <table:table-cell>
            <text:p>Tony's Plumbing, Heating &amp; Air</text:p>
          </table:table-cell>
          <table:table-cell>
            <text:p>(209) 337-3788</text:p>
          </table:table-cell>
          <table:table-cell>
            <text:p/>
          </table:table-cell>
          <table:table-cell>
            <text:p><text:a xlink:href="https://tonysplumbing.com" xlink:type="simple" xlink:actuate="onRequest" office:target-frame="_blank" text:style-name="InternetLink">tonysplumbing.com</text:a></text:p>
          </table:table-cell>
          <table:table-cell>
            <text:p>Stockton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1.0</text:p>
          </table:table-cell>
          <table:table-cell>
            <text:p>Newark</text:p>
          </table:table-cell>
          <table:table-cell>
            <text:p>NJ</text:p>
          </table:table-cell>
          <table:table-cell>
            <text:p>323808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><text:a xlink:href="https://ffheatingplumbing.com" xlink:type="simple" xlink:actuate="onRequest" office:target-frame="_blank" text:style-name="InternetLink">ffheatingplumbing.com</text:a></text:p>
          </table:table-cell>
          <table:table-cell>
            <text:p>28 Samuel Ave, Newark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.0</text:p>
          </table:table-cell>
          <table:table-cell>
            <text:p>Riverside</text:p>
          </table:table-cell>
          <table:table-cell>
            <text:p>CA</text:p>
          </table:table-cell>
          <table:table-cell>
            <text:p>323057</text:p>
          </table:table-cell>
          <table:table-cell>
            <text:p>Campbell Family Plumbing &amp; Electric</text:p>
          </table:table-cell>
          <table:table-cell>
            <text:p>(951) 363-2666</text:p>
          </table:table-cell>
          <table:table-cell>
            <text:p/>
          </table:table-cell>
          <table:table-cell>
            <text:p/>
          </table:table-cell>
          <table:table-cell>
            <text:p>River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3.0</text:p>
          </table:table-cell>
          <table:table-cell>
            <text:p>Irvine</text:p>
          </table:table-cell>
          <table:table-cell>
            <text:p>CA</text:p>
          </table:table-cell>
          <table:table-cell>
            <text:p>318764</text:p>
          </table:table-cell>
          <table:table-cell>
            <text:p>Irvine Plumbing</text:p>
          </table:table-cell>
          <table:table-cell>
            <text:p>(949) 850-4471</text:p>
          </table:table-cell>
          <table:table-cell>
            <text:p/>
          </table:table-cell>
          <table:table-cell>
            <text:p><text:a xlink:href="https://irvineplumbing.com" xlink:type="simple" xlink:actuate="onRequest" office:target-frame="_blank" text:style-name="InternetLink">irvine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4.0</text:p>
          </table:table-cell>
          <table:table-cell>
            <text:p>Corpus Christi</text:p>
          </table:table-cell>
          <table:table-cell>
            <text:p>TX</text:p>
          </table:table-cell>
          <table:table-cell>
            <text:p>317247</text:p>
          </table:table-cell>
          <table:table-cell>
            <text:p>Dwain McCain Plumbing</text:p>
          </table:table-cell>
          <table:table-cell>
            <text:p>(361) 241-6000</text:p>
          </table:table-cell>
          <table:table-cell>
            <text:p>mccainplumbing@sbcglobal.net</text:p>
          </table:table-cell>
          <table:table-cell>
            <text:p><text:a xlink:href="https://dwainmccainplumbing.com" xlink:type="simple" xlink:actuate="onRequest" office:target-frame="_blank" text:style-name="InternetLink">dwainmccainplumbing.com</text:a></text:p>
          </table:table-cell>
          <table:table-cell>
            <text:p>Corpus Christi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5.0</text:p>
          </table:table-cell>
          <table:table-cell>
            <text:p>Santa Ana</text:p>
          </table:table-cell>
          <table:table-cell>
            <text:p>CA</text:p>
          </table:table-cell>
          <table:table-cell>
            <text:p>315586</text:p>
          </table:table-cell>
          <table:table-cell>
            <text:p>Do It Right Plumbers</text:p>
          </table:table-cell>
          <table:table-cell>
            <text:p>(657) 229-2993</text:p>
          </table:table-cell>
          <table:table-cell>
            <text:p>leads@doitrightplumbers.com</text:p>
          </table:table-cell>
          <table:table-cell>
            <text:p><text:a xlink:href="https://doitrightplumbers.com" xlink:type="simple" xlink:actuate="onRequest" office:target-frame="_blank" text:style-name="InternetLink">doitrightplumbers.com</text:a></text:p>
          </table:table-cell>
          <table:table-cell>
            <text:p>Santa 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6.0</text:p>
          </table:table-cell>
          <table:table-cell>
            <text:p>Cincinnati</text:p>
          </table:table-cell>
          <table:table-cell>
            <text:p>OH</text:p>
          </table:table-cell>
          <table:table-cell>
            <text:p>314367</text:p>
          </table:table-cell>
          <table:table-cell>
            <text:p>Halpin Plumbing Inc</text:p>
          </table:table-cell>
          <table:table-cell>
            <text:p>(513) 790-6985</text:p>
          </table:table-cell>
          <table:table-cell>
            <text:p/>
          </table:table-cell>
          <table:table-cell>
            <text:p><text:a xlink:href="https://halpinplumbing.com" xlink:type="simple" xlink:actuate="onRequest" office:target-frame="_blank" text:style-name="InternetLink">halpinplumbing.com</text:a></text:p>
          </table:table-cell>
          <table:table-cell>
            <text:p>Cincinnati, OH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7.0</text:p>
          </table:table-cell>
          <table:table-cell>
            <text:p>Greensboro</text:p>
          </table:table-cell>
          <table:table-cell>
            <text:p>NC</text:p>
          </table:table-cell>
          <table:table-cell>
            <text:p>308667</text:p>
          </table:table-cell>
          <table:table-cell>
            <text:p>Owens Plumbing Company LLC</text:p>
          </table:table-cell>
          <table:table-cell>
            <text:p>(336) 908-8478</text:p>
          </table:table-cell>
          <table:table-cell>
            <text:p/>
          </table:table-cell>
          <table:table-cell>
            <text:p><text:a xlink:href="https://owensplumbingcompany.com" xlink:type="simple" xlink:actuate="onRequest" office:target-frame="_blank" text:style-name="InternetLink">owensplumbingcompany.com</text:a></text:p>
          </table:table-cell>
          <table:table-cell>
            <text:p>Greensboro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8.0</text:p>
          </table:table-cell>
          <table:table-cell>
            <text:p>Pittsburgh</text:p>
          </table:table-cell>
          <table:table-cell>
            <text:p>PA</text:p>
          </table:table-cell>
          <table:table-cell>
            <text:p>307632</text:p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.0</text:p>
          </table:table-cell>
          <table:table-cell>
            <text:p>St. Paul</text:p>
          </table:table-cell>
          <table:table-cell>
            <text:p>MN</text:p>
          </table:table-cell>
          <table:table-cell>
            <text:p>306684</text:p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.0</text:p>
          </table:table-cell>
          <table:table-cell>
            <text:p>Durham</text:p>
          </table:table-cell>
          <table:table-cell>
            <text:p>NC</text:p>
          </table:table-cell>
          <table:table-cell>
            <text:p>305561</text:p>
          </table:table-cell>
          <table:table-cell>
            <text:p>Brown Brothers Plumbing &amp; Heating</text:p>
          </table:table-cell>
          <table:table-cell>
            <text:p>(919) 220-2554</text:p>
          </table:table-cell>
          <table:table-cell>
            <text:p/>
          </table:table-cell>
          <table:table-cell>
            <text:p><text:a xlink:href="https://brownbrothers.com" xlink:type="simple" xlink:actuate="onRequest" office:target-frame="_blank" text:style-name="InternetLink">brownbrothers.com</text:a></text:p>
          </table:table-cell>
          <table:table-cell>
            <text:p>Durha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1.0</text:p>
          </table:table-cell>
          <table:table-cell>
            <text:p>Jersey City</text:p>
          </table:table-cell>
          <table:table-cell>
            <text:p>NJ</text:p>
          </table:table-cell>
          <table:table-cell>
            <text:p>302013</text:p>
          </table:table-cell>
          <table:table-cell>
            <text:p>M&amp;A Plumbing &amp; Heating</text:p>
          </table:table-cell>
          <table:table-cell>
            <text:p>(551) 208-8366</text:p>
          </table:table-cell>
          <table:table-cell>
            <text:p/>
          </table:table-cell>
          <table:table-cell>
            <text:p><text:a xlink:href="https://business.google.com/v/m-a-plumbing-heating/0322610284500796106/8434/_?" xlink:type="simple" xlink:actuate="onRequest" office:target-frame="_blank" text:style-name="InternetLink">https://business.google.com/v/m-a-plumbing-heating/0322610284500796106/8434/_?</text:a></text:p>
          </table:table-cell>
          <table:table-cell>
            <text:p>257 Dwight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.0</text:p>
          </table:table-cell>
          <table:table-cell>
            <text:p>Lincoln</text:p>
          </table:table-cell>
          <table:table-cell>
            <text:p>NE</text:p>
          </table:table-cell>
          <table:table-cell>
            <text:p>301522</text:p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.0</text:p>
          </table:table-cell>
          <table:table-cell>
            <text:p>North Las Vegas</text:p>
          </table:table-cell>
          <table:table-cell>
            <text:p>NV</text:p>
          </table:table-cell>
          <table:table-cell>
            <text:p>296653</text:p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.0</text:p>
          </table:table-cell>
          <table:table-cell>
            <text:p>Plano</text:p>
          </table:table-cell>
          <table:table-cell>
            <text:p>TX</text:p>
          </table:table-cell>
          <table:table-cell>
            <text:p>293028</text:p>
          </table:table-cell>
          <table:table-cell>
            <text:p>Pla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5.0</text:p>
          </table:table-cell>
          <table:table-cell>
            <text:p>Gilbert</text:p>
          </table:table-cell>
          <table:table-cell>
            <text:p>AZ</text:p>
          </table:table-cell>
          <table:table-cell>
            <text:p>287285</text:p>
          </table:table-cell>
          <table:table-cell>
            <text:p>Travis &amp; Sons Plumbing &amp; Rooter</text:p>
          </table:table-cell>
          <table:table-cell>
            <text:p>(480) 568-2309</text:p>
          </table:table-cell>
          <table:table-cell>
            <text:p/>
          </table:table-cell>
          <table:table-cell>
            <text:p><text:a xlink:href="https://travisandsonsplumbing.com" xlink:type="simple" xlink:actuate="onRequest" office:target-frame="_blank" text:style-name="InternetLink">travisandsonsplumbing.com</text:a></text:p>
          </table:table-cell>
          <table:table-cell>
            <text:p>Gilbert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6.0</text:p>
          </table:table-cell>
          <table:table-cell>
            <text:p>Anchorage</text:p>
          </table:table-cell>
          <table:table-cell>
            <text:p>AK</text:p>
          </table:table-cell>
          <table:table-cell>
            <text:p>287155</text:p>
          </table:table-cell>
          <table:table-cell>
            <text:p>Anchorag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7.0</text:p>
          </table:table-cell>
          <table:table-cell>
            <text:p>Madison</text:p>
          </table:table-cell>
          <table:table-cell>
            <text:p>WI</text:p>
          </table:table-cell>
          <table:table-cell>
            <text:p>286233</text:p>
          </table:table-cell>
          <table:table-cell>
            <text:p>Howe Brothers Plumbing LLC</text:p>
          </table:table-cell>
          <table:table-cell>
            <text:p>(608) 257-2884</text:p>
          </table:table-cell>
          <table:table-cell>
            <text:p/>
          </table:table-cell>
          <table:table-cell>
            <text:p/>
          </table:table-cell>
          <table:table-cell>
            <text:p>Madison, W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8.0</text:p>
          </table:table-cell>
          <table:table-cell>
            <text:p>Reno</text:p>
          </table:table-cell>
          <table:table-cell>
            <text:p>NV</text:p>
          </table:table-cell>
          <table:table-cell>
            <text:p>283621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.0</text:p>
          </table:table-cell>
          <table:table-cell>
            <text:p>Chandler</text:p>
          </table:table-cell>
          <table:table-cell>
            <text:p>AZ</text:p>
          </table:table-cell>
          <table:table-cell>
            <text:p>278748</text:p>
          </table:table-cell>
          <table:table-cell>
            <text:p>Roy Dossey Plumbing</text:p>
          </table:table-cell>
          <table:table-cell>
            <text:p>(480) 963-3302</text:p>
          </table:table-cell>
          <table:table-cell>
            <text:p/>
          </table:table-cell>
          <table:table-cell>
            <text:p/>
          </table:table-cell>
          <table:table-cell>
            <text:p>Chandler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0.0</text:p>
          </table:table-cell>
          <table:table-cell>
            <text:p>St. Louis</text:p>
          </table:table-cell>
          <table:table-cell>
            <text:p>MO</text:p>
          </table:table-cell>
          <table:table-cell>
            <text:p>278144</text:p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.0</text:p>
          </table:table-cell>
          <table:table-cell>
            <text:p>Chula Vista</text:p>
          </table:table-cell>
          <table:table-cell>
            <text:p>CA</text:p>
          </table:table-cell>
          <table:table-cell>
            <text:p>275533</text:p>
          </table:table-cell>
          <table:table-cell>
            <text:p>Bob the Plumber of Chula Vista</text:p>
          </table:table-cell>
          <table:table-cell>
            <text:p>(619) 990-7960</text:p>
          </table:table-cell>
          <table:table-cell>
            <text:p/>
          </table:table-cell>
          <table:table-cell>
            <text:p><text:a xlink:href="https://bobthe.com" xlink:type="simple" xlink:actuate="onRequest" office:target-frame="_blank" text:style-name="InternetLink">bobthe.com</text:a></text:p>
          </table:table-cell>
          <table:table-cell>
            <text:p>Chula Vist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2.0</text:p>
          </table:table-cell>
          <table:table-cell>
            <text:p>Fort Wayne</text:p>
          </table:table-cell>
          <table:table-cell>
            <text:p>IN</text:p>
          </table:table-cell>
          <table:table-cell>
            <text:p>275203</text:p>
          </table:table-cell>
          <table:table-cell>
            <text:p>A Hattersley &amp; Sons Inc</text:p>
          </table:table-cell>
          <table:table-cell>
            <text:p>(260) 483-6473</text:p>
          </table:table-cell>
          <table:table-cell>
            <text:p/>
          </table:table-cell>
          <table:table-cell>
            <text:p><text:a xlink:href="https://ahattersley.com" xlink:type="simple" xlink:actuate="onRequest" office:target-frame="_blank" text:style-name="InternetLink">ahattersley.com</text:a></text:p>
          </table:table-cell>
          <table:table-cell>
            <text:p>Fort Wayne, I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3.0</text:p>
          </table:table-cell>
          <table:table-cell>
            <text:p>Buffalo</text:p>
          </table:table-cell>
          <table:table-cell>
            <text:p>NY</text:p>
          </table:table-cell>
          <table:table-cell>
            <text:p>274613</text:p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4.0</text:p>
          </table:table-cell>
          <table:table-cell>
            <text:p>Lubbock</text:p>
          </table:table-cell>
          <table:table-cell>
            <text:p>TX</text:p>
          </table:table-cell>
          <table:table-cell>
            <text:p>273071</text:p>
          </table:table-cell>
          <table:table-cell>
            <text:p>Lubbock Plumbing T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ubbock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5.0</text:p>
          </table:table-cell>
          <table:table-cell>
            <text:p>Laredo</text:p>
          </table:table-cell>
          <table:table-cell>
            <text:p>TX</text:p>
          </table:table-cell>
          <table:table-cell>
            <text:p>269515</text:p>
          </table:table-cell>
          <table:table-cell>
            <text:p>South Texas Plumbing Contractors</text:p>
          </table:table-cell>
          <table:table-cell>
            <text:p>(956) 333-6935</text:p>
          </table:table-cell>
          <table:table-cell>
            <text:p/>
          </table:table-cell>
          <table:table-cell>
            <text:p><text:a xlink:href="https://southtexas.com" xlink:type="simple" xlink:actuate="onRequest" office:target-frame="_blank" text:style-name="InternetLink">southtexas.com</text:a></text:p>
          </table:table-cell>
          <table:table-cell>
            <text:p>Lared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6.0</text:p>
          </table:table-cell>
          <table:table-cell>
            <text:p>Port St. Lucie</text:p>
          </table:table-cell>
          <table:table-cell>
            <text:p>FL</text:p>
          </table:table-cell>
          <table:table-cell>
            <text:p>268062</text:p>
          </table:table-cell>
          <table:table-cell>
            <text:p>First Choice Plus Plumbing &amp; Air</text:p>
          </table:table-cell>
          <table:table-cell>
            <text:p>(772) 275-3760</text:p>
          </table:table-cell>
          <table:table-cell>
            <text:p/>
          </table:table-cell>
          <table:table-cell>
            <text:p><text:a xlink:href="https://firstchoice.com" xlink:type="simple" xlink:actuate="onRequest" office:target-frame="_blank" text:style-name="InternetLink">firstchoice.com</text:a></text:p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7.0</text:p>
          </table:table-cell>
          <table:table-cell>
            <text:p>St. Petersburg</text:p>
          </table:table-cell>
          <table:table-cell>
            <text:p>FL</text:p>
          </table:table-cell>
          <table:table-cell>
            <text:p>264033</text:p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8.0</text:p>
          </table:table-cell>
          <table:table-cell>
            <text:p>Toledo</text:p>
          </table:table-cell>
          <table:table-cell>
            <text:p>OH</text:p>
          </table:table-cell>
          <table:table-cell>
            <text:p>263423</text:p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9.0</text:p>
          </table:table-cell>
          <table:table-cell>
            <text:p>Glendale</text:p>
          </table:table-cell>
          <table:table-cell>
            <text:p>AZ</text:p>
          </table:table-cell>
          <table:table-cell>
            <text:p>260572</text:p>
          </table:table-cell>
          <table:table-cell>
            <text:p>Glendale Plumbing A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0.0</text:p>
          </table:table-cell>
          <table:table-cell>
            <text:p>Winston-Salem</text:p>
          </table:table-cell>
          <table:table-cell>
            <text:p>NC</text:p>
          </table:table-cell>
          <table:table-cell>
            <text:p>257271</text:p>
          </table:table-cell>
          <table:table-cell>
            <text:p>Transou's Plumbing &amp; Septic</text:p>
          </table:table-cell>
          <table:table-cell>
            <text:p>(336) 276-1263</text:p>
          </table:table-cell>
          <table:table-cell>
            <text:p/>
          </table:table-cell>
          <table:table-cell>
            <text:p/>
          </table:table-cell>
          <table:table-cell>
            <text:p>Winston-Sale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1.0</text:p>
          </table:table-cell>
          <table:table-cell>
            <text:p>Irving</text:p>
          </table:table-cell>
          <table:table-cell>
            <text:p>TX</text:p>
          </table:table-cell>
          <table:table-cell>
            <text:p>257076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reevesfamily.com" xlink:type="simple" xlink:actuate="onRequest" office:target-frame="_blank" text:style-name="InternetLink">reevesfamily.com</text:a></text:p>
          </table:table-cell>
          <table:table-cell>
            <text:p>Irving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2.0</text:p>
          </table:table-cell>
          <table:table-cell>
            <text:p>Chesapeake</text:p>
          </table:table-cell>
          <table:table-cell>
            <text:p>VA</text:p>
          </table:table-cell>
          <table:table-cell>
            <text:p>255332</text:p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3.0</text:p>
          </table:table-cell>
          <table:table-cell>
            <text:p>Garland</text:p>
          </table:table-cell>
          <table:table-cell>
            <text:p>TX</text:p>
          </table:table-cell>
          <table:table-cell>
            <text:p>249625</text:p>
          </table:table-cell>
          <table:table-cell>
            <text:p>Family Ties Plumbing &amp; Construction</text:p>
          </table:table-cell>
          <table:table-cell>
            <text:p>(972) 824-8833</text:p>
          </table:table-cell>
          <table:table-cell>
            <text:p/>
          </table:table-cell>
          <table:table-cell>
            <text:p/>
          </table:table-cell>
          <table:table-cell>
            <text:p>Garland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4.0</text:p>
          </table:table-cell>
          <table:table-cell>
            <text:p>Scottsdale</text:p>
          </table:table-cell>
          <table:table-cell>
            <text:p>AZ</text:p>
          </table:table-cell>
          <table:table-cell>
            <text:p>243006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" xlink:type="simple" xlink:actuate="onRequest" office:target-frame="_blank" text:style-name="InternetLink">dcfamilyplumbing.com</text:a></text:p>
          </table:table-cell>
          <table:table-cell>
            <text:p>Scotts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5.0</text:p>
          </table:table-cell>
          <table:table-cell>
            <text:p>Boise City</text:p>
          </table:table-cell>
          <table:table-cell>
            <text:p>ID</text:p>
          </table:table-cell>
          <table:table-cell>
            <text:p>238429</text:p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6.0</text:p>
          </table:table-cell>
          <table:table-cell>
            <text:p>Richmond</text:p>
          </table:table-cell>
          <table:table-cell>
            <text:p>VA</text:p>
          </table:table-cell>
          <table:table-cell>
            <text:p>2372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7.0</text:p>
          </table:table-cell>
          <table:table-cell>
            <text:p>Frisco</text:p>
          </table:table-cell>
          <table:table-cell>
            <text:p>TX</text:p>
          </table:table-cell>
          <table:table-cell>
            <text:p>236955</text:p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8.0</text:p>
          </table:table-cell>
          <table:table-cell>
            <text:p>Cape Coral</text:p>
          </table:table-cell>
          <table:table-cell>
            <text:p>FL</text:p>
          </table:table-cell>
          <table:table-cell>
            <text:p>236264</text:p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9.0</text:p>
          </table:table-cell>
          <table:table-cell>
            <text:p>McKinney</text:p>
          </table:table-cell>
          <table:table-cell>
            <text:p>TX</text:p>
          </table:table-cell>
          <table:table-cell>
            <text:p>236001</text:p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0.0</text:p>
          </table:table-cell>
          <table:table-cell>
            <text:p>Huntsville</text:p>
          </table:table-cell>
          <table:table-cell>
            <text:p>AL</text:p>
          </table:table-cell>
          <table:table-cell>
            <text:p>233627</text:p>
          </table:table-cell>
          <table:table-cell>
            <text:p>Dean Plumbing Company Inc.</text:p>
          </table:table-cell>
          <table:table-cell>
            <text:p>(256) 883-6130</text:p>
          </table:table-cell>
          <table:table-cell>
            <text:p/>
          </table:table-cell>
          <table:table-cell>
            <text:p><text:a xlink:href="https://deanplumbing.com" xlink:type="simple" xlink:actuate="onRequest" office:target-frame="_blank" text:style-name="InternetLink">deanplumbing.com</text:a></text:p>
          </table:table-cell>
          <table:table-cell>
            <text:p>Huntsville, A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1.0</text:p>
          </table:table-cell>
          <table:table-cell>
            <text:p>Norfolk</text:p>
          </table:table-cell>
          <table:table-cell>
            <text:p>VA</text:p>
          </table:table-cell>
          <table:table-cell>
            <text:p>231013</text:p>
          </table:table-cell>
          <table:table-cell>
            <text:p>Eaton Family Plumbing</text:p>
          </table:table-cell>
          <table:table-cell>
            <text:p>(757) 913-9100</text:p>
          </table:table-cell>
          <table:table-cell>
            <text:p/>
          </table:table-cell>
          <table:table-cell>
            <text:p><text:a xlink:href="https://eatonfamily.com" xlink:type="simple" xlink:actuate="onRequest" office:target-frame="_blank" text:style-name="InternetLink">eatonfamily.com</text:a></text:p>
          </table:table-cell>
          <table:table-cell>
            <text:p>Norfolk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2.0</text:p>
          </table:table-cell>
          <table:table-cell>
            <text:p>Hialeah</text:p>
          </table:table-cell>
          <table:table-cell>
            <text:p>FL</text:p>
          </table:table-cell>
          <table:table-cell>
            <text:p>230968</text:p>
          </table:table-cell>
          <table:table-cell>
            <text:p>Hernandez Plumbing Co.</text:p>
          </table:table-cell>
          <table:table-cell>
            <text:p>(305) 428-3782</text:p>
          </table:table-cell>
          <table:table-cell>
            <text:p/>
          </table:table-cell>
          <table:table-cell>
            <text:p><text:a xlink:href="https://hernandezplumbing.com" xlink:type="simple" xlink:actuate="onRequest" office:target-frame="_blank" text:style-name="InternetLink">hernandezplumbing.com</text:a></text:p>
          </table:table-cell>
          <table:table-cell>
            <text:p>Hialeah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3.0</text:p>
          </table:table-cell>
          <table:table-cell>
            <text:p>Spokane</text:p>
          </table:table-cell>
          <table:table-cell>
            <text:p>WA</text:p>
          </table:table-cell>
          <table:table-cell>
            <text:p>230783</text:p>
          </table:table-cell>
          <table:table-cell>
            <text:p>Shaw Plumbing Heating &amp; Air Conditioning</text:p>
          </table:table-cell>
          <table:table-cell>
            <text:p>(509) 642-6166</text:p>
          </table:table-cell>
          <table:table-cell>
            <text:p/>
          </table:table-cell>
          <table:table-cell>
            <text:p><text:a xlink:href="https://shawplumbing.com" xlink:type="simple" xlink:actuate="onRequest" office:target-frame="_blank" text:style-name="InternetLink">shawplumbing.com</text:a></text:p>
          </table:table-cell>
          <table:table-cell>
            <text:p>Spokane, W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4.0</text:p>
          </table:table-cell>
          <table:table-cell>
            <text:p>Tacoma</text:p>
          </table:table-cell>
          <table:table-cell>
            <text:p>WA</text:p>
          </table:table-cell>
          <table:table-cell>
            <text:p>229816</text:p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5.0</text:p>
          </table:table-cell>
          <table:table-cell>
            <text:p>Santa Clarita</text:p>
          </table:table-cell>
          <table:table-cell>
            <text:p>CA</text:p>
          </table:table-cell>
          <table:table-cell>
            <text:p>228430</text:p>
          </table:table-cell>
          <table:table-cell>
            <text:p>Matthew's Plumbing Inc</text:p>
          </table:table-cell>
          <table:table-cell>
            <text:p>(661) 299-6707</text:p>
          </table:table-cell>
          <table:table-cell>
            <text:p/>
          </table:table-cell>
          <table:table-cell>
            <text:p/>
          </table:table-cell>
          <table:table-cell>
            <text:p>Santa Clarita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6.0</text:p>
          </table:table-cell>
          <table:table-cell>
            <text:p>Fremont</text:p>
          </table:table-cell>
          <table:table-cell>
            <text:p>CA</text:p>
          </table:table-cell>
          <table:table-cell>
            <text:p>226442</text:p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7.0</text:p>
          </table:table-cell>
          <table:table-cell>
            <text:p>Baton Rouge</text:p>
          </table:table-cell>
          <table:table-cell>
            <text:p>LA</text:p>
          </table:table-cell>
          <table:table-cell>
            <text:p>222795</text:p>
          </table:table-cell>
          <table:table-cell>
            <text:p>Trinity Plumbing</text:p>
          </table:table-cell>
          <table:table-cell>
            <text:p>(225) 501-5554</text:p>
          </table:table-cell>
          <table:table-cell>
            <text:p/>
          </table:table-cell>
          <table:table-cell>
            <text:p><text:a xlink:href="https://trinityplumbingla.com" xlink:type="simple" xlink:actuate="onRequest" office:target-frame="_blank" text:style-name="InternetLink">trinityplumbingla.com</text:a></text:p>
          </table:table-cell>
          <table:table-cell>
            <text:p>Baton Rouge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8.0</text:p>
          </table:table-cell>
          <table:table-cell>
            <text:p>San Bernardino</text:p>
          </table:table-cell>
          <table:table-cell>
            <text:p>CA</text:p>
          </table:table-cell>
          <table:table-cell>
            <text:p>222044</text:p>
          </table:table-cell>
          <table:table-cell>
            <text:p>Thompson Family Plumbing &amp; Drain</text:p>
          </table:table-cell>
          <table:table-cell>
            <text:p>(909) 332-2838</text:p>
          </table:table-cell>
          <table:table-cell>
            <text:p/>
          </table:table-cell>
          <table:table-cell>
            <text:p><text:a xlink:href="https://thompsonfamily.com" xlink:type="simple" xlink:actuate="onRequest" office:target-frame="_blank" text:style-name="InternetLink">thompsonfamily.com</text:a></text:p>
          </table:table-cell>
          <table:table-cell>
            <text:p>San Bernardino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9.0</text:p>
          </table:table-cell>
          <table:table-cell>
            <text:p>Fontana</text:p>
          </table:table-cell>
          <table:table-cell>
            <text:p>CA</text:p>
          </table:table-cell>
          <table:table-cell>
            <text:p>221223</text:p>
          </table:table-cell>
          <table:table-cell>
            <text:p>Family Ties Air, Plumbing, &amp; Drain</text:p>
          </table:table-cell>
          <table:table-cell>
            <text:p>(909) 332-2558</text:p>
          </table:table-cell>
          <table:table-cell>
            <text:p/>
          </table:table-cell>
          <table:table-cell>
            <text:p><text:a xlink:href="https://familytiesair.com" xlink:type="simple" xlink:actuate="onRequest" office:target-frame="_blank" text:style-name="InternetLink">familytiesair.com</text:a></text:p>
          </table:table-cell>
          <table:table-cell>
            <text:p>Font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0.0</text:p>
          </table:table-cell>
          <table:table-cell>
            <text:p>Modesto</text:p>
          </table:table-cell>
          <table:table-cell>
            <text:p>CA</text:p>
          </table:table-cell>
          <table:table-cell>
            <text:p>219652</text:p>
          </table:table-cell>
          <table:table-cell>
            <text:p>Herk's Plumbing</text:p>
          </table:table-cell>
          <table:table-cell>
            <text:p>(209) 496-1388</text:p>
          </table:table-cell>
          <table:table-cell>
            <text:p/>
          </table:table-cell>
          <table:table-cell>
            <text:p><text:a xlink:href="https://herksplumbing.com" xlink:type="simple" xlink:actuate="onRequest" office:target-frame="_blank" text:style-name="InternetLink">herksplumbing.com</text:a></text:p>
          </table:table-cell>
          <table:table-cell>
            <text:p>Modes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1.0</text:p>
          </table:table-cell>
          <table:table-cell>
            <text:p>Salt Lake City</text:p>
          </table:table-cell>
          <table:table-cell>
            <text:p>UT</text:p>
          </table:table-cell>
          <table:table-cell>
            <text:p>218428</text:p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2.0</text:p>
          </table:table-cell>
          <table:table-cell>
            <text:p>Moreno Valley</text:p>
          </table:table-cell>
          <table:table-cell>
            <text:p>CA</text:p>
          </table:table-cell>
          <table:table-cell>
            <text:p>214263</text:p>
          </table:table-cell>
          <table:table-cell>
            <text:p>McPherson Bros Plumbing</text:p>
          </table:table-cell>
          <table:table-cell>
            <text:p>(833) 627-2767</text:p>
          </table:table-cell>
          <table:table-cell>
            <text:p/>
          </table:table-cell>
          <table:table-cell>
            <text:p><text:a xlink:href="https://mcphersonbros.com" xlink:type="simple" xlink:actuate="onRequest" office:target-frame="_blank" text:style-name="InternetLink">mcphersonbros.com</text:a></text:p>
          </table:table-cell>
          <table:table-cell>
            <text:p>Moreno Valley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3.0</text:p>
          </table:table-cell>
          <table:table-cell>
            <text:p>Worcester</text:p>
          </table:table-cell>
          <table:table-cell>
            <text:p>MA</text:p>
          </table:table-cell>
          <table:table-cell>
            <text:p>213862</text:p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4.0</text:p>
          </table:table-cell>
          <table:table-cell>
            <text:p>Sioux Falls</text:p>
          </table:table-cell>
          <table:table-cell>
            <text:p>SD</text:p>
          </table:table-cell>
          <table:table-cell>
            <text:p>213748</text:p>
          </table:table-cell>
          <table:table-cell>
            <text:p>Sioux Falls Plumbing LLC.</text:p>
          </table:table-cell>
          <table:table-cell>
            <text:p>(605) 800-6537</text:p>
          </table:table-cell>
          <table:table-cell>
            <text:p/>
          </table:table-cell>
          <table:table-cell>
            <text:p><text:a xlink:href="http://siouxfalls-plumbing.com/" xlink:type="simple" xlink:actuate="onRequest" office:target-frame="_blank" text:style-name="InternetLink">http://siouxfalls-plumbing.com/</text:a></text:p>
          </table:table-cell>
          <table:table-cell>
            <text:p>1508 E 32nd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5.0</text:p>
          </table:table-cell>
          <table:table-cell>
            <text:p>Yonkers</text:p>
          </table:table-cell>
          <table:table-cell>
            <text:p>NY</text:p>
          </table:table-cell>
          <table:table-cell>
            <text:p>212603</text:p>
          </table:table-cell>
          <table:table-cell>
            <text:p>JP Plumbing and Sewer</text:p>
          </table:table-cell>
          <table:table-cell>
            <text:p>(914) 527-2773</text:p>
          </table:table-cell>
          <table:table-cell>
            <text:p/>
          </table:table-cell>
          <table:table-cell>
            <text:p><text:a xlink:href="https://jpplumbingandsewer.com" xlink:type="simple" xlink:actuate="onRequest" office:target-frame="_blank" text:style-name="InternetLink">jpplumbingandsewer.com</text:a></text:p>
          </table:table-cell>
          <table:table-cell>
            <text:p>Yonkers, NY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6.0</text:p>
          </table:table-cell>
          <table:table-cell>
            <text:p>Des Moines</text:p>
          </table:table-cell>
          <table:table-cell>
            <text:p>IA</text:p>
          </table:table-cell>
          <table:table-cell>
            <text:p>212086</text:p>
          </table:table-cell>
          <table:table-cell>
            <text:p>Schaal Plumbing, Heating and Cooling</text:p>
          </table:table-cell>
          <table:table-cell>
            <text:p>(515) 207-2272</text:p>
          </table:table-cell>
          <table:table-cell>
            <text:p/>
          </table:table-cell>
          <table:table-cell>
            <text:p/>
          </table:table-cell>
          <table:table-cell>
            <text:p>Des Moines, I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7.0</text:p>
          </table:table-cell>
          <table:table-cell>
            <text:p>Grand Prairie</text:p>
          </table:table-cell>
          <table:table-cell>
            <text:p>TX</text:p>
          </table:table-cell>
          <table:table-cell>
            <text:p>209434</text:p>
          </table:table-cell>
          <table:table-cell>
            <text:p>Grand Prair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and Prairie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8.0</text:p>
          </table:table-cell>
          <table:table-cell>
            <text:p>Fayetteville</text:p>
          </table:table-cell>
          <table:table-cell>
            <text:p>NC</text:p>
          </table:table-cell>
          <table:table-cell>
            <text:p>209120</text:p>
          </table:table-cell>
          <table:table-cell>
            <text:p>Woods Plumbing Service LLC</text:p>
          </table:table-cell>
          <table:table-cell>
            <text:p>(910) 920-3908</text:p>
          </table:table-cell>
          <table:table-cell>
            <text:p/>
          </table:table-cell>
          <table:table-cell>
            <text:p><text:a xlink:href="https://woodsplumbing.com" xlink:type="simple" xlink:actuate="onRequest" office:target-frame="_blank" text:style-name="InternetLink">woodsplumbing.com</text:a></text:p>
          </table:table-cell>
          <table:table-cell>
            <text:p>Fayetteville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9.0</text:p>
          </table:table-cell>
          <table:table-cell>
            <text:p>Augusta</text:p>
          </table:table-cell>
          <table:table-cell>
            <text:p>GA</text:p>
          </table:table-cell>
          <table:table-cell>
            <text:p>206559</text:p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0.0</text:p>
          </table:table-cell>
          <table:table-cell>
            <text:p>Little Rock</text:p>
          </table:table-cell>
          <table:table-cell>
            <text:p>AR</text:p>
          </table:table-cell>
          <table:table-cell>
            <text:p>206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1.0</text:p>
          </table:table-cell>
          <table:table-cell>
            <text:p>Rochester</text:p>
          </table:table-cell>
          <table:table-cell>
            <text:p>NY</text:p>
          </table:table-cell>
          <table:table-cell>
            <text:p>2061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2.0</text:p>
          </table:table-cell>
          <table:table-cell>
            <text:p>Amarillo</text:p>
          </table:table-cell>
          <table:table-cell>
            <text:p>TX</text:p>
          </table:table-cell>
          <table:table-cell>
            <text:p>2051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3.0</text:p>
          </table:table-cell>
          <table:table-cell>
            <text:p>Tallahassee</text:p>
          </table:table-cell>
          <table:table-cell>
            <text:p>FL</text:p>
          </table:table-cell>
          <table:table-cell>
            <text:p>204902</text:p>
          </table:table-cell>
          <table:table-cell>
            <text:p>White's Plumbing Inc</text:p>
          </table:table-cell>
          <table:table-cell>
            <text:p>(850) 576-3510</text:p>
          </table:table-cell>
          <table:table-cell>
            <text:p/>
          </table:table-cell>
          <table:table-cell>
            <text:p><text:a xlink:href="https://whitesplumbing.com" xlink:type="simple" xlink:actuate="onRequest" office:target-frame="_blank" text:style-name="InternetLink">whitesplumbing.com</text:a></text:p>
          </table:table-cell>
          <table:table-cell>
            <text:p>Tallahassee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24.0</text:p>
          </table:table-cell>
          <table:table-cell>
            <text:p>Overland Park</text:p>
          </table:table-cell>
          <table:table-cell>
            <text:p>KS</text:p>
          </table:table-cell>
          <table:table-cell>
            <text:p>2036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5.0</text:p>
          </table:table-cell>
          <table:table-cell>
            <text:p>Columbus</text:p>
          </table:table-cell>
          <table:table-cell>
            <text:p>GA</text:p>
          </table:table-cell>
          <table:table-cell>
            <text:p>2021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6.0</text:p>
          </table:table-cell>
          <table:table-cell>
            <text:p>Knoxville</text:p>
          </table:table-cell>
          <table:table-cell>
            <text:p>TN</text:p>
          </table:table-cell>
          <table:table-cell>
            <text:p>20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7.0</text:p>
          </table:table-cell>
          <table:table-cell>
            <text:p>Grand Rapids</text:p>
          </table:table-cell>
          <table:table-cell>
            <text:p>MI</text:p>
          </table:table-cell>
          <table:table-cell>
            <text:p>201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8.0</text:p>
          </table:table-cell>
          <table:table-cell>
            <text:p>Peoria</text:p>
          </table:table-cell>
          <table:table-cell>
            <text:p>AZ</text:p>
          </table:table-cell>
          <table:table-cell>
            <text:p>200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9.0</text:p>
          </table:table-cell>
          <table:table-cell>
            <text:p>Mobile</text:p>
          </table:table-cell>
          <table:table-cell>
            <text:p>AL</text:p>
          </table:table-cell>
          <table:table-cell>
            <text:p>2008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0.0</text:p>
          </table:table-cell>
          <table:table-cell>
            <text:p>Vancouver</text:p>
          </table:table-cell>
          <table:table-cell>
            <text:p>WA</text:p>
          </table:table-cell>
          <table:table-cell>
            <text:p>199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1.0</text:p>
          </table:table-cell>
          <table:table-cell>
            <text:p>Oxnard</text:p>
          </table:table-cell>
          <table:table-cell>
            <text:p>CA</text:p>
          </table:table-cell>
          <table:table-cell>
            <text:p>199651</text:p>
          </table:table-cell>
          <table:table-cell>
            <text:p>Salinas and Sons Rooter</text:p>
          </table:table-cell>
          <table:table-cell>
            <text:p>(805) 486-7030</text:p>
          </table:table-cell>
          <table:table-cell>
            <text:p/>
          </table:table-cell>
          <table:table-cell>
            <text:p/>
          </table:table-cell>
          <table:table-cell>
            <text:p>Oxnar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2.0</text:p>
          </table:table-cell>
          <table:table-cell>
            <text:p>Birmingham</text:p>
          </table:table-cell>
          <table:table-cell>
            <text:p>AL</text:p>
          </table:table-cell>
          <table:table-cell>
            <text:p>195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3.0</text:p>
          </table:table-cell>
          <table:table-cell>
            <text:p>Providence</text:p>
          </table:table-cell>
          <table:table-cell>
            <text:p>RI</text:p>
          </table:table-cell>
          <table:table-cell>
            <text:p>19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4.0</text:p>
          </table:table-cell>
          <table:table-cell>
            <text:p>Montgomery</text:p>
          </table:table-cell>
          <table:table-cell>
            <text:p>AL</text:p>
          </table:table-cell>
          <table:table-cell>
            <text:p>1953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5.0</text:p>
          </table:table-cell>
          <table:table-cell>
            <text:p>Chattanooga</text:p>
          </table:table-cell>
          <table:table-cell>
            <text:p>TN</text:p>
          </table:table-cell>
          <table:table-cell>
            <text:p>1941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6.0</text:p>
          </table:table-cell>
          <table:table-cell>
            <text:p>Brownsville</text:p>
          </table:table-cell>
          <table:table-cell>
            <text:p>TX</text:p>
          </table:table-cell>
          <table:table-cell>
            <text:p>192957</text:p>
          </table:table-cell>
          <table:table-cell>
            <text:p>Robert's Repair Plumbing</text:p>
          </table:table-cell>
          <table:table-cell>
            <text:p>(956) 203-9993</text:p>
          </table:table-cell>
          <table:table-cell>
            <text:p/>
          </table:table-cell>
          <table:table-cell>
            <text:p><text:a xlink:href="https://robertsrepair.com" xlink:type="simple" xlink:actuate="onRequest" office:target-frame="_blank" text:style-name="InternetLink">robertsrepair.com</text:a></text:p>
          </table:table-cell>
          <table:table-cell>
            <text:p>Brownsville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7.0</text:p>
          </table:table-cell>
          <table:table-cell>
            <text:p>Huntington Beach</text:p>
          </table:table-cell>
          <table:table-cell>
            <text:p>CA</text:p>
          </table:table-cell>
          <table:table-cell>
            <text:p>191451</text:p>
          </table:table-cell>
          <table:table-cell>
            <text:p>DeVinney Plumbing, Inc.</text:p>
          </table:table-cell>
          <table:table-cell>
            <text:p>(714) 375-0126</text:p>
          </table:table-cell>
          <table:table-cell>
            <text:p/>
          </table:table-cell>
          <table:table-cell>
            <text:p><text:a xlink:href="https://devinneyplumbing.com" xlink:type="simple" xlink:actuate="onRequest" office:target-frame="_blank" text:style-name="InternetLink">devinneyplumbing.com</text:a></text:p>
          </table:table-cell>
          <table:table-cell>
            <text:p>Huntington Beach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8.0</text:p>
          </table:table-cell>
          <table:table-cell>
            <text:p>Tempe</text:p>
          </table:table-cell>
          <table:table-cell>
            <text:p>AZ</text:p>
          </table:table-cell>
          <table:table-cell>
            <text:p>190571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9.0</text:p>
          </table:table-cell>
          <table:table-cell>
            <text:p>Akron</text:p>
          </table:table-cell>
          <table:table-cell>
            <text:p>OH</text:p>
          </table:table-cell>
          <table:table-cell>
            <text:p>189691</text:p>
          </table:table-cell>
          <table:table-cell>
            <text:p>J&amp;J Plumbing, Heating, Cooling, &amp; Electric</text:p>
          </table:table-cell>
          <table:table-cell>
            <text:p>(330) 967-0147</text:p>
          </table:table-cell>
          <table:table-cell>
            <text:p/>
          </table:table-cell>
          <table:table-cell>
            <text:p><text:a xlink:href="https://jandjplumbing.com" xlink:type="simple" xlink:actuate="onRequest" office:target-frame="_blank" text:style-name="InternetLink">jandjplumbing.com</text:a></text:p>
          </table:table-cell>
          <table:table-cell>
            <text:p>Akron, OH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0.0</text:p>
          </table:table-cell>
          <table:table-cell>
            <text:p>Clarksville</text:p>
          </table:table-cell>
          <table:table-cell>
            <text:p>TN</text:p>
          </table:table-cell>
          <table:table-cell>
            <text:p>188829</text:p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1.0</text:p>
          </table:table-cell>
          <table:table-cell>
            <text:p>Fort Lauderdale</text:p>
          </table:table-cell>
          <table:table-cell>
            <text:p>FL</text:p>
          </table:table-cell>
          <table:table-cell>
            <text:p>188677</text:p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2.0</text:p>
          </table:table-cell>
          <table:table-cell>
            <text:p>Glendale</text:p>
          </table:table-cell>
          <table:table-cell>
            <text:p>CA</text:p>
          </table:table-cell>
          <table:table-cell>
            <text:p>187160</text:p>
          </table:table-cell>
          <table:table-cell>
            <text:p>Morrissey Family Plumbing</text:p>
          </table:table-cell>
          <table:table-cell>
            <text:p>(818) 915-6630</text:p>
          </table:table-cell>
          <table:table-cell>
            <text:p/>
          </table:table-cell>
          <table:table-cell>
            <text:p><text:a xlink:href="https://morrisseyfamily.com" xlink:type="simple" xlink:actuate="onRequest" office:target-frame="_blank" text:style-name="InternetLink">morrisseyfamily.com</text:a></text:p>
          </table:table-cell>
          <table:table-cell>
            <text:p>Glendal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3.0</text:p>
          </table:table-cell>
          <table:table-cell>
            <text:p>Ontario</text:p>
          </table:table-cell>
          <table:table-cell>
            <text:p>CA</text:p>
          </table:table-cell>
          <table:table-cell>
            <text:p>187013</text:p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4.0</text:p>
          </table:table-cell>
          <table:table-cell>
            <text:p>Elk Grove</text:p>
          </table:table-cell>
          <table:table-cell>
            <text:p>CA</text:p>
          </table:table-cell>
          <table:table-cell>
            <text:p>185007</text:p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5.0</text:p>
          </table:table-cell>
          <table:table-cell>
            <text:p>Cary</text:p>
          </table:table-cell>
          <table:table-cell>
            <text:p>NC</text:p>
          </table:table-cell>
          <table:table-cell>
            <text:p>183582</text:p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6.0</text:p>
          </table:table-cell>
          <table:table-cell>
            <text:p>Newport News</text:p>
          </table:table-cell>
          <table:table-cell>
            <text:p>VA</text:p>
          </table:table-cell>
          <table:table-cell>
            <text:p>183230</text:p>
          </table:table-cell>
          <table:table-cell>
            <text:p>Blair's Plumbing Repair &amp; Drains</text:p>
          </table:table-cell>
          <table:table-cell>
            <text:p>(757) 719-1236</text:p>
          </table:table-cell>
          <table:table-cell>
            <text:p/>
          </table:table-cell>
          <table:table-cell>
            <text:p><text:a xlink:href="https://blairsplumbingrepair.com" xlink:type="simple" xlink:actuate="onRequest" office:target-frame="_blank" text:style-name="InternetLink">blairsplumbingrepair.com</text:a></text:p>
          </table:table-cell>
          <table:table-cell>
            <text:p>Newport News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7.0</text:p>
          </table:table-cell>
          <table:table-cell>
            <text:p>Salem</text:p>
          </table:table-cell>
          <table:table-cell>
            <text:p>OR</text:p>
          </table:table-cell>
          <table:table-cell>
            <text:p>181779</text:p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8.0</text:p>
          </table:table-cell>
          <table:table-cell>
            <text:p>Aurora</text:p>
          </table:table-cell>
          <table:table-cell>
            <text:p>IL</text:p>
          </table:table-cell>
          <table:table-cell>
            <text:p>181505</text:p>
          </table:table-cell>
          <table:table-cell>
            <text:p>Michels Plumbing Inc</text:p>
          </table:table-cell>
          <table:table-cell>
            <text:p>(630) 801-9700</text:p>
          </table:table-cell>
          <table:table-cell>
            <text:p/>
          </table:table-cell>
          <table:table-cell>
            <text:p><text:a xlink:href="https://michelsplumbing.com" xlink:type="simple" xlink:actuate="onRequest" office:target-frame="_blank" text:style-name="InternetLink">michelsplumbing.com</text:a></text:p>
          </table:table-cell>
          <table:table-cell>
            <text:p>Aurora, I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9.0</text:p>
          </table:table-cell>
          <table:table-cell>
            <text:p>Santa Rosa</text:p>
          </table:table-cell>
          <table:table-cell>
            <text:p>CA</text:p>
          </table:table-cell>
          <table:table-cell>
            <text:p>179437</text:p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0.0</text:p>
          </table:table-cell>
          <table:table-cell>
            <text:p>Eugene</text:p>
          </table:table-cell>
          <table:table-cell>
            <text:p>OR</text:p>
          </table:table-cell>
          <table:table-cell>
            <text:p>178618</text:p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1.0</text:p>
          </table:table-cell>
          <table:table-cell>
            <text:p>Rancho Cucamonga</text:p>
          </table:table-cell>
          <table:table-cell>
            <text:p>CA</text:p>
          </table:table-cell>
          <table:table-cell>
            <text:p>177856</text:p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2.0</text:p>
          </table:table-cell>
          <table:table-cell>
            <text:p>Pembroke Pines</text:p>
          </table:table-cell>
          <table:table-cell>
            <text:p>FL</text:p>
          </table:table-cell>
          <table:table-cell>
            <text:p>176714</text:p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3.0</text:p>
          </table:table-cell>
          <table:table-cell>
            <text:p>Shreveport</text:p>
          </table:table-cell>
          <table:table-cell>
            <text:p>LA</text:p>
          </table:table-cell>
          <table:table-cell>
            <text:p>175902</text:p>
          </table:table-cell>
          <table:table-cell>
            <text:p>Bobby L. Greene Plumbing</text:p>
          </table:table-cell>
          <table:table-cell>
            <text:p>(318) 929-6574</text:p>
          </table:table-cell>
          <table:table-cell>
            <text:p/>
          </table:table-cell>
          <table:table-cell>
            <text:p/>
          </table:table-cell>
          <table:table-cell>
            <text:p>Shreveport, L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4.0</text:p>
          </table:table-cell>
          <table:table-cell>
            <text:p>Surprise</text:p>
          </table:table-cell>
          <table:table-cell>
            <text:p>AZ</text:p>
          </table:table-cell>
          <table:table-cell>
            <text:p>175304</text:p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5.0</text:p>
          </table:table-cell>
          <table:table-cell>
            <text:p>Fort Collins</text:p>
          </table:table-cell>
          <table:table-cell>
            <text:p>CO</text:p>
          </table:table-cell>
          <table:table-cell>
            <text:p>171500</text:p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6.0</text:p>
          </table:table-cell>
          <table:table-cell>
            <text:p>Murfreesboro</text:p>
          </table:table-cell>
          <table:table-cell>
            <text:p>TN</text:p>
          </table:table-cell>
          <table:table-cell>
            <text:p>171178</text:p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7.0</text:p>
          </table:table-cell>
          <table:table-cell>
            <text:p>Oceanside</text:p>
          </table:table-cell>
          <table:table-cell>
            <text:p>CA</text:p>
          </table:table-cell>
          <table:table-cell>
            <text:p>170483</text:p>
          </table:table-cell>
          <table:table-cell>
            <text:p>Parmley Plumbing</text:p>
          </table:table-cell>
          <table:table-cell>
            <text:p>(858) 229-3341</text:p>
          </table:table-cell>
          <table:table-cell>
            <text:p/>
          </table:table-cell>
          <table:table-cell>
            <text:p><text:a xlink:href="https://parmleyplumbing.com" xlink:type="simple" xlink:actuate="onRequest" office:target-frame="_blank" text:style-name="InternetLink">parmleyplumbing.com</text:a></text:p>
          </table:table-cell>
          <table:table-cell>
            <text:p>Ocean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8.0</text:p>
          </table:table-cell>
          <table:table-cell>
            <text:p>Garden Grove</text:p>
          </table:table-cell>
          <table:table-cell>
            <text:p>CA</text:p>
          </table:table-cell>
          <table:table-cell>
            <text:p>170455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9.0</text:p>
          </table:table-cell>
          <table:table-cell>
            <text:p>Lancaster</text:p>
          </table:table-cell>
          <table:table-cell>
            <text:p>CA</text:p>
          </table:table-cell>
          <table:table-cell>
            <text:p>1700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0.0</text:p>
          </table:table-cell>
          <table:table-cell>
            <text:p>Springfield</text:p>
          </table:table-cell>
          <table:table-cell>
            <text:p>MO</text:p>
          </table:table-cell>
          <table:table-cell>
            <text:p>169847</text:p>
          </table:table-cell>
          <table:table-cell>
            <text:p>Junior's Plumbing LLC</text:p>
          </table:table-cell>
          <table:table-cell>
            <text:p>(417) 655-0536</text:p>
          </table:table-cell>
          <table:table-cell>
            <text:p/>
          </table:table-cell>
          <table:table-cell>
            <text:p><text:a xlink:href="https://juniorsplumbingmo.com/" xlink:type="simple" xlink:actuate="onRequest" office:target-frame="_blank" text:style-name="InternetLink">https://juniorsplumbingmo.com/</text:a></text:p>
          </table:table-cell>
          <table:table-cell>
            <text:p>7325 E Divisio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1.0</text:p>
          </table:table-cell>
          <table:table-cell>
            <text:p>Denton</text:p>
          </table:table-cell>
          <table:table-cell>
            <text:p>TX</text:p>
          </table:table-cell>
          <table:table-cell>
            <text:p>169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2.0</text:p>
          </table:table-cell>
          <table:table-cell>
            <text:p>Roseville</text:p>
          </table:table-cell>
          <table:table-cell>
            <text:p>CA</text:p>
          </table:table-cell>
          <table:table-cell>
            <text:p>1673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3.0</text:p>
          </table:table-cell>
          <table:table-cell>
            <text:p>Killeen</text:p>
          </table:table-cell>
          <table:table-cell>
            <text:p>TX</text:p>
          </table:table-cell>
          <table:table-cell>
            <text:p>161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4.0</text:p>
          </table:table-cell>
          <table:table-cell>
            <text:p>Palmdale</text:p>
          </table:table-cell>
          <table:table-cell>
            <text:p>CA</text:p>
          </table:table-cell>
          <table:table-cell>
            <text:p>1618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5.0</text:p>
          </table:table-cell>
          <table:table-cell>
            <text:p>Paterson</text:p>
          </table:table-cell>
          <table:table-cell>
            <text:p>NJ</text:p>
          </table:table-cell>
          <table:table-cell>
            <text:p>1617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6.0</text:p>
          </table:table-cell>
          <table:table-cell>
            <text:p>Corona</text:p>
          </table:table-cell>
          <table:table-cell>
            <text:p>CA</text:p>
          </table:table-cell>
          <table:table-cell>
            <text:p>1617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7.0</text:p>
          </table:table-cell>
          <table:table-cell>
            <text:p>Alexandria</text:p>
          </table:table-cell>
          <table:table-cell>
            <text:p>VA</text:p>
          </table:table-cell>
          <table:table-cell>
            <text:p>160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8.0</text:p>
          </table:table-cell>
          <table:table-cell>
            <text:p>Charleston</text:p>
          </table:table-cell>
          <table:table-cell>
            <text:p>SC</text:p>
          </table:table-cell>
          <table:table-cell>
            <text:p>159423</text:p>
          </table:table-cell>
          <table:table-cell>
            <text:p>Plumb Easy</text:p>
          </table:table-cell>
          <table:table-cell>
            <text:p>(843) 270-3983</text:p>
          </table:table-cell>
          <table:table-cell>
            <text:p/>
          </table:table-cell>
          <table:table-cell>
            <text:p><text:a xlink:href="https://plumbeasy.com/" xlink:type="simple" xlink:actuate="onRequest" office:target-frame="_blank" text:style-name="InternetLink">https://plumbeasy.com/</text:a></text:p>
          </table:table-cell>
          <table:table-cell>
            <text:p>1212 Wappoo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9.0</text:p>
          </table:table-cell>
          <table:table-cell>
            <text:p>Salinas</text:p>
          </table:table-cell>
          <table:table-cell>
            <text:p>CA</text:p>
          </table:table-cell>
          <table:table-cell>
            <text:p>159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0.0</text:p>
          </table:table-cell>
          <table:table-cell>
            <text:p>Kansas City</text:p>
          </table:table-cell>
          <table:table-cell>
            <text:p>KS</text:p>
          </table:table-cell>
          <table:table-cell>
            <text:p>1578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1.0</text:p>
          </table:table-cell>
          <table:table-cell>
            <text:p>Macon-Bibb County</text:p>
          </table:table-cell>
          <table:table-cell>
            <text:p>GA</text:p>
          </table:table-cell>
          <table:table-cell>
            <text:p>157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2.0</text:p>
          </table:table-cell>
          <table:table-cell>
            <text:p>Hayward</text:p>
          </table:table-cell>
          <table:table-cell>
            <text:p>CA</text:p>
          </table:table-cell>
          <table:table-cell>
            <text:p>157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3.0</text:p>
          </table:table-cell>
          <table:table-cell>
            <text:p>Hollywood</text:p>
          </table:table-cell>
          <table:table-cell>
            <text:p>FL</text:p>
          </table:table-cell>
          <table:table-cell>
            <text:p>1570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4.0</text:p>
          </table:table-cell>
          <table:table-cell>
            <text:p>Lakewood</text:p>
          </table:table-cell>
          <table:table-cell>
            <text:p>CO</text:p>
          </table:table-cell>
          <table:table-cell>
            <text:p>156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5.0</text:p>
          </table:table-cell>
          <table:table-cell>
            <text:p>Sunnyvale</text:p>
          </table:table-cell>
          <table:table-cell>
            <text:p>CA</text:p>
          </table:table-cell>
          <table:table-cell>
            <text:p>1565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6.0</text:p>
          </table:table-cell>
          <table:table-cell>
            <text:p>Springfield</text:p>
          </table:table-cell>
          <table:table-cell>
            <text:p>MA</text:p>
          </table:table-cell>
          <table:table-cell>
            <text:p>1547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7.0</text:p>
          </table:table-cell>
          <table:table-cell>
            <text:p>Bellevue</text:p>
          </table:table-cell>
          <table:table-cell>
            <text:p>WA</text:p>
          </table:table-cell>
          <table:table-cell>
            <text:p>15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8.0</text:p>
          </table:table-cell>
          <table:table-cell>
            <text:p>Naperville</text:p>
          </table:table-cell>
          <table:table-cell>
            <text:p>IL</text:p>
          </table:table-cell>
          <table:table-cell>
            <text:p>1531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9.0</text:p>
          </table:table-cell>
          <table:table-cell>
            <text:p>Bridgeport</text:p>
          </table:table-cell>
          <table:table-cell>
            <text:p>CT</text:p>
          </table:table-cell>
          <table:table-cell>
            <text:p>1522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0.0</text:p>
          </table:table-cell>
          <table:table-cell>
            <text:p>Joliet</text:p>
          </table:table-cell>
          <table:table-cell>
            <text:p>IL</text:p>
          </table:table-cell>
          <table:table-cell>
            <text:p>1522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1.0</text:p>
          </table:table-cell>
          <table:table-cell>
            <text:p>Mesquite</text:p>
          </table:table-cell>
          <table:table-cell>
            <text:p>TX</text:p>
          </table:table-cell>
          <table:table-cell>
            <text:p>15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2.0</text:p>
          </table:table-cell>
          <table:table-cell>
            <text:p>McAllen</text:p>
          </table:table-cell>
          <table:table-cell>
            <text:p>TX</text:p>
          </table:table-cell>
          <table:table-cell>
            <text:p>15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3.0</text:p>
          </table:table-cell>
          <table:table-cell>
            <text:p>Olathe</text:p>
          </table:table-cell>
          <table:table-cell>
            <text:p>KS</text:p>
          </table:table-cell>
          <table:table-cell>
            <text:p>1500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4.0</text:p>
          </table:table-cell>
          <table:table-cell>
            <text:p>Savannah</text:p>
          </table:table-cell>
          <table:table-cell>
            <text:p>GA</text:p>
          </table:table-cell>
          <table:table-cell>
            <text:p>1494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5.0</text:p>
          </table:table-cell>
          <table:table-cell>
            <text:p>Gainesville</text:p>
          </table:table-cell>
          <table:table-cell>
            <text:p>FL</text:p>
          </table:table-cell>
          <table:table-cell>
            <text:p>1486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6.0</text:p>
          </table:table-cell>
          <table:table-cell>
            <text:p>Pasadena</text:p>
          </table:table-cell>
          <table:table-cell>
            <text:p>TX</text:p>
          </table:table-cell>
          <table:table-cell>
            <text:p>148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7.0</text:p>
          </table:table-cell>
          <table:table-cell>
            <text:p>Palm Bay</text:p>
          </table:table-cell>
          <table:table-cell>
            <text:p>FL</text:p>
          </table:table-cell>
          <table:table-cell>
            <text:p>148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8.0</text:p>
          </table:table-cell>
          <table:table-cell>
            <text:p>Pomona</text:p>
          </table:table-cell>
          <table:table-cell>
            <text:p>CA</text:p>
          </table:table-cell>
          <table:table-cell>
            <text:p>14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9.0</text:p>
          </table:table-cell>
          <table:table-cell>
            <text:p>Waco</text:p>
          </table:table-cell>
          <table:table-cell>
            <text:p>TX</text:p>
          </table:table-cell>
          <table:table-cell>
            <text:p>1477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0.0</text:p>
          </table:table-cell>
          <table:table-cell>
            <text:p>Thornton</text:p>
          </table:table-cell>
          <table:table-cell>
            <text:p>CO</text:p>
          </table:table-cell>
          <table:table-cell>
            <text:p>1477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1.0</text:p>
          </table:table-cell>
          <table:table-cell>
            <text:p>Midland</text:p>
          </table:table-cell>
          <table:table-cell>
            <text:p>TX</text:p>
          </table:table-cell>
          <table:table-cell>
            <text:p>1476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2.0</text:p>
          </table:table-cell>
          <table:table-cell>
            <text:p>Rockford</text:p>
          </table:table-cell>
          <table:table-cell>
            <text:p>IL</text:p>
          </table:table-cell>
          <table:table-cell>
            <text:p>1473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3.0</text:p>
          </table:table-cell>
          <table:table-cell>
            <text:p>Columbia</text:p>
          </table:table-cell>
          <table:table-cell>
            <text:p>SC</text:p>
          </table:table-cell>
          <table:table-cell>
            <text:p>147035</text:p>
          </table:table-cell>
          <table:table-cell>
            <text:p>Franklin Plumbing &amp; Drain Cleaning</text:p>
          </table:table-cell>
          <table:table-cell>
            <text:p>(803) 515-7753</text:p>
          </table:table-cell>
          <table:table-cell>
            <text:p/>
          </table:table-cell>
          <table:table-cell>
            <text:p><text:a xlink:href="https://www.franklinplumbingsc.com/" xlink:type="simple" xlink:actuate="onRequest" office:target-frame="_blank" text:style-name="InternetLink">https://www.franklinplumbingsc.com/</text:a></text:p>
          </table:table-cell>
          <table:table-cell>
            <text:p>3004 Millwood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4.0</text:p>
          </table:table-cell>
          <table:table-cell>
            <text:p>Visalia</text:p>
          </table:table-cell>
          <table:table-cell>
            <text:p>CA</text:p>
          </table:table-cell>
          <table:table-cell>
            <text:p>1465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5.0</text:p>
          </table:table-cell>
          <table:table-cell>
            <text:p>Escondido</text:p>
          </table:table-cell>
          <table:table-cell>
            <text:p>CA</text:p>
          </table:table-cell>
          <table:table-cell>
            <text:p>146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6.0</text:p>
          </table:table-cell>
          <table:table-cell>
            <text:p>Syracuse</text:p>
          </table:table-cell>
          <table:table-cell>
            <text:p>NY</text:p>
          </table:table-cell>
          <table:table-cell>
            <text:p>1448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7.0</text:p>
          </table:table-cell>
          <table:table-cell>
            <text:p>Meridian</text:p>
          </table:table-cell>
          <table:table-cell>
            <text:p>ID</text:p>
          </table:table-cell>
          <table:table-cell>
            <text:p>14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8.0</text:p>
          </table:table-cell>
          <table:table-cell>
            <text:p>Miramar</text:p>
          </table:table-cell>
          <table:table-cell>
            <text:p>FL</text:p>
          </table:table-cell>
          <table:table-cell>
            <text:p>1425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9.0</text:p>
          </table:table-cell>
          <table:table-cell>
            <text:p>Elizabeth</text:p>
          </table:table-cell>
          <table:table-cell>
            <text:p>NJ</text:p>
          </table:table-cell>
          <table:table-cell>
            <text:p>14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0.0</text:p>
          </table:table-cell>
          <table:table-cell>
            <text:p>Victorville</text:p>
          </table:table-cell>
          <table:table-cell>
            <text:p>CA</text:p>
          </table:table-cell>
          <table:table-cell>
            <text:p>141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1.0</text:p>
          </table:table-cell>
          <table:table-cell>
            <text:p>Round Rock</text:p>
          </table:table-cell>
          <table:table-cell>
            <text:p>TX</text:p>
          </table:table-cell>
          <table:table-cell>
            <text:p>141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.0</text:p>
          </table:table-cell>
          <table:table-cell>
            <text:p>Jackson</text:p>
          </table:table-cell>
          <table:table-cell>
            <text:p>MS</text:p>
          </table:table-cell>
          <table:table-cell>
            <text:p>141196</text:p>
          </table:table-cell>
          <table:table-cell>
            <text:p>Mississippi Plumbing Solutions - Formerly Reid Plumbing</text:p>
          </table:table-cell>
          <table:table-cell>
            <text:p>(601) 850-1828</text:p>
          </table:table-cell>
          <table:table-cell>
            <text:p/>
          </table:table-cell>
          <table:table-cell>
            <text:p><text:a xlink:href="http://msplumbingsolutions.com/" xlink:type="simple" xlink:actuate="onRequest" office:target-frame="_blank" text:style-name="InternetLink">http://msplumbingsolutions.com/</text:a></text:p>
          </table:table-cell>
          <table:table-cell>
            <text:p>1775 Lelia Dr 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3.0</text:p>
          </table:table-cell>
          <table:table-cell>
            <text:p>Stamford</text:p>
          </table:table-cell>
          <table:table-cell>
            <text:p>CT</text:p>
          </table:table-cell>
          <table:table-cell>
            <text:p>139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4.0</text:p>
          </table:table-cell>
          <table:table-cell>
            <text:p>Lewisville</text:p>
          </table:table-cell>
          <table:table-cell>
            <text:p>TX</text:p>
          </table:table-cell>
          <table:table-cell>
            <text:p>1390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5.0</text:p>
          </table:table-cell>
          <table:table-cell>
            <text:p>Coral Springs</text:p>
          </table:table-cell>
          <table:table-cell>
            <text:p>FL</text:p>
          </table:table-cell>
          <table:table-cell>
            <text:p>1387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6.0</text:p>
          </table:table-cell>
          <table:table-cell>
            <text:p>New Haven</text:p>
          </table:table-cell>
          <table:table-cell>
            <text:p>CT</text:p>
          </table:table-cell>
          <table:table-cell>
            <text:p>1387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7.0</text:p>
          </table:table-cell>
          <table:table-cell>
            <text:p>Fullerton</text:p>
          </table:table-cell>
          <table:table-cell>
            <text:p>CA</text:p>
          </table:table-cell>
          <table:table-cell>
            <text:p>138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8.0</text:p>
          </table:table-cell>
          <table:table-cell>
            <text:p>Torrance</text:p>
          </table:table-cell>
          <table:table-cell>
            <text:p>CA</text:p>
          </table:table-cell>
          <table:table-cell>
            <text:p>138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9.0</text:p>
          </table:table-cell>
          <table:table-cell>
            <text:p>Orange</text:p>
          </table:table-cell>
          <table:table-cell>
            <text:p>CA</text:p>
          </table:table-cell>
          <table:table-cell>
            <text:p>138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0.0</text:p>
          </table:table-cell>
          <table:table-cell>
            <text:p>Cedar Rapids</text:p>
          </table:table-cell>
          <table:table-cell>
            <text:p>IA</text:p>
          </table:table-cell>
          <table:table-cell>
            <text:p>1379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1.0</text:p>
          </table:table-cell>
          <table:table-cell>
            <text:p>West Valley City</text:p>
          </table:table-cell>
          <table:table-cell>
            <text:p>UT</text:p>
          </table:table-cell>
          <table:table-cell>
            <text:p>1374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2.0</text:p>
          </table:table-cell>
          <table:table-cell>
            <text:p>Hampton</text:p>
          </table:table-cell>
          <table:table-cell>
            <text:p>VA</text:p>
          </table:table-cell>
          <table:table-cell>
            <text:p>1373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3.0</text:p>
          </table:table-cell>
          <table:table-cell>
            <text:p>Warren</text:p>
          </table:table-cell>
          <table:table-cell>
            <text:p>MI</text:p>
          </table:table-cell>
          <table:table-cell>
            <text:p>1371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4.0</text:p>
          </table:table-cell>
          <table:table-cell>
            <text:p>Dayton</text:p>
          </table:table-cell>
          <table:table-cell>
            <text:p>OH</text:p>
          </table:table-cell>
          <table:table-cell>
            <text:p>136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5.0</text:p>
          </table:table-cell>
          <table:table-cell>
            <text:p>Fargo</text:p>
          </table:table-cell>
          <table:table-cell>
            <text:p>ND</text:p>
          </table:table-cell>
          <table:table-cell>
            <text:p>136275</text:p>
          </table:table-cell>
          <table:table-cell>
            <text:p>LEGACY PLUMBING &amp; HEATING</text:p>
          </table:table-cell>
          <table:table-cell>
            <text:p>(701) 306-3375</text:p>
          </table:table-cell>
          <table:table-cell>
            <text:p/>
          </table:table-cell>
          <table:table-cell>
            <text:p><text:a xlink:href="https://www.legacyplumbingfm.com/" xlink:type="simple" xlink:actuate="onRequest" office:target-frame="_blank" text:style-name="InternetLink">https://www.legacyplumbingfm.com/</text:a></text:p>
          </table:table-cell>
          <table:table-cell>
            <text:p>3522 4th Ave 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6.0</text:p>
          </table:table-cell>
          <table:table-cell>
            <text:p>Pasadena</text:p>
          </table:table-cell>
          <table:table-cell>
            <text:p>CA</text:p>
          </table:table-cell>
          <table:table-cell>
            <text:p>13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7.0</text:p>
          </table:table-cell>
          <table:table-cell>
            <text:p>Kent</text:p>
          </table:table-cell>
          <table:table-cell>
            <text:p>WA</text:p>
          </table:table-cell>
          <table:table-cell>
            <text:p>134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8.0</text:p>
          </table:table-cell>
          <table:table-cell>
            <text:p>Carrollton</text:p>
          </table:table-cell>
          <table:table-cell>
            <text:p>TX</text:p>
          </table:table-cell>
          <table:table-cell>
            <text:p>134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9.0</text:p>
          </table:table-cell>
          <table:table-cell>
            <text:p>Sterling Heights</text:p>
          </table:table-cell>
          <table:table-cell>
            <text:p>MI</text:p>
          </table:table-cell>
          <table:table-cell>
            <text:p>1339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0.0</text:p>
          </table:table-cell>
          <table:table-cell>
            <text:p>Santa Clara</text:p>
          </table:table-cell>
          <table:table-cell>
            <text:p>CA</text:p>
          </table:table-cell>
          <table:table-cell>
            <text:p>133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1.0</text:p>
          </table:table-cell>
          <table:table-cell>
            <text:p>Abilene</text:p>
          </table:table-cell>
          <table:table-cell>
            <text:p>TX</text:p>
          </table:table-cell>
          <table:table-cell>
            <text:p>131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2.0</text:p>
          </table:table-cell>
          <table:table-cell>
            <text:p>Norman</text:p>
          </table:table-cell>
          <table:table-cell>
            <text:p>OK</text:p>
          </table:table-cell>
          <table:table-cell>
            <text:p>130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3.0</text:p>
          </table:table-cell>
          <table:table-cell>
            <text:p>Columbia</text:p>
          </table:table-cell>
          <table:table-cell>
            <text:p>MO</text:p>
          </table:table-cell>
          <table:table-cell>
            <text:p>130851</text:p>
          </table:table-cell>
          <table:table-cell>
            <text:p>Brian Wear Plumbing &amp; Restoration</text:p>
          </table:table-cell>
          <table:table-cell>
            <text:p>(573) 864-4463</text:p>
          </table:table-cell>
          <table:table-cell>
            <text:p/>
          </table:table-cell>
          <table:table-cell>
            <text:p><text:a xlink:href="https://brianwearplumbing.com/" xlink:type="simple" xlink:actuate="onRequest" office:target-frame="_blank" text:style-name="InternetLink">https://brianwearplumbing.com/</text:a></text:p>
          </table:table-cell>
          <table:table-cell>
            <text:p>2501 Rangeline St Suite B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4.0</text:p>
          </table:table-cell>
          <table:table-cell>
            <text:p>Pearland</text:p>
          </table:table-cell>
          <table:table-cell>
            <text:p>TX</text:p>
          </table:table-cell>
          <table:table-cell>
            <text:p>129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5.0</text:p>
          </table:table-cell>
          <table:table-cell>
            <text:p>Athens</text:p>
          </table:table-cell>
          <table:table-cell>
            <text:p>GA</text:p>
          </table:table-cell>
          <table:table-cell>
            <text:p>129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6.0</text:p>
          </table:table-cell>
          <table:table-cell>
            <text:p>Clovis</text:p>
          </table:table-cell>
          <table:table-cell>
            <text:p>CA</text:p>
          </table:table-cell>
          <table:table-cell>
            <text:p>129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7.0</text:p>
          </table:table-cell>
          <table:table-cell>
            <text:p>North Charleston</text:p>
          </table:table-cell>
          <table:table-cell>
            <text:p>SC</text:p>
          </table:table-cell>
          <table:table-cell>
            <text:p>1292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8.0</text:p>
          </table:table-cell>
          <table:table-cell>
            <text:p>College Station</text:p>
          </table:table-cell>
          <table:table-cell>
            <text:p>TX</text:p>
          </table:table-cell>
          <table:table-cell>
            <text:p>1274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9.0</text:p>
          </table:table-cell>
          <table:table-cell>
            <text:p>West Palm Beach</text:p>
          </table:table-cell>
          <table:table-cell>
            <text:p>FL</text:p>
          </table:table-cell>
          <table:table-cell>
            <text:p>127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0.0</text:p>
          </table:table-cell>
          <table:table-cell>
            <text:p>Wilmington</text:p>
          </table:table-cell>
          <table:table-cell>
            <text:p>NC</text:p>
          </table:table-cell>
          <table:table-cell>
            <text:p>126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1.0</text:p>
          </table:table-cell>
          <table:table-cell>
            <text:p>Allentown</text:p>
          </table:table-cell>
          <table:table-cell>
            <text:p>PA</text:p>
          </table:table-cell>
          <table:table-cell>
            <text:p>1260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2.0</text:p>
          </table:table-cell>
          <table:table-cell>
            <text:p>Topeka</text:p>
          </table:table-cell>
          <table:table-cell>
            <text:p>KS</text:p>
          </table:table-cell>
          <table:table-cell>
            <text:p>1257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3.0</text:p>
          </table:table-cell>
          <table:table-cell>
            <text:p>Lakeland</text:p>
          </table:table-cell>
          <table:table-cell>
            <text:p>FL</text:p>
          </table:table-cell>
          <table:table-cell>
            <text:p>1255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4.0</text:p>
          </table:table-cell>
          <table:table-cell>
            <text:p>Buckeye</text:p>
          </table:table-cell>
          <table:table-cell>
            <text:p>AZ</text:p>
          </table:table-cell>
          <table:table-cell>
            <text:p>1254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5.0</text:p>
          </table:table-cell>
          <table:table-cell>
            <text:p>Goodyear</text:p>
          </table:table-cell>
          <table:table-cell>
            <text:p>AZ</text:p>
          </table:table-cell>
          <table:table-cell>
            <text:p>1253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6.0</text:p>
          </table:table-cell>
          <table:table-cell>
            <text:p>Broken Arrow</text:p>
          </table:table-cell>
          <table:table-cell>
            <text:p>OK</text:p>
          </table:table-cell>
          <table:table-cell>
            <text:p>124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7.0</text:p>
          </table:table-cell>
          <table:table-cell>
            <text:p>Simi Valley</text:p>
          </table:table-cell>
          <table:table-cell>
            <text:p>CA</text:p>
          </table:table-cell>
          <table:table-cell>
            <text:p>12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8.0</text:p>
          </table:table-cell>
          <table:table-cell>
            <text:p>Rochester</text:p>
          </table:table-cell>
          <table:table-cell>
            <text:p>MN</text:p>
          </table:table-cell>
          <table:table-cell>
            <text:p>1242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9.0</text:p>
          </table:table-cell>
          <table:table-cell>
            <text:p>Lafayette</text:p>
          </table:table-cell>
          <table:table-cell>
            <text:p>LA</text:p>
          </table:table-cell>
          <table:table-cell>
            <text:p>123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0.0</text:p>
          </table:table-cell>
          <table:table-cell>
            <text:p>Vallejo</text:p>
          </table:table-cell>
          <table:table-cell>
            <text:p>CA</text:p>
          </table:table-cell>
          <table:table-cell>
            <text:p>1232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1.0</text:p>
          </table:table-cell>
          <table:table-cell>
            <text:p>Concord</text:p>
          </table:table-cell>
          <table:table-cell>
            <text:p>CA</text:p>
          </table:table-cell>
          <table:table-cell>
            <text:p>123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2.0</text:p>
          </table:table-cell>
          <table:table-cell>
            <text:p>Arvada</text:p>
          </table:table-cell>
          <table:table-cell>
            <text:p>CO</text:p>
          </table:table-cell>
          <table:table-cell>
            <text:p>122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3.0</text:p>
          </table:table-cell>
          <table:table-cell>
            <text:p>Odessa</text:p>
          </table:table-cell>
          <table:table-cell>
            <text:p>TX</text:p>
          </table:table-cell>
          <table:table-cell>
            <text:p>1227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4.0</text:p>
          </table:table-cell>
          <table:table-cell>
            <text:p>Cambridge</text:p>
          </table:table-cell>
          <table:table-cell>
            <text:p>MA</text:p>
          </table:table-cell>
          <table:table-cell>
            <text:p>122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5.0</text:p>
          </table:table-cell>
          <table:table-cell>
            <text:p>New Braunfels</text:p>
          </table:table-cell>
          <table:table-cell>
            <text:p>TX</text:p>
          </table:table-cell>
          <table:table-cell>
            <text:p>122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6.0</text:p>
          </table:table-cell>
          <table:table-cell>
            <text:p>Fairfield</text:p>
          </table:table-cell>
          <table:table-cell>
            <text:p>CA</text:p>
          </table:table-cell>
          <table:table-cell>
            <text:p>122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7.0</text:p>
          </table:table-cell>
          <table:table-cell>
            <text:p>Ann Arbor</text:p>
          </table:table-cell>
          <table:table-cell>
            <text:p>MI</text:p>
          </table:table-cell>
          <table:table-cell>
            <text:p>1222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8.0</text:p>
          </table:table-cell>
          <table:table-cell>
            <text:p>Thousand Oaks</text:p>
          </table:table-cell>
          <table:table-cell>
            <text:p>CA</text:p>
          </table:table-cell>
          <table:table-cell>
            <text:p>122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9.0</text:p>
          </table:table-cell>
          <table:table-cell>
            <text:p>Hartford</text:p>
          </table:table-cell>
          <table:table-cell>
            <text:p>CT</text:p>
          </table:table-cell>
          <table:table-cell>
            <text:p>121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0.0</text:p>
          </table:table-cell>
          <table:table-cell>
            <text:p>Berkeley</text:p>
          </table:table-cell>
          <table:table-cell>
            <text:p>CA</text:p>
          </table:table-cell>
          <table:table-cell>
            <text:p>121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1.0</text:p>
          </table:table-cell>
          <table:table-cell>
            <text:p>Independence</text:p>
          </table:table-cell>
          <table:table-cell>
            <text:p>MO</text:p>
          </table:table-cell>
          <table:table-cell>
            <text:p>12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2.0</text:p>
          </table:table-cell>
          <table:table-cell>
            <text:p>Billings</text:p>
          </table:table-cell>
          <table:table-cell>
            <text:p>MT</text:p>
          </table:table-cell>
          <table:table-cell>
            <text:p>121239</text:p>
          </table:table-cell>
          <table:table-cell>
            <text:p>Rimrock Plumbing</text:p>
          </table:table-cell>
          <table:table-cell>
            <text:p>(406) 855-7131</text:p>
          </table:table-cell>
          <table:table-cell>
            <text:p/>
          </table:table-cell>
          <table:table-cell>
            <text:p><text:a xlink:href="http://rimrockplumbing.com/" xlink:type="simple" xlink:actuate="onRequest" office:target-frame="_blank" text:style-name="InternetLink">http://rimrockplumbing.com/</text:a></text:p>
          </table:table-cell>
          <table:table-cell>
            <text:p>3419 Central Ave Suite C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3.0</text:p>
          </table:table-cell>
          <table:table-cell>
            <text:p>High Point</text:p>
          </table:table-cell>
          <table:table-cell>
            <text:p>NC</text:p>
          </table:table-cell>
          <table:table-cell>
            <text:p>12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4.0</text:p>
          </table:table-cell>
          <table:table-cell>
            <text:p>Nampa</text:p>
          </table:table-cell>
          <table:table-cell>
            <text:p>ID</text:p>
          </table:table-cell>
          <table:table-cell>
            <text:p>120384</text:p>
          </table:table-cell>
          <table:table-cell>
            <text:p>Dillon Plumbing</text:p>
          </table:table-cell>
          <table:table-cell>
            <text:p>(208) 466-3707</text:p>
          </table:table-cell>
          <table:table-cell>
            <text:p/>
          </table:table-cell>
          <table:table-cell>
            <text:p><text:a xlink:href="http://www.dillonplumbing.com/" xlink:type="simple" xlink:actuate="onRequest" office:target-frame="_blank" text:style-name="InternetLink">http://www.dillonplumbing.com/</text:a></text:p>
          </table:table-cell>
          <table:table-cell>
            <text:p>605 E Hawai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5.0</text:p>
          </table:table-cell>
          <table:table-cell>
            <text:p>Lowell</text:p>
          </table:table-cell>
          <table:table-cell>
            <text:p>MA</text:p>
          </table:table-cell>
          <table:table-cell>
            <text:p>1199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6.0</text:p>
          </table:table-cell>
          <table:table-cell>
            <text:p>League City</text:p>
          </table:table-cell>
          <table:table-cell>
            <text:p>TX</text:p>
          </table:table-cell>
          <table:table-cell>
            <text:p>11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7.0</text:p>
          </table:table-cell>
          <table:table-cell>
            <text:p>Conroe</text:p>
          </table:table-cell>
          <table:table-cell>
            <text:p>TX</text:p>
          </table:table-cell>
          <table:table-cell>
            <text:p>1195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8.0</text:p>
          </table:table-cell>
          <table:table-cell>
            <text:p>Antioch</text:p>
          </table:table-cell>
          <table:table-cell>
            <text:p>CA</text:p>
          </table:table-cell>
          <table:table-cell>
            <text:p>1189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9.0</text:p>
          </table:table-cell>
          <table:table-cell>
            <text:p>Menifee</text:p>
          </table:table-cell>
          <table:table-cell>
            <text:p>CA</text:p>
          </table:table-cell>
          <table:table-cell>
            <text:p>1185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0.0</text:p>
          </table:table-cell>
          <table:table-cell>
            <text:p>Richardson</text:p>
          </table:table-cell>
          <table:table-cell>
            <text:p>TX</text:p>
          </table:table-cell>
          <table:table-cell>
            <text:p>118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1.0</text:p>
          </table:table-cell>
          <table:table-cell>
            <text:p>Pompano Beach</text:p>
          </table:table-cell>
          <table:table-cell>
            <text:p>FL</text:p>
          </table:table-cell>
          <table:table-cell>
            <text:p>117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2.0</text:p>
          </table:table-cell>
          <table:table-cell>
            <text:p>Las Cruces</text:p>
          </table:table-cell>
          <table:table-cell>
            <text:p>NM</text:p>
          </table:table-cell>
          <table:table-cell>
            <text:p>116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3.0</text:p>
          </table:table-cell>
          <table:table-cell>
            <text:p>Manchester</text:p>
          </table:table-cell>
          <table:table-cell>
            <text:p>NH</text:p>
          </table:table-cell>
          <table:table-cell>
            <text:p>116818</text:p>
          </table:table-cell>
          <table:table-cell>
            <text:p>Paul The Plumber - Manchester</text:p>
          </table:table-cell>
          <table:table-cell>
            <text:p>(603) 437-7039</text:p>
          </table:table-cell>
          <table:table-cell>
            <text:p/>
          </table:table-cell>
          <table:table-cell>
            <text:p><text:a xlink:href="https://www.paultheplumbernh.com/" xlink:type="simple" xlink:actuate="onRequest" office:target-frame="_blank" text:style-name="InternetLink">https://www.paultheplumbernh.com/</text:a></text:p>
          </table:table-cell>
          <table:table-cell>
            <text:p>1087 Elm St Suite 406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4.0</text:p>
          </table:table-cell>
          <table:table-cell>
            <text:p>West Jordan</text:p>
          </table:table-cell>
          <table:table-cell>
            <text:p>UT</text:p>
          </table:table-cell>
          <table:table-cell>
            <text:p>116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5.0</text:p>
          </table:table-cell>
          <table:table-cell>
            <text:p>Westminster</text:p>
          </table:table-cell>
          <table:table-cell>
            <text:p>CO</text:p>
          </table:table-cell>
          <table:table-cell>
            <text:p>116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6.0</text:p>
          </table:table-cell>
          <table:table-cell>
            <text:p>Evansville</text:p>
          </table:table-cell>
          <table:table-cell>
            <text:p>IN</text:p>
          </table:table-cell>
          <table:table-cell>
            <text:p>1161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7.0</text:p>
          </table:table-cell>
          <table:table-cell>
            <text:p>Waterbury</text:p>
          </table:table-cell>
          <table:table-cell>
            <text:p>CT</text:p>
          </table:table-cell>
          <table:table-cell>
            <text:p>115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8.0</text:p>
          </table:table-cell>
          <table:table-cell>
            <text:p>Elgin</text:p>
          </table:table-cell>
          <table:table-cell>
            <text:p>IL</text:p>
          </table:table-cell>
          <table:table-cell>
            <text:p>115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9.0</text:p>
          </table:table-cell>
          <table:table-cell>
            <text:p>Greeley</text:p>
          </table:table-cell>
          <table:table-cell>
            <text:p>CO</text:p>
          </table:table-cell>
          <table:table-cell>
            <text:p>1150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0.0</text:p>
          </table:table-cell>
          <table:table-cell>
            <text:p>Temecula</text:p>
          </table:table-cell>
          <table:table-cell>
            <text:p>CA</text:p>
          </table:table-cell>
          <table:table-cell>
            <text:p>114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1.0</text:p>
          </table:table-cell>
          <table:table-cell>
            <text:p>Richmond</text:p>
          </table:table-cell>
          <table:table-cell>
            <text:p>CA</text:p>
          </table:table-cell>
          <table:table-cell>
            <text:p>11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2.0</text:p>
          </table:table-cell>
          <table:table-cell>
            <text:p>Concord</text:p>
          </table:table-cell>
          <table:table-cell>
            <text:p>NC</text:p>
          </table:table-cell>
          <table:table-cell>
            <text:p>1145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3.0</text:p>
          </table:table-cell>
          <table:table-cell>
            <text:p>Provo</text:p>
          </table:table-cell>
          <table:table-cell>
            <text:p>UT</text:p>
          </table:table-cell>
          <table:table-cell>
            <text:p>1145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4.0</text:p>
          </table:table-cell>
          <table:table-cell>
            <text:p>Rio Rancho</text:p>
          </table:table-cell>
          <table:table-cell>
            <text:p>NM</text:p>
          </table:table-cell>
          <table:table-cell>
            <text:p>114419</text:p>
          </table:table-cell>
          <table:table-cell>
            <text:p>TLC Plumbing Heating Cooling Electrical</text:p>
          </table:table-cell>
          <table:table-cell>
            <text:p>(505) 891-2962</text:p>
          </table:table-cell>
          <table:table-cell>
            <text:p/>
          </table:table-cell>
          <table:table-cell>
            <text:p><text:a xlink:href="https://www.tlcplumbing.com/rio-rancho" xlink:type="simple" xlink:actuate="onRequest" office:target-frame="_blank" text:style-name="InternetLink">https://www.tlcplumbing.com/rio-rancho</text:a></text:p>
          </table:table-cell>
          <table:table-cell>
            <text:p>506 Frontage Rd N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5.0</text:p>
          </table:table-cell>
          <table:table-cell>
            <text:p>Clearwater</text:p>
          </table:table-cell>
          <table:table-cell>
            <text:p>FL</text:p>
          </table:table-cell>
          <table:table-cell>
            <text:p>114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6.0</text:p>
          </table:table-cell>
          <table:table-cell>
            <text:p>Tuscaloosa</text:p>
          </table:table-cell>
          <table:table-cell>
            <text:p>AL</text:p>
          </table:table-cell>
          <table:table-cell>
            <text:p>114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7.0</text:p>
          </table:table-cell>
          <table:table-cell>
            <text:p>Murrieta</text:p>
          </table:table-cell>
          <table:table-cell>
            <text:p>CA</text:p>
          </table:table-cell>
          <table:table-cell>
            <text:p>114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8.0</text:p>
          </table:table-cell>
          <table:table-cell>
            <text:p>Lansing</text:p>
          </table:table-cell>
          <table:table-cell>
            <text:p>MI</text:p>
          </table:table-cell>
          <table:table-cell>
            <text:p>113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9.0</text:p>
          </table:table-cell>
          <table:table-cell>
            <text:p>Tyler</text:p>
          </table:table-cell>
          <table:table-cell>
            <text:p>TX</text:p>
          </table:table-cell>
          <table:table-cell>
            <text:p>1137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0.0</text:p>
          </table:table-cell>
          <table:table-cell>
            <text:p>Miami Gardens</text:p>
          </table:table-cell>
          <table:table-cell>
            <text:p>FL</text:p>
          </table:table-cell>
          <table:table-cell>
            <text:p>1135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1.0</text:p>
          </table:table-cell>
          <table:table-cell>
            <text:p>Everett</text:p>
          </table:table-cell>
          <table:table-cell>
            <text:p>WA</text:p>
          </table:table-cell>
          <table:table-cell>
            <text:p>1135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2.0</text:p>
          </table:table-cell>
          <table:table-cell>
            <text:p>Allen</text:p>
          </table:table-cell>
          <table:table-cell>
            <text:p>TX</text:p>
          </table:table-cell>
          <table:table-cell>
            <text:p>1134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3.0</text:p>
          </table:table-cell>
          <table:table-cell>
            <text:p>Springfield</text:p>
          </table:table-cell>
          <table:table-cell>
            <text:p>IL</text:p>
          </table:table-cell>
          <table:table-cell>
            <text:p>1129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4.0</text:p>
          </table:table-cell>
          <table:table-cell>
            <text:p>Beaumont</text:p>
          </table:table-cell>
          <table:table-cell>
            <text:p>TX</text:p>
          </table:table-cell>
          <table:table-cell>
            <text:p>1129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5.0</text:p>
          </table:table-cell>
          <table:table-cell>
            <text:p>South Fulton</text:p>
          </table:table-cell>
          <table:table-cell>
            <text:p>GA</text:p>
          </table:table-cell>
          <table:table-cell>
            <text:p>112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6.0</text:p>
          </table:table-cell>
          <table:table-cell>
            <text:p>Carlsbad</text:p>
          </table:table-cell>
          <table:table-cell>
            <text:p>CA</text:p>
          </table:table-cell>
          <table:table-cell>
            <text:p>112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7.0</text:p>
          </table:table-cell>
          <table:table-cell>
            <text:p>Sparks</text:p>
          </table:table-cell>
          <table:table-cell>
            <text:p>NV</text:p>
          </table:table-cell>
          <table:table-cell>
            <text:p>1119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8.0</text:p>
          </table:table-cell>
          <table:table-cell>
            <text:p>Gresham</text:p>
          </table:table-cell>
          <table:table-cell>
            <text:p>OR</text:p>
          </table:table-cell>
          <table:table-cell>
            <text:p>111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9.0</text:p>
          </table:table-cell>
          <table:table-cell>
            <text:p>Santa Maria</text:p>
          </table:table-cell>
          <table:table-cell>
            <text:p>CA</text:p>
          </table:table-cell>
          <table:table-cell>
            <text:p>1113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0.0</text:p>
          </table:table-cell>
          <table:table-cell>
            <text:p>Hillsboro</text:p>
          </table:table-cell>
          <table:table-cell>
            <text:p>OR</text:p>
          </table:table-cell>
          <table:table-cell>
            <text:p>1111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1.0</text:p>
          </table:table-cell>
          <table:table-cell>
            <text:p>Peoria</text:p>
          </table:table-cell>
          <table:table-cell>
            <text:p>IL</text:p>
          </table:table-cell>
          <table:table-cell>
            <text:p>1109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2.0</text:p>
          </table:table-cell>
          <table:table-cell>
            <text:p>Davie</text:p>
          </table:table-cell>
          <table:table-cell>
            <text:p>FL</text:p>
          </table:table-cell>
          <table:table-cell>
            <text:p>1108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3.0</text:p>
          </table:table-cell>
          <table:table-cell>
            <text:p>Edinburg</text:p>
          </table:table-cell>
          <table:table-cell>
            <text:p>TX</text:p>
          </table:table-cell>
          <table:table-cell>
            <text:p>1107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4.0</text:p>
          </table:table-cell>
          <table:table-cell>
            <text:p>Pueblo</text:p>
          </table:table-cell>
          <table:table-cell>
            <text:p>CO</text:p>
          </table:table-cell>
          <table:table-cell>
            <text:p>110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5.0</text:p>
          </table:table-cell>
          <table:table-cell>
            <text:p>San Buenaventura (Ventura)</text:p>
          </table:table-cell>
          <table:table-cell>
            <text:p>CA</text:p>
          </table:table-cell>
          <table:table-cell>
            <text:p>10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6.0</text:p>
          </table:table-cell>
          <table:table-cell>
            <text:p>Palm Coast</text:p>
          </table:table-cell>
          <table:table-cell>
            <text:p>FL</text:p>
          </table:table-cell>
          <table:table-cell>
            <text:p>1098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7.0</text:p>
          </table:table-cell>
          <table:table-cell>
            <text:p>Costa Mesa</text:p>
          </table:table-cell>
          <table:table-cell>
            <text:p>CA</text:p>
          </table:table-cell>
          <table:table-cell>
            <text:p>108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8.0</text:p>
          </table:table-cell>
          <table:table-cell>
            <text:p>St. George</text:p>
          </table:table-cell>
          <table:table-cell>
            <text:p>UT</text:p>
          </table:table-cell>
          <table:table-cell>
            <text:p>1087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9.0</text:p>
          </table:table-cell>
          <table:table-cell>
            <text:p>Centennial</text:p>
          </table:table-cell>
          <table:table-cell>
            <text:p>CO</text:p>
          </table:table-cell>
          <table:table-cell>
            <text:p>108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0.0</text:p>
          </table:table-cell>
          <table:table-cell>
            <text:p>Downey</text:p>
          </table:table-cell>
          <table:table-cell>
            <text:p>CA</text:p>
          </table:table-cell>
          <table:table-cell>
            <text:p>108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1.0</text:p>
          </table:table-cell>
          <table:table-cell>
            <text:p>Spokane Valley</text:p>
          </table:table-cell>
          <table:table-cell>
            <text:p>WA</text:p>
          </table:table-cell>
          <table:table-cell>
            <text:p>1084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2.0</text:p>
          </table:table-cell>
          <table:table-cell>
            <text:p>Sugar Land</text:p>
          </table:table-cell>
          <table:table-cell>
            <text:p>TX</text:p>
          </table:table-cell>
          <table:table-cell>
            <text:p>1077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3.0</text:p>
          </table:table-cell>
          <table:table-cell>
            <text:p>Lee's Summit</text:p>
          </table:table-cell>
          <table:table-cell>
            <text:p>MO</text:p>
          </table:table-cell>
          <table:table-cell>
            <text:p>107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4.0</text:p>
          </table:table-cell>
          <table:table-cell>
            <text:p>Bend</text:p>
          </table:table-cell>
          <table:table-cell>
            <text:p>OR</text:p>
          </table:table-cell>
          <table:table-cell>
            <text:p>1073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5.0</text:p>
          </table:table-cell>
          <table:table-cell>
            <text:p>Jurupa Valley</text:p>
          </table:table-cell>
          <table:table-cell>
            <text:p>CA</text:p>
          </table:table-cell>
          <table:table-cell>
            <text:p>107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6.0</text:p>
          </table:table-cell>
          <table:table-cell>
            <text:p>Georgetown</text:p>
          </table:table-cell>
          <table:table-cell>
            <text:p>TX</text:p>
          </table:table-cell>
          <table:table-cell>
            <text:p>10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7.0</text:p>
          </table:table-cell>
          <table:table-cell>
            <text:p>Green Bay</text:p>
          </table:table-cell>
          <table:table-cell>
            <text:p>WI</text:p>
          </table:table-cell>
          <table:table-cell>
            <text:p>106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8.0</text:p>
          </table:table-cell>
          <table:table-cell>
            <text:p>Fayetteville</text:p>
          </table:table-cell>
          <table:table-cell>
            <text:p>AR</text:p>
          </table:table-cell>
          <table:table-cell>
            <text:p>106623</text:p>
          </table:table-cell>
          <table:table-cell>
            <text:p>Fayetteville Plumbing Services</text:p>
          </table:table-cell>
          <table:table-cell>
            <text:p>(479) 888-5522</text:p>
          </table:table-cell>
          <table:table-cell>
            <text:p/>
          </table:table-cell>
          <table:table-cell>
            <text:p><text:a xlink:href="https://www.plumbingfayettevillear.com/" xlink:type="simple" xlink:actuate="onRequest" office:target-frame="_blank" text:style-name="InternetLink">https://www.plumbingfayettevillear.com/</text:a></text:p>
          </table:table-cell>
          <table:table-cell>
            <text:p>34 E Center St #4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9.0</text:p>
          </table:table-cell>
          <table:table-cell>
            <text:p>Rialto</text:p>
          </table:table-cell>
          <table:table-cell>
            <text:p>CA</text:p>
          </table:table-cell>
          <table:table-cell>
            <text:p>106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0.0</text:p>
          </table:table-cell>
          <table:table-cell>
            <text:p>Brockton</text:p>
          </table:table-cell>
          <table:table-cell>
            <text:p>MA</text:p>
          </table:table-cell>
          <table:table-cell>
            <text:p>106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1.0</text:p>
          </table:table-cell>
          <table:table-cell>
            <text:p>Boulder</text:p>
          </table:table-cell>
          <table:table-cell>
            <text:p>CO</text:p>
          </table:table-cell>
          <table:table-cell>
            <text:p>105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2.0</text:p>
          </table:table-cell>
          <table:table-cell>
            <text:p>Carmel</text:p>
          </table:table-cell>
          <table:table-cell>
            <text:p>IN</text:p>
          </table:table-cell>
          <table:table-cell>
            <text:p>105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3.0</text:p>
          </table:table-cell>
          <table:table-cell>
            <text:p>Dearborn</text:p>
          </table:table-cell>
          <table:table-cell>
            <text:p>MI</text:p>
          </table:table-cell>
          <table:table-cell>
            <text:p>1056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4.0</text:p>
          </table:table-cell>
          <table:table-cell>
            <text:p>West Covina</text:p>
          </table:table-cell>
          <table:table-cell>
            <text:p>CA</text:p>
          </table:table-cell>
          <table:table-cell>
            <text:p>105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5.0</text:p>
          </table:table-cell>
          <table:table-cell>
            <text:p>Yuma</text:p>
          </table:table-cell>
          <table:table-cell>
            <text:p>AZ</text:p>
          </table:table-cell>
          <table:table-cell>
            <text:p>1052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6.0</text:p>
          </table:table-cell>
          <table:table-cell>
            <text:p>Chico</text:p>
          </table:table-cell>
          <table:table-cell>
            <text:p>CA</text:p>
          </table:table-cell>
          <table:table-cell>
            <text:p>105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7.0</text:p>
          </table:table-cell>
          <table:table-cell>
            <text:p>El Monte</text:p>
          </table:table-cell>
          <table:table-cell>
            <text:p>CA</text:p>
          </table:table-cell>
          <table:table-cell>
            <text:p>105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8.0</text:p>
          </table:table-cell>
          <table:table-cell>
            <text:p>Sandy Springs</text:p>
          </table:table-cell>
          <table:table-cell>
            <text:p>GA</text:p>
          </table:table-cell>
          <table:table-cell>
            <text:p>105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9.0</text:p>
          </table:table-cell>
          <table:table-cell>
            <text:p>Renton</text:p>
          </table:table-cell>
          <table:table-cell>
            <text:p>WA</text:p>
          </table:table-cell>
          <table:table-cell>
            <text:p>104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0.0</text:p>
          </table:table-cell>
          <table:table-cell>
            <text:p>Fishers</text:p>
          </table:table-cell>
          <table:table-cell>
            <text:p>IN</text:p>
          </table:table-cell>
          <table:table-cell>
            <text:p>104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1.0</text:p>
          </table:table-cell>
          <table:table-cell>
            <text:p>Suffolk</text:p>
          </table:table-cell>
          <table:table-cell>
            <text:p>VA</text:p>
          </table:table-cell>
          <table:table-cell>
            <text:p>104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2.0</text:p>
          </table:table-cell>
          <table:table-cell>
            <text:p>Lynn</text:p>
          </table:table-cell>
          <table:table-cell>
            <text:p>MA</text:p>
          </table:table-cell>
          <table:table-cell>
            <text:p>104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3.0</text:p>
          </table:table-cell>
          <table:table-cell>
            <text:p>Vacaville</text:p>
          </table:table-cell>
          <table:table-cell>
            <text:p>CA</text:p>
          </table:table-cell>
          <table:table-cell>
            <text:p>103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4.0</text:p>
          </table:table-cell>
          <table:table-cell>
            <text:p>San Mateo</text:p>
          </table:table-cell>
          <table:table-cell>
            <text:p>CA</text:p>
          </table:table-cell>
          <table:table-cell>
            <text:p>103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5.0</text:p>
          </table:table-cell>
          <table:table-cell>
            <text:p>South Bend</text:p>
          </table:table-cell>
          <table:table-cell>
            <text:p>IN</text:p>
          </table:table-cell>
          <table:table-cell>
            <text:p>1032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6.0</text:p>
          </table:table-cell>
          <table:table-cell>
            <text:p>Quincy</text:p>
          </table:table-cell>
          <table:table-cell>
            <text:p>MA</text:p>
          </table:table-cell>
          <table:table-cell>
            <text:p>103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7.0</text:p>
          </table:table-cell>
          <table:table-cell>
            <text:p>Burbank</text:p>
          </table:table-cell>
          <table:table-cell>
            <text:p>CA</text:p>
          </table:table-cell>
          <table:table-cell>
            <text:p>10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8.0</text:p>
          </table:table-cell>
          <table:table-cell>
            <text:p>Hesperia</text:p>
          </table:table-cell>
          <table:table-cell>
            <text:p>CA</text:p>
          </table:table-cell>
          <table:table-cell>
            <text:p>102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9.0</text:p>
          </table:table-cell>
          <table:table-cell>
            <text:p>Wichita Falls</text:p>
          </table:table-cell>
          <table:table-cell>
            <text:p>TX</text:p>
          </table:table-cell>
          <table:table-cell>
            <text:p>1019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0.0</text:p>
          </table:table-cell>
          <table:table-cell>
            <text:p>Tracy</text:p>
          </table:table-cell>
          <table:table-cell>
            <text:p>CA</text:p>
          </table:table-cell>
          <table:table-cell>
            <text:p>101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1.0</text:p>
          </table:table-cell>
          <table:table-cell>
            <text:p>New Bedford</text:p>
          </table:table-cell>
          <table:table-cell>
            <text:p>MA</text:p>
          </table:table-cell>
          <table:table-cell>
            <text:p>101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2.0</text:p>
          </table:table-cell>
          <table:table-cell>
            <text:p>El Cajon</text:p>
          </table:table-cell>
          <table:table-cell>
            <text:p>CA</text:p>
          </table:table-cell>
          <table:table-cell>
            <text:p>101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3.0</text:p>
          </table:table-cell>
          <table:table-cell>
            <text:p>Albany</text:p>
          </table:table-cell>
          <table:table-cell>
            <text:p>NY</text:p>
          </table:table-cell>
          <table:table-cell>
            <text:p>101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4.0</text:p>
          </table:table-cell>
          <table:table-cell>
            <text:p>Inglewood</text:p>
          </table:table-cell>
          <table:table-cell>
            <text:p>CA</text:p>
          </table:table-cell>
          <table:table-cell>
            <text:p>101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5.0</text:p>
          </table:table-cell>
          <table:table-cell>
            <text:p>Boca Raton</text:p>
          </table:table-cell>
          <table:table-cell>
            <text:p>FL</text:p>
          </table:table-cell>
          <table:table-cell>
            <text:p>101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6.0</text:p>
          </table:table-cell>
          <table:table-cell>
            <text:p>Fort Myers</text:p>
          </table:table-cell>
          <table:table-cell>
            <text:p>FL</text:p>
          </table:table-cell>
          <table:table-cell>
            <text:p>101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7.0</text:p>
          </table:table-cell>
          <table:table-cell>
            <text:p>Daly City</text:p>
          </table:table-cell>
          <table:table-cell>
            <text:p>CA</text:p>
          </table:table-cell>
          <table:table-cell>
            <text:p>101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8.0</text:p>
          </table:table-cell>
          <table:table-cell>
            <text:p>Avondale</text:p>
          </table:table-cell>
          <table:table-cell>
            <text:p>AZ</text:p>
          </table:table-cell>
          <table:table-cell>
            <text:p>100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9.0</text:p>
          </table:table-cell>
          <table:table-cell>
            <text:p>San Angelo</text:p>
          </table:table-cell>
          <table:table-cell>
            <text:p>TX</text:p>
          </table:table-cell>
          <table:table-cell>
            <text:p>10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0.0</text:p>
          </table:table-cell>
          <table:table-cell>
            <text:p>Edmond</text:p>
          </table:table-cell>
          <table:table-cell>
            <text:p>OK</text:p>
          </table:table-cell>
          <table:table-cell>
            <text:p>100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1.0</text:p>
          </table:table-cell>
          <table:table-cell>
            <text:p>Davenport</text:p>
          </table:table-cell>
          <table:table-cell>
            <text:p>IA</text:p>
          </table:table-cell>
          <table:table-cell>
            <text:p>100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2.0</text:p>
          </table:table-cell>
          <table:table-cell>
            <text:p>Deltona</text:p>
          </table:table-cell>
          <table:table-cell>
            <text:p>FL</text:p>
          </table:table-cell>
          <table:table-cell>
            <text:p>1002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3.0</text:p>
          </table:table-cell>
          <table:table-cell>
            <text:p>Longmont</text:p>
          </table:table-cell>
          <table:table-cell>
            <text:p>CO</text:p>
          </table:table-cell>
          <table:table-cell>
            <text:p>100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4.0</text:p>
          </table:table-cell>
          <table:table-cell>
            <text:p>Federal Way</text:p>
          </table:table-cell>
          <table:table-cell>
            <text:p>WA</text:p>
          </table:table-cell>
          <table:table-cell>
            <text:p>997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5.0</text:p>
          </table:table-cell>
          <table:table-cell>
            <text:p>Merced</text:p>
          </table:table-cell>
          <table:table-cell>
            <text:p>CA</text:p>
          </table:table-cell>
          <table:table-cell>
            <text:p>99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6.0</text:p>
          </table:table-cell>
          <table:table-cell>
            <text:p>Kenosha</text:p>
          </table:table-cell>
          <table:table-cell>
            <text:p>WI</text:p>
          </table:table-cell>
          <table:table-cell>
            <text:p>992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7.0</text:p>
          </table:table-cell>
          <table:table-cell>
            <text:p>Plantation</text:p>
          </table:table-cell>
          <table:table-cell>
            <text:p>FL</text:p>
          </table:table-cell>
          <table:table-cell>
            <text:p>99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8.0</text:p>
          </table:table-cell>
          <table:table-cell>
            <text:p>Roanoke</text:p>
          </table:table-cell>
          <table:table-cell>
            <text:p>VA</text:p>
          </table:table-cell>
          <table:table-cell>
            <text:p>99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9.0</text:p>
          </table:table-cell>
          <table:table-cell>
            <text:p>Sunrise</text:p>
          </table:table-cell>
          <table:table-cell>
            <text:p>FL</text:p>
          </table:table-cell>
          <table:table-cell>
            <text:p>988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0.0</text:p>
          </table:table-cell>
          <table:table-cell>
            <text:p>Temple</text:p>
          </table:table-cell>
          <table:table-cell>
            <text:p>TX</text:p>
          </table:table-cell>
          <table:table-cell>
            <text:p>98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1.0</text:p>
          </table:table-cell>
          <table:table-cell>
            <text:p>Vista</text:p>
          </table:table-cell>
          <table:table-cell>
            <text:p>CA</text:p>
          </table:table-cell>
          <table:table-cell>
            <text:p>98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2.0</text:p>
          </table:table-cell>
          <table:table-cell>
            <text:p>Beaverton</text:p>
          </table:table-cell>
          <table:table-cell>
            <text:p>OR</text:p>
          </table:table-cell>
          <table:table-cell>
            <text:p>97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3.0</text:p>
          </table:table-cell>
          <table:table-cell>
            <text:p>Yakima</text:p>
          </table:table-cell>
          <table:table-cell>
            <text:p>WA</text:p>
          </table:table-cell>
          <table:table-cell>
            <text:p>97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4.0</text:p>
          </table:table-cell>
          <table:table-cell>
            <text:p>Kirkland</text:p>
          </table:table-cell>
          <table:table-cell>
            <text:p>WA</text:p>
          </table:table-cell>
          <table:table-cell>
            <text:p>97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5.0</text:p>
          </table:table-cell>
          <table:table-cell>
            <text:p>Norwalk</text:p>
          </table:table-cell>
          <table:table-cell>
            <text:p>CA</text:p>
          </table:table-cell>
          <table:table-cell>
            <text:p>97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6.0</text:p>
          </table:table-cell>
          <table:table-cell>
            <text:p>Chino</text:p>
          </table:table-cell>
          <table:table-cell>
            <text:p>CA</text:p>
          </table:table-cell>
          <table:table-cell>
            <text:p>96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7.0</text:p>
          </table:table-cell>
          <table:table-cell>
            <text:p>Portsmouth</text:p>
          </table:table-cell>
          <table:table-cell>
            <text:p>VA</text:p>
          </table:table-cell>
          <table:table-cell>
            <text:p>96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8.0</text:p>
          </table:table-cell>
          <table:table-cell>
            <text:p>Manteca</text:p>
          </table:table-cell>
          <table:table-cell>
            <text:p>CA</text:p>
          </table:table-cell>
          <table:table-cell>
            <text:p>96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9.0</text:p>
          </table:table-cell>
          <table:table-cell>
            <text:p>North Port</text:p>
          </table:table-cell>
          <table:table-cell>
            <text:p>FL</text:p>
          </table:table-cell>
          <table:table-cell>
            <text:p>96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0.0</text:p>
          </table:table-cell>
          <table:table-cell>
            <text:p>Greenville</text:p>
          </table:table-cell>
          <table:table-cell>
            <text:p>NC</text:p>
          </table:table-cell>
          <table:table-cell>
            <text:p>96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1.0</text:p>
          </table:table-cell>
          <table:table-cell>
            <text:p>Bellingham</text:p>
          </table:table-cell>
          <table:table-cell>
            <text:p>WA</text:p>
          </table:table-cell>
          <table:table-cell>
            <text:p>9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2.0</text:p>
          </table:table-cell>
          <table:table-cell>
            <text:p>Lawrence</text:p>
          </table:table-cell>
          <table:table-cell>
            <text:p>KS</text:p>
          </table:table-cell>
          <table:table-cell>
            <text:p>96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3.0</text:p>
          </table:table-cell>
          <table:table-cell>
            <text:p>O'Fallon</text:p>
          </table:table-cell>
          <table:table-cell>
            <text:p>MO</text:p>
          </table:table-cell>
          <table:table-cell>
            <text:p>96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4.0</text:p>
          </table:table-cell>
          <table:table-cell>
            <text:p>Reading</text:p>
          </table:table-cell>
          <table:table-cell>
            <text:p>PA</text:p>
          </table:table-cell>
          <table:table-cell>
            <text:p>9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5.0</text:p>
          </table:table-cell>
          <table:table-cell>
            <text:p>Mount Pleasant</text:p>
          </table:table-cell>
          <table:table-cell>
            <text:p>SC</text:p>
          </table:table-cell>
          <table:table-cell>
            <text:p>954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6.0</text:p>
          </table:table-cell>
          <table:table-cell>
            <text:p>Lehi</text:p>
          </table:table-cell>
          <table:table-cell>
            <text:p>UT</text:p>
          </table:table-cell>
          <table:table-cell>
            <text:p>95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7.0</text:p>
          </table:table-cell>
          <table:table-cell>
            <text:p>Fall River</text:p>
          </table:table-cell>
          <table:table-cell>
            <text:p>MA</text:p>
          </table:table-cell>
          <table:table-cell>
            <text:p>952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8.0</text:p>
          </table:table-cell>
          <table:table-cell>
            <text:p>Orem</text:p>
          </table:table-cell>
          <table:table-cell>
            <text:p>UT</text:p>
          </table:table-cell>
          <table:table-cell>
            <text:p>95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9.0</text:p>
          </table:table-cell>
          <table:table-cell>
            <text:p>San Marcos</text:p>
          </table:table-cell>
          <table:table-cell>
            <text:p>CA</text:p>
          </table:table-cell>
          <table:table-cell>
            <text:p>94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0.0</text:p>
          </table:table-cell>
          <table:table-cell>
            <text:p>Norwalk</text:p>
          </table:table-cell>
          <table:table-cell>
            <text:p>CT</text:p>
          </table:table-cell>
          <table:table-cell>
            <text:p>94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1.0</text:p>
          </table:table-cell>
          <table:table-cell>
            <text:p>Indio</text:p>
          </table:table-cell>
          <table:table-cell>
            <text:p>CA</text:p>
          </table:table-cell>
          <table:table-cell>
            <text:p>942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2.0</text:p>
          </table:table-cell>
          <table:table-cell>
            <text:p>Redding</text:p>
          </table:table-cell>
          <table:table-cell>
            <text:p>CA</text:p>
          </table:table-cell>
          <table:table-cell>
            <text:p>9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3.0</text:p>
          </table:table-cell>
          <table:table-cell>
            <text:p>Hemet</text:p>
          </table:table-cell>
          <table:table-cell>
            <text:p>CA</text:p>
          </table:table-cell>
          <table:table-cell>
            <text:p>936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4.0</text:p>
          </table:table-cell>
          <table:table-cell>
            <text:p>Hoover</text:p>
          </table:table-cell>
          <table:table-cell>
            <text:p>AL</text:p>
          </table:table-cell>
          <table:table-cell>
            <text:p>935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5.0</text:p>
          </table:table-cell>
          <table:table-cell>
            <text:p>Asheville</text:p>
          </table:table-cell>
          <table:table-cell>
            <text:p>NC</text:p>
          </table:table-cell>
          <table:table-cell>
            <text:p>93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6.0</text:p>
          </table:table-cell>
          <table:table-cell>
            <text:p>Livonia</text:p>
          </table:table-cell>
          <table:table-cell>
            <text:p>MI</text:p>
          </table:table-cell>
          <table:table-cell>
            <text:p>92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7.0</text:p>
          </table:table-cell>
          <table:table-cell>
            <text:p>Nashua</text:p>
          </table:table-cell>
          <table:table-cell>
            <text:p>NH</text:p>
          </table:table-cell>
          <table:table-cell>
            <text:p>92435</text:p>
          </table:table-cell>
          <table:table-cell>
            <text:p>Fagundes Plumbing Heating AC</text:p>
          </table:table-cell>
          <table:table-cell>
            <text:p>(603) 605-1919</text:p>
          </table:table-cell>
          <table:table-cell>
            <text:p/>
          </table:table-cell>
          <table:table-cell>
            <text:p><text:a xlink:href="https://www.afphpro.com/" xlink:type="simple" xlink:actuate="onRequest" office:target-frame="_blank" text:style-name="InternetLink">https://www.afphpro.com/</text:a></text:p>
          </table:table-cell>
          <table:table-cell>
            <text:p>230 Amherst St Unit 10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8.0</text:p>
          </table:table-cell>
          <table:table-cell>
            <text:p>Sandy</text:p>
          </table:table-cell>
          <table:table-cell>
            <text:p>UT</text:p>
          </table:table-cell>
          <table:table-cell>
            <text:p>923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9.0</text:p>
          </table:table-cell>
          <table:table-cell>
            <text:p>Frederick</text:p>
          </table:table-cell>
          <table:table-cell>
            <text:p>MD</text:p>
          </table:table-cell>
          <table:table-cell>
            <text:p>920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0.0</text:p>
          </table:table-cell>
          <table:table-cell>
            <text:p>Bryan</text:p>
          </table:table-cell>
          <table:table-cell>
            <text:p>TX</text:p>
          </table:table-cell>
          <table:table-cell>
            <text:p>9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1.0</text:p>
          </table:table-cell>
          <table:table-cell>
            <text:p>Folsom</text:p>
          </table:table-cell>
          <table:table-cell>
            <text:p>CA</text:p>
          </table:table-cell>
          <table:table-cell>
            <text:p>91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2.0</text:p>
          </table:table-cell>
          <table:table-cell>
            <text:p>Erie</text:p>
          </table:table-cell>
          <table:table-cell>
            <text:p>PA</text:p>
          </table:table-cell>
          <table:table-cell>
            <text:p>918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3.0</text:p>
          </table:table-cell>
          <table:table-cell>
            <text:p>Trenton</text:p>
          </table:table-cell>
          <table:table-cell>
            <text:p>NJ</text:p>
          </table:table-cell>
          <table:table-cell>
            <text:p>91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4.0</text:p>
          </table:table-cell>
          <table:table-cell>
            <text:p>Roswell</text:p>
          </table:table-cell>
          <table:table-cell>
            <text:p>GA</text:p>
          </table:table-cell>
          <table:table-cell>
            <text:p>91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5.0</text:p>
          </table:table-cell>
          <table:table-cell>
            <text:p>Champaign</text:p>
          </table:table-cell>
          <table:table-cell>
            <text:p>IL</text:p>
          </table:table-cell>
          <table:table-cell>
            <text:p>911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6.0</text:p>
          </table:table-cell>
          <table:table-cell>
            <text:p>Leander</text:p>
          </table:table-cell>
          <table:table-cell>
            <text:p>TX</text:p>
          </table:table-cell>
          <table:table-cell>
            <text:p>91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7.0</text:p>
          </table:table-cell>
          <table:table-cell>
            <text:p>Clifton</text:p>
          </table:table-cell>
          <table:table-cell>
            <text:p>NJ</text:p>
          </table:table-cell>
          <table:table-cell>
            <text:p>91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8.0</text:p>
          </table:table-cell>
          <table:table-cell>
            <text:p>Fort Smith</text:p>
          </table:table-cell>
          <table:table-cell>
            <text:p>AR</text:p>
          </table:table-cell>
          <table:table-cell>
            <text:p>908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9.0</text:p>
          </table:table-cell>
          <table:table-cell>
            <text:p>Carson</text:p>
          </table:table-cell>
          <table:table-cell>
            <text:p>CA</text:p>
          </table:table-cell>
          <table:table-cell>
            <text:p>908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0.0</text:p>
          </table:table-cell>
          <table:table-cell>
            <text:p>Newton</text:p>
          </table:table-cell>
          <table:table-cell>
            <text:p>MA</text:p>
          </table:table-cell>
          <table:table-cell>
            <text:p>90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1.0</text:p>
          </table:table-cell>
          <table:table-cell>
            <text:p>Springdale</text:p>
          </table:table-cell>
          <table:table-cell>
            <text:p>AR</text:p>
          </table:table-cell>
          <table:table-cell>
            <text:p>90685</text:p>
          </table:table-cell>
          <table:table-cell>
            <text:p>A Plus Plumbing of NWA</text:p>
          </table:table-cell>
          <table:table-cell>
            <text:p>(479) 408-4845</text:p>
          </table:table-cell>
          <table:table-cell>
            <text:p/>
          </table:table-cell>
          <table:table-cell>
            <text:p><text:a xlink:href="https://aplusplumbingofnwa.com/" xlink:type="simple" xlink:actuate="onRequest" office:target-frame="_blank" text:style-name="InternetLink">https://aplusplumbingofnwa.com/</text:a></text:p>
          </table:table-cell>
          <table:table-cell>
            <text:p>284 Ranall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2.0</text:p>
          </table:table-cell>
          <table:table-cell>
            <text:p>Lawton</text:p>
          </table:table-cell>
          <table:table-cell>
            <text:p>OK</text:p>
          </table:table-cell>
          <table:table-cell>
            <text:p>905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3.0</text:p>
          </table:table-cell>
          <table:table-cell>
            <text:p>Compton</text:p>
          </table:table-cell>
          <table:table-cell>
            <text:p>CA</text:p>
          </table:table-cell>
          <table:table-cell>
            <text:p>90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4.0</text:p>
          </table:table-cell>
          <table:table-cell>
            <text:p>Mission Viejo</text:p>
          </table:table-cell>
          <table:table-cell>
            <text:p>CA</text:p>
          </table:table-cell>
          <table:table-cell>
            <text:p>90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5.0</text:p>
          </table:table-cell>
          <table:table-cell>
            <text:p>Franklin</text:p>
          </table:table-cell>
          <table:table-cell>
            <text:p>TN</text:p>
          </table:table-cell>
          <table:table-cell>
            <text:p>90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6.0</text:p>
          </table:table-cell>
          <table:table-cell>
            <text:p>Santa Monica</text:p>
          </table:table-cell>
          <table:table-cell>
            <text:p>CA</text:p>
          </table:table-cell>
          <table:table-cell>
            <text:p>90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7.0</text:p>
          </table:table-cell>
          <table:table-cell>
            <text:p>South Gate</text:p>
          </table:table-cell>
          <table:table-cell>
            <text:p>CA</text:p>
          </table:table-cell>
          <table:table-cell>
            <text:p>90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8.0</text:p>
          </table:table-cell>
          <table:table-cell>
            <text:p>Santa Fe</text:p>
          </table:table-cell>
          <table:table-cell>
            <text:p>NM</text:p>
          </table:table-cell>
          <table:table-cell>
            <text:p>89837</text:p>
          </table:table-cell>
          <table:table-cell>
            <text:p>James Plumbing and Heating</text:p>
          </table:table-cell>
          <table:table-cell>
            <text:p>(505) 473-7148</text:p>
          </table:table-cell>
          <table:table-cell>
            <text:p/>
          </table:table-cell>
          <table:table-cell>
            <text:p><text:a xlink:href="https://jamesplumbingandheating.com" xlink:type="simple" xlink:actuate="onRequest" office:target-frame="_blank" text:style-name="InternetLink">jamesplumbingandheating.com</text:a></text:p>
          </table:table-cell>
          <table:table-cell>
            <text:p>1159 Coriander Rd, Santa F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9.0</text:p>
          </table:table-cell>
          <table:table-cell>
            <text:p>Queen Creek</text:p>
          </table:table-cell>
          <table:table-cell>
            <text:p>AZ</text:p>
          </table:table-cell>
          <table:table-cell>
            <text:p>89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0.0</text:p>
          </table:table-cell>
          <table:table-cell>
            <text:p>Ogden</text:p>
          </table:table-cell>
          <table:table-cell>
            <text:p>UT</text:p>
          </table:table-cell>
          <table:table-cell>
            <text:p>895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1.0</text:p>
          </table:table-cell>
          <table:table-cell>
            <text:p>Deerfield Beach</text:p>
          </table:table-cell>
          <table:table-cell>
            <text:p>FL</text:p>
          </table:table-cell>
          <table:table-cell>
            <text:p>8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2.0</text:p>
          </table:table-cell>
          <table:table-cell>
            <text:p>Lawrence</text:p>
          </table:table-cell>
          <table:table-cell>
            <text:p>MA</text:p>
          </table:table-cell>
          <table:table-cell>
            <text:p>893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3.0</text:p>
          </table:table-cell>
          <table:table-cell>
            <text:p>Bloomington</text:p>
          </table:table-cell>
          <table:table-cell>
            <text:p>MN</text:p>
          </table:table-cell>
          <table:table-cell>
            <text:p>89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4.0</text:p>
          </table:table-cell>
          <table:table-cell>
            <text:p>Danbury</text:p>
          </table:table-cell>
          <table:table-cell>
            <text:p>CT</text:p>
          </table:table-cell>
          <table:table-cell>
            <text:p>89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5.0</text:p>
          </table:table-cell>
          <table:table-cell>
            <text:p>Mission</text:p>
          </table:table-cell>
          <table:table-cell>
            <text:p>TX</text:p>
          </table:table-cell>
          <table:table-cell>
            <text:p>88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6.0</text:p>
          </table:table-cell>
          <table:table-cell>
            <text:p>Westminster</text:p>
          </table:table-cell>
          <table:table-cell>
            <text:p>CA</text:p>
          </table:table-cell>
          <table:table-cell>
            <text:p>889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7.0</text:p>
          </table:table-cell>
          <table:table-cell>
            <text:p>Troy</text:p>
          </table:table-cell>
          <table:table-cell>
            <text:p>MI</text:p>
          </table:table-cell>
          <table:table-cell>
            <text:p>88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8.0</text:p>
          </table:table-cell>
          <table:table-cell>
            <text:p>Daytona Beach</text:p>
          </table:table-cell>
          <table:table-cell>
            <text:p>FL</text:p>
          </table:table-cell>
          <table:table-cell>
            <text:p>88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9.0</text:p>
          </table:table-cell>
          <table:table-cell>
            <text:p>Kennewick</text:p>
          </table:table-cell>
          <table:table-cell>
            <text:p>WA</text:p>
          </table:table-cell>
          <table:table-cell>
            <text:p>8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0.0</text:p>
          </table:table-cell>
          <table:table-cell>
            <text:p>Duluth</text:p>
          </table:table-cell>
          <table:table-cell>
            <text:p>MN</text:p>
          </table:table-cell>
          <table:table-cell>
            <text:p>88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1.0</text:p>
          </table:table-cell>
          <table:table-cell>
            <text:p>Waukegan</text:p>
          </table:table-cell>
          <table:table-cell>
            <text:p>IL</text:p>
          </table:table-cell>
          <table:table-cell>
            <text:p>87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2.0</text:p>
          </table:table-cell>
          <table:table-cell>
            <text:p>Warner Robins</text:p>
          </table:table-cell>
          <table:table-cell>
            <text:p>GA</text:p>
          </table:table-cell>
          <table:table-cell>
            <text:p>87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3.0</text:p>
          </table:table-cell>
          <table:table-cell>
            <text:p>South Jordan</text:p>
          </table:table-cell>
          <table:table-cell>
            <text:p>UT</text:p>
          </table:table-cell>
          <table:table-cell>
            <text:p>8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4.0</text:p>
          </table:table-cell>
          <table:table-cell>
            <text:p>Rancho Cordova</text:p>
          </table:table-cell>
          <table:table-cell>
            <text:p>CA</text:p>
          </table:table-cell>
          <table:table-cell>
            <text:p>87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5.0</text:p>
          </table:table-cell>
          <table:table-cell>
            <text:p>Melbourne</text:p>
          </table:table-cell>
          <table:table-cell>
            <text:p>FL</text:p>
          </table:table-cell>
          <table:table-cell>
            <text:p>870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6.0</text:p>
          </table:table-cell>
          <table:table-cell>
            <text:p>Gastonia</text:p>
          </table:table-cell>
          <table:table-cell>
            <text:p>NC</text:p>
          </table:table-cell>
          <table:table-cell>
            <text:p>87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7.0</text:p>
          </table:table-cell>
          <table:table-cell>
            <text:p>Baytown</text:p>
          </table:table-cell>
          <table:table-cell>
            <text:p>TX</text:p>
          </table:table-cell>
          <table:table-cell>
            <text:p>865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8.0</text:p>
          </table:table-cell>
          <table:table-cell>
            <text:p>Medford</text:p>
          </table:table-cell>
          <table:table-cell>
            <text:p>OR</text:p>
          </table:table-cell>
          <table:table-cell>
            <text:p>864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9.0</text:p>
          </table:table-cell>
          <table:table-cell>
            <text:p>Santa Barbara</text:p>
          </table:table-cell>
          <table:table-cell>
            <text:p>CA</text:p>
          </table:table-cell>
          <table:table-cell>
            <text:p>864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0.0</text:p>
          </table:table-cell>
          <table:table-cell>
            <text:p>Sioux City</text:p>
          </table:table-cell>
          <table:table-cell>
            <text:p>IA</text:p>
          </table:table-cell>
          <table:table-cell>
            <text:p>86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1.0</text:p>
          </table:table-cell>
          <table:table-cell>
            <text:p>Citrus Heights</text:p>
          </table:table-cell>
          <table:table-cell>
            <text:p>CA</text:p>
          </table:table-cell>
          <table:table-cell>
            <text:p>863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2.0</text:p>
          </table:table-cell>
          <table:table-cell>
            <text:p>Lake Forest</text:p>
          </table:table-cell>
          <table:table-cell>
            <text:p>CA</text:p>
          </table:table-cell>
          <table:table-cell>
            <text:p>86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3.0</text:p>
          </table:table-cell>
          <table:table-cell>
            <text:p>Auburn</text:p>
          </table:table-cell>
          <table:table-cell>
            <text:p>WA</text:p>
          </table:table-cell>
          <table:table-cell>
            <text:p>86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4.0</text:p>
          </table:table-cell>
          <table:table-cell>
            <text:p>Homestead</text:p>
          </table:table-cell>
          <table:table-cell>
            <text:p>FL</text:p>
          </table:table-cell>
          <table:table-cell>
            <text:p>86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5.0</text:p>
          </table:table-cell>
          <table:table-cell>
            <text:p>San Ramon</text:p>
          </table:table-cell>
          <table:table-cell>
            <text:p>CA</text:p>
          </table:table-cell>
          <table:table-cell>
            <text:p>86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6.0</text:p>
          </table:table-cell>
          <table:table-cell>
            <text:p>New Rochelle</text:p>
          </table:table-cell>
          <table:table-cell>
            <text:p>NY</text:p>
          </table:table-cell>
          <table:table-cell>
            <text:p>85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7.0</text:p>
          </table:table-cell>
          <table:table-cell>
            <text:p>Whittier</text:p>
          </table:table-cell>
          <table:table-cell>
            <text:p>CA</text:p>
          </table:table-cell>
          <table:table-cell>
            <text:p>85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8.0</text:p>
          </table:table-cell>
          <table:table-cell>
            <text:p>Kissimmee</text:p>
          </table:table-cell>
          <table:table-cell>
            <text:p>FL</text:p>
          </table:table-cell>
          <table:table-cell>
            <text:p>855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9.0</text:p>
          </table:table-cell>
          <table:table-cell>
            <text:p>Mountain View</text:p>
          </table:table-cell>
          <table:table-cell>
            <text:p>CA</text:p>
          </table:table-cell>
          <table:table-cell>
            <text:p>854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0.0</text:p>
          </table:table-cell>
          <table:table-cell>
            <text:p>San Leandro</text:p>
          </table:table-cell>
          <table:table-cell>
            <text:p>CA</text:p>
          </table:table-cell>
          <table:table-cell>
            <text:p>853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1.0</text:p>
          </table:table-cell>
          <table:table-cell>
            <text:p>Layton</text:p>
          </table:table-cell>
          <table:table-cell>
            <text:p>UT</text:p>
          </table:table-cell>
          <table:table-cell>
            <text:p>853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2.0</text:p>
          </table:table-cell>
          <table:table-cell>
            <text:p>Auburn</text:p>
          </table:table-cell>
          <table:table-cell>
            <text:p>AL</text:p>
          </table:table-cell>
          <table:table-cell>
            <text:p>85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3.0</text:p>
          </table:table-cell>
          <table:table-cell>
            <text:p>Cranston</text:p>
          </table:table-cell>
          <table:table-cell>
            <text:p>RI</text:p>
          </table:table-cell>
          <table:table-cell>
            <text:p>8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4.0</text:p>
          </table:table-cell>
          <table:table-cell>
            <text:p>Mansfield</text:p>
          </table:table-cell>
          <table:table-cell>
            <text:p>TX</text:p>
          </table:table-cell>
          <table:table-cell>
            <text:p>84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5.0</text:p>
          </table:table-cell>
          <table:table-cell>
            <text:p>Somerville</text:p>
          </table:table-cell>
          <table:table-cell>
            <text:p>MA</text:p>
          </table:table-cell>
          <table:table-cell>
            <text:p>84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6.0</text:p>
          </table:table-cell>
          <table:table-cell>
            <text:p>Warwick</text:p>
          </table:table-cell>
          <table:table-cell>
            <text:p>RI</text:p>
          </table:table-cell>
          <table:table-cell>
            <text:p>8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7.0</text:p>
          </table:table-cell>
          <table:table-cell>
            <text:p>Castle Rock</text:p>
          </table:table-cell>
          <table:table-cell>
            <text:p>CO</text:p>
          </table:table-cell>
          <table:table-cell>
            <text:p>83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8.0</text:p>
          </table:table-cell>
          <table:table-cell>
            <text:p>Brooklyn Park</text:p>
          </table:table-cell>
          <table:table-cell>
            <text:p>MN</text:p>
          </table:table-cell>
          <table:table-cell>
            <text:p>835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9.0</text:p>
          </table:table-cell>
          <table:table-cell>
            <text:p>Livermore</text:p>
          </table:table-cell>
          <table:table-cell>
            <text:p>CA</text:p>
          </table:table-cell>
          <table:table-cell>
            <text:p>83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0.0</text:p>
          </table:table-cell>
          <table:table-cell>
            <text:p>Bloomington</text:p>
          </table:table-cell>
          <table:table-cell>
            <text:p>IN</text:p>
          </table:table-cell>
          <table:table-cell>
            <text:p>83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1.0</text:p>
          </table:table-cell>
          <table:table-cell>
            <text:p>Jonesboro</text:p>
          </table:table-cell>
          <table:table-cell>
            <text:p>AR</text:p>
          </table:table-cell>
          <table:table-cell>
            <text:p>83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2.0</text:p>
          </table:table-cell>
          <table:table-cell>
            <text:p>Farmington Hills</text:p>
          </table:table-cell>
          <table:table-cell>
            <text:p>MI</text:p>
          </table:table-cell>
          <table:table-cell>
            <text:p>83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3.0</text:p>
          </table:table-cell>
          <table:table-cell>
            <text:p>Perris</text:p>
          </table:table-cell>
          <table:table-cell>
            <text:p>CA</text:p>
          </table:table-cell>
          <table:table-cell>
            <text:p>832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4.0</text:p>
          </table:table-cell>
          <table:table-cell>
            <text:p>Longview</text:p>
          </table:table-cell>
          <table:table-cell>
            <text:p>TX</text:p>
          </table:table-cell>
          <table:table-cell>
            <text:p>83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5.0</text:p>
          </table:table-cell>
          <table:table-cell>
            <text:p>Pasco</text:p>
          </table:table-cell>
          <table:table-cell>
            <text:p>WA</text:p>
          </table:table-cell>
          <table:table-cell>
            <text:p>82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6.0</text:p>
          </table:table-cell>
          <table:table-cell>
            <text:p>Hawthorne</text:p>
          </table:table-cell>
          <table:table-cell>
            <text:p>CA</text:p>
          </table:table-cell>
          <table:table-cell>
            <text:p>82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7.0</text:p>
          </table:table-cell>
          <table:table-cell>
            <text:p>Lake Charles</text:p>
          </table:table-cell>
          <table:table-cell>
            <text:p>LA</text:p>
          </table:table-cell>
          <table:table-cell>
            <text:p>82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8.0</text:p>
          </table:table-cell>
          <table:table-cell>
            <text:p>Redmond</text:p>
          </table:table-cell>
          <table:table-cell>
            <text:p>WA</text:p>
          </table:table-cell>
          <table:table-cell>
            <text:p>82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9.0</text:p>
          </table:table-cell>
          <table:table-cell>
            <text:p>Boynton Beach</text:p>
          </table:table-cell>
          <table:table-cell>
            <text:p>FL</text:p>
          </table:table-cell>
          <table:table-cell>
            <text:p>82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0.0</text:p>
          </table:table-cell>
          <table:table-cell>
            <text:p>Westland</text:p>
          </table:table-cell>
          <table:table-cell>
            <text:p>MI</text:p>
          </table:table-cell>
          <table:table-cell>
            <text:p>82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1.0</text:p>
          </table:table-cell>
          <table:table-cell>
            <text:p>Redwood City</text:p>
          </table:table-cell>
          <table:table-cell>
            <text:p>CA</text:p>
          </table:table-cell>
          <table:table-cell>
            <text:p>82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2.0</text:p>
          </table:table-cell>
          <table:table-cell>
            <text:p>Newport Beach</text:p>
          </table:table-cell>
          <table:table-cell>
            <text:p>CA</text:p>
          </table:table-cell>
          <table:table-cell>
            <text:p>819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3.0</text:p>
          </table:table-cell>
          <table:table-cell>
            <text:p>Cicero</text:p>
          </table:table-cell>
          <table:table-cell>
            <text:p>IL</text:p>
          </table:table-cell>
          <table:table-cell>
            <text:p>81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4.0</text:p>
          </table:table-cell>
          <table:table-cell>
            <text:p>Buena Park</text:p>
          </table:table-cell>
          <table:table-cell>
            <text:p>CA</text:p>
          </table:table-cell>
          <table:table-cell>
            <text:p>81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5.0</text:p>
          </table:table-cell>
          <table:table-cell>
            <text:p>Doral</text:p>
          </table:table-cell>
          <table:table-cell>
            <text:p>FL</text:p>
          </table:table-cell>
          <table:table-cell>
            <text:p>81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6.0</text:p>
          </table:table-cell>
          <table:table-cell>
            <text:p>Miami Beach</text:p>
          </table:table-cell>
          <table:table-cell>
            <text:p>FL</text:p>
          </table:table-cell>
          <table:table-cell>
            <text:p>81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7.0</text:p>
          </table:table-cell>
          <table:table-cell>
            <text:p>Woodbury</text:p>
          </table:table-cell>
          <table:table-cell>
            <text:p>MN</text:p>
          </table:table-cell>
          <table:table-cell>
            <text:p>815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8.0</text:p>
          </table:table-cell>
          <table:table-cell>
            <text:p>Loveland</text:p>
          </table:table-cell>
          <table:table-cell>
            <text:p>CO</text:p>
          </table:table-cell>
          <table:table-cell>
            <text:p>81387</text:p>
          </table:table-cell>
          <table:table-cell>
            <text:p>Loveland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veland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9.0</text:p>
          </table:table-cell>
          <table:table-cell>
            <text:p>Lynchburg</text:p>
          </table:table-cell>
          <table:table-cell>
            <text:p>VA</text:p>
          </table:table-cell>
          <table:table-cell>
            <text:p>81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0.0</text:p>
          </table:table-cell>
          <table:table-cell>
            <text:p>Pharr</text:p>
          </table:table-cell>
          <table:table-cell>
            <text:p>TX</text:p>
          </table:table-cell>
          <table:table-cell>
            <text:p>80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1.0</text:p>
          </table:table-cell>
          <table:table-cell>
            <text:p>Largo</text:p>
          </table:table-cell>
          <table:table-cell>
            <text:p>FL</text:p>
          </table:table-cell>
          <table:table-cell>
            <text:p>8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2.0</text:p>
          </table:table-cell>
          <table:table-cell>
            <text:p>Rapid City</text:p>
          </table:table-cell>
          <table:table-cell>
            <text:p>SD</text:p>
          </table:table-cell>
          <table:table-cell>
            <text:p>80589</text:p>
          </table:table-cell>
          <table:table-cell>
            <text:p>Loyal Plumbing Heating and Cooling</text:p>
          </table:table-cell>
          <table:table-cell>
            <text:p>(605) 315-3683</text:p>
          </table:table-cell>
          <table:table-cell>
            <text:p/>
          </table:table-cell>
          <table:table-cell>
            <text:p><text:a xlink:href="https://www.loyalplumbing.com/" xlink:type="simple" xlink:actuate="onRequest" office:target-frame="_blank" text:style-name="InternetLink">https://www.loyalplumbing.com/</text:a></text:p>
          </table:table-cell>
          <table:table-cell>
            <text:p>814 E Omaha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3.0</text:p>
          </table:table-cell>
          <table:table-cell>
            <text:p>Apex</text:p>
          </table:table-cell>
          <table:table-cell>
            <text:p>NC</text:p>
          </table:table-cell>
          <table:table-cell>
            <text:p>804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4.0</text:p>
          </table:table-cell>
          <table:table-cell>
            <text:p>Johns Creek</text:p>
          </table:table-cell>
          <table:table-cell>
            <text:p>GA</text:p>
          </table:table-cell>
          <table:table-cell>
            <text:p>804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5.0</text:p>
          </table:table-cell>
          <table:table-cell>
            <text:p>Alhambra</text:p>
          </table:table-cell>
          <table:table-cell>
            <text:p>CA</text:p>
          </table:table-cell>
          <table:table-cell>
            <text:p>79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6.0</text:p>
          </table:table-cell>
          <table:table-cell>
            <text:p>Bethlehem</text:p>
          </table:table-cell>
          <table:table-cell>
            <text:p>PA</text:p>
          </table:table-cell>
          <table:table-cell>
            <text:p>79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7.0</text:p>
          </table:table-cell>
          <table:table-cell>
            <text:p>Flower Mound</text:p>
          </table:table-cell>
          <table:table-cell>
            <text:p>TX</text:p>
          </table:table-cell>
          <table:table-cell>
            <text:p>79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8.0</text:p>
          </table:table-cell>
          <table:table-cell>
            <text:p>Upland</text:p>
          </table:table-cell>
          <table:table-cell>
            <text:p>CA</text:p>
          </table:table-cell>
          <table:table-cell>
            <text:p>79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9.0</text:p>
          </table:table-cell>
          <table:table-cell>
            <text:p>Flint</text:p>
          </table:table-cell>
          <table:table-cell>
            <text:p>MI</text:p>
          </table:table-cell>
          <table:table-cell>
            <text:p>79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0.0</text:p>
          </table:table-cell>
          <table:table-cell>
            <text:p>Lakeville</text:p>
          </table:table-cell>
          <table:table-cell>
            <text:p>MN</text:p>
          </table:table-cell>
          <table:table-cell>
            <text:p>792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1.0</text:p>
          </table:table-cell>
          <table:table-cell>
            <text:p>Broomfield</text:p>
          </table:table-cell>
          <table:table-cell>
            <text:p>CO</text:p>
          </table:table-cell>
          <table:table-cell>
            <text:p>791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2.0</text:p>
          </table:table-cell>
          <table:table-cell>
            <text:p>Cedar Park</text:p>
          </table:table-cell>
          <table:table-cell>
            <text:p>TX</text:p>
          </table:table-cell>
          <table:table-cell>
            <text:p>790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3.0</text:p>
          </table:table-cell>
          <table:table-cell>
            <text:p>Plymouth</text:p>
          </table:table-cell>
          <table:table-cell>
            <text:p>MN</text:p>
          </table:table-cell>
          <table:table-cell>
            <text:p>78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4.0</text:p>
          </table:table-cell>
          <table:table-cell>
            <text:p>Missoula</text:p>
          </table:table-cell>
          <table:table-cell>
            <text:p>MT</text:p>
          </table:table-cell>
          <table:table-cell>
            <text:p>78903</text:p>
          </table:table-cell>
          <table:table-cell>
            <text:p>Plumb-Tech Plumbing, Heating &amp; Drain Missoula</text:p>
          </table:table-cell>
          <table:table-cell>
            <text:p>(406) 233-0662</text:p>
          </table:table-cell>
          <table:table-cell>
            <text:p/>
          </table:table-cell>
          <table:table-cell>
            <text:p><text:a xlink:href="https://plumbtechmt.com/" xlink:type="simple" xlink:actuate="onRequest" office:target-frame="_blank" text:style-name="InternetLink">https://plumbtechmt.com/</text:a></text:p>
          </table:table-cell>
          <table:table-cell>
            <text:p>1530 Livingston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5.0</text:p>
          </table:table-cell>
          <table:table-cell>
            <text:p>Mableton</text:p>
          </table:table-cell>
          <table:table-cell>
            <text:p>GA</text:p>
          </table:table-cell>
          <table:table-cell>
            <text:p>78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6.0</text:p>
          </table:table-cell>
          <table:table-cell>
            <text:p>Bloomington</text:p>
          </table:table-cell>
          <table:table-cell>
            <text:p>IL</text:p>
          </table:table-cell>
          <table:table-cell>
            <text:p>78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7.0</text:p>
          </table:table-cell>
          <table:table-cell>
            <text:p>Milpitas</text:p>
          </table:table-cell>
          <table:table-cell>
            <text:p>CA</text:p>
          </table:table-cell>
          <table:table-cell>
            <text:p>785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8.0</text:p>
          </table:table-cell>
          <table:table-cell>
            <text:p>Wyoming</text:p>
          </table:table-cell>
          <table:table-cell>
            <text:p>MI</text:p>
          </table:table-cell>
          <table:table-cell>
            <text:p>78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9.0</text:p>
          </table:table-cell>
          <table:table-cell>
            <text:p>Parma</text:p>
          </table:table-cell>
          <table:table-cell>
            <text:p>OH</text:p>
          </table:table-cell>
          <table:table-cell>
            <text:p>78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0.0</text:p>
          </table:table-cell>
          <table:table-cell>
            <text:p>St. George</text:p>
          </table:table-cell>
          <table:table-cell>
            <text:p>LA</text:p>
          </table:table-cell>
          <table:table-cell>
            <text:p>78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1.0</text:p>
          </table:table-cell>
          <table:table-cell>
            <text:p>Bowling Green</text:p>
          </table:table-cell>
          <table:table-cell>
            <text:p>KY</text:p>
          </table:table-cell>
          <table:table-cell>
            <text:p>78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2.0</text:p>
          </table:table-cell>
          <table:table-cell>
            <text:p>Maricopa</text:p>
          </table:table-cell>
          <table:table-cell>
            <text:p>AZ</text:p>
          </table:table-cell>
          <table:table-cell>
            <text:p>783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3.0</text:p>
          </table:table-cell>
          <table:table-cell>
            <text:p>Lakewood</text:p>
          </table:table-cell>
          <table:table-cell>
            <text:p>CA</text:p>
          </table:table-cell>
          <table:table-cell>
            <text:p>78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4.0</text:p>
          </table:table-cell>
          <table:table-cell>
            <text:p>Bismarck</text:p>
          </table:table-cell>
          <table:table-cell>
            <text:p>ND</text:p>
          </table:table-cell>
          <table:table-cell>
            <text:p>77963</text:p>
          </table:table-cell>
          <table:table-cell>
            <text:p>Timber Ridge Plumbing &amp; Heating</text:p>
          </table:table-cell>
          <table:table-cell>
            <text:p>(701) 289-3106</text:p>
          </table:table-cell>
          <table:table-cell>
            <text:p/>
          </table:table-cell>
          <table:table-cell>
            <text:p><text:a xlink:href="https://www.timberridgephnd.com/" xlink:type="simple" xlink:actuate="onRequest" office:target-frame="_blank" text:style-name="InternetLink">https://www.timberridgephnd.com/</text:a></text:p>
          </table:table-cell>
          <table:table-cell>
            <text:p>1512 Basin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5.0</text:p>
          </table:table-cell>
          <table:table-cell>
            <text:p>Racine</text:p>
          </table:table-cell>
          <table:table-cell>
            <text:p>WI</text:p>
          </table:table-cell>
          <table:table-cell>
            <text:p>7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6.0</text:p>
          </table:table-cell>
          <table:table-cell>
            <text:p>Tustin</text:p>
          </table:table-cell>
          <table:table-cell>
            <text:p>CA</text:p>
          </table:table-cell>
          <table:table-cell>
            <text:p>77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7.0</text:p>
          </table:table-cell>
          <table:table-cell>
            <text:p>Ankeny</text:p>
          </table:table-cell>
          <table:table-cell>
            <text:p>IA</text:p>
          </table:table-cell>
          <table:table-cell>
            <text:p>77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8.0</text:p>
          </table:table-cell>
          <table:table-cell>
            <text:p>San Marcos</text:p>
          </table:table-cell>
          <table:table-cell>
            <text:p>TX</text:p>
          </table:table-cell>
          <table:table-cell>
            <text:p>77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9.0</text:p>
          </table:table-cell>
          <table:table-cell>
            <text:p>Marysville</text:p>
          </table:table-cell>
          <table:table-cell>
            <text:p>WA</text:p>
          </table:table-cell>
          <table:table-cell>
            <text:p>776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0.0</text:p>
          </table:table-cell>
          <table:table-cell>
            <text:p>Pittsburg</text:p>
          </table:table-cell>
          <table:table-cell>
            <text:p>CA</text:p>
          </table:table-cell>
          <table:table-cell>
            <text:p>77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1.0</text:p>
          </table:table-cell>
          <table:table-cell>
            <text:p>Rochester Hills</text:p>
          </table:table-cell>
          <table:table-cell>
            <text:p>MI</text:p>
          </table:table-cell>
          <table:table-cell>
            <text:p>77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2.0</text:p>
          </table:table-cell>
          <table:table-cell>
            <text:p>Chino Hills</text:p>
          </table:table-cell>
          <table:table-cell>
            <text:p>CA</text:p>
          </table:table-cell>
          <table:table-cell>
            <text:p>77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3.0</text:p>
          </table:table-cell>
          <table:table-cell>
            <text:p>Missouri City</text:p>
          </table:table-cell>
          <table:table-cell>
            <text:p>TX</text:p>
          </table:table-cell>
          <table:table-cell>
            <text:p>773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4.0</text:p>
          </table:table-cell>
          <table:table-cell>
            <text:p>Flagstaff</text:p>
          </table:table-cell>
          <table:table-cell>
            <text:p>AZ</text:p>
          </table:table-cell>
          <table:table-cell>
            <text:p>77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5.0</text:p>
          </table:table-cell>
          <table:table-cell>
            <text:p>Schaumburg</text:p>
          </table:table-cell>
          <table:table-cell>
            <text:p>IL</text:p>
          </table:table-cell>
          <table:table-cell>
            <text:p>77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6.0</text:p>
          </table:table-cell>
          <table:table-cell>
            <text:p>Pawtucket</text:p>
          </table:table-cell>
          <table:table-cell>
            <text:p>RI</text:p>
          </table:table-cell>
          <table:table-cell>
            <text:p>77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7.0</text:p>
          </table:table-cell>
          <table:table-cell>
            <text:p>Rogers</text:p>
          </table:table-cell>
          <table:table-cell>
            <text:p>AR</text:p>
          </table:table-cell>
          <table:table-cell>
            <text:p>76956</text:p>
          </table:table-cell>
          <table:table-cell>
            <text:p>Kinty Jones Plumbing</text:p>
          </table:table-cell>
          <table:table-cell>
            <text:p>(479) 925-4186</text:p>
          </table:table-cell>
          <table:table-cell>
            <text:p/>
          </table:table-cell>
          <table:table-cell>
            <text:p><text:a xlink:href="https://kintyjonesplumbing.com/" xlink:type="simple" xlink:actuate="onRequest" office:target-frame="_blank" text:style-name="InternetLink">https://kintyjonesplumbing.com/</text:a></text:p>
          </table:table-cell>
          <table:table-cell>
            <text:p>4530 NE Hudson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8.0</text:p>
          </table:table-cell>
          <table:table-cell>
            <text:p>Alameda</text:p>
          </table:table-cell>
          <table:table-cell>
            <text:p>CA</text:p>
          </table:table-cell>
          <table:table-cell>
            <text:p>768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9.0</text:p>
          </table:table-cell>
          <table:table-cell>
            <text:p>Rocklin</text:p>
          </table:table-cell>
          <table:table-cell>
            <text:p>CA</text:p>
          </table:table-cell>
          <table:table-cell>
            <text:p>768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0.0</text:p>
          </table:table-cell>
          <table:table-cell>
            <text:p>Caldwell</text:p>
          </table:table-cell>
          <table:table-cell>
            <text:p>ID</text:p>
          </table:table-cell>
          <table:table-cell>
            <text:p>766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1.0</text:p>
          </table:table-cell>
          <table:table-cell>
            <text:p>Blaine</text:p>
          </table:table-cell>
          <table:table-cell>
            <text:p>MN</text:p>
          </table:table-cell>
          <table:table-cell>
            <text:p>76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2.0</text:p>
          </table:table-cell>
          <table:table-cell>
            <text:p>Napa</text:p>
          </table:table-cell>
          <table:table-cell>
            <text:p>CA</text:p>
          </table:table-cell>
          <table:table-cell>
            <text:p>76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3.0</text:p>
          </table:table-cell>
          <table:table-cell>
            <text:p>Gulfport</text:p>
          </table:table-cell>
          <table:table-cell>
            <text:p>MS</text:p>
          </table:table-cell>
          <table:table-cell>
            <text:p>76506</text:p>
          </table:table-cell>
          <table:table-cell>
            <text:p>A Royal Flush Plumbing Company</text:p>
          </table:table-cell>
          <table:table-cell>
            <text:p>(228) 867-9944</text:p>
          </table:table-cell>
          <table:table-cell>
            <text:p/>
          </table:table-cell>
          <table:table-cell>
            <text:p><text:a xlink:href="https://arfplumbing.com/" xlink:type="simple" xlink:actuate="onRequest" office:target-frame="_blank" text:style-name="InternetLink">https://arfplumbing.com/</text:a></text:p>
          </table:table-cell>
          <table:table-cell>
            <text:p>12453 Canal Rd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4.0</text:p>
          </table:table-cell>
          <table:table-cell>
            <text:p>Evanston</text:p>
          </table:table-cell>
          <table:table-cell>
            <text:p>IL</text:p>
          </table:table-cell>
          <table:table-cell>
            <text:p>763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5.0</text:p>
          </table:table-cell>
          <table:table-cell>
            <text:p>New Britain</text:p>
          </table:table-cell>
          <table:table-cell>
            <text:p>CT</text:p>
          </table:table-cell>
          <table:table-cell>
            <text:p>76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6.0</text:p>
          </table:table-cell>
          <table:table-cell>
            <text:p>Iowa City</text:p>
          </table:table-cell>
          <table:table-cell>
            <text:p>IA</text:p>
          </table:table-cell>
          <table:table-cell>
            <text:p>76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7.0</text:p>
          </table:table-cell>
          <table:table-cell>
            <text:p>Arlington Heights</text:p>
          </table:table-cell>
          <table:table-cell>
            <text:p>IL</text:p>
          </table:table-cell>
          <table:table-cell>
            <text:p>7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Noblesville</text:p>
          </table:table-cell>
          <table:table-cell>
            <text:p>IN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Southfield</text:p>
          </table:table-cell>
          <table:table-cell>
            <text:p>MI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0.0</text:p>
          </table:table-cell>
          <table:table-cell>
            <text:p>Rock Hill</text:p>
          </table:table-cell>
          <table:table-cell>
            <text:p>SC</text:p>
          </table:table-cell>
          <table:table-cell>
            <text:p>75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1.0</text:p>
          </table:table-cell>
          <table:table-cell>
            <text:p>Hammond</text:p>
          </table:table-cell>
          <table:table-cell>
            <text:p>IN</text:p>
          </table:table-cell>
          <table:table-cell>
            <text:p>75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2.0</text:p>
          </table:table-cell>
          <table:table-cell>
            <text:p>Lauderhill</text:p>
          </table:table-cell>
          <table:table-cell>
            <text:p>FL</text:p>
          </table:table-cell>
          <table:table-cell>
            <text:p>75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3.0</text:p>
          </table:table-cell>
          <table:table-cell>
            <text:p>Scranton</text:p>
          </table:table-cell>
          <table:table-cell>
            <text:p>PA</text:p>
          </table:table-cell>
          <table:table-cell>
            <text:p>75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4.0</text:p>
          </table:table-cell>
          <table:table-cell>
            <text:p>Appleton</text:p>
          </table:table-cell>
          <table:table-cell>
            <text:p>WI</text:p>
          </table:table-cell>
          <table:table-cell>
            <text:p>754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5.0</text:p>
          </table:table-cell>
          <table:table-cell>
            <text:p>Greenville</text:p>
          </table:table-cell>
          <table:table-cell>
            <text:p>SC</text:p>
          </table:table-cell>
          <table:table-cell>
            <text:p>7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6.0</text:p>
          </table:table-cell>
          <table:table-cell>
            <text:p>Apple Valley</text:p>
          </table:table-cell>
          <table:table-cell>
            <text:p>CA</text:p>
          </table:table-cell>
          <table:table-cell>
            <text:p>752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7.0</text:p>
          </table:table-cell>
          <table:table-cell>
            <text:p>Lake Elsinore</text:p>
          </table:table-cell>
          <table:table-cell>
            <text:p>CA</text:p>
          </table:table-cell>
          <table:table-cell>
            <text:p>75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8.0</text:p>
          </table:table-cell>
          <table:table-cell>
            <text:p>St. Cloud</text:p>
          </table:table-cell>
          <table:table-cell>
            <text:p>FL</text:p>
          </table:table-cell>
          <table:table-cell>
            <text:p>749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9.0</text:p>
          </table:table-cell>
          <table:table-cell>
            <text:p>Johnson City</text:p>
          </table:table-cell>
          <table:table-cell>
            <text:p>TN</text:p>
          </table:table-cell>
          <table:table-cell>
            <text:p>74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0.0</text:p>
          </table:table-cell>
          <table:table-cell>
            <text:p>Bolingbrook</text:p>
          </table:table-cell>
          <table:table-cell>
            <text:p>IL</text:p>
          </table:table-cell>
          <table:table-cell>
            <text:p>748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1.0</text:p>
          </table:table-cell>
          <table:table-cell>
            <text:p>Bayonne</text:p>
          </table:table-cell>
          <table:table-cell>
            <text:p>NJ</text:p>
          </table:table-cell>
          <table:table-cell>
            <text:p>747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2.0</text:p>
          </table:table-cell>
          <table:table-cell>
            <text:p>Bellflower</text:p>
          </table:table-cell>
          <table:table-cell>
            <text:p>CA</text:p>
          </table:table-cell>
          <table:table-cell>
            <text:p>74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3.0</text:p>
          </table:table-cell>
          <table:table-cell>
            <text:p>Pleasanton</text:p>
          </table:table-cell>
          <table:table-cell>
            <text:p>CA</text:p>
          </table:table-cell>
          <table:table-cell>
            <text:p>74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4.0</text:p>
          </table:table-cell>
          <table:table-cell>
            <text:p>West Des Moines</text:p>
          </table:table-cell>
          <table:table-cell>
            <text:p>IA</text:p>
          </table:table-cell>
          <table:table-cell>
            <text:p>74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5.0</text:p>
          </table:table-cell>
          <table:table-cell>
            <text:p>Tamarac</text:p>
          </table:table-cell>
          <table:table-cell>
            <text:p>FL</text:p>
          </table:table-cell>
          <table:table-cell>
            <text:p>7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6.0</text:p>
          </table:table-cell>
          <table:table-cell>
            <text:p>Redlands</text:p>
          </table:table-cell>
          <table:table-cell>
            <text:p>CA</text:p>
          </table:table-cell>
          <table:table-cell>
            <text:p>741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7.0</text:p>
          </table:table-cell>
          <table:table-cell>
            <text:p>Tulare</text:p>
          </table:table-cell>
          <table:table-cell>
            <text:p>CA</text:p>
          </table:table-cell>
          <table:table-cell>
            <text:p>73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8.0</text:p>
          </table:table-cell>
          <table:table-cell>
            <text:p>Maple Grove</text:p>
          </table:table-cell>
          <table:table-cell>
            <text:p>MN</text:p>
          </table:table-cell>
          <table:table-cell>
            <text:p>73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9.0</text:p>
          </table:table-cell>
          <table:table-cell>
            <text:p>Wilmington</text:p>
          </table:table-cell>
          <table:table-cell>
            <text:p>DE</text:p>
          </table:table-cell>
          <table:table-cell>
            <text:p>73512</text:p>
          </table:table-cell>
          <table:table-cell>
            <text:p>Benjamin Franklin Plumbing of Wilmington DE</text:p>
          </table:table-cell>
          <table:table-cell>
            <text:p>(302) 524-7437</text:p>
          </table:table-cell>
          <table:table-cell>
            <text:p/>
          </table:table-cell>
          <table:table-cell>
            <text:p><text:a xlink:href="https://benjaminfranklinplumbing.com/wilmington-de/" xlink:type="simple" xlink:actuate="onRequest" office:target-frame="_blank" text:style-name="InternetLink">https://benjaminfranklinplumbing.com/wilmington-de/</text:a></text:p>
          </table:table-cell>
          <table:table-cell>
            <text:p>410 Meco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0.0</text:p>
          </table:table-cell>
          <table:table-cell>
            <text:p>Framingham</text:p>
          </table:table-cell>
          <table:table-cell>
            <text:p>MA</text:p>
          </table:table-cell>
          <table:table-cell>
            <text:p>73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1.0</text:p>
          </table:table-cell>
          <table:table-cell>
            <text:p>Turlock</text:p>
          </table:table-cell>
          <table:table-cell>
            <text:p>CA</text:p>
          </table:table-cell>
          <table:table-cell>
            <text:p>72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2.0</text:p>
          </table:table-cell>
          <table:table-cell>
            <text:p>Jacksonville</text:p>
          </table:table-cell>
          <table:table-cell>
            <text:p>NC</text:p>
          </table:table-cell>
          <table:table-cell>
            <text:p>727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3.0</text:p>
          </table:table-cell>
          <table:table-cell>
            <text:p>Kalamazoo</text:p>
          </table:table-cell>
          <table:table-cell>
            <text:p>MI</text:p>
          </table:table-cell>
          <table:table-cell>
            <text:p>726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4.0</text:p>
          </table:table-cell>
          <table:table-cell>
            <text:p>St. Cloud</text:p>
          </table:table-cell>
          <table:table-cell>
            <text:p>MN</text:p>
          </table:table-cell>
          <table:table-cell>
            <text:p>72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5.0</text:p>
          </table:table-cell>
          <table:table-cell>
            <text:p>St. Charles</text:p>
          </table:table-cell>
          <table:table-cell>
            <text:p>MO</text:p>
          </table:table-cell>
          <table:table-cell>
            <text:p>72561</text:p>
          </table:table-cell>
          <table:table-cell>
            <text:p>Pierson Plumbing Sewer &amp; Drain L.L.C</text:p>
          </table:table-cell>
          <table:table-cell>
            <text:p>(314) 691-8066</text:p>
          </table:table-cell>
          <table:table-cell>
            <text:p/>
          </table:table-cell>
          <table:table-cell>
            <text:p><text:a xlink:href="http://www.piersonplumbingstl.com/" xlink:type="simple" xlink:actuate="onRequest" office:target-frame="_blank" text:style-name="InternetLink">http://www.piersonplumbingstl.com/</text:a></text:p>
          </table:table-cell>
          <table:table-cell>
            <text:p>500 Boone's Lick Rd Suite C Uppe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6.0</text:p>
          </table:table-cell>
          <table:table-cell>
            <text:p>Harlingen</text:p>
          </table:table-cell>
          <table:table-cell>
            <text:p>TX</text:p>
          </table:table-cell>
          <table:table-cell>
            <text:p>724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7.0</text:p>
          </table:table-cell>
          <table:table-cell>
            <text:p>Eau Claire</text:p>
          </table:table-cell>
          <table:table-cell>
            <text:p>WI</text:p>
          </table:table-cell>
          <table:table-cell>
            <text:p>724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8.0</text:p>
          </table:table-cell>
          <table:table-cell>
            <text:p>Commerce City</text:p>
          </table:table-cell>
          <table:table-cell>
            <text:p>CO</text:p>
          </table:table-cell>
          <table:table-cell>
            <text:p>7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9.0</text:p>
          </table:table-cell>
          <table:table-cell>
            <text:p>Conway</text:p>
          </table:table-cell>
          <table:table-cell>
            <text:p>AR</text:p>
          </table:table-cell>
          <table:table-cell>
            <text:p>723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0.0</text:p>
          </table:table-cell>
          <table:table-cell>
            <text:p>Mount Vernon</text:p>
          </table:table-cell>
          <table:table-cell>
            <text:p>NY</text:p>
          </table:table-cell>
          <table:table-cell>
            <text:p>72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1.0</text:p>
          </table:table-cell>
          <table:table-cell>
            <text:p>East Orange</text:p>
          </table:table-cell>
          <table:table-cell>
            <text:p>NJ</text:p>
          </table:table-cell>
          <table:table-cell>
            <text:p>72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2.0</text:p>
          </table:table-cell>
          <table:table-cell>
            <text:p>Dothan</text:p>
          </table:table-cell>
          <table:table-cell>
            <text:p>AL</text:p>
          </table:table-cell>
          <table:table-cell>
            <text:p>720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3.0</text:p>
          </table:table-cell>
          <table:table-cell>
            <text:p>Grand Junction</text:p>
          </table:table-cell>
          <table:table-cell>
            <text:p>CO</text:p>
          </table:table-cell>
          <table:table-cell>
            <text:p>718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4.0</text:p>
          </table:table-cell>
          <table:table-cell>
            <text:p>Idaho Falls</text:p>
          </table:table-cell>
          <table:table-cell>
            <text:p>ID</text:p>
          </table:table-cell>
          <table:table-cell>
            <text:p>717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5.0</text:p>
          </table:table-cell>
          <table:table-cell>
            <text:p>Ocala</text:p>
          </table:table-cell>
          <table:table-cell>
            <text:p>FL</text:p>
          </table:table-cell>
          <table:table-cell>
            <text:p>71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6.0</text:p>
          </table:table-cell>
          <table:table-cell>
            <text:p>Dublin</text:p>
          </table:table-cell>
          <table:table-cell>
            <text:p>CA</text:p>
          </table:table-cell>
          <table:table-cell>
            <text:p>71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7.0</text:p>
          </table:table-cell>
          <table:table-cell>
            <text:p>Camden</text:p>
          </table:table-cell>
          <table:table-cell>
            <text:p>NJ</text:p>
          </table:table-cell>
          <table:table-cell>
            <text:p>71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8.0</text:p>
          </table:table-cell>
          <table:table-cell>
            <text:p>Passaic</text:p>
          </table:table-cell>
          <table:table-cell>
            <text:p>NJ</text:p>
          </table:table-cell>
          <table:table-cell>
            <text:p>7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9.0</text:p>
          </table:table-cell>
          <table:table-cell>
            <text:p>Lafayette</text:p>
          </table:table-cell>
          <table:table-cell>
            <text:p>IN</text:p>
          </table:table-cell>
          <table:table-cell>
            <text:p>71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0.0</text:p>
          </table:table-cell>
          <table:table-cell>
            <text:p>Gaithersburg</text:p>
          </table:table-cell>
          <table:table-cell>
            <text:p>MD</text:p>
          </table:table-cell>
          <table:table-cell>
            <text:p>71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1.0</text:p>
          </table:table-cell>
          <table:table-cell>
            <text:p>St. Joseph</text:p>
          </table:table-cell>
          <table:table-cell>
            <text:p>MO</text:p>
          </table:table-cell>
          <table:table-cell>
            <text:p>71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2.0</text:p>
          </table:table-cell>
          <table:table-cell>
            <text:p>Waukesha</text:p>
          </table:table-cell>
          <table:table-cell>
            <text:p>WI</text:p>
          </table:table-cell>
          <table:table-cell>
            <text:p>70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3.0</text:p>
          </table:table-cell>
          <table:table-cell>
            <text:p>North Richland Hills</text:p>
          </table:table-cell>
          <table:table-cell>
            <text:p>TX</text:p>
          </table:table-cell>
          <table:table-cell>
            <text:p>70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4.0</text:p>
          </table:table-cell>
          <table:table-cell>
            <text:p>Eastvale</text:p>
          </table:table-cell>
          <table:table-cell>
            <text:p>CA</text:p>
          </table:table-cell>
          <table:table-cell>
            <text:p>70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5.0</text:p>
          </table:table-cell>
          <table:table-cell>
            <text:p>Walnut Creek</text:p>
          </table:table-cell>
          <table:table-cell>
            <text:p>CA</text:p>
          </table:table-cell>
          <table:table-cell>
            <text:p>70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6.0</text:p>
          </table:table-cell>
          <table:table-cell>
            <text:p>Kyle</text:p>
          </table:table-cell>
          <table:table-cell>
            <text:p>TX</text:p>
          </table:table-cell>
          <table:table-cell>
            <text:p>69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7.0</text:p>
          </table:table-cell>
          <table:table-cell>
            <text:p>Portland</text:p>
          </table:table-cell>
          <table:table-cell>
            <text:p>ME</text:p>
          </table:table-cell>
          <table:table-cell>
            <text:p>69911</text:p>
          </table:table-cell>
          <table:table-cell>
            <text:p>Heritage Home Service</text:p>
          </table:table-cell>
          <table:table-cell>
            <text:p>(207) 370-9533</text:p>
          </table:table-cell>
          <table:table-cell>
            <text:p/>
          </table:table-cell>
          <table:table-cell>
            <text:p><text:a xlink:href="https://justcallheritage.com/service-area/portland-me/" xlink:type="simple" xlink:actuate="onRequest" office:target-frame="_blank" text:style-name="InternetLink">https://justcallheritage.com/service-area/portland-me/</text:a></text:p>
          </table:table-cell>
          <table:table-cell>
            <text:p>72 City Line D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8.0</text:p>
          </table:table-cell>
          <table:table-cell>
            <text:p>Shawnee</text:p>
          </table:table-cell>
          <table:table-cell>
            <text:p>KS</text:p>
          </table:table-cell>
          <table:table-cell>
            <text:p>69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9.0</text:p>
          </table:table-cell>
          <table:table-cell>
            <text:p>Delray Beach</text:p>
          </table:table-cell>
          <table:table-cell>
            <text:p>FL</text:p>
          </table:table-cell>
          <table:table-cell>
            <text:p>69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0.0</text:p>
          </table:table-cell>
          <table:table-cell>
            <text:p>Casa Grande</text:p>
          </table:table-cell>
          <table:table-cell>
            <text:p>AZ</text:p>
          </table:table-cell>
          <table:table-cell>
            <text:p>69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1.0</text:p>
          </table:table-cell>
          <table:table-cell>
            <text:p>Weston</text:p>
          </table:table-cell>
          <table:table-cell>
            <text:p>FL</text:p>
          </table:table-cell>
          <table:table-cell>
            <text:p>69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2.0</text:p>
          </table:table-cell>
          <table:table-cell>
            <text:p>Yuba City</text:p>
          </table:table-cell>
          <table:table-cell>
            <text:p>CA</text:p>
          </table:table-cell>
          <table:table-cell>
            <text:p>694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3.0</text:p>
          </table:table-cell>
          <table:table-cell>
            <text:p>Schenectady</text:p>
          </table:table-cell>
          <table:table-cell>
            <text:p>NY</text:p>
          </table:table-cell>
          <table:table-cell>
            <text:p>69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4.0</text:p>
          </table:table-cell>
          <table:table-cell>
            <text:p>Greenwood</text:p>
          </table:table-cell>
          <table:table-cell>
            <text:p>IN</text:p>
          </table:table-cell>
          <table:table-cell>
            <text:p>693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5.0</text:p>
          </table:table-cell>
          <table:table-cell>
            <text:p>Jackson</text:p>
          </table:table-cell>
          <table:table-cell>
            <text:p>TN</text:p>
          </table:table-cell>
          <table:table-cell>
            <text:p>6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6.0</text:p>
          </table:table-cell>
          <table:table-cell>
            <text:p>Lodi</text:p>
          </table:table-cell>
          <table:table-cell>
            <text:p>CA</text:p>
          </table:table-cell>
          <table:table-cell>
            <text:p>691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7.0</text:p>
          </table:table-cell>
          <table:table-cell>
            <text:p>Madera</text:p>
          </table:table-cell>
          <table:table-cell>
            <text:p>CA</text:p>
          </table:table-cell>
          <table:table-cell>
            <text:p>6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8.0</text:p>
          </table:table-cell>
          <table:table-cell>
            <text:p>Canton</text:p>
          </table:table-cell>
          <table:table-cell>
            <text:p>OH</text:p>
          </table:table-cell>
          <table:table-cell>
            <text:p>69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9.0</text:p>
          </table:table-cell>
          <table:table-cell>
            <text:p>Baldwin Park</text:p>
          </table:table-cell>
          <table:table-cell>
            <text:p>CA</text:p>
          </table:table-cell>
          <table:table-cell>
            <text:p>688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0.0</text:p>
          </table:table-cell>
          <table:table-cell>
            <text:p>Camarillo</text:p>
          </table:table-cell>
          <table:table-cell>
            <text:p>CA</text:p>
          </table:table-cell>
          <table:table-cell>
            <text:p>68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1.0</text:p>
          </table:table-cell>
          <table:table-cell>
            <text:p>Huntersville</text:p>
          </table:table-cell>
          <table:table-cell>
            <text:p>NC</text:p>
          </table:table-cell>
          <table:table-cell>
            <text:p>68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2.0</text:p>
          </table:table-cell>
          <table:table-cell>
            <text:p>Haverhill</text:p>
          </table:table-cell>
          <table:table-cell>
            <text:p>MA</text:p>
          </table:table-cell>
          <table:table-cell>
            <text:p>683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3.0</text:p>
          </table:table-cell>
          <table:table-cell>
            <text:p>Pflugerville</text:p>
          </table:table-cell>
          <table:table-cell>
            <text:p>TX</text:p>
          </table:table-cell>
          <table:table-cell>
            <text:p>68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4.0</text:p>
          </table:table-cell>
          <table:table-cell>
            <text:p>Ames</text:p>
          </table:table-cell>
          <table:table-cell>
            <text:p>IA</text:p>
          </table:table-cell>
          <table:table-cell>
            <text:p>68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5.0</text:p>
          </table:table-cell>
          <table:table-cell>
            <text:p>Madison</text:p>
          </table:table-cell>
          <table:table-cell>
            <text:p>AL</text:p>
          </table:table-cell>
          <table:table-cell>
            <text:p>679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6.0</text:p>
          </table:table-cell>
          <table:table-cell>
            <text:p>Rowlett</text:p>
          </table:table-cell>
          <table:table-cell>
            <text:p>TX</text:p>
          </table:table-cell>
          <table:table-cell>
            <text:p>678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7.0</text:p>
          </table:table-cell>
          <table:table-cell>
            <text:p>Decatur</text:p>
          </table:table-cell>
          <table:table-cell>
            <text:p>IL</text:p>
          </table:table-cell>
          <table:table-cell>
            <text:p>67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8.0</text:p>
          </table:table-cell>
          <table:table-cell>
            <text:p>Palo Alto</text:p>
          </table:table-cell>
          <table:table-cell>
            <text:p>CA</text:p>
          </table:table-cell>
          <table:table-cell>
            <text:p>67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9.0</text:p>
          </table:table-cell>
          <table:table-cell>
            <text:p>Rockville</text:p>
          </table:table-cell>
          <table:table-cell>
            <text:p>MD</text:p>
          </table:table-cell>
          <table:table-cell>
            <text:p>67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0.0</text:p>
          </table:table-cell>
          <table:table-cell>
            <text:p>Sanford</text:p>
          </table:table-cell>
          <table:table-cell>
            <text:p>FL</text:p>
          </table:table-cell>
          <table:table-cell>
            <text:p>674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1.0</text:p>
          </table:table-cell>
          <table:table-cell>
            <text:p>Oshkosh</text:p>
          </table:table-cell>
          <table:table-cell>
            <text:p>WI</text:p>
          </table:table-cell>
          <table:table-cell>
            <text:p>67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2.0</text:p>
          </table:table-cell>
          <table:table-cell>
            <text:p>Novi</text:p>
          </table:table-cell>
          <table:table-cell>
            <text:p>MI</text:p>
          </table:table-cell>
          <table:table-cell>
            <text:p>673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3.0</text:p>
          </table:table-cell>
          <table:table-cell>
            <text:p>Gary</text:p>
          </table:table-cell>
          <table:table-cell>
            <text:p>IN</text:p>
          </table:table-cell>
          <table:table-cell>
            <text:p>67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4.0</text:p>
          </table:table-cell>
          <table:table-cell>
            <text:p>Redondo Beach</text:p>
          </table:table-cell>
          <table:table-cell>
            <text:p>CA</text:p>
          </table:table-cell>
          <table:table-cell>
            <text:p>67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5.0</text:p>
          </table:table-cell>
          <table:table-cell>
            <text:p>Eagan</text:p>
          </table:table-cell>
          <table:table-cell>
            <text:p>MN</text:p>
          </table:table-cell>
          <table:table-cell>
            <text:p>67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6.0</text:p>
          </table:table-cell>
          <table:table-cell>
            <text:p>Janesville</text:p>
          </table:table-cell>
          <table:table-cell>
            <text:p>WI</text:p>
          </table:table-cell>
          <table:table-cell>
            <text:p>66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7.0</text:p>
          </table:table-cell>
          <table:table-cell>
            <text:p>Alpharetta</text:p>
          </table:table-cell>
          <table:table-cell>
            <text:p>GA</text:p>
          </table:table-cell>
          <table:table-cell>
            <text:p>66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8.0</text:p>
          </table:table-cell>
          <table:table-cell>
            <text:p>Waterloo</text:p>
          </table:table-cell>
          <table:table-cell>
            <text:p>IA</text:p>
          </table:table-cell>
          <table:table-cell>
            <text:p>66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9.0</text:p>
          </table:table-cell>
          <table:table-cell>
            <text:p>Albany</text:p>
          </table:table-cell>
          <table:table-cell>
            <text:p>GA</text:p>
          </table:table-cell>
          <table:table-cell>
            <text:p>6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0.0</text:p>
          </table:table-cell>
          <table:table-cell>
            <text:p>Union City</text:p>
          </table:table-cell>
          <table:table-cell>
            <text:p>NJ</text:p>
          </table:table-cell>
          <table:table-cell>
            <text:p>66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1.0</text:p>
          </table:table-cell>
          <table:table-cell>
            <text:p>Brentwood</text:p>
          </table:table-cell>
          <table:table-cell>
            <text:p>CA</text:p>
          </table:table-cell>
          <table:table-cell>
            <text:p>666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2.0</text:p>
          </table:table-cell>
          <table:table-cell>
            <text:p>Eagle Mountain</text:p>
          </table:table-cell>
          <table:table-cell>
            <text:p>UT</text:p>
          </table:table-cell>
          <table:table-cell>
            <text:p>665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3.0</text:p>
          </table:table-cell>
          <table:table-cell>
            <text:p>Skokie</text:p>
          </table:table-cell>
          <table:table-cell>
            <text:p>IL</text:p>
          </table:table-cell>
          <table:table-cell>
            <text:p>66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4.0</text:p>
          </table:table-cell>
          <table:table-cell>
            <text:p>Shoreline</text:p>
          </table:table-cell>
          <table:table-cell>
            <text:p>WA</text:p>
          </table:table-cell>
          <table:table-cell>
            <text:p>66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5.0</text:p>
          </table:table-cell>
          <table:table-cell>
            <text:p>Cheyenne</text:p>
          </table:table-cell>
          <table:table-cell>
            <text:p>WY</text:p>
          </table:table-cell>
          <table:table-cell>
            <text:p>66507</text:p>
          </table:table-cell>
          <table:table-cell>
            <text:p>Aspen Mountain Plumbing</text:p>
          </table:table-cell>
          <table:table-cell>
            <text:p>(307) 202-8919</text:p>
          </table:table-cell>
          <table:table-cell>
            <text:p/>
          </table:table-cell>
          <table:table-cell>
            <text:p><text:a xlink:href="https://www.aspenmtnplumbing.com/plumbers-cheyenne-wy" xlink:type="simple" xlink:actuate="onRequest" office:target-frame="_blank" text:style-name="InternetLink">https://www.aspenmtnplumbing.com/plumbers-cheyenne-wy</text:a></text:p>
          </table:table-cell>
          <table:table-cell>
            <text:p>2404 E Lincolnwa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6.0</text:p>
          </table:table-cell>
          <table:table-cell>
            <text:p>Victoria</text:p>
          </table:table-cell>
          <table:table-cell>
            <text:p>TX</text:p>
          </table:table-cell>
          <table:table-cell>
            <text:p>66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7.0</text:p>
          </table:table-cell>
          <table:table-cell>
            <text:p>Port Orange</text:p>
          </table:table-cell>
          <table:table-cell>
            <text:p>FL</text:p>
          </table:table-cell>
          <table:table-cell>
            <text:p>6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8.0</text:p>
          </table:table-cell>
          <table:table-cell>
            <text:p>Malden</text:p>
          </table:table-cell>
          <table:table-cell>
            <text:p>MA</text:p>
          </table:table-cell>
          <table:table-cell>
            <text:p>663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9.0</text:p>
          </table:table-cell>
          <table:table-cell>
            <text:p>Westfield</text:p>
          </table:table-cell>
          <table:table-cell>
            <text:p>IN</text:p>
          </table:table-cell>
          <table:table-cell>
            <text:p>66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Davis</text:p>
          </table:table-cell>
          <table:table-cell>
            <text:p>C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Sammamish</text:p>
          </table:table-cell>
          <table:table-cell>
            <text:p>W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2.0</text:p>
          </table:table-cell>
          <table:table-cell>
            <text:p>Parker</text:p>
          </table:table-cell>
          <table:table-cell>
            <text:p>CO</text:p>
          </table:table-cell>
          <table:table-cell>
            <text:p>659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3.0</text:p>
          </table:table-cell>
          <table:table-cell>
            <text:p>Palatine</text:p>
          </table:table-cell>
          <table:table-cell>
            <text:p>IL</text:p>
          </table:table-cell>
          <table:table-cell>
            <text:p>6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4.0</text:p>
          </table:table-cell>
          <table:table-cell>
            <text:p>Yorba Linda</text:p>
          </table:table-cell>
          <table:table-cell>
            <text:p>CA</text:p>
          </table:table-cell>
          <table:table-cell>
            <text:p>65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5.0</text:p>
          </table:table-cell>
          <table:table-cell>
            <text:p>Apopka</text:p>
          </table:table-cell>
          <table:table-cell>
            <text:p>FL</text:p>
          </table:table-cell>
          <table:table-cell>
            <text:p>6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6.0</text:p>
          </table:table-cell>
          <table:table-cell>
            <text:p>Marana</text:p>
          </table:table-cell>
          <table:table-cell>
            <text:p>AZ</text:p>
          </table:table-cell>
          <table:table-cell>
            <text:p>65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7.0</text:p>
          </table:table-cell>
          <table:table-cell>
            <text:p>Muncie</text:p>
          </table:table-cell>
          <table:table-cell>
            <text:p>IN</text:p>
          </table:table-cell>
          <table:table-cell>
            <text:p>654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8.0</text:p>
          </table:table-cell>
          <table:table-cell>
            <text:p>Lorain</text:p>
          </table:table-cell>
          <table:table-cell>
            <text:p>OH</text:p>
          </table:table-cell>
          <table:table-cell>
            <text:p>6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9.0</text:p>
          </table:table-cell>
          <table:table-cell>
            <text:p>Union City</text:p>
          </table:table-cell>
          <table:table-cell>
            <text:p>CA</text:p>
          </table:table-cell>
          <table:table-cell>
            <text:p>65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0.0</text:p>
          </table:table-cell>
          <table:table-cell>
            <text:p>Richland</text:p>
          </table:table-cell>
          <table:table-cell>
            <text:p>WA</text:p>
          </table:table-cell>
          <table:table-cell>
            <text:p>65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1.0</text:p>
          </table:table-cell>
          <table:table-cell>
            <text:p>Burnsville</text:p>
          </table:table-cell>
          <table:table-cell>
            <text:p>MN</text:p>
          </table:table-cell>
          <table:table-cell>
            <text:p>65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2.0</text:p>
          </table:table-cell>
          <table:table-cell>
            <text:p>Kenner</text:p>
          </table:table-cell>
          <table:table-cell>
            <text:p>LA</text:p>
          </table:table-cell>
          <table:table-cell>
            <text:p>651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3.0</text:p>
          </table:table-cell>
          <table:table-cell>
            <text:p>North Little Rock</text:p>
          </table:table-cell>
          <table:table-cell>
            <text:p>AR</text:p>
          </table:table-cell>
          <table:table-cell>
            <text:p>6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4.0</text:p>
          </table:table-cell>
          <table:table-cell>
            <text:p>Waltham</text:p>
          </table:table-cell>
          <table:table-cell>
            <text:p>MA</text:p>
          </table:table-cell>
          <table:table-cell>
            <text:p>65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5.0</text:p>
          </table:table-cell>
          <table:table-cell>
            <text:p>South San Francisco</text:p>
          </table:table-cell>
          <table:table-cell>
            <text:p>CA</text:p>
          </table:table-cell>
          <table:table-cell>
            <text:p>649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6.0</text:p>
          </table:table-cell>
          <table:table-cell>
            <text:p>Bellevue</text:p>
          </table:table-cell>
          <table:table-cell>
            <text:p>NE</text:p>
          </table:table-cell>
          <table:table-cell>
            <text:p>648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7.0</text:p>
          </table:table-cell>
          <table:table-cell>
            <text:p>Hamilton</text:p>
          </table:table-cell>
          <table:table-cell>
            <text:p>OH</text:p>
          </table:table-cell>
          <table:table-cell>
            <text:p>64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8.0</text:p>
          </table:table-cell>
          <table:table-cell>
            <text:p>Fulshear</text:p>
          </table:table-cell>
          <table:table-cell>
            <text:p>TX</text:p>
          </table:table-cell>
          <table:table-cell>
            <text:p>64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9.0</text:p>
          </table:table-cell>
          <table:table-cell>
            <text:p>Celina</text:p>
          </table:table-cell>
          <table:table-cell>
            <text:p>TX</text:p>
          </table:table-cell>
          <table:table-cell>
            <text:p>64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0.0</text:p>
          </table:table-cell>
          <table:table-cell>
            <text:p>Hendersonville</text:p>
          </table:table-cell>
          <table:table-cell>
            <text:p>TN</text:p>
          </table:table-cell>
          <table:table-cell>
            <text:p>642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1.0</text:p>
          </table:table-cell>
          <table:table-cell>
            <text:p>Coon Rapids</text:p>
          </table:table-cell>
          <table:table-cell>
            <text:p>MN</text:p>
          </table:table-cell>
          <table:table-cell>
            <text:p>6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2.0</text:p>
          </table:table-cell>
          <table:table-cell>
            <text:p>Laguna Niguel</text:p>
          </table:table-cell>
          <table:table-cell>
            <text:p>CA</text:p>
          </table:table-cell>
          <table:table-cell>
            <text:p>64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3.0</text:p>
          </table:table-cell>
          <table:table-cell>
            <text:p>Millcreek</text:p>
          </table:table-cell>
          <table:table-cell>
            <text:p>UT</text:p>
          </table:table-cell>
          <table:table-cell>
            <text:p>639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4.0</text:p>
          </table:table-cell>
          <table:table-cell>
            <text:p>Palm Beach Gardens</text:p>
          </table:table-cell>
          <table:table-cell>
            <text:p>FL</text:p>
          </table:table-cell>
          <table:table-cell>
            <text:p>63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5.0</text:p>
          </table:table-cell>
          <table:table-cell>
            <text:p>Wylie</text:p>
          </table:table-cell>
          <table:table-cell>
            <text:p>TX</text:p>
          </table:table-cell>
          <table:table-cell>
            <text:p>63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6.0</text:p>
          </table:table-cell>
          <table:table-cell>
            <text:p>Moore</text:p>
          </table:table-cell>
          <table:table-cell>
            <text:p>OK</text:p>
          </table:table-cell>
          <table:table-cell>
            <text:p>63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7.0</text:p>
          </table:table-cell>
          <table:table-cell>
            <text:p>Marietta</text:p>
          </table:table-cell>
          <table:table-cell>
            <text:p>GA</text:p>
          </table:table-cell>
          <table:table-cell>
            <text:p>635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8.0</text:p>
          </table:table-cell>
          <table:table-cell>
            <text:p>Chapel Hill</text:p>
          </table:table-cell>
          <table:table-cell>
            <text:p>NC</text:p>
          </table:table-cell>
          <table:table-cell>
            <text:p>635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9.0</text:p>
          </table:table-cell>
          <table:table-cell>
            <text:p>Lynwood</text:p>
          </table:table-cell>
          <table:table-cell>
            <text:p>CA</text:p>
          </table:table-cell>
          <table:table-cell>
            <text:p>635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0.0</text:p>
          </table:table-cell>
          <table:table-cell>
            <text:p>Smyrna</text:p>
          </table:table-cell>
          <table:table-cell>
            <text:p>TN</text:p>
          </table:table-cell>
          <table:table-cell>
            <text:p>63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1.0</text:p>
          </table:table-cell>
          <table:table-cell>
            <text:p>Herriman</text:p>
          </table:table-cell>
          <table:table-cell>
            <text:p>UT</text:p>
          </table:table-cell>
          <table:table-cell>
            <text:p>63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2.0</text:p>
          </table:table-cell>
          <table:table-cell>
            <text:p>Bossier City</text:p>
          </table:table-cell>
          <table:table-cell>
            <text:p>LA</text:p>
          </table:table-cell>
          <table:table-cell>
            <text:p>6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3.0</text:p>
          </table:table-cell>
          <table:table-cell>
            <text:p>Porterville</text:p>
          </table:table-cell>
          <table:table-cell>
            <text:p>CA</text:p>
          </table:table-cell>
          <table:table-cell>
            <text:p>63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4.0</text:p>
          </table:table-cell>
          <table:table-cell>
            <text:p>Eden Prairie</text:p>
          </table:table-cell>
          <table:table-cell>
            <text:p>MN</text:p>
          </table:table-cell>
          <table:table-cell>
            <text:p>63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5.0</text:p>
          </table:table-cell>
          <table:table-cell>
            <text:p>Bentonville</text:p>
          </table:table-cell>
          <table:table-cell>
            <text:p>AR</text:p>
          </table:table-cell>
          <table:table-cell>
            <text:p>63057</text:p>
          </table:table-cell>
          <table:table-cell>
            <text:p>Smith Bros. Plumbing</text:p>
          </table:table-cell>
          <table:table-cell>
            <text:p>(479) 877-5803</text:p>
          </table:table-cell>
          <table:table-cell>
            <text:p/>
          </table:table-cell>
          <table:table-cell>
            <text:p><text:a xlink:href="https://www.callsmith.com/" xlink:type="simple" xlink:actuate="onRequest" office:target-frame="_blank" text:style-name="InternetLink">https://www.callsmith.com/</text:a></text:p>
          </table:table-cell>
          <table:table-cell>
            <text:p>8816 W McNelly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6.0</text:p>
          </table:table-cell>
          <table:table-cell>
            <text:p>Utica</text:p>
          </table:table-cell>
          <table:table-cell>
            <text:p>NY</text:p>
          </table:table-cell>
          <table:table-cell>
            <text:p>62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7.0</text:p>
          </table:table-cell>
          <table:table-cell>
            <text:p>White Plains</text:p>
          </table:table-cell>
          <table:table-cell>
            <text:p>NY</text:p>
          </table:table-cell>
          <table:table-cell>
            <text:p>62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8.0</text:p>
          </table:table-cell>
          <table:table-cell>
            <text:p>Lakewood</text:p>
          </table:table-cell>
          <table:table-cell>
            <text:p>WA</text:p>
          </table:table-cell>
          <table:table-cell>
            <text:p>62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9.0</text:p>
          </table:table-cell>
          <table:table-cell>
            <text:p>Little Elm</text:p>
          </table:table-cell>
          <table:table-cell>
            <text:p>TX</text:p>
          </table:table-cell>
          <table:table-cell>
            <text:p>627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0.0</text:p>
          </table:table-cell>
          <table:table-cell>
            <text:p>Vineland</text:p>
          </table:table-cell>
          <table:table-cell>
            <text:p>NJ</text:p>
          </table:table-cell>
          <table:table-cell>
            <text:p>627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1.0</text:p>
          </table:table-cell>
          <table:table-cell>
            <text:p>Council Bluffs</text:p>
          </table:table-cell>
          <table:table-cell>
            <text:p>IA</text:p>
          </table:table-cell>
          <table:table-cell>
            <text:p>626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2.0</text:p>
          </table:table-cell>
          <table:table-cell>
            <text:p>Wellington</text:p>
          </table:table-cell>
          <table:table-cell>
            <text:p>FL</text:p>
          </table:table-cell>
          <table:table-cell>
            <text:p>62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3.0</text:p>
          </table:table-cell>
          <table:table-cell>
            <text:p>Taunton</text:p>
          </table:table-cell>
          <table:table-cell>
            <text:p>MA</text:p>
          </table:table-cell>
          <table:table-cell>
            <text:p>62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4.0</text:p>
          </table:table-cell>
          <table:table-cell>
            <text:p>Woodland</text:p>
          </table:table-cell>
          <table:table-cell>
            <text:p>CA</text:p>
          </table:table-cell>
          <table:table-cell>
            <text:p>62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5.0</text:p>
          </table:table-cell>
          <table:table-cell>
            <text:p>Jupiter</text:p>
          </table:table-cell>
          <table:table-cell>
            <text:p>FL</text:p>
          </table:table-cell>
          <table:table-cell>
            <text:p>62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6.0</text:p>
          </table:table-cell>
          <table:table-cell>
            <text:p>Bristol</text:p>
          </table:table-cell>
          <table:table-cell>
            <text:p>CT</text:p>
          </table:table-cell>
          <table:table-cell>
            <text:p>623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7.0</text:p>
          </table:table-cell>
          <table:table-cell>
            <text:p>Winter Haven</text:p>
          </table:table-cell>
          <table:table-cell>
            <text:p>FL</text:p>
          </table:table-cell>
          <table:table-cell>
            <text:p>62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8.0</text:p>
          </table:table-cell>
          <table:table-cell>
            <text:p>Hanford</text:p>
          </table:table-cell>
          <table:table-cell>
            <text:p>CA</text:p>
          </table:table-cell>
          <table:table-cell>
            <text:p>62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9.0</text:p>
          </table:table-cell>
          <table:table-cell>
            <text:p>San Clemente</text:p>
          </table:table-cell>
          <table:table-cell>
            <text:p>CA</text:p>
          </table:table-cell>
          <table:table-cell>
            <text:p>62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0.0</text:p>
          </table:table-cell>
          <table:table-cell>
            <text:p>Pontiac</text:p>
          </table:table-cell>
          <table:table-cell>
            <text:p>MI</text:p>
          </table:table-cell>
          <table:table-cell>
            <text:p>62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1.0</text:p>
          </table:table-cell>
          <table:table-cell>
            <text:p>Santa Cruz</text:p>
          </table:table-cell>
          <table:table-cell>
            <text:p>CA</text:p>
          </table:table-cell>
          <table:table-cell>
            <text:p>61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2.0</text:p>
          </table:table-cell>
          <table:table-cell>
            <text:p>Kannapolis</text:p>
          </table:table-cell>
          <table:table-cell>
            <text:p>NC</text:p>
          </table:table-cell>
          <table:table-cell>
            <text:p>6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3.0</text:p>
          </table:table-cell>
          <table:table-cell>
            <text:p>Blue Springs</text:p>
          </table:table-cell>
          <table:table-cell>
            <text:p>MO</text:p>
          </table:table-cell>
          <table:table-cell>
            <text:p>61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4.0</text:p>
          </table:table-cell>
          <table:table-cell>
            <text:p>Corvallis</text:p>
          </table:table-cell>
          <table:table-cell>
            <text:p>OR</text:p>
          </table:table-cell>
          <table:table-cell>
            <text:p>61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5.0</text:p>
          </table:table-cell>
          <table:table-cell>
            <text:p>Burlington</text:p>
          </table:table-cell>
          <table:table-cell>
            <text:p>NC</text:p>
          </table:table-cell>
          <table:table-cell>
            <text:p>614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6.0</text:p>
          </table:table-cell>
          <table:table-cell>
            <text:p>St. Peters</text:p>
          </table:table-cell>
          <table:table-cell>
            <text:p>MO</text:p>
          </table:table-cell>
          <table:table-cell>
            <text:p>61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7.0</text:p>
          </table:table-cell>
          <table:table-cell>
            <text:p>Springfield</text:p>
          </table:table-cell>
          <table:table-cell>
            <text:p>OR</text:p>
          </table:table-cell>
          <table:table-cell>
            <text:p>61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8.0</text:p>
          </table:table-cell>
          <table:table-cell>
            <text:p>Saratoga Springs</text:p>
          </table:table-cell>
          <table:table-cell>
            <text:p>UT</text:p>
          </table:table-cell>
          <table:table-cell>
            <text:p>613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9.0</text:p>
          </table:table-cell>
          <table:table-cell>
            <text:p>Stonecrest</text:p>
          </table:table-cell>
          <table:table-cell>
            <text:p>GA</text:p>
          </table:table-cell>
          <table:table-cell>
            <text:p>6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0.0</text:p>
          </table:table-cell>
          <table:table-cell>
            <text:p>Spring Hill</text:p>
          </table:table-cell>
          <table:table-cell>
            <text:p>TN</text:p>
          </table:table-cell>
          <table:table-cell>
            <text:p>613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1.0</text:p>
          </table:table-cell>
          <table:table-cell>
            <text:p>Taylor</text:p>
          </table:table-cell>
          <table:table-cell>
            <text:p>MI</text:p>
          </table:table-cell>
          <table:table-cell>
            <text:p>61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2.0</text:p>
          </table:table-cell>
          <table:table-cell>
            <text:p>La Habra</text:p>
          </table:table-cell>
          <table:table-cell>
            <text:p>CA</text:p>
          </table:table-cell>
          <table:table-cell>
            <text:p>60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3.0</text:p>
          </table:table-cell>
          <table:table-cell>
            <text:p>Owensboro</text:p>
          </table:table-cell>
          <table:table-cell>
            <text:p>KY</text:p>
          </table:table-cell>
          <table:table-cell>
            <text:p>608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4.0</text:p>
          </table:table-cell>
          <table:table-cell>
            <text:p>North Miami</text:p>
          </table:table-cell>
          <table:table-cell>
            <text:p>FL</text:p>
          </table:table-cell>
          <table:table-cell>
            <text:p>60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5.0</text:p>
          </table:table-cell>
          <table:table-cell>
            <text:p>Beaumont</text:p>
          </table:table-cell>
          <table:table-cell>
            <text:p>CA</text:p>
          </table:table-cell>
          <table:table-cell>
            <text:p>608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6.0</text:p>
          </table:table-cell>
          <table:table-cell>
            <text:p>Meriden</text:p>
          </table:table-cell>
          <table:table-cell>
            <text:p>CT</text:p>
          </table:table-cell>
          <table:table-cell>
            <text:p>6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7.0</text:p>
          </table:table-cell>
          <table:table-cell>
            <text:p>Gilroy</text:p>
          </table:table-cell>
          <table:table-cell>
            <text:p>CA</text:p>
          </table:table-cell>
          <table:table-cell>
            <text:p>60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8.0</text:p>
          </table:table-cell>
          <table:table-cell>
            <text:p>Encinitas</text:p>
          </table:table-cell>
          <table:table-cell>
            <text:p>CA</text:p>
          </table:table-cell>
          <table:table-cell>
            <text:p>6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9.0</text:p>
          </table:table-cell>
          <table:table-cell>
            <text:p>Montebello</text:p>
          </table:table-cell>
          <table:table-cell>
            <text:p>CA</text:p>
          </table:table-cell>
          <table:table-cell>
            <text:p>6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0.0</text:p>
          </table:table-cell>
          <table:table-cell>
            <text:p>Dearborn Heights</text:p>
          </table:table-cell>
          <table:table-cell>
            <text:p>MI</text:p>
          </table:table-cell>
          <table:table-cell>
            <text:p>60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1.0</text:p>
          </table:table-cell>
          <table:table-cell>
            <text:p>Lenexa</text:p>
          </table:table-cell>
          <table:table-cell>
            <text:p>KS</text:p>
          </table:table-cell>
          <table:table-cell>
            <text:p>60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2.0</text:p>
          </table:table-cell>
          <table:table-cell>
            <text:p>Grand Forks</text:p>
          </table:table-cell>
          <table:table-cell>
            <text:p>ND</text:p>
          </table:table-cell>
          <table:table-cell>
            <text:p>6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3.0</text:p>
          </table:table-cell>
          <table:table-cell>
            <text:p>Great Falls</text:p>
          </table:table-cell>
          <table:table-cell>
            <text:p>MT</text:p>
          </table:table-cell>
          <table:table-cell>
            <text:p>60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4.0</text:p>
          </table:table-cell>
          <table:table-cell>
            <text:p>Revere</text:p>
          </table:table-cell>
          <table:table-cell>
            <text:p>MA</text:p>
          </table:table-cell>
          <table:table-cell>
            <text:p>60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5.0</text:p>
          </table:table-cell>
          <table:table-cell>
            <text:p>West Allis</text:p>
          </table:table-cell>
          <table:table-cell>
            <text:p>WI</text:p>
          </table:table-cell>
          <table:table-cell>
            <text:p>60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6.0</text:p>
          </table:table-cell>
          <table:table-cell>
            <text:p>Margate</text:p>
          </table:table-cell>
          <table:table-cell>
            <text:p>FL</text:p>
          </table:table-cell>
          <table:table-cell>
            <text:p>6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7.0</text:p>
          </table:table-cell>
          <table:table-cell>
            <text:p>Euless</text:p>
          </table:table-cell>
          <table:table-cell>
            <text:p>TX</text:p>
          </table:table-cell>
          <table:table-cell>
            <text:p>60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8.0</text:p>
          </table:table-cell>
          <table:table-cell>
            <text:p>Kokomo</text:p>
          </table:table-cell>
          <table:table-cell>
            <text:p>IN</text:p>
          </table:table-cell>
          <table:table-cell>
            <text:p>59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9.0</text:p>
          </table:table-cell>
          <table:table-cell>
            <text:p>La Mesa</text:p>
          </table:table-cell>
          <table:table-cell>
            <text:p>CA</text:p>
          </table:table-cell>
          <table:table-cell>
            <text:p>5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0.0</text:p>
          </table:table-cell>
          <table:table-cell>
            <text:p>Medford</text:p>
          </table:table-cell>
          <table:table-cell>
            <text:p>MA</text:p>
          </table:table-cell>
          <table:table-cell>
            <text:p>59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1.0</text:p>
          </table:table-cell>
          <table:table-cell>
            <text:p>Hempstead</text:p>
          </table:table-cell>
          <table:table-cell>
            <text:p>NY</text:p>
          </table:table-cell>
          <table:table-cell>
            <text:p>59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2.0</text:p>
          </table:table-cell>
          <table:table-cell>
            <text:p>Weymouth Town</text:p>
          </table:table-cell>
          <table:table-cell>
            <text:p>MA</text:p>
          </table:table-cell>
          <table:table-cell>
            <text:p>59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3.0</text:p>
          </table:table-cell>
          <table:table-cell>
            <text:p>Texas City</text:p>
          </table:table-cell>
          <table:table-cell>
            <text:p>TX</text:p>
          </table:table-cell>
          <table:table-cell>
            <text:p>59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4.0</text:p>
          </table:table-cell>
          <table:table-cell>
            <text:p>Petaluma</text:p>
          </table:table-cell>
          <table:table-cell>
            <text:p>CA</text:p>
          </table:table-cell>
          <table:table-cell>
            <text:p>59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5.0</text:p>
          </table:table-cell>
          <table:table-cell>
            <text:p>Brookhaven</text:p>
          </table:table-cell>
          <table:table-cell>
            <text:p>GA</text:p>
          </table:table-cell>
          <table:table-cell>
            <text:p>59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6.0</text:p>
          </table:table-cell>
          <table:table-cell>
            <text:p>San Rafael</text:p>
          </table:table-cell>
          <table:table-cell>
            <text:p>CA</text:p>
          </table:table-cell>
          <table:table-cell>
            <text:p>59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7.0</text:p>
          </table:table-cell>
          <table:table-cell>
            <text:p>Lake Havasu City</text:p>
          </table:table-cell>
          <table:table-cell>
            <text:p>AZ</text:p>
          </table:table-cell>
          <table:table-cell>
            <text:p>59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8.0</text:p>
          </table:table-cell>
          <table:table-cell>
            <text:p>Dubuque</text:p>
          </table:table-cell>
          <table:table-cell>
            <text:p>IA</text:p>
          </table:table-cell>
          <table:table-cell>
            <text:p>591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9.0</text:p>
          </table:table-cell>
          <table:table-cell>
            <text:p>Hoboken</text:p>
          </table:table-cell>
          <table:table-cell>
            <text:p>NJ</text:p>
          </table:table-cell>
          <table:table-cell>
            <text:p>59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0.0</text:p>
          </table:table-cell>
          <table:table-cell>
            <text:p>Pico Rivera</text:p>
          </table:table-cell>
          <table:table-cell>
            <text:p>CA</text:p>
          </table:table-cell>
          <table:table-cell>
            <text:p>5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1.0</text:p>
          </table:table-cell>
          <table:table-cell>
            <text:p>Lacey</text:p>
          </table:table-cell>
          <table:table-cell>
            <text:p>WA</text:p>
          </table:table-cell>
          <table:table-cell>
            <text:p>58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2.0</text:p>
          </table:table-cell>
          <table:table-cell>
            <text:p>Youngstown</text:p>
          </table:table-cell>
          <table:table-cell>
            <text:p>OH</text:p>
          </table:table-cell>
          <table:table-cell>
            <text:p>58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3.0</text:p>
          </table:table-cell>
          <table:table-cell>
            <text:p>Bozeman</text:p>
          </table:table-cell>
          <table:table-cell>
            <text:p>MT</text:p>
          </table:table-cell>
          <table:table-cell>
            <text:p>588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4.0</text:p>
          </table:table-cell>
          <table:table-cell>
            <text:p>Midwest City</text:p>
          </table:table-cell>
          <table:table-cell>
            <text:p>OK</text:p>
          </table:table-cell>
          <table:table-cell>
            <text:p>587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5.0</text:p>
          </table:table-cell>
          <table:table-cell>
            <text:p>Des Plaines</text:p>
          </table:table-cell>
          <table:table-cell>
            <text:p>IL</text:p>
          </table:table-cell>
          <table:table-cell>
            <text:p>587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Pocatello</text:p>
          </table:table-cell>
          <table:table-cell>
            <text:p>ID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Casper</text:p>
          </table:table-cell>
          <table:table-cell>
            <text:p>WY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8.0</text:p>
          </table:table-cell>
          <table:table-cell>
            <text:p>Terre Haute</text:p>
          </table:table-cell>
          <table:table-cell>
            <text:p>IN</text:p>
          </table:table-cell>
          <table:table-cell>
            <text:p>58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9.0</text:p>
          </table:table-cell>
          <table:table-cell>
            <text:p>Coconut Creek</text:p>
          </table:table-cell>
          <table:table-cell>
            <text:p>FL</text:p>
          </table:table-cell>
          <table:table-cell>
            <text:p>58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0.0</text:p>
          </table:table-cell>
          <table:table-cell>
            <text:p>Carson City</text:p>
          </table:table-cell>
          <table:table-cell>
            <text:p>NV</text:p>
          </table:table-cell>
          <table:table-cell>
            <text:p>58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1.0</text:p>
          </table:table-cell>
          <table:table-cell>
            <text:p>Gardena</text:p>
          </table:table-cell>
          <table:table-cell>
            <text:p>CA</text:p>
          </table:table-cell>
          <table:table-cell>
            <text:p>58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2.0</text:p>
          </table:table-cell>
          <table:table-cell>
            <text:p>Sarasota</text:p>
          </table:table-cell>
          <table:table-cell>
            <text:p>FL</text:p>
          </table:table-cell>
          <table:table-cell>
            <text:p>58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3.0</text:p>
          </table:table-cell>
          <table:table-cell>
            <text:p>Bowie</text:p>
          </table:table-cell>
          <table:table-cell>
            <text:p>MD</text:p>
          </table:table-cell>
          <table:table-cell>
            <text:p>58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4.0</text:p>
          </table:table-cell>
          <table:table-cell>
            <text:p>Lancaster</text:p>
          </table:table-cell>
          <table:table-cell>
            <text:p>PA</text:p>
          </table:table-cell>
          <table:table-cell>
            <text:p>5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5.0</text:p>
          </table:table-cell>
          <table:table-cell>
            <text:p>Cupertino</text:p>
          </table:table-cell>
          <table:table-cell>
            <text:p>CA</text:p>
          </table:table-cell>
          <table:table-cell>
            <text:p>58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6.0</text:p>
          </table:table-cell>
          <table:table-cell>
            <text:p>Springfield</text:p>
          </table:table-cell>
          <table:table-cell>
            <text:p>OH</text:p>
          </table:table-cell>
          <table:table-cell>
            <text:p>58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7.0</text:p>
          </table:table-cell>
          <table:table-cell>
            <text:p>Santee</text:p>
          </table:table-cell>
          <table:table-cell>
            <text:p>CA</text:p>
          </table:table-cell>
          <table:table-cell>
            <text:p>58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8.0</text:p>
          </table:table-cell>
          <table:table-cell>
            <text:p>Coeur d'Alene</text:p>
          </table:table-cell>
          <table:table-cell>
            <text:p>ID</text:p>
          </table:table-cell>
          <table:table-cell>
            <text:p>581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9.0</text:p>
          </table:table-cell>
          <table:table-cell>
            <text:p>Wake Forest</text:p>
          </table:table-cell>
          <table:table-cell>
            <text:p>NC</text:p>
          </table:table-cell>
          <table:table-cell>
            <text:p>581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0.0</text:p>
          </table:table-cell>
          <table:table-cell>
            <text:p>Decatur</text:p>
          </table:table-cell>
          <table:table-cell>
            <text:p>AL</text:p>
          </table:table-cell>
          <table:table-cell>
            <text:p>580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1.0</text:p>
          </table:table-cell>
          <table:table-cell>
            <text:p>Bradenton</text:p>
          </table:table-cell>
          <table:table-cell>
            <text:p>FL</text:p>
          </table:table-cell>
          <table:table-cell>
            <text:p>58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2.0</text:p>
          </table:table-cell>
          <table:table-cell>
            <text:p>Orland Park</text:p>
          </table:table-cell>
          <table:table-cell>
            <text:p>IL</text:p>
          </table:table-cell>
          <table:table-cell>
            <text:p>57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3.0</text:p>
          </table:table-cell>
          <table:table-cell>
            <text:p>Tigard</text:p>
          </table:table-cell>
          <table:table-cell>
            <text:p>OR</text:p>
          </table:table-cell>
          <table:table-cell>
            <text:p>57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4.0</text:p>
          </table:table-cell>
          <table:table-cell>
            <text:p>St. Clair Shores</text:p>
          </table:table-cell>
          <table:table-cell>
            <text:p>MI</text:p>
          </table:table-cell>
          <table:table-cell>
            <text:p>57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5.0</text:p>
          </table:table-cell>
          <table:table-cell>
            <text:p>Southaven</text:p>
          </table:table-cell>
          <table:table-cell>
            <text:p>MS</text:p>
          </table:table-cell>
          <table:table-cell>
            <text:p>57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6.0</text:p>
          </table:table-cell>
          <table:table-cell>
            <text:p>National City</text:p>
          </table:table-cell>
          <table:table-cell>
            <text:p>CA</text:p>
          </table:table-cell>
          <table:table-cell>
            <text:p>5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7.0</text:p>
          </table:table-cell>
          <table:table-cell>
            <text:p>Bonita Springs</text:p>
          </table:table-cell>
          <table:table-cell>
            <text:p>FL</text:p>
          </table:table-cell>
          <table:table-cell>
            <text:p>57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8.0</text:p>
          </table:table-cell>
          <table:table-cell>
            <text:p>Highland</text:p>
          </table:table-cell>
          <table:table-cell>
            <text:p>CA</text:p>
          </table:table-cell>
          <table:table-cell>
            <text:p>5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9.0</text:p>
          </table:table-cell>
          <table:table-cell>
            <text:p>Royal Oak</text:p>
          </table:table-cell>
          <table:table-cell>
            <text:p>MI</text:p>
          </table:table-cell>
          <table:table-cell>
            <text:p>575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0.0</text:p>
          </table:table-cell>
          <table:table-cell>
            <text:p>Kingsport</text:p>
          </table:table-cell>
          <table:table-cell>
            <text:p>TN</text:p>
          </table:table-cell>
          <table:table-cell>
            <text:p>575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1.0</text:p>
          </table:table-cell>
          <table:table-cell>
            <text:p>Smyrna</text:p>
          </table:table-cell>
          <table:table-cell>
            <text:p>GA</text:p>
          </table:table-cell>
          <table:table-cell>
            <text:p>57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2.0</text:p>
          </table:table-cell>
          <table:table-cell>
            <text:p>Taylorsville</text:p>
          </table:table-cell>
          <table:table-cell>
            <text:p>UT</text:p>
          </table:table-cell>
          <table:table-cell>
            <text:p>57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3.0</text:p>
          </table:table-cell>
          <table:table-cell>
            <text:p>Monterey Park</text:p>
          </table:table-cell>
          <table:table-cell>
            <text:p>CA</text:p>
          </table:table-cell>
          <table:table-cell>
            <text:p>57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4.0</text:p>
          </table:table-cell>
          <table:table-cell>
            <text:p>Kettering</text:p>
          </table:table-cell>
          <table:table-cell>
            <text:p>OH</text:p>
          </table:table-cell>
          <table:table-cell>
            <text:p>57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5.0</text:p>
          </table:table-cell>
          <table:table-cell>
            <text:p>Lincoln</text:p>
          </table:table-cell>
          <table:table-cell>
            <text:p>CA</text:p>
          </table:table-cell>
          <table:table-cell>
            <text:p>57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6.0</text:p>
          </table:table-cell>
          <table:table-cell>
            <text:p>Plainfield</text:p>
          </table:table-cell>
          <table:table-cell>
            <text:p>NJ</text:p>
          </table:table-cell>
          <table:table-cell>
            <text:p>57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7.0</text:p>
          </table:table-cell>
          <table:table-cell>
            <text:p>New Brunswick</text:p>
          </table:table-cell>
          <table:table-cell>
            <text:p>NJ</text:p>
          </table:table-cell>
          <table:table-cell>
            <text:p>57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8.0</text:p>
          </table:table-cell>
          <table:table-cell>
            <text:p>Burleson</text:p>
          </table:table-cell>
          <table:table-cell>
            <text:p>TX</text:p>
          </table:table-cell>
          <table:table-cell>
            <text:p>5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9.0</text:p>
          </table:table-cell>
          <table:table-cell>
            <text:p>Albany</text:p>
          </table:table-cell>
          <table:table-cell>
            <text:p>OR</text:p>
          </table:table-cell>
          <table:table-cell>
            <text:p>568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0.0</text:p>
          </table:table-cell>
          <table:table-cell>
            <text:p>Perth Amboy</text:p>
          </table:table-cell>
          <table:table-cell>
            <text:p>NJ</text:p>
          </table:table-cell>
          <table:table-cell>
            <text:p>567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1.0</text:p>
          </table:table-cell>
          <table:table-cell>
            <text:p>Olympia</text:p>
          </table:table-cell>
          <table:table-cell>
            <text:p>WA</text:p>
          </table:table-cell>
          <table:table-cell>
            <text:p>56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2.0</text:p>
          </table:table-cell>
          <table:table-cell>
            <text:p>DeSoto</text:p>
          </table:table-cell>
          <table:table-cell>
            <text:p>TX</text:p>
          </table:table-cell>
          <table:table-cell>
            <text:p>566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3.0</text:p>
          </table:table-cell>
          <table:table-cell>
            <text:p>Oak Lawn</text:p>
          </table:table-cell>
          <table:table-cell>
            <text:p>IL</text:p>
          </table:table-cell>
          <table:table-cell>
            <text:p>564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4.0</text:p>
          </table:table-cell>
          <table:table-cell>
            <text:p>Bartlett</text:p>
          </table:table-cell>
          <table:table-cell>
            <text:p>TN</text:p>
          </table:table-cell>
          <table:table-cell>
            <text:p>564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West Sacramento</text:p>
          </table:table-cell>
          <table:table-cell>
            <text:p>CA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Twin Falls</text:p>
          </table:table-cell>
          <table:table-cell>
            <text:p>ID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7.0</text:p>
          </table:table-cell>
          <table:table-cell>
            <text:p>Valdosta</text:p>
          </table:table-cell>
          <table:table-cell>
            <text:p>GA</text:p>
          </table:table-cell>
          <table:table-cell>
            <text:p>56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8.0</text:p>
          </table:table-cell>
          <table:table-cell>
            <text:p>Anderson</text:p>
          </table:table-cell>
          <table:table-cell>
            <text:p>IN</text:p>
          </table:table-cell>
          <table:table-cell>
            <text:p>56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9.0</text:p>
          </table:table-cell>
          <table:table-cell>
            <text:p>San Jacinto</text:p>
          </table:table-cell>
          <table:table-cell>
            <text:p>CA</text:p>
          </table:table-cell>
          <table:table-cell>
            <text:p>56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0.0</text:p>
          </table:table-cell>
          <table:table-cell>
            <text:p>Peabody</text:p>
          </table:table-cell>
          <table:table-cell>
            <text:p>MA</text:p>
          </table:table-cell>
          <table:table-cell>
            <text:p>55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1.0</text:p>
          </table:table-cell>
          <table:table-cell>
            <text:p>Mooresville</text:p>
          </table:table-cell>
          <table:table-cell>
            <text:p>NC</text:p>
          </table:table-cell>
          <table:table-cell>
            <text:p>5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2.0</text:p>
          </table:table-cell>
          <table:table-cell>
            <text:p>Port Arthur</text:p>
          </table:table-cell>
          <table:table-cell>
            <text:p>TX</text:p>
          </table:table-cell>
          <table:table-cell>
            <text:p>5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3.0</text:p>
          </table:table-cell>
          <table:table-cell>
            <text:p>Logan</text:p>
          </table:table-cell>
          <table:table-cell>
            <text:p>UT</text:p>
          </table:table-cell>
          <table:table-cell>
            <text:p>555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4.0</text:p>
          </table:table-cell>
          <table:table-cell>
            <text:p>Fountain Valley</text:p>
          </table:table-cell>
          <table:table-cell>
            <text:p>CA</text:p>
          </table:table-cell>
          <table:table-cell>
            <text:p>55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5.0</text:p>
          </table:table-cell>
          <table:table-cell>
            <text:p>Mount Prospect</text:p>
          </table:table-cell>
          <table:table-cell>
            <text:p>IL</text:p>
          </table:table-cell>
          <table:table-cell>
            <text:p>55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6.0</text:p>
          </table:table-cell>
          <table:table-cell>
            <text:p>West Haven</text:p>
          </table:table-cell>
          <table:table-cell>
            <text:p>CT</text:p>
          </table:table-cell>
          <table:table-cell>
            <text:p>553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7.0</text:p>
          </table:table-cell>
          <table:table-cell>
            <text:p>Chicopee</text:p>
          </table:table-cell>
          <table:table-cell>
            <text:p>MA</text:p>
          </table:table-cell>
          <table:table-cell>
            <text:p>5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8.0</text:p>
          </table:table-cell>
          <table:table-cell>
            <text:p>Apple Valley</text:p>
          </table:table-cell>
          <table:table-cell>
            <text:p>MN</text:p>
          </table:table-cell>
          <table:table-cell>
            <text:p>55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9.0</text:p>
          </table:table-cell>
          <table:table-cell>
            <text:p>Tinley Park</text:p>
          </table:table-cell>
          <table:table-cell>
            <text:p>IL</text:p>
          </table:table-cell>
          <table:table-cell>
            <text:p>55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0.0</text:p>
          </table:table-cell>
          <table:table-cell>
            <text:p>Rocky Mount</text:p>
          </table:table-cell>
          <table:table-cell>
            <text:p>NC</text:p>
          </table:table-cell>
          <table:table-cell>
            <text:p>5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1.0</text:p>
          </table:table-cell>
          <table:table-cell>
            <text:p>Berwyn</text:p>
          </table:table-cell>
          <table:table-cell>
            <text:p>IL</text:p>
          </table:table-cell>
          <table:table-cell>
            <text:p>55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2.0</text:p>
          </table:table-cell>
          <table:table-cell>
            <text:p>Yucaipa</text:p>
          </table:table-cell>
          <table:table-cell>
            <text:p>CA</text:p>
          </table:table-cell>
          <table:table-cell>
            <text:p>54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3.0</text:p>
          </table:table-cell>
          <table:table-cell>
            <text:p>Placentia</text:p>
          </table:table-cell>
          <table:table-cell>
            <text:p>CA</text:p>
          </table:table-cell>
          <table:table-cell>
            <text:p>54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4.0</text:p>
          </table:table-cell>
          <table:table-cell>
            <text:p>Kentwood</text:p>
          </table:table-cell>
          <table:table-cell>
            <text:p>MI</text:p>
          </table:table-cell>
          <table:table-cell>
            <text:p>54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5.0</text:p>
          </table:table-cell>
          <table:table-cell>
            <text:p>Manhattan</text:p>
          </table:table-cell>
          <table:table-cell>
            <text:p>KS</text:p>
          </table:table-cell>
          <table:table-cell>
            <text:p>546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6.0</text:p>
          </table:table-cell>
          <table:table-cell>
            <text:p>Gallatin</text:p>
          </table:table-cell>
          <table:table-cell>
            <text:p>TN</text:p>
          </table:table-cell>
          <table:table-cell>
            <text:p>545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7.0</text:p>
          </table:table-cell>
          <table:table-cell>
            <text:p>Methuen</text:p>
          </table:table-cell>
          <table:table-cell>
            <text:p>MA</text:p>
          </table:table-cell>
          <table:table-cell>
            <text:p>54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8.0</text:p>
          </table:table-cell>
          <table:table-cell>
            <text:p>Edina</text:p>
          </table:table-cell>
          <table:table-cell>
            <text:p>MN</text:p>
          </table:table-cell>
          <table:table-cell>
            <text:p>54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9.0</text:p>
          </table:table-cell>
          <table:table-cell>
            <text:p>Jeffersonville</text:p>
          </table:table-cell>
          <table:table-cell>
            <text:p>IN</text:p>
          </table:table-cell>
          <table:table-cell>
            <text:p>5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0.0</text:p>
          </table:table-cell>
          <table:table-cell>
            <text:p>Arcadia</text:p>
          </table:table-cell>
          <table:table-cell>
            <text:p>CA</text:p>
          </table:table-cell>
          <table:table-cell>
            <text:p>541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1.0</text:p>
          </table:table-cell>
          <table:table-cell>
            <text:p>Elkhart</text:p>
          </table:table-cell>
          <table:table-cell>
            <text:p>IN</text:p>
          </table:table-cell>
          <table:table-cell>
            <text:p>5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2.0</text:p>
          </table:table-cell>
          <table:table-cell>
            <text:p>Wheaton</text:p>
          </table:table-cell>
          <table:table-cell>
            <text:p>IL</text:p>
          </table:table-cell>
          <table:table-cell>
            <text:p>54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3.0</text:p>
          </table:table-cell>
          <table:table-cell>
            <text:p>Rockwall</text:p>
          </table:table-cell>
          <table:table-cell>
            <text:p>TX</text:p>
          </table:table-cell>
          <table:table-cell>
            <text:p>53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4.0</text:p>
          </table:table-cell>
          <table:table-cell>
            <text:p>Minnetonka</text:p>
          </table:table-cell>
          <table:table-cell>
            <text:p>MN</text:p>
          </table:table-cell>
          <table:table-cell>
            <text:p>539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5.0</text:p>
          </table:table-cell>
          <table:table-cell>
            <text:p>Grand Island</text:p>
          </table:table-cell>
          <table:table-cell>
            <text:p>NE</text:p>
          </table:table-cell>
          <table:table-cell>
            <text:p>53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6.0</text:p>
          </table:table-cell>
          <table:table-cell>
            <text:p>Joplin</text:p>
          </table:table-cell>
          <table:table-cell>
            <text:p>MO</text:p>
          </table:table-cell>
          <table:table-cell>
            <text:p>53930</text:p>
          </table:table-cell>
          <table:table-cell>
            <text:p>Next Generation Gaylen Plumbing</text:p>
          </table:table-cell>
          <table:table-cell>
            <text:p>(417) 781-5136</text:p>
          </table:table-cell>
          <table:table-cell>
            <text:p/>
          </table:table-cell>
          <table:table-cell>
            <text:p><text:a xlink:href="http://www.nextgenerationgaylen.com/" xlink:type="simple" xlink:actuate="onRequest" office:target-frame="_blank" text:style-name="InternetLink">http://www.nextgenerationgaylen.com/</text:a></text:p>
          </table:table-cell>
          <table:table-cell>
            <text:p>2030 S Main St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7.0</text:p>
          </table:table-cell>
          <table:table-cell>
            <text:p>Pensacola</text:p>
          </table:table-cell>
          <table:table-cell>
            <text:p>FL</text:p>
          </table:table-cell>
          <table:table-cell>
            <text:p>53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8.0</text:p>
          </table:table-cell>
          <table:table-cell>
            <text:p>Galveston</text:p>
          </table:table-cell>
          <table:table-cell>
            <text:p>TX</text:p>
          </table:table-cell>
          <table:table-cell>
            <text:p>53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9.0</text:p>
          </table:table-cell>
          <table:table-cell>
            <text:p>Elyria</text:p>
          </table:table-cell>
          <table:table-cell>
            <text:p>OH</text:p>
          </table:table-cell>
          <table:table-cell>
            <text:p>53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0.0</text:p>
          </table:table-cell>
          <table:table-cell>
            <text:p>Milford</text:p>
          </table:table-cell>
          <table:table-cell>
            <text:p>CT</text:p>
          </table:table-cell>
          <table:table-cell>
            <text:p>53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1.0</text:p>
          </table:table-cell>
          <table:table-cell>
            <text:p>Everett</text:p>
          </table:table-cell>
          <table:table-cell>
            <text:p>MA</text:p>
          </table:table-cell>
          <table:table-cell>
            <text:p>53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2.0</text:p>
          </table:table-cell>
          <table:table-cell>
            <text:p>Lebanon</text:p>
          </table:table-cell>
          <table:table-cell>
            <text:p>TN</text:p>
          </table:table-cell>
          <table:table-cell>
            <text:p>53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3.0</text:p>
          </table:table-cell>
          <table:table-cell>
            <text:p>Colton</text:p>
          </table:table-cell>
          <table:table-cell>
            <text:p>CA</text:p>
          </table:table-cell>
          <table:table-cell>
            <text:p>53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4.0</text:p>
          </table:table-cell>
          <table:table-cell>
            <text:p>Murray</text:p>
          </table:table-cell>
          <table:table-cell>
            <text:p>UT</text:p>
          </table:table-cell>
          <table:table-cell>
            <text:p>53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5.0</text:p>
          </table:table-cell>
          <table:table-cell>
            <text:p>Normal</text:p>
          </table:table-cell>
          <table:table-cell>
            <text:p>IL</text:p>
          </table:table-cell>
          <table:table-cell>
            <text:p>532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6.0</text:p>
          </table:table-cell>
          <table:table-cell>
            <text:p>Palm Desert</text:p>
          </table:table-cell>
          <table:table-cell>
            <text:p>CA</text:p>
          </table:table-cell>
          <table:table-cell>
            <text:p>5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7.0</text:p>
          </table:table-cell>
          <table:table-cell>
            <text:p>West New York</text:p>
          </table:table-cell>
          <table:table-cell>
            <text:p>NJ</text:p>
          </table:table-cell>
          <table:table-cell>
            <text:p>53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8.0</text:p>
          </table:table-cell>
          <table:table-cell>
            <text:p>Summerville</text:p>
          </table:table-cell>
          <table:table-cell>
            <text:p>SC</text:p>
          </table:table-cell>
          <table:table-cell>
            <text:p>531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9.0</text:p>
          </table:table-cell>
          <table:table-cell>
            <text:p>Oak Park</text:p>
          </table:table-cell>
          <table:table-cell>
            <text:p>IL</text:p>
          </table:table-cell>
          <table:table-cell>
            <text:p>528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0.0</text:p>
          </table:table-cell>
          <table:table-cell>
            <text:p>Clermont</text:p>
          </table:table-cell>
          <table:table-cell>
            <text:p>FL</text:p>
          </table:table-cell>
          <table:table-cell>
            <text:p>52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1.0</text:p>
          </table:table-cell>
          <table:table-cell>
            <text:p>Columbus</text:p>
          </table:table-cell>
          <table:table-cell>
            <text:p>IN</text:p>
          </table:table-cell>
          <table:table-cell>
            <text:p>526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2.0</text:p>
          </table:table-cell>
          <table:table-cell>
            <text:p>Prescott Valley</text:p>
          </table:table-cell>
          <table:table-cell>
            <text:p>AZ</text:p>
          </table:table-cell>
          <table:table-cell>
            <text:p>52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3.0</text:p>
          </table:table-cell>
          <table:table-cell>
            <text:p>Sherman</text:p>
          </table:table-cell>
          <table:table-cell>
            <text:p>TX</text:p>
          </table:table-cell>
          <table:table-cell>
            <text:p>5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4.0</text:p>
          </table:table-cell>
          <table:table-cell>
            <text:p>Cathedral City</text:p>
          </table:table-cell>
          <table:table-cell>
            <text:p>CA</text:p>
          </table:table-cell>
          <table:table-cell>
            <text:p>523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5.0</text:p>
          </table:table-cell>
          <table:table-cell>
            <text:p>Delano</text:p>
          </table:table-cell>
          <table:table-cell>
            <text:p>CA</text:p>
          </table:table-cell>
          <table:table-cell>
            <text:p>523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6.0</text:p>
          </table:table-cell>
          <table:table-cell>
            <text:p>Pinellas Park</text:p>
          </table:table-cell>
          <table:table-cell>
            <text:p>FL</text:p>
          </table:table-cell>
          <table:table-cell>
            <text:p>522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7.0</text:p>
          </table:table-cell>
          <table:table-cell>
            <text:p>Bothell</text:p>
          </table:table-cell>
          <table:table-cell>
            <text:p>WA</text:p>
          </table:table-cell>
          <table:table-cell>
            <text:p>52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8.0</text:p>
          </table:table-cell>
          <table:table-cell>
            <text:p>Middletown</text:p>
          </table:table-cell>
          <table:table-cell>
            <text:p>OH</text:p>
          </table:table-cell>
          <table:table-cell>
            <text:p>52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9.0</text:p>
          </table:table-cell>
          <table:table-cell>
            <text:p>Battle Creek</text:p>
          </table:table-cell>
          <table:table-cell>
            <text:p>MI</text:p>
          </table:table-cell>
          <table:table-cell>
            <text:p>5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0.0</text:p>
          </table:table-cell>
          <table:table-cell>
            <text:p>Goose Creek</text:p>
          </table:table-cell>
          <table:table-cell>
            <text:p>SC</text:p>
          </table:table-cell>
          <table:table-cell>
            <text:p>52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1.0</text:p>
          </table:table-cell>
          <table:table-cell>
            <text:p>Novato</text:p>
          </table:table-cell>
          <table:table-cell>
            <text:p>CA</text:p>
          </table:table-cell>
          <table:table-cell>
            <text:p>51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2.0</text:p>
          </table:table-cell>
          <table:table-cell>
            <text:p>Ocoee</text:p>
          </table:table-cell>
          <table:table-cell>
            <text:p>FL</text:p>
          </table:table-cell>
          <table:table-cell>
            <text:p>5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3.0</text:p>
          </table:table-cell>
          <table:table-cell>
            <text:p>Collierville</text:p>
          </table:table-cell>
          <table:table-cell>
            <text:p>TN</text:p>
          </table:table-cell>
          <table:table-cell>
            <text:p>519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4.0</text:p>
          </table:table-cell>
          <table:table-cell>
            <text:p>Diamond Bar</text:p>
          </table:table-cell>
          <table:table-cell>
            <text:p>CA</text:p>
          </table:table-cell>
          <table:table-cell>
            <text:p>51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5.0</text:p>
          </table:table-cell>
          <table:table-cell>
            <text:p>Burien</text:p>
          </table:table-cell>
          <table:table-cell>
            <text:p>WA</text:p>
          </table:table-cell>
          <table:table-cell>
            <text:p>51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6.0</text:p>
          </table:table-cell>
          <table:table-cell>
            <text:p>Dunwoody</text:p>
          </table:table-cell>
          <table:table-cell>
            <text:p>GA</text:p>
          </table:table-cell>
          <table:table-cell>
            <text:p>517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7.0</text:p>
          </table:table-cell>
          <table:table-cell>
            <text:p>Fort Pierce</text:p>
          </table:table-cell>
          <table:table-cell>
            <text:p>FL</text:p>
          </table:table-cell>
          <table:table-cell>
            <text:p>5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8.0</text:p>
          </table:table-cell>
          <table:table-cell>
            <text:p>Huntington Park</text:p>
          </table:table-cell>
          <table:table-cell>
            <text:p>CA</text:p>
          </table:table-cell>
          <table:table-cell>
            <text:p>51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9.0</text:p>
          </table:table-cell>
          <table:table-cell>
            <text:p>Newark</text:p>
          </table:table-cell>
          <table:table-cell>
            <text:p>OH</text:p>
          </table:table-cell>
          <table:table-cell>
            <text:p>514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0.0</text:p>
          </table:table-cell>
          <table:table-cell>
            <text:p>Mishawaka</text:p>
          </table:table-cell>
          <table:table-cell>
            <text:p>IN</text:p>
          </table:table-cell>
          <table:table-cell>
            <text:p>51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1.0</text:p>
          </table:table-cell>
          <table:table-cell>
            <text:p>Cleveland</text:p>
          </table:table-cell>
          <table:table-cell>
            <text:p>TN</text:p>
          </table:table-cell>
          <table:table-cell>
            <text:p>51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2.0</text:p>
          </table:table-cell>
          <table:table-cell>
            <text:p>Florissant</text:p>
          </table:table-cell>
          <table:table-cell>
            <text:p>MO</text:p>
          </table:table-cell>
          <table:table-cell>
            <text:p>51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3.0</text:p>
          </table:table-cell>
          <table:table-cell>
            <text:p>Cuyahoga Falls</text:p>
          </table:table-cell>
          <table:table-cell>
            <text:p>OH</text:p>
          </table:table-cell>
          <table:table-cell>
            <text:p>50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4.0</text:p>
          </table:table-cell>
          <table:table-cell>
            <text:p>Troy</text:p>
          </table:table-cell>
          <table:table-cell>
            <text:p>NY</text:p>
          </table:table-cell>
          <table:table-cell>
            <text:p>50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5.0</text:p>
          </table:table-cell>
          <table:table-cell>
            <text:p>Hoffman Estates</text:p>
          </table:table-cell>
          <table:table-cell>
            <text:p>IL</text:p>
          </table:table-cell>
          <table:table-cell>
            <text:p>50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6.0</text:p>
          </table:table-cell>
          <table:table-cell>
            <text:p>Harrisonburg</text:p>
          </table:table-cell>
          <table:table-cell>
            <text:p>VA</text:p>
          </table:table-cell>
          <table:table-cell>
            <text:p>508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7.0</text:p>
          </table:table-cell>
          <table:table-cell>
            <text:p>La Crosse</text:p>
          </table:table-cell>
          <table:table-cell>
            <text:p>WI</text:p>
          </table:table-cell>
          <table:table-cell>
            <text:p>507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8.0</text:p>
          </table:table-cell>
          <table:table-cell>
            <text:p>Paramount</text:p>
          </table:table-cell>
          <table:table-cell>
            <text:p>CA</text:p>
          </table:table-cell>
          <table:table-cell>
            <text:p>50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9.0</text:p>
          </table:table-cell>
          <table:table-cell>
            <text:p>Watsonville</text:p>
          </table:table-cell>
          <table:table-cell>
            <text:p>CA</text:p>
          </table:table-cell>
          <table:table-cell>
            <text:p>507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0.0</text:p>
          </table:table-cell>
          <table:table-cell>
            <text:p>Grapevine</text:p>
          </table:table-cell>
          <table:table-cell>
            <text:p>TX</text:p>
          </table:table-cell>
          <table:table-cell>
            <text:p>50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1.0</text:p>
          </table:table-cell>
          <table:table-cell>
            <text:p>Draper</text:p>
          </table:table-cell>
          <table:table-cell>
            <text:p>UT</text:p>
          </table:table-cell>
          <table:table-cell>
            <text:p>50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2.0</text:p>
          </table:table-cell>
          <table:table-cell>
            <text:p>San Luis Obispo</text:p>
          </table:table-cell>
          <table:table-cell>
            <text:p>CA</text:p>
          </table:table-cell>
          <table:table-cell>
            <text:p>50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3.0</text:p>
          </table:table-cell>
          <table:table-cell>
            <text:p>Harrisburg</text:p>
          </table:table-cell>
          <table:table-cell>
            <text:p>PA</text:p>
          </table:table-cell>
          <table:table-cell>
            <text:p>50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4.0</text:p>
          </table:table-cell>
          <table:table-cell>
            <text:p>Lawrence</text:p>
          </table:table-cell>
          <table:table-cell>
            <text:p>IN</text:p>
          </table:table-cell>
          <table:table-cell>
            <text:p>504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5.0</text:p>
          </table:table-cell>
          <table:table-cell>
            <text:p>Downers Grove</text:p>
          </table:table-cell>
          <table:table-cell>
            <text:p>IL</text:p>
          </table:table-cell>
          <table:table-cell>
            <text:p>5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6.0</text:p>
          </table:table-cell>
          <table:table-cell>
            <text:p>Enid</text:p>
          </table:table-cell>
          <table:table-cell>
            <text:p>OK</text:p>
          </table:table-cell>
          <table:table-cell>
            <text:p>50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7.0</text:p>
          </table:table-cell>
          <table:table-cell>
            <text:p>Holly Springs</text:p>
          </table:table-cell>
          <table:table-cell>
            <text:p>NC</text:p>
          </table:table-cell>
          <table:table-cell>
            <text:p>502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8.0</text:p>
          </table:table-cell>
          <table:table-cell>
            <text:p>Barnstable Town</text:p>
          </table:table-cell>
          <table:table-cell>
            <text:p>MA</text:p>
          </table:table-cell>
          <table:table-cell>
            <text:p>50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9.0</text:p>
          </table:table-cell>
          <table:table-cell>
            <text:p>Waxahachie</text:p>
          </table:table-cell>
          <table:table-cell>
            <text:p>TX</text:p>
          </table:table-cell>
          <table:table-cell>
            <text:p>50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0.0</text:p>
          </table:table-cell>
          <table:table-cell>
            <text:p>Columbia</text:p>
          </table:table-cell>
          <table:table-cell>
            <text:p>TN</text:p>
          </table:table-cell>
          <table:table-cell>
            <text:p>500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1.0</text:p>
          </table:table-cell>
          <table:table-cell>
            <text:p>Stillwater</text:p>
          </table:table-cell>
          <table:table-cell>
            <text:p>OK</text:p>
          </table:table-cell>
          <table:table-cell>
            <text:p>500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2.0</text:p>
          </table:table-cell>
          <table:table-cell>
            <text:p>Plainfield</text:p>
          </table:table-cell>
          <table:table-cell>
            <text:p>IL</text:p>
          </table:table-cell>
          <table:table-cell>
            <text:p>50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3.0</text:p>
          </table:table-cell>
          <table:table-cell>
            <text:p>St. Louis Park</text:p>
          </table:table-cell>
          <table:table-cell>
            <text:p>MN</text:p>
          </table:table-cell>
          <table:table-cell>
            <text:p>50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Huntington</text:p>
          </table:table-cell>
          <table:table-cell>
            <text:p>WV</text:p>
          </table:table-cell>
          <table:table-cell>
            <text:p>458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outh 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arleston</text:p>
          </table:table-cell>
          <table:table-cell>
            <text:p>WV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Kelly Plumbing &amp; Heating</text:p>
          </table:table-cell>
          <table:table-cell>
            <text:p>(651) 645-5401</text:p>
          </table:table-cell>
          <table:table-cell>
            <text:p/>
          </table:table-cell>
          <table:table-cell>
            <text:p><text:a xlink:href="https://kellyplumbinginc.com" xlink:type="simple" xlink:actuate="onRequest" office:target-frame="_blank" text:style-name="InternetLink">kellyplumbinginc.com</text:a></text:p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</text:p>
          </table:table-cell>
          <table:table-cell>
            <text:p>(314) 965-9377</text:p>
          </table:table-cell>
          <table:table-cell>
            <text:p>pl_a_055-300x200@2x.jpeg</text:p>
          </table:table-cell>
          <table:table-cell>
            <text:p><text:a xlink:href="https://tonylamartinaplumbing.com" xlink:type="simple" xlink:actuate="onRequest" office:target-frame="_blank" text:style-name="InternetLink">tonylamartinaplumbing.com</text:a></text:p>
          </table:table-cell>
          <table:table-cell>
            <text:p>Saint Louis, MO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etersburg</text:p>
          </table:table-cell>
          <table:table-cell>
            <text:p>FL</text:p>
          </table:table-cell>
          <table:table-cell>
            <text:p/>
          </table:table-cell>
          <table:table-cell>
            <text:p>St Pet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etersburg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odot Springs</text:p>
          </table:table-cell>
          <table:table-cell>
            <text:p>CO</text:p>
          </table:table-cell>
          <table:table-cell>
            <text:p/>
          </table:table-cell>
          <table:table-cell>
            <text:p>Godot Spring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dot Springs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ort St Lucie</text:p>
          </table:table-cell>
          <table:table-cell>
            <text:p>FL</text:p>
          </table:table-cell>
          <table:table-cell>
            <text:p/>
          </table:table-cell>
          <table:table-cell>
            <text:p>Port St Luc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St Paul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Boise</text:p>
          </table:table-cell>
          <table:table-cell>
            <text:p>ID</text:p>
          </table:table-cell>
          <table:table-cell>
            <text:p/>
          </table:table-cell>
          <table:table-cell>
            <text:p>Boise Family Plumbing LLC</text:p>
          </table:table-cell>
          <table:table-cell>
            <text:p>(208) 949-3307</text:p>
          </table:table-cell>
          <table:table-cell>
            <text:p/>
          </table:table-cell>
          <table:table-cell>
            <text:p><text:a xlink:href="https://boisefamilyplumbing.com" xlink:type="simple" xlink:actuate="onRequest" office:target-frame="_blank" text:style-name="InternetLink">boisefamilyplumbing.com</text:a></text:p>
          </table:table-cell>
          <table:table-cell>
            <text:p>210 E 37th St #3, Boise, I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sno</text:p>
          </table:table-cell>
          <table:table-cell>
            <text:p>CA</text:p>
          </table:table-cell>
          <table:table-cell>
            <text:p/>
          </table:table-cell>
          <table:table-cell>
            <text:p>Clovis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clovisplumbing.com" xlink:type="simple" xlink:actuate="onRequest" office:target-frame="_blank" text:style-name="InternetLink">clovisplumbing.com</text:a></text:p>
          </table:table-cell>
          <table:table-cell>
            <text:p>Fresn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lbuquerque</text:p>
          </table:table-cell>
          <table:table-cell>
            <text:p>NM</text:p>
          </table:table-cell>
          <table:table-cell>
            <text:p/>
          </table:table-cell>
          <table:table-cell>
            <text:p>Family Plumbing Heating &amp; Refrigeration</text:p>
          </table:table-cell>
          <table:table-cell>
            <text:p>(505) 803-3170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Albuquerque, NM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cramento</text:p>
          </table:table-cell>
          <table:table-cell>
            <text:p>CA</text:p>
          </table:table-cell>
          <table:table-cell>
            <text:p/>
          </table:table-cell>
          <table:table-cell>
            <text:p>Armstrong Plumbing Inc</text:p>
          </table:table-cell>
          <table:table-cell>
            <text:p>(916) 461-8744</text:p>
          </table:table-cell>
          <table:table-cell>
            <text:p/>
          </table:table-cell>
          <table:table-cell>
            <text:p><text:a xlink:href="https://armstrongplumbing.com" xlink:type="simple" xlink:actuate="onRequest" office:target-frame="_blank" text:style-name="InternetLink">armstrongplumbing.com</text:a></text:p>
          </table:table-cell>
          <table:table-cell>
            <text:p>Sacrament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Memphis</text:p>
          </table:table-cell>
          <table:table-cell>
            <text:p>TN</text:p>
          </table:table-cell>
          <table:table-cell>
            <text:p/>
          </table:table-cell>
          <table:table-cell>
            <text:p>Smith's Plumbing Services</text:p>
          </table:table-cell>
          <table:table-cell>
            <text:p>(901) 660-2009</text:p>
          </table:table-cell>
          <table:table-cell>
            <text:p/>
          </table:table-cell>
          <table:table-cell>
            <text:p><text:a xlink:href="https://smithsplumbingservice.com" xlink:type="simple" xlink:actuate="onRequest" office:target-frame="_blank" text:style-name="InternetLink">smithsplumbingservice.com</text:a></text:p>
          </table:table-cell>
          <table:table-cell>
            <text:p>Memphis, TN</text:p>
          </table:table-cell>
          <table:table-cell>
            <text:p>4.8+/5</text:p>
          </table:table-cell>
          <table:table-cell>
            <text:p>YES (201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Pro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nchorage</text:p>
          </table:table-cell>
          <table:table-cell>
            <text:p>AK</text:p>
          </table:table-cell>
          <table:table-cell>
            <text:p/>
          </table:table-cell>
          <table:table-cell>
            <text:p>Anchorage Plumbing</text:p>
          </table:table-cell>
          <table:table-cell>
            <text:p>(907) 349-6620</text:p>
          </table:table-cell>
          <table:table-cell>
            <text:p/>
          </table:table-cell>
          <table:table-cell>
            <text:p><text:a xlink:href="https://ancph.com" xlink:type="simple" xlink:actuate="onRequest" office:target-frame="_blank" text:style-name="InternetLink">ancph.com</text:a></text:p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Irvine</text:p>
          </table:table-cell>
          <table:table-cell>
            <text:p>CA</text:p>
          </table:table-cell>
          <table:table-cell>
            <text:p/>
          </table:table-cell>
          <table:table-cell>
            <text:p>Family Plumbing &amp; Rooter Services</text:p>
          </table:table-cell>
          <table:table-cell>
            <text:p>(949) 648-6645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ubbock</text:p>
          </table:table-cell>
          <table:table-cell>
            <text:p>TX</text:p>
          </table:table-cell>
          <table:table-cell>
            <text:p/>
          </table:table-cell>
          <table:table-cell>
            <text:p>A-1 Plumbing</text:p>
          </table:table-cell>
          <table:table-cell>
            <text:p>(806) 796-0206</text:p>
          </table:table-cell>
          <table:table-cell>
            <text:p/>
          </table:table-cell>
          <table:table-cell>
            <text:p><text:a xlink:href="https://lubbocka1plumbing.com" xlink:type="simple" xlink:actuate="onRequest" office:target-frame="_blank" text:style-name="InternetLink">lubbocka1plumbing.com</text:a></text:p>
          </table:table-cell>
          <table:table-cell>
            <text:p>Lubbock, TX</text:p>
          </table:table-cell>
          <table:table-cell>
            <text:p>4.5+/5</text:p>
          </table:table-cell>
          <table:table-cell>
            <text:p>YES (1976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ersey City</text:p>
          </table:table-cell>
          <table:table-cell>
            <text:p>NJ</text:p>
          </table:table-cell>
          <table:table-cell>
            <text:p/>
          </table:table-cell>
          <table:table-cell>
            <text:p>Carmine P. Aumenta &amp; Sons Plumbing</text:p>
          </table:table-cell>
          <table:table-cell>
            <text:p>(201) 451-8008</text:p>
          </table:table-cell>
          <table:table-cell>
            <text:p/>
          </table:table-cell>
          <table:table-cell>
            <text:p/>
          </table:table-cell>
          <table:table-cell>
            <text:p>Jersey City, NJ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AZ Family Plumbing</text:p>
          </table:table-cell>
          <table:table-cell>
            <text:p>(602) 922-0103</text:p>
          </table:table-cell>
          <table:table-cell>
            <text:p/>
          </table:table-cell>
          <table:table-cell>
            <text:p><text:a xlink:href="https://azfamilyplumbing.com" xlink:type="simple" xlink:actuate="onRequest" office:target-frame="_blank" text:style-name="InternetLink">azfamilyplumbing.com</text:a></text:p>
          </table:table-cell>
          <table:table-cell>
            <text:p>Glendale, AZ</text:p>
          </table:table-cell>
          <table:table-cell>
            <text:p>4.8+/5</text:p>
          </table:table-cell>
          <table:table-cell>
            <text:p>YES (2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ville</text:p>
          </table:table-cell>
          <table:table-cell>
            <text:p>FL</text:p>
          </table:table-cell>
          <table:table-cell>
            <text:p/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The Local Plumber LLC</text:p>
          </table:table-cell>
          <table:table-cell>
            <text:p>(614) 230-6086</text:p>
          </table:table-cell>
          <table:table-cell>
            <text:p/>
          </table:table-cell>
          <table:table-cell>
            <text:p><text:a xlink:href="http://localplumbercolumbus.com/" xlink:type="simple" xlink:actuate="onRequest" office:target-frame="_blank" text:style-name="InternetLink">http://localplumbercolumbus.com/</text:a></text:p>
          </table:table-cell>
          <table:table-cell>
            <text:p>461 Industry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Indianapolis</text:p>
          </table:table-cell>
          <table:table-cell>
            <text:p>IN</text:p>
          </table:table-cell>
          <table:table-cell>
            <text:p/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Magic Plumbing Heating &amp; Cooling</text:p>
          </table:table-cell>
          <table:table-cell>
            <text:p>(415) 441-2255</text:p>
          </table:table-cell>
          <table:table-cell>
            <text:p/>
          </table:table-cell>
          <table:table-cell>
            <text:p><text:a xlink:href="https://www.magicplumbing.com/" xlink:type="simple" xlink:actuate="onRequest" office:target-frame="_blank" text:style-name="InternetLink">https://www.magicplumbing.com/</text:a></text:p>
          </table:table-cell>
          <table:table-cell>
            <text:p>1455 Bancroft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Eaton Family Plumbers</text:p>
          </table:table-cell>
          <table:table-cell>
            <text:p>(405) 281-4400</text:p>
          </table:table-cell>
          <table:table-cell>
            <text:p/>
          </table:table-cell>
          <table:table-cell>
            <text:p><text:a xlink:href="https://eatonfamilyplumbers-ok.pro/" xlink:type="simple" xlink:actuate="onRequest" office:target-frame="_blank" text:style-name="InternetLink">https://eatonfamilyplumbers-ok.pro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 Paso</text:p>
          </table:table-cell>
          <table:table-cell>
            <text:p>TX</text:p>
          </table:table-cell>
          <table:table-cell>
            <text:p/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Detroit</text:p>
          </table:table-cell>
          <table:table-cell>
            <text:p>MI</text:p>
          </table:table-cell>
          <table:table-cell>
            <text:p/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mith Plumbing, Heating, Air Conditioning &amp; Electrical</text:p>
          </table:table-cell>
          <table:table-cell>
            <text:p>(719) 241-1924</text:p>
          </table:table-cell>
          <table:table-cell>
            <text:p/>
          </table:table-cell>
          <table:table-cell>
            <text:p><text:a xlink:href="https://www.smithtotalhome.com/" xlink:type="simple" xlink:actuate="onRequest" office:target-frame="_blank" text:style-name="InternetLink">https://www.smithtotalhome.com/</text:a></text:p>
          </table:table-cell>
          <table:table-cell>
            <text:p>1875 Mai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Virginia Beach</text:p>
          </table:table-cell>
          <table:table-cell>
            <text:p>VA</text:p>
          </table:table-cell>
          <table:table-cell>
            <text:p/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inneapolis</text:p>
          </table:table-cell>
          <table:table-cell>
            <text:p>MN</text:p>
          </table:table-cell>
          <table:table-cell>
            <text:p/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ichita</text:p>
          </table:table-cell>
          <table:table-cell>
            <text:p>KS</text:p>
          </table:table-cell>
          <table:table-cell>
            <text:p/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eveland</text:p>
          </table:table-cell>
          <table:table-cell>
            <text:p>OH</text:p>
          </table:table-cell>
          <table:table-cell>
            <text:p/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/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ittsburgh</text:p>
          </table:table-cell>
          <table:table-cell>
            <text:p>PA</text:p>
          </table:table-cell>
          <table:table-cell>
            <text:p/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isco</text:p>
          </table:table-cell>
          <table:table-cell>
            <text:p>TX</text:p>
          </table:table-cell>
          <table:table-cell>
            <text:p/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cKinney</text:p>
          </table:table-cell>
          <table:table-cell>
            <text:p>TX</text:p>
          </table:table-cell>
          <table:table-cell>
            <text:p/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t Lake City</text:p>
          </table:table-cell>
          <table:table-cell>
            <text:p>UT</text:p>
          </table:table-cell>
          <table:table-cell>
            <text:p/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k Grove</text:p>
          </table:table-cell>
          <table:table-cell>
            <text:p>CA</text:p>
          </table:table-cell>
          <table:table-cell>
            <text:p/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ry</text:p>
          </table:table-cell>
          <table:table-cell>
            <text:p>NC</text:p>
          </table:table-cell>
          <table:table-cell>
            <text:p/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em</text:p>
          </table:table-cell>
          <table:table-cell>
            <text:p>OR</text:p>
          </table:table-cell>
          <table:table-cell>
            <text:p/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empe</text:p>
          </table:table-cell>
          <table:table-cell>
            <text:p>AZ</text:p>
          </table:table-cell>
          <table:table-cell>
            <text:p/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arksville</text:p>
          </table:table-cell>
          <table:table-cell>
            <text:p>TN</text:p>
          </table:table-cell>
          <table:table-cell>
            <text:p/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Lauderdale</text:p>
          </table:table-cell>
          <table:table-cell>
            <text:p>FL</text:p>
          </table:table-cell>
          <table:table-cell>
            <text:p/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ta Rosa</text:p>
          </table:table-cell>
          <table:table-cell>
            <text:p>CA</text:p>
          </table:table-cell>
          <table:table-cell>
            <text:p/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ugene</text:p>
          </table:table-cell>
          <table:table-cell>
            <text:p>OR</text:p>
          </table:table-cell>
          <table:table-cell>
            <text:p/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ancho Cucamonga</text:p>
          </table:table-cell>
          <table:table-cell>
            <text:p>CA</text:p>
          </table:table-cell>
          <table:table-cell>
            <text:p/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embroke Pines</text:p>
          </table:table-cell>
          <table:table-cell>
            <text:p>FL</text:p>
          </table:table-cell>
          <table:table-cell>
            <text:p/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urprise</text:p>
          </table:table-cell>
          <table:table-cell>
            <text:p>AZ</text:p>
          </table:table-cell>
          <table:table-cell>
            <text:p/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Collins</text:p>
          </table:table-cell>
          <table:table-cell>
            <text:p>CO</text:p>
          </table:table-cell>
          <table:table-cell>
            <text:p/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urfreesboro</text:p>
          </table:table-cell>
          <table:table-cell>
            <text:p>TN</text:p>
          </table:table-cell>
          <table:table-cell>
            <text:p/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Garden Grove</text:p>
          </table:table-cell>
          <table:table-cell>
            <text:p>CA</text:p>
          </table:table-cell>
          <table:table-cell>
            <text:p/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uperior Plumbing Solutions</text:p>
          </table:table-cell>
          <table:table-cell>
            <text:p>(239) 518-2469</text:p>
          </table:table-cell>
          <table:table-cell>
            <text:p/>
          </table:table-cell>
          <table:table-cell>
            <text:p><text:a xlink:href="http://www.superiorplumbingflorida.com/" xlink:type="simple" xlink:actuate="onRequest" office:target-frame="_blank" text:style-name="InternetLink">http://www.superiorplumbingflorida.com/</text:a></text:p>
          </table:table-cell>
          <table:table-cell>
            <text:p>1014 SE 12th Ct #5, Cape Coral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Bob Larson Plumbing</text:p>
          </table:table-cell>
          <table:table-cell>
            <text:p>(253) 400-1582</text:p>
          </table:table-cell>
          <table:table-cell>
            <text:p/>
          </table:table-cell>
          <table:table-cell>
            <text:p><text:a xlink:href="https://www.boblarsonplumbing.com/" xlink:type="simple" xlink:actuate="onRequest" office:target-frame="_blank" text:style-name="InternetLink">https://www.boblarsonplumbing.com/</text:a></text:p>
          </table:table-cell>
          <table:table-cell>
            <text:p>4320 128th St E, Tacoma, W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Durrani Plumbing</text:p>
          </table:table-cell>
          <table:table-cell>
            <text:p>(510) 602-8370</text:p>
          </table:table-cell>
          <table:table-cell>
            <text:p/>
          </table:table-cell>
          <table:table-cell>
            <text:p><text:a xlink:href="http://www.durraniplumbing.com/" xlink:type="simple" xlink:actuate="onRequest" office:target-frame="_blank" text:style-name="InternetLink">http://www.durraniplumbing.com/</text:a></text:p>
          </table:table-cell>
          <table:table-cell>
            <text:p>38765 Mission Blvd, Fremont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orcester</text:p>
          </table:table-cell>
          <table:table-cell>
            <text:p>MA</text:p>
          </table:table-cell>
          <table:table-cell>
            <text:p/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Augusta</text:p>
          </table:table-cell>
          <table:table-cell>
            <text:p>GA</text:p>
          </table:table-cell>
          <table:table-cell>
            <text:p/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Hometown Plumbing Services</text:p>
          </table:table-cell>
          <table:table-cell>
            <text:p>(909) 442-5501</text:p>
          </table:table-cell>
          <table:table-cell>
            <text:p/>
          </table:table-cell>
          <table:table-cell>
            <text:p><text:a xlink:href="https://hometownplumbingserv.com/" xlink:type="simple" xlink:actuate="onRequest" office:target-frame="_blank" text:style-name="InternetLink">https://hometownplumbingserv.com/</text:a></text:p>
          </table:table-cell>
          <table:table-cell>
            <text:p>615 N Euclid Ave suite 843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aul</text:p>
          </table:table-cell>
          <table:table-cell>
            <text:p>MN</text:p>
          </table:table-cell>
          <table:table-cell>
            <text:p/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incoln</text:p>
          </table:table-cell>
          <table:table-cell>
            <text:p>NE</text:p>
          </table:table-cell>
          <table:table-cell>
            <text:p/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North Las Vegas</text:p>
          </table:table-cell>
          <table:table-cell>
            <text:p>NV</text:p>
          </table:table-cell>
          <table:table-cell>
            <text:p/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eno</text:p>
          </table:table-cell>
          <table:table-cell>
            <text:p>NV</text:p>
          </table:table-cell>
          <table:table-cell>
            <text:p/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ffalo</text:p>
          </table:table-cell>
          <table:table-cell>
            <text:p>NY</text:p>
          </table:table-cell>
          <table:table-cell>
            <text:p/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etersburg</text:p>
          </table:table-cell>
          <table:table-cell>
            <text:p>FL</text:p>
          </table:table-cell>
          <table:table-cell>
            <text:p/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oledo</text:p>
          </table:table-cell>
          <table:table-cell>
            <text:p>OH</text:p>
          </table:table-cell>
          <table:table-cell>
            <text:p/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esapeake</text:p>
          </table:table-cell>
          <table:table-cell>
            <text:p>VA</text:p>
          </table:table-cell>
          <table:table-cell>
            <text:p/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oise City</text:p>
          </table:table-cell>
          <table:table-cell>
            <text:p>ID</text:p>
          </table:table-cell>
          <table:table-cell>
            <text:p/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