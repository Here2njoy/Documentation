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>Almighty Plumbing</text:p>
          </table:table-cell>
          <table:table-cell>
            <text:p>(925) 281-4861</text:p>
          </table:table-cell>
          <table:table-cell>
            <text:p/>
          </table:table-cell>
          <table:table-cell>
            <text:p><text:a xlink:href="http://www.almightyplumbing.biz/" xlink:type="simple" xlink:actuate="onRequest" office:target-frame="_blank" text:style-name="InternetLink">http://www.almightyplumbing.biz/</text:a></text:p>
          </table:table-cell>
          <table:table-cell>
            <text:p>1309 Mokelumne Dr, Antioch, CA 94531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>Neil and Sons Plumbing &amp; Water Heaters Inc</text:p>
          </table:table-cell>
          <table:table-cell>
            <text:p>(951) 546-8058</text:p>
          </table:table-cell>
          <table:table-cell>
            <text:p/>
          </table:table-cell>
          <table:table-cell>
            <text:p><text:a xlink:href="https://www.neilandsonsplumbing.com/" xlink:type="simple" xlink:actuate="onRequest" office:target-frame="_blank" text:style-name="InternetLink">https://www.neilandsonsplumbing.com/</text:a></text:p>
          </table:table-cell>
          <table:table-cell>
            <text:p>27679 Avenida Halago, Menifee, CA 92585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>Dean's Plumbing</text:p>
          </table:table-cell>
          <table:table-cell>
            <text:p>(972) 449-5274</text:p>
          </table:table-cell>
          <table:table-cell>
            <text:p/>
          </table:table-cell>
          <table:table-cell>
            <text:p><text:a xlink:href="https://www.deansplumbingtx.com/richardson-plumbers/" xlink:type="simple" xlink:actuate="onRequest" office:target-frame="_blank" text:style-name="InternetLink">https://www.deansplumbingtx.com/richardson-plumbers/</text:a></text:p>
          </table:table-cell>
          <table:table-cell>
            <text:p>610 Presidential Dr #110, Richardson, TX 7508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>John the Plumber</text:p>
          </table:table-cell>
          <table:table-cell>
            <text:p>(954) 807-2394</text:p>
          </table:table-cell>
          <table:table-cell>
            <text:p/>
          </table:table-cell>
          <table:table-cell>
            <text:p><text:a xlink:href="https://johntheplumberfl.com/" xlink:type="simple" xlink:actuate="onRequest" office:target-frame="_blank" text:style-name="InternetLink">https://johntheplumberfl.com/</text:a></text:p>
          </table:table-cell>
          <table:table-cell>
            <text:p>1571 SW 3rd St, Pompano Beach, FL 33069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>Four Towns Plumbing Inc</text:p>
          </table:table-cell>
          <table:table-cell>
            <text:p>(386) 668-4424</text:p>
          </table:table-cell>
          <table:table-cell>
            <text:p/>
          </table:table-cell>
          <table:table-cell>
            <text:p><text:a xlink:href="https://fourtownsplumbingdebary.com" xlink:type="simple" xlink:actuate="onRequest" office:target-frame="_blank" text:style-name="InternetLink">https://fourtownsplumbingdebary.com</text:a></text:p>
          </table:table-cell>
          <table:table-cell>
            <text:p>1623 Dunlap Dr, Deltona, FL 32725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>Streamline Plumbing, LLC</text:p>
          </table:table-cell>
          <table:table-cell>
            <text:p>(303) 772-2250</text:p>
          </table:table-cell>
          <table:table-cell>
            <text:p/>
          </table:table-cell>
          <table:table-cell>
            <text:p><text:a xlink:href="https://streamlineplb.com" xlink:type="simple" xlink:actuate="onRequest" office:target-frame="_blank" text:style-name="InternetLink">https://streamlineplb.com</text:a></text:p>
          </table:table-cell>
          <table:table-cell>
            <text:p>1740 Skyway Dr, Longmont, CO 805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>JC Plumbing</text:p>
          </table:table-cell>
          <table:table-cell>
            <text:p>(253) 242-2079</text:p>
          </table:table-cell>
          <table:table-cell>
            <text:p/>
          </table:table-cell>
          <table:table-cell>
            <text:p><text:a xlink:href="https://jcplumbingwa.com" xlink:type="simple" xlink:actuate="onRequest" office:target-frame="_blank" text:style-name="InternetLink">https://jcplumbingwa.com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>Johnson Plumbing Inc.</text:p>
          </table:table-cell>
          <table:table-cell>
            <text:p>(209) 723-4032</text:p>
          </table:table-cell>
          <table:table-cell>
            <text:p/>
          </table:table-cell>
          <table:table-cell>
            <text:p><text:a xlink:href="https://johnsonplumbinginc.com" xlink:type="simple" xlink:actuate="onRequest" office:target-frame="_blank" text:style-name="InternetLink">https://johnsonplumbinginc.com</text:a></text:p>
          </table:table-cell>
          <table:table-cell>
            <text:p>2190 Yosemite Pkwy, Merced, CA 9534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>Kenosha Plumbing</text:p>
          </table:table-cell>
          <table:table-cell>
            <text:p>(262) 653-8223</text:p>
          </table:table-cell>
          <table:table-cell>
            <text:p/>
          </table:table-cell>
          <table:table-cell>
            <text:p><text:a xlink:href="https://kenoshaplumbing.net" xlink:type="simple" xlink:actuate="onRequest" office:target-frame="_blank" text:style-name="InternetLink">https://kenoshaplumbing.net</text:a></text:p>
          </table:table-cell>
          <table:table-cell>
            <text:p>7012 30th Ave, Kenosha, WI 53142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>Plantation fl Plumber</text:p>
          </table:table-cell>
          <table:table-cell>
            <text:p>(954) 787-1613</text:p>
          </table:table-cell>
          <table:table-cell>
            <text:p/>
          </table:table-cell>
          <table:table-cell>
            <text:p><text:a xlink:href="https://plantationflplumber.net" xlink:type="simple" xlink:actuate="onRequest" office:target-frame="_blank" text:style-name="InternetLink">https://plantationflplumber.net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>Pierce Plumbing</text:p>
          </table:table-cell>
          <table:table-cell>
            <text:p>(951) 765-9411</text:p>
          </table:table-cell>
          <table:table-cell>
            <text:p/>
          </table:table-cell>
          <table:table-cell>
            <text:p><text:a xlink:href="https://pierceplumbing.net" xlink:type="simple" xlink:actuate="onRequest" office:target-frame="_blank" text:style-name="InternetLink">https://pierceplumbing.net</text:a></text:p>
          </table:table-cell>
          <table:table-cell>
            <text:p>700 W Florida Ave, Hemet, CA 92543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>Mr. Drippy Plumbing</text:p>
          </table:table-cell>
          <table:table-cell>
            <text:p>(205) 946-0337</text:p>
          </table:table-cell>
          <table:table-cell>
            <text:p/>
          </table:table-cell>
          <table:table-cell>
            <text:p><text:a xlink:href="https://mrdrippyplumbing.com" xlink:type="simple" xlink:actuate="onRequest" office:target-frame="_blank" text:style-name="InternetLink">https://mrdrippyplumbing.com</text:a></text:p>
          </table:table-cell>
          <table:table-cell>
            <text:p>3411 Lorna Ln, Hoover, AL 3521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>PlumbSmart Plumbing &amp; Drains</text:p>
          </table:table-cell>
          <table:table-cell>
            <text:p>(828) 974-6147</text:p>
          </table:table-cell>
          <table:table-cell>
            <text:p/>
          </table:table-cell>
          <table:table-cell>
            <text:p><text:a xlink:href="https://callplumbsmart.com" xlink:type="simple" xlink:actuate="onRequest" office:target-frame="_blank" text:style-name="InternetLink">https://callplumbsmart.com</text:a></text:p>
          </table:table-cell>
          <table:table-cell>
            <text:p>1 Sunny Ridge Dr, Asheville, NC 28804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>Kennedy Plumbing &amp; Heating</text:p>
          </table:table-cell>
          <table:table-cell>
            <text:p>(248) 474-0309</text:p>
          </table:table-cell>
          <table:table-cell>
            <text:p/>
          </table:table-cell>
          <table:table-cell>
            <text:p><text:a xlink:href="https://kennedyplumbingheating.com" xlink:type="simple" xlink:actuate="onRequest" office:target-frame="_blank" text:style-name="InternetLink">https://kennedyplumbingheating.com</text:a></text:p>
          </table:table-cell>
          <table:table-cell>
            <text:p>30284 7 Mile, Livonia, MI 4815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>Plumbing Utah</text:p>
          </table:table-cell>
          <table:table-cell>
            <text:p>(801) 601-1298</text:p>
          </table:table-cell>
          <table:table-cell>
            <text:p/>
          </table:table-cell>
          <table:table-cell>
            <text:p><text:a xlink:href="https://plumbingutah.com" xlink:type="simple" xlink:actuate="onRequest" office:target-frame="_blank" text:style-name="InternetLink">https://plumbingutah.com</text:a></text:p>
          </table:table-cell>
          <table:table-cell>
            <text:p>8789 Highland Dr #260, Sandy, UT 8409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>Larry &amp; Sons Plumbing, Heating, Cooling, Drain &amp; Electrical</text:p>
          </table:table-cell>
          <table:table-cell>
            <text:p>(240) 232-8985</text:p>
          </table:table-cell>
          <table:table-cell>
            <text:p/>
          </table:table-cell>
          <table:table-cell>
            <text:p><text:a xlink:href="https://larryandsons.com" xlink:type="simple" xlink:actuate="onRequest" office:target-frame="_blank" text:style-name="InternetLink">https://larryandsons.com</text:a></text:p>
          </table:table-cell>
          <table:table-cell>
            <text:p>5744 Industry Ln Ste N, Frederick, MD 21704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>Plumbing Installs</text:p>
          </table:table-cell>
          <table:table-cell>
            <text:p>(714) 455-9346</text:p>
          </table:table-cell>
          <table:table-cell>
            <text:p/>
          </table:table-cell>
          <table:table-cell>
            <text:p><text:a xlink:href="http://www.plumbinginstalls.com/" xlink:type="simple" xlink:actuate="onRequest" office:target-frame="_blank" text:style-name="InternetLink">http://www.plumbinginstalls.com/</text:a></text:p>
          </table:table-cell>
          <table:table-cell>
            <text:p>6291 Iroquois Rd, Westminster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>Paul C. Scott &amp; Sons Plumbing, Inc.</text:p>
          </table:table-cell>
          <table:table-cell>
            <text:p>(248) 547-9334</text:p>
          </table:table-cell>
          <table:table-cell>
            <text:p/>
          </table:table-cell>
          <table:table-cell>
            <text:p><text:a xlink:href="http://www.paulscottplumbing.com/" xlink:type="simple" xlink:actuate="onRequest" office:target-frame="_blank" text:style-name="InternetLink">http://www.paulscottplumbing.com/</text:a></text:p>
          </table:table-cell>
          <table:table-cell>
            <text:p>2722 Elliott Ave, Troy, MI</text:p>
          </table:table-cell>
          <table:table-cell>
            <text:p>4.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>Daytona Plumbing</text:p>
          </table:table-cell>
          <table:table-cell>
            <text:p>(386) 253-7674</text:p>
          </table:table-cell>
          <table:table-cell>
            <text:p/>
          </table:table-cell>
          <table:table-cell>
            <text:p><text:a xlink:href="http://www.daytonaplumb.com/" xlink:type="simple" xlink:actuate="onRequest" office:target-frame="_blank" text:style-name="InternetLink">http://www.daytonaplumb.com/</text:a></text:p>
          </table:table-cell>
          <table:table-cell>
            <text:p>500 Walker St, Daytona Beach, FL</text:p>
          </table:table-cell>
          <table:table-cell>
            <text:p>4.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