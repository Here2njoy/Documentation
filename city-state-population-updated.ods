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ns0:document-content xmlns:ns0="urn:oasis:names:tc:opendocument:xmlns:office:1.0" xmlns:ns1="urn:oasis:names:tc:opendocument:xmlns:table:1.0" xmlns:ns2="urn:oasis:names:tc:opendocument:xmlns:text:1.0" xmlns:office="urn:oasis:names:tc:opendocument:xmlns:office:1.0" xmlns:table="urn:oasis:names:tc:opendocument:xmlns:table:1.0" xmlns:text="urn:oasis:names:tc:opendocument:xmlns:text:1.0" ns0:version="1.2">
  <ns0:body>
    <ns0:spreadsheet>
      <ns1:table ns1:name="Sheet1">
        <ns1:table-row>
          <ns1:table-cell>
            <ns2:p>rank</ns2:p>
          </ns1:table-cell>
          <ns1:table-cell>
            <ns2:p>city</ns2:p>
          </ns1:table-cell>
          <ns1:table-cell>
            <ns2:p>state_abbr</ns2:p>
          </ns1:table-cell>
          <ns1:table-cell>
            <ns2:p>pop_current</ns2:p>
          </ns1:table-cell>
          <ns1:table-cell>
            <ns2:p>company</ns2:p>
          </ns1:table-cell>
          <ns1:table-cell>
            <ns2:p>phone</ns2:p>
          </ns1:table-cell>
          <ns1:table-cell>
            <ns2:p>email</ns2:p>
          </ns1:table-cell>
          <ns1:table-cell>
            <ns2:p>website link</ns2:p>
          </ns1:table-cell>
          <ns1:table-cell>
            <ns2:p>address</ns2:p>
          </ns1:table-cell>
          <ns1:table-cell>
            <ns2:p>star rating</ns2:p>
          </ns1:table-cell>
          <ns1:table-cell>
            <ns2:p>family owned</ns2:p>
          </ns1:table-cell>
          <ns1:table-cell>
            <ns2:p>year in biz</ns2:p>
          </ns1:table-cell>
          <ns1:table-cell>
            <ns2:p>platform found on</ns2:p>
          </ns1:table-cell>
        </ns1:table-row>
        <ns1:table-row>
          <ns1:table-cell>
            <ns2:p>1.0</ns2:p>
          </ns1:table-cell>
          <ns1:table-cell>
            <ns2:p>New York</ns2:p>
          </ns1:table-cell>
          <ns1:table-cell>
            <ns2:p>NY</ns2:p>
          </ns1:table-cell>
          <ns1:table-cell>
            <ns2:p>8584629</ns2:p>
          </ns1:table-cell>
          <ns1:table-cell>
            <ns2:p>A Good Plumber Inc.</ns2:p>
          </ns1:table-cell>
          <ns1:table-cell>
            <ns2:p>(718) 648-6838</ns2:p>
          </ns1:table-cell>
          <ns1:table-cell>
            <ns2:p>info@agoodplumber.com</ns2:p>
          </ns1:table-cell>
          <ns1:table-cell>
            <ns2:p>agoodplumber.com</ns2:p>
          </ns1:table-cell>
          <ns1:table-cell>
            <ns2:p>2114 E 27th St, Brooklyn, NY 11229</ns2:p>
          </ns1:table-cell>
          <ns1:table-cell>
            <ns2:p>4.7/5 (Angi)</ns2:p>
          </ns1:table-cell>
          <ns1:table-cell>
            <ns2:p>YES</ns2:p>
          </ns1:table-cell>
          <ns1:table-cell>
            <ns2:p/>
          </ns1:table-cell>
          <ns1:table-cell>
            <ns2:p>LinkedIn</ns2:p>
          </ns1:table-cell>
        </ns1:table-row>
        <ns1:table-row>
          <ns1:table-cell>
            <ns2:p>2.0</ns2:p>
          </ns1:table-cell>
          <ns1:table-cell>
            <ns2:p>Los Angeles</ns2:p>
          </ns1:table-cell>
          <ns1:table-cell>
            <ns2:p>CA</ns2:p>
          </ns1:table-cell>
          <ns1:table-cell>
            <ns2:p>3869089</ns2:p>
          </ns1:table-cell>
          <ns1:table-cell>
            <ns2:p>Advantage Plumbing &amp; Rooter</ns2:p>
          </ns1:table-cell>
          <ns1:table-cell>
            <ns2:p>(626) 956-3708</ns2:p>
          </ns1:table-cell>
          <ns1:table-cell>
            <ns2:p/>
          </ns1:table-cell>
          <ns1:table-cell>
            <ns2:p>advantageplumbingrooter.com</ns2:p>
          </ns1:table-cell>
          <ns1:table-cell>
            <ns2:p>2361 Barton Lane, Montrose, CA 91020</ns2:p>
          </ns1:table-cell>
          <ns1:table-cell>
            <ns2:p>5.0/5</ns2:p>
          </ns1:table-cell>
          <ns1:table-cell>
            <ns2:p>YES (27 yrs)</ns2:p>
          </ns1:table-cell>
          <ns1:table-cell>
            <ns2:p/>
          </ns1:table-cell>
          <ns1:table-cell>
            <ns2:p>Facebook</ns2:p>
          </ns1:table-cell>
        </ns1:table-row>
        <ns1:table-row>
          <ns1:table-cell>
            <ns2:p>3.0</ns2:p>
          </ns1:table-cell>
          <ns1:table-cell>
            <ns2:p>Chicago</ns2:p>
          </ns1:table-cell>
          <ns1:table-cell>
            <ns2:p>IL</ns2:p>
          </ns1:table-cell>
          <ns1:table-cell>
            <ns2:p>2731585</ns2:p>
          </ns1:table-cell>
          <ns1:table-cell>
            <ns2:p>Jim Wagner Plumbing Inc.</ns2:p>
          </ns1:table-cell>
          <ns1:table-cell>
            <ns2:p>(630) 454-1510</ns2:p>
          </ns1:table-cell>
          <ns1:table-cell>
            <ns2:p/>
          </ns1:table-cell>
          <ns1:table-cell>
            <ns2:p>jimwagnerplumbing.com</ns2:p>
          </ns1:table-cell>
          <ns1:table-cell>
            <ns2:p>West Chicago, IL</ns2:p>
          </ns1:table-cell>
          <ns1:table-cell>
            <ns2:p>4.8/5 (1000+ reviews)</ns2:p>
          </ns1:table-cell>
          <ns1:table-cell>
            <ns2:p>YES (3rd gen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.0</ns2:p>
          </ns1:table-cell>
          <ns1:table-cell>
            <ns2:p>Houston</ns2:p>
          </ns1:table-cell>
          <ns1:table-cell>
            <ns2:p>TX</ns2:p>
          </ns1:table-cell>
          <ns1:table-cell>
            <ns2:p>2397315</ns2:p>
          </ns1:table-cell>
          <ns1:table-cell>
            <ns2:p>Texas Quality Plumbing</ns2:p>
          </ns1:table-cell>
          <ns1:table-cell>
            <ns2:p>(713) 385-0349</ns2:p>
          </ns1:table-cell>
          <ns1:table-cell>
            <ns2:p/>
          </ns1:table-cell>
          <ns1:table-cell>
            <ns2:p>texasqualityplumbing.com</ns2:p>
          </ns1:table-cell>
          <ns1:table-cell>
            <ns2:p>Houston, TX</ns2:p>
          </ns1:table-cell>
          <ns1:table-cell>
            <ns2:p>4.9/5 (Best Pick)</ns2:p>
          </ns1:table-cell>
          <ns1:table-cell>
            <ns2:p>YES (2007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.0</ns2:p>
          </ns1:table-cell>
          <ns1:table-cell>
            <ns2:p>Phoenix</ns2:p>
          </ns1:table-cell>
          <ns1:table-cell>
            <ns2:p>AZ</ns2:p>
          </ns1:table-cell>
          <ns1:table-cell>
            <ns2:p>1665481</ns2:p>
          </ns1:table-cell>
          <ns1:table-cell>
            <ns2:p>Lawson Family Plumbing</ns2:p>
          </ns1:table-cell>
          <ns1:table-cell>
            <ns2:p>(602) 413-5790</ns2:p>
          </ns1:table-cell>
          <ns1:table-cell>
            <ns2:p/>
          </ns1:table-cell>
          <ns1:table-cell>
            <ns2:p>lawsonfamilyplumbing.com</ns2:p>
          </ns1:table-cell>
          <ns1:table-cell>
            <ns2:p>1497 E Baseline Rd, Gilbert, AZ 85233</ns2:p>
          </ns1:table-cell>
          <ns1:table-cell>
            <ns2:p>4.9/5 (1,547 reviews)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6.0</ns2:p>
          </ns1:table-cell>
          <ns1:table-cell>
            <ns2:p>Philadelphia</ns2:p>
          </ns1:table-cell>
          <ns1:table-cell>
            <ns2:p>PA</ns2:p>
          </ns1:table-cell>
          <ns1:table-cell>
            <ns2:p>1574281</ns2:p>
          </ns1:table-cell>
          <ns1:table-cell>
            <ns2:p>Goodman Plumbing</ns2:p>
          </ns1:table-cell>
          <ns1:table-cell>
            <ns2:p>(215) 364-7775</ns2:p>
          </ns1:table-cell>
          <ns1:table-cell>
            <ns2:p/>
          </ns1:table-cell>
          <ns1:table-cell>
            <ns2:p>goodmanplumbers.com</ns2:p>
          </ns1:table-cell>
          <ns1:table-cell>
            <ns2:p>Philadelphia &amp; Feasterville-Trevose, PA</ns2:p>
          </ns1:table-cell>
          <ns1:table-cell>
            <ns2:p>4.5+/5</ns2:p>
          </ns1:table-cell>
          <ns1:table-cell>
            <ns2:p>YES (60+ yrs, 2nd gen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7.0</ns2:p>
          </ns1:table-cell>
          <ns1:table-cell>
            <ns2:p>San Antonio</ns2:p>
          </ns1:table-cell>
          <ns1:table-cell>
            <ns2:p>TX</ns2:p>
          </ns1:table-cell>
          <ns1:table-cell>
            <ns2:p>1548422</ns2:p>
          </ns1:table-cell>
          <ns1:table-cell>
            <ns2:p>Chambliss Plumbing</ns2:p>
          </ns1:table-cell>
          <ns1:table-cell>
            <ns2:p>(210) 797-7471</ns2:p>
          </ns1:table-cell>
          <ns1:table-cell>
            <ns2:p/>
          </ns1:table-cell>
          <ns1:table-cell>
            <ns2:p>chamblissplumbing.com</ns2:p>
          </ns1:table-cell>
          <ns1:table-cell>
            <ns2:p>San Antonio, TX</ns2:p>
          </ns1:table-cell>
          <ns1:table-cell>
            <ns2:p>5.0/5 (1,400+ reviews)</ns2:p>
          </ns1:table-cell>
          <ns1:table-cell>
            <ns2:p>YES (1991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8.0</ns2:p>
          </ns1:table-cell>
          <ns1:table-cell>
            <ns2:p>San Diego</ns2:p>
          </ns1:table-cell>
          <ns1:table-cell>
            <ns2:p>CA</ns2:p>
          </ns1:table-cell>
          <ns1:table-cell>
            <ns2:p>1406106</ns2:p>
          </ns1:table-cell>
          <ns1:table-cell>
            <ns2:p>American Plumbing Co</ns2:p>
          </ns1:table-cell>
          <ns1:table-cell>
            <ns2:p>(619) 723-1114</ns2:p>
          </ns1:table-cell>
          <ns1:table-cell>
            <ns2:p>info@plumbersandiegoonline.com</ns2:p>
          </ns1:table-cell>
          <ns1:table-cell>
            <ns2:p>plumbersandiegoonline.com</ns2:p>
          </ns1:table-cell>
          <ns1:table-cell>
            <ns2:p>San Diego, CA</ns2:p>
          </ns1:table-cell>
          <ns1:table-cell>
            <ns2:p>5.0/5 (40+ years)</ns2:p>
          </ns1:table-cell>
          <ns1:table-cell>
            <ns2:p>YES</ns2:p>
          </ns1:table-cell>
          <ns1:table-cell>
            <ns2:p/>
          </ns1:table-cell>
          <ns1:table-cell>
            <ns2:p>Google/Yelp</ns2:p>
          </ns1:table-cell>
        </ns1:table-row>
        <ns1:table-row>
          <ns1:table-cell>
            <ns2:p>9.0</ns2:p>
          </ns1:table-cell>
          <ns1:table-cell>
            <ns2:p>Dallas</ns2:p>
          </ns1:table-cell>
          <ns1:table-cell>
            <ns2:p>TX</ns2:p>
          </ns1:table-cell>
          <ns1:table-cell>
            <ns2:p>1329491</ns2:p>
          </ns1:table-cell>
          <ns1:table-cell>
            <ns2:p>Baker Brothers Plumbing</ns2:p>
          </ns1:table-cell>
          <ns1:table-cell>
            <ns2:p>(214) 324-8811</ns2:p>
          </ns1:table-cell>
          <ns1:table-cell>
            <ns2:p/>
          </ns1:table-cell>
          <ns1:table-cell>
            <ns2:p>bakerbrothersplumbing.com</ns2:p>
          </ns1:table-cell>
          <ns1:table-cell>
            <ns2:p>Dallas/DFW, TX</ns2:p>
          </ns1:table-cell>
          <ns1:table-cell>
            <ns2:p>4.9/5 (24,000+ reviews)</ns2:p>
          </ns1:table-cell>
          <ns1:table-cell>
            <ns2:p>YES (80+ yrs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0.0</ns2:p>
          </ns1:table-cell>
          <ns1:table-cell>
            <ns2:p>Fort Worth</ns2:p>
          </ns1:table-cell>
          <ns1:table-cell>
            <ns2:p>TX</ns2:p>
          </ns1:table-cell>
          <ns1:table-cell>
            <ns2:p>1028117</ns2:p>
          </ns1:table-cell>
          <ns1:table-cell>
            <ns2:p>Larry Stinson Plumbing &amp; Water Heater Repair</ns2:p>
          </ns1:table-cell>
          <ns1:table-cell>
            <ns2:p>(817) 508-2631</ns2:p>
          </ns1:table-cell>
          <ns1:table-cell>
            <ns2:p/>
          </ns1:table-cell>
          <ns1:table-cell>
            <ns2:p>larrystinson.com</ns2:p>
          </ns1:table-cell>
          <ns1:table-cell>
            <ns2:p>Fort Worth, TX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1.0</ns2:p>
          </ns1:table-cell>
          <ns1:table-cell>
            <ns2:p>Jacksonville</ns2:p>
          </ns1:table-cell>
          <ns1:table-cell>
            <ns2:p>FL</ns2:p>
          </ns1:table-cell>
          <ns1:table-cell>
            <ns2:p>101768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.0</ns2:p>
          </ns1:table-cell>
          <ns1:table-cell>
            <ns2:p>Austin</ns2:p>
          </ns1:table-cell>
          <ns1:table-cell>
            <ns2:p>TX</ns2:p>
          </ns1:table-cell>
          <ns1:table-cell>
            <ns2:p>1002632</ns2:p>
          </ns1:table-cell>
          <ns1:table-cell>
            <ns2:p>Austin's Best Plumbing</ns2:p>
          </ns1:table-cell>
          <ns1:table-cell>
            <ns2:p>(512) 377-9919</ns2:p>
          </ns1:table-cell>
          <ns1:table-cell>
            <ns2:p/>
          </ns1:table-cell>
          <ns1:table-cell>
            <ns2:p>austinsgreatestplumbing.com</ns2:p>
          </ns1:table-cell>
          <ns1:table-cell>
            <ns2:p>Austin, TX</ns2:p>
          </ns1:table-cell>
          <ns1:table-cell>
            <ns2:p>4.8/5+</ns2:p>
          </ns1:table-cell>
          <ns1:table-cell>
            <ns2:p>YES (1978)</ns2:p>
          </ns1:table-cell>
          <ns1:table-cell>
            <ns2:p/>
          </ns1:table-cell>
          <ns1:table-cell>
            <ns2:p>Nextdoor</ns2:p>
          </ns1:table-cell>
        </ns1:table-row>
        <ns1:table-row>
          <ns1:table-cell>
            <ns2:p>13.0</ns2:p>
          </ns1:table-cell>
          <ns1:table-cell>
            <ns2:p>San Jose</ns2:p>
          </ns1:table-cell>
          <ns1:table-cell>
            <ns2:p>CA</ns2:p>
          </ns1:table-cell>
          <ns1:table-cell>
            <ns2:p>989814</ns2:p>
          </ns1:table-cell>
          <ns1:table-cell>
            <ns2:p>San Jose Plumbing Inc.</ns2:p>
          </ns1:table-cell>
          <ns1:table-cell>
            <ns2:p>(408) 296-1820</ns2:p>
          </ns1:table-cell>
          <ns1:table-cell>
            <ns2:p/>
          </ns1:table-cell>
          <ns1:table-cell>
            <ns2:p>sanjoseplumbinginc.com</ns2:p>
          </ns1:table-cell>
          <ns1:table-cell>
            <ns2:p>San Jose, CA</ns2:p>
          </ns1:table-cell>
          <ns1:table-cell>
            <ns2:p>4.8/5</ns2:p>
          </ns1:table-cell>
          <ns1:table-cell>
            <ns2:p>YES (30+ yrs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4.0</ns2:p>
          </ns1:table-cell>
          <ns1:table-cell>
            <ns2:p>Charlotte</ns2:p>
          </ns1:table-cell>
          <ns1:table-cell>
            <ns2:p>NC</ns2:p>
          </ns1:table-cell>
          <ns1:table-cell>
            <ns2:p>964784</ns2:p>
          </ns1:table-cell>
          <ns1:table-cell>
            <ns2:p>WyattWorks Plumbing Charlotte</ns2:p>
          </ns1:table-cell>
          <ns1:table-cell>
            <ns2:p>(704) 825-5000</ns2:p>
          </ns1:table-cell>
          <ns1:table-cell>
            <ns2:p/>
          </ns1:table-cell>
          <ns1:table-cell>
            <ns2:p>wyattworksplumbing.com</ns2:p>
          </ns1:table-cell>
          <ns1:table-cell>
            <ns2:p>Charlotte, NC</ns2:p>
          </ns1:table-cell>
          <ns1:table-cell>
            <ns2:p>4.7+/5</ns2:p>
          </ns1:table-cell>
          <ns1:table-cell>
            <ns2:p>YES (family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5.0</ns2:p>
          </ns1:table-cell>
          <ns1:table-cell>
            <ns2:p>Columbus</ns2:p>
          </ns1:table-cell>
          <ns1:table-cell>
            <ns2:p>OH</ns2:p>
          </ns1:table-cell>
          <ns1:table-cell>
            <ns2:p>93839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.0</ns2:p>
          </ns1:table-cell>
          <ns1:table-cell>
            <ns2:p>Indianapolis</ns2:p>
          </ns1:table-cell>
          <ns1:table-cell>
            <ns2:p>IN</ns2:p>
          </ns1:table-cell>
          <ns1:table-cell>
            <ns2:p>91063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.0</ns2:p>
          </ns1:table-cell>
          <ns1:table-cell>
            <ns2:p>San Francisco</ns2:p>
          </ns1:table-cell>
          <ns1:table-cell>
            <ns2:p>CA</ns2:p>
          </ns1:table-cell>
          <ns1:table-cell>
            <ns2:p>82607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.0</ns2:p>
          </ns1:table-cell>
          <ns1:table-cell>
            <ns2:p>Louisville</ns2:p>
          </ns1:table-cell>
          <ns1:table-cell>
            <ns2:p>KY</ns2:p>
          </ns1:table-cell>
          <ns1:table-cell>
            <ns2:p>795222</ns2:p>
          </ns1:table-cell>
          <ns1:table-cell>
            <ns2:p>Bryant &amp; Sons Plumbing</ns2:p>
          </ns1:table-cell>
          <ns1:table-cell>
            <ns2:p>(812) 284-2109</ns2:p>
          </ns1:table-cell>
          <ns1:table-cell>
            <ns2:p/>
          </ns1:table-cell>
          <ns1:table-cell>
            <ns2:p>bryantsplumbingandwaterheaters.com</ns2:p>
          </ns1:table-cell>
          <ns1:table-cell>
            <ns2:p>Louisville, KY</ns2:p>
          </ns1:table-cell>
          <ns1:table-cell>
            <ns2:p>4.7+/5</ns2:p>
          </ns1:table-cell>
          <ns1:table-cell>
            <ns2:p>YES (40+ yrs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9.0</ns2:p>
          </ns1:table-cell>
          <ns1:table-cell>
            <ns2:p>Seattle</ns2:p>
          </ns1:table-cell>
          <ns1:table-cell>
            <ns2:p>WA</ns2:p>
          </ns1:table-cell>
          <ns1:table-cell>
            <ns2:p>784777</ns2:p>
          </ns1:table-cell>
          <ns1:table-cell>
            <ns2:p>Ballard Plumbing</ns2:p>
          </ns1:table-cell>
          <ns1:table-cell>
            <ns2:p/>
          </ns1:table-cell>
          <ns1:table-cell>
            <ns2:p/>
          </ns1:table-cell>
          <ns1:table-cell>
            <ns2:p>ballardplumbing.com</ns2:p>
          </ns1:table-cell>
          <ns1:table-cell>
            <ns2:p>Seattle, WA</ns2:p>
          </ns1:table-cell>
          <ns1:table-cell>
            <ns2:p>4.7+/5</ns2:p>
          </ns1:table-cell>
          <ns1:table-cell>
            <ns2:p>YES (family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20.0</ns2:p>
          </ns1:table-cell>
          <ns1:table-cell>
            <ns2:p>Nashville</ns2:p>
          </ns1:table-cell>
          <ns1:table-cell>
            <ns2:p>TN</ns2:p>
          </ns1:table-cell>
          <ns1:table-cell>
            <ns2:p>745904</ns2:p>
          </ns1:table-cell>
          <ns1:table-cell>
            <ns2:p>Southern Plumbing Works</ns2:p>
          </ns1:table-cell>
          <ns1:table-cell>
            <ns2:p>(615) 205-7656</ns2:p>
          </ns1:table-cell>
          <ns1:table-cell>
            <ns2:p>jonathan@loftyrankings.com</ns2:p>
          </ns1:table-cell>
          <ns1:table-cell>
            <ns2:p>southernplumbingworks.com</ns2:p>
          </ns1:table-cell>
          <ns1:table-cell>
            <ns2:p>Nashville, TN</ns2:p>
          </ns1:table-cell>
          <ns1:table-cell>
            <ns2:p>4.8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21.0</ns2:p>
          </ns1:table-cell>
          <ns1:table-cell>
            <ns2:p>Denver</ns2:p>
          </ns1:table-cell>
          <ns1:table-cell>
            <ns2:p>CO</ns2:p>
          </ns1:table-cell>
          <ns1:table-cell>
            <ns2:p>740613</ns2:p>
          </ns1:table-cell>
          <ns1:table-cell>
            <ns2:p>Applewood Plumbing</ns2:p>
          </ns1:table-cell>
          <ns1:table-cell>
            <ns2:p>(303) 444-1633</ns2:p>
          </ns1:table-cell>
          <ns1:table-cell>
            <ns2:p/>
          </ns1:table-cell>
          <ns1:table-cell>
            <ns2:p>applewoodfixit.com</ns2:p>
          </ns1:table-cell>
          <ns1:table-cell>
            <ns2:p>Denver/Boulder, CO</ns2:p>
          </ns1:table-cell>
          <ns1:table-cell>
            <ns2:p>4.7+/5</ns2:p>
          </ns1:table-cell>
          <ns1:table-cell>
            <ns2:p>YES (1973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22.0</ns2:p>
          </ns1:table-cell>
          <ns1:table-cell>
            <ns2:p>Oklahoma City</ns2:p>
          </ns1:table-cell>
          <ns1:table-cell>
            <ns2:p>OK</ns2:p>
          </ns1:table-cell>
          <ns1:table-cell>
            <ns2:p>71984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.0</ns2:p>
          </ns1:table-cell>
          <ns1:table-cell>
            <ns2:p>El Paso</ns2:p>
          </ns1:table-cell>
          <ns1:table-cell>
            <ns2:p>TX</ns2:p>
          </ns1:table-cell>
          <ns1:table-cell>
            <ns2:p>6830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.0</ns2:p>
          </ns1:table-cell>
          <ns1:table-cell>
            <ns2:p>Las Vegas</ns2:p>
          </ns1:table-cell>
          <ns1:table-cell>
            <ns2:p>NV</ns2:p>
          </ns1:table-cell>
          <ns1:table-cell>
            <ns2:p>679817</ns2:p>
          </ns1:table-cell>
          <ns1:table-cell>
            <ns2:p>Vegas Valley Plumbing</ns2:p>
          </ns1:table-cell>
          <ns1:table-cell>
            <ns2:p>(702) 766-8827</ns2:p>
          </ns1:table-cell>
          <ns1:table-cell>
            <ns2:p/>
          </ns1:table-cell>
          <ns1:table-cell>
            <ns2:p>vegasvalley.com</ns2:p>
          </ns1:table-cell>
          <ns1:table-cell>
            <ns2:p>Las Vegas, NV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26.0</ns2:p>
          </ns1:table-cell>
          <ns1:table-cell>
            <ns2:p>Boston</ns2:p>
          </ns1:table-cell>
          <ns1:table-cell>
            <ns2:p>MA</ns2:p>
          </ns1:table-cell>
          <ns1:table-cell>
            <ns2:p>672973</ns2:p>
          </ns1:table-cell>
          <ns1:table-cell>
            <ns2:p>Vaughan Plumbing &amp; Heating</ns2:p>
          </ns1:table-cell>
          <ns1:table-cell>
            <ns2:p>(781) 686-5049</ns2:p>
          </ns1:table-cell>
          <ns1:table-cell>
            <ns2:p>accounts@vaughanplumbing.com</ns2:p>
          </ns1:table-cell>
          <ns1:table-cell>
            <ns2:p>vaughanplumbing.com</ns2:p>
          </ns1:table-cell>
          <ns1:table-cell>
            <ns2:p>Boston, MA</ns2:p>
          </ns1:table-cell>
          <ns1:table-cell>
            <ns2:p>4.6+/5</ns2:p>
          </ns1:table-cell>
          <ns1:table-cell>
            <ns2:p>YES (100+ yrs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27.0</ns2:p>
          </ns1:table-cell>
          <ns1:table-cell>
            <ns2:p>Detroit</ns2:p>
          </ns1:table-cell>
          <ns1:table-cell>
            <ns2:p>MI</ns2:p>
          </ns1:table-cell>
          <ns1:table-cell>
            <ns2:p>64909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.0</ns2:p>
          </ns1:table-cell>
          <ns1:table-cell>
            <ns2:p>Portland</ns2:p>
          </ns1:table-cell>
          <ns1:table-cell>
            <ns2:p>OR</ns2:p>
          </ns1:table-cell>
          <ns1:table-cell>
            <ns2:p>635109</ns2:p>
          </ns1:table-cell>
          <ns1:table-cell>
            <ns2:p>Service Plus Plumbing</ns2:p>
          </ns1:table-cell>
          <ns1:table-cell>
            <ns2:p>(503) 927-4482</ns2:p>
          </ns1:table-cell>
          <ns1:table-cell>
            <ns2:p/>
          </ns1:table-cell>
          <ns1:table-cell>
            <ns2:p>serviceplusplumbing.com</ns2:p>
          </ns1:table-cell>
          <ns1:table-cell>
            <ns2:p>Portland, OR</ns2:p>
          </ns1:table-cell>
          <ns1:table-cell>
            <ns2:p>4.5+/5</ns2:p>
          </ns1:table-cell>
          <ns1:table-cell>
            <ns2:p>Family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29.0</ns2:p>
          </ns1:table-cell>
          <ns1:table-cell>
            <ns2:p>Memphis</ns2:p>
          </ns1:table-cell>
          <ns1:table-cell>
            <ns2:p>TN</ns2:p>
          </ns1:table-cell>
          <ns1:table-cell>
            <ns2:p>609647</ns2:p>
          </ns1:table-cell>
          <ns1:table-cell>
            <ns2:p>Memphis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Memphis, TN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0.0</ns2:p>
          </ns1:table-cell>
          <ns1:table-cell>
            <ns2:p>Baltimore</ns2:p>
          </ns1:table-cell>
          <ns1:table-cell>
            <ns2:p>MD</ns2:p>
          </ns1:table-cell>
          <ns1:table-cell>
            <ns2:p>569997</ns2:p>
          </ns1:table-cell>
          <ns1:table-cell>
            <ns2:p>Lyons Plumbing</ns2:p>
          </ns1:table-cell>
          <ns1:table-cell>
            <ns2:p>(301) 253-4090</ns2:p>
          </ns1:table-cell>
          <ns1:table-cell>
            <ns2:p/>
          </ns1:table-cell>
          <ns1:table-cell>
            <ns2:p>lyonsplumbing.com</ns2:p>
          </ns1:table-cell>
          <ns1:table-cell>
            <ns2:p>Baltimore, MD</ns2:p>
          </ns1:table-cell>
          <ns1:table-cell>
            <ns2:p>4.6+/5</ns2:p>
          </ns1:table-cell>
          <ns1:table-cell>
            <ns2:p>YES (1959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1.0</ns2:p>
          </ns1:table-cell>
          <ns1:table-cell>
            <ns2:p>Milwaukee</ns2:p>
          </ns1:table-cell>
          <ns1:table-cell>
            <ns2:p>WI</ns2:p>
          </ns1:table-cell>
          <ns1:table-cell>
            <ns2:p>562407</ns2:p>
          </ns1:table-cell>
          <ns1:table-cell>
            <ns2:p>J J's Plumbing Repair</ns2:p>
          </ns1:table-cell>
          <ns1:table-cell>
            <ns2:p>(262) 377-7161</ns2:p>
          </ns1:table-cell>
          <ns1:table-cell>
            <ns2:p/>
          </ns1:table-cell>
          <ns1:table-cell>
            <ns2:p>jjsplumbing.com</ns2:p>
          </ns1:table-cell>
          <ns1:table-cell>
            <ns2:p>Milwaukee, WI</ns2:p>
          </ns1:table-cell>
          <ns1:table-cell>
            <ns2:p>4.7+/5</ns2:p>
          </ns1:table-cell>
          <ns1:table-cell>
            <ns2:p>YES (1985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2.0</ns2:p>
          </ns1:table-cell>
          <ns1:table-cell>
            <ns2:p>Albuquerque</ns2:p>
          </ns1:table-cell>
          <ns1:table-cell>
            <ns2:p>NM</ns2:p>
          </ns1:table-cell>
          <ns1:table-cell>
            <ns2:p>556588</ns2:p>
          </ns1:table-cell>
          <ns1:table-cell>
            <ns2:p>TLC Plumbing Heating Cooling Electrical</ns2:p>
          </ns1:table-cell>
          <ns1:table-cell>
            <ns2:p>(505) 761-9644</ns2:p>
          </ns1:table-cell>
          <ns1:table-cell>
            <ns2:p/>
          </ns1:table-cell>
          <ns1:table-cell>
            <ns2:p>tlcnm.com</ns2:p>
          </ns1:table-cell>
          <ns1:table-cell>
            <ns2:p>5000 Edith Blvd NE, Albuquerque, NM</ns2:p>
          </ns1:table-cell>
          <ns1:table-cell>
            <ns2:p>4.8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.0</ns2:p>
          </ns1:table-cell>
          <ns1:table-cell>
            <ns2:p>Fresno</ns2:p>
          </ns1:table-cell>
          <ns1:table-cell>
            <ns2:p>CA</ns2:p>
          </ns1:table-cell>
          <ns1:table-cell>
            <ns2:p>555549</ns2:p>
          </ns1:table-cell>
          <ns1:table-cell>
            <ns2:p>Fresno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Fresno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4.0</ns2:p>
          </ns1:table-cell>
          <ns1:table-cell>
            <ns2:p>Tucson</ns2:p>
          </ns1:table-cell>
          <ns1:table-cell>
            <ns2:p>AZ</ns2:p>
          </ns1:table-cell>
          <ns1:table-cell>
            <ns2:p>548371</ns2:p>
          </ns1:table-cell>
          <ns1:table-cell>
            <ns2:p>Jobe &amp; Sons Plumbing</ns2:p>
          </ns1:table-cell>
          <ns1:table-cell>
            <ns2:p>(520) 850-4552</ns2:p>
          </ns1:table-cell>
          <ns1:table-cell>
            <ns2:p>impallari@gmail.com</ns2:p>
          </ns1:table-cell>
          <ns1:table-cell>
            <ns2:p>jobeandsonsplumbing.com</ns2:p>
          </ns1:table-cell>
          <ns1:table-cell>
            <ns2:p>Tucson, AZ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5.0</ns2:p>
          </ns1:table-cell>
          <ns1:table-cell>
            <ns2:p>Sacramento</ns2:p>
          </ns1:table-cell>
          <ns1:table-cell>
            <ns2:p>CA</ns2:p>
          </ns1:table-cell>
          <ns1:table-cell>
            <ns2:p>536449</ns2:p>
          </ns1:table-cell>
          <ns1:table-cell>
            <ns2:p>Sacramento Plumbing</ns2:p>
          </ns1:table-cell>
          <ns1:table-cell>
            <ns2:p>(916) 606-6331</ns2:p>
          </ns1:table-cell>
          <ns1:table-cell>
            <ns2:p/>
          </ns1:table-cell>
          <ns1:table-cell>
            <ns2:p>allsacramento.com</ns2:p>
          </ns1:table-cell>
          <ns1:table-cell>
            <ns2:p>Sacramento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6.0</ns2:p>
          </ns1:table-cell>
          <ns1:table-cell>
            <ns2:p>Atlanta</ns2:p>
          </ns1:table-cell>
          <ns1:table-cell>
            <ns2:p>GA</ns2:p>
          </ns1:table-cell>
          <ns1:table-cell>
            <ns2:p>529110</ns2:p>
          </ns1:table-cell>
          <ns1:table-cell>
            <ns2:p>Head's Plumbing Sales &amp; Service</ns2:p>
          </ns1:table-cell>
          <ns1:table-cell>
            <ns2:p>(404) 696-3175</ns2:p>
          </ns1:table-cell>
          <ns1:table-cell>
            <ns2:p/>
          </ns1:table-cell>
          <ns1:table-cell>
            <ns2:p>headsplumbing.com</ns2:p>
          </ns1:table-cell>
          <ns1:table-cell>
            <ns2:p>Atlanta, GA</ns2:p>
          </ns1:table-cell>
          <ns1:table-cell>
            <ns2:p>4.8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7.0</ns2:p>
          </ns1:table-cell>
          <ns1:table-cell>
            <ns2:p>Kansas City</ns2:p>
          </ns1:table-cell>
          <ns1:table-cell>
            <ns2:p>MO</ns2:p>
          </ns1:table-cell>
          <ns1:table-cell>
            <ns2:p>521220</ns2:p>
          </ns1:table-cell>
          <ns1:table-cell>
            <ns2:p>Stine-Nichols Plumbing</ns2:p>
          </ns1:table-cell>
          <ns1:table-cell>
            <ns2:p>(816) 348-3481</ns2:p>
          </ns1:table-cell>
          <ns1:table-cell>
            <ns2:p/>
          </ns1:table-cell>
          <ns1:table-cell>
            <ns2:p>stinenichols.com</ns2:p>
          </ns1:table-cell>
          <ns1:table-cell>
            <ns2:p>Kansas City, MO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8.0</ns2:p>
          </ns1:table-cell>
          <ns1:table-cell>
            <ns2:p>Mesa</ns2:p>
          </ns1:table-cell>
          <ns1:table-cell>
            <ns2:p>AZ</ns2:p>
          </ns1:table-cell>
          <ns1:table-cell>
            <ns2:p>513656</ns2:p>
          </ns1:table-cell>
          <ns1:table-cell>
            <ns2:p>Goettl Plumbing</ns2:p>
          </ns1:table-cell>
          <ns1:table-cell>
            <ns2:p/>
          </ns1:table-cell>
          <ns1:table-cell>
            <ns2:p/>
          </ns1:table-cell>
          <ns1:table-cell>
            <ns2:p>goettl.com</ns2:p>
          </ns1:table-cell>
          <ns1:table-cell>
            <ns2:p>Mesa, AZ</ns2:p>
          </ns1:table-cell>
          <ns1:table-cell>
            <ns2:p>4.5+/5</ns2:p>
          </ns1:table-cell>
          <ns1:table-cell>
            <ns2:p>YES (family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39.0</ns2:p>
          </ns1:table-cell>
          <ns1:table-cell>
            <ns2:p>Raleigh</ns2:p>
          </ns1:table-cell>
          <ns1:table-cell>
            <ns2:p>NC</ns2:p>
          </ns1:table-cell>
          <ns1:table-cell>
            <ns2:p>506306</ns2:p>
          </ns1:table-cell>
          <ns1:table-cell>
            <ns2:p>William Parrish Plumbing</ns2:p>
          </ns1:table-cell>
          <ns1:table-cell>
            <ns2:p>(919) 343-0783</ns2:p>
          </ns1:table-cell>
          <ns1:table-cell>
            <ns2:p/>
          </ns1:table-cell>
          <ns1:table-cell>
            <ns2:p>williamparrishplumbing.com</ns2:p>
          </ns1:table-cell>
          <ns1:table-cell>
            <ns2:p>Raleigh, NC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0.0</ns2:p>
          </ns1:table-cell>
          <ns1:table-cell>
            <ns2:p>Colorado Springs</ns2:p>
          </ns1:table-cell>
          <ns1:table-cell>
            <ns2:p>CO</ns2:p>
          </ns1:table-cell>
          <ns1:table-cell>
            <ns2:p>4947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.0</ns2:p>
          </ns1:table-cell>
          <ns1:table-cell>
            <ns2:p>Miami</ns2:p>
          </ns1:table-cell>
          <ns1:table-cell>
            <ns2:p>FL</ns2:p>
          </ns1:table-cell>
          <ns1:table-cell>
            <ns2:p>489812</ns2:p>
          </ns1:table-cell>
          <ns1:table-cell>
            <ns2:p>Miami Dade Plumbing</ns2:p>
          </ns1:table-cell>
          <ns1:table-cell>
            <ns2:p>(786) 756-3185</ns2:p>
          </ns1:table-cell>
          <ns1:table-cell>
            <ns2:p/>
          </ns1:table-cell>
          <ns1:table-cell>
            <ns2:p>miamidadeplumbing.com</ns2:p>
          </ns1:table-cell>
          <ns1:table-cell>
            <ns2:p>Miami, FL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2.0</ns2:p>
          </ns1:table-cell>
          <ns1:table-cell>
            <ns2:p>Omaha</ns2:p>
          </ns1:table-cell>
          <ns1:table-cell>
            <ns2:p>NE</ns2:p>
          </ns1:table-cell>
          <ns1:table-cell>
            <ns2:p>488797</ns2:p>
          </ns1:table-cell>
          <ns1:table-cell>
            <ns2:p>Grayson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Omaha, NE</ns2:p>
          </ns1:table-cell>
          <ns1:table-cell>
            <ns2:p>4.6+/5</ns2:p>
          </ns1:table-cell>
          <ns1:table-cell>
            <ns2:p>YES (family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3.0</ns2:p>
          </ns1:table-cell>
          <ns1:table-cell>
            <ns2:p>Virginia Beach</ns2:p>
          </ns1:table-cell>
          <ns1:table-cell>
            <ns2:p>VA</ns2:p>
          </ns1:table-cell>
          <ns1:table-cell>
            <ns2:p>45373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.0</ns2:p>
          </ns1:table-cell>
          <ns1:table-cell>
            <ns2:p>Long Beach</ns2:p>
          </ns1:table-cell>
          <ns1:table-cell>
            <ns2:p>CA</ns2:p>
          </ns1:table-cell>
          <ns1:table-cell>
            <ns2:p>450469</ns2:p>
          </ns1:table-cell>
          <ns1:table-cell>
            <ns2:p>The Family Plumber</ns2:p>
          </ns1:table-cell>
          <ns1:table-cell>
            <ns2:p>(562) 459-6445</ns2:p>
          </ns1:table-cell>
          <ns1:table-cell>
            <ns2:p>info@thefamilyplumber.com</ns2:p>
          </ns1:table-cell>
          <ns1:table-cell>
            <ns2:p>thefamilyplumber.com</ns2:p>
          </ns1:table-cell>
          <ns1:table-cell>
            <ns2:p>Long Beach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5.0</ns2:p>
          </ns1:table-cell>
          <ns1:table-cell>
            <ns2:p>Oakland</ns2:p>
          </ns1:table-cell>
          <ns1:table-cell>
            <ns2:p>CA</ns2:p>
          </ns1:table-cell>
          <ns1:table-cell>
            <ns2:p>440838</ns2:p>
          </ns1:table-cell>
          <ns1:table-cell>
            <ns2:p>Fazule and Sons Plumbing</ns2:p>
          </ns1:table-cell>
          <ns1:table-cell>
            <ns2:p>(510) 534-5480</ns2:p>
          </ns1:table-cell>
          <ns1:table-cell>
            <ns2:p/>
          </ns1:table-cell>
          <ns1:table-cell>
            <ns2:p/>
          </ns1:table-cell>
          <ns1:table-cell>
            <ns2:p>Oakland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6.0</ns2:p>
          </ns1:table-cell>
          <ns1:table-cell>
            <ns2:p>Minneapolis</ns2:p>
          </ns1:table-cell>
          <ns1:table-cell>
            <ns2:p>MN</ns2:p>
          </ns1:table-cell>
          <ns1:table-cell>
            <ns2:p>43032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.0</ns2:p>
          </ns1:table-cell>
          <ns1:table-cell>
            <ns2:p>Bakersfield</ns2:p>
          </ns1:table-cell>
          <ns1:table-cell>
            <ns2:p>CA</ns2:p>
          </ns1:table-cell>
          <ns1:table-cell>
            <ns2:p>422165</ns2:p>
          </ns1:table-cell>
          <ns1:table-cell>
            <ns2:p>Cisneros Brothers Plumbing</ns2:p>
          </ns1:table-cell>
          <ns1:table-cell>
            <ns2:p>(661) 768-0616</ns2:p>
          </ns1:table-cell>
          <ns1:table-cell>
            <ns2:p/>
          </ns1:table-cell>
          <ns1:table-cell>
            <ns2:p>cisnerosbrothersplumbing.com</ns2:p>
          </ns1:table-cell>
          <ns1:table-cell>
            <ns2:p>Bakersfield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8.0</ns2:p>
          </ns1:table-cell>
          <ns1:table-cell>
            <ns2:p>Tulsa</ns2:p>
          </ns1:table-cell>
          <ns1:table-cell>
            <ns2:p>OK</ns2:p>
          </ns1:table-cell>
          <ns1:table-cell>
            <ns2:p>416209</ns2:p>
          </ns1:table-cell>
          <ns1:table-cell>
            <ns2:p>Williams Plumbing &amp; Drain Service</ns2:p>
          </ns1:table-cell>
          <ns1:table-cell>
            <ns2:p>(918) 505-7332</ns2:p>
          </ns1:table-cell>
          <ns1:table-cell>
            <ns2:p/>
          </ns1:table-cell>
          <ns1:table-cell>
            <ns2:p>williamsplumbing.com</ns2:p>
          </ns1:table-cell>
          <ns1:table-cell>
            <ns2:p>Tulsa, OK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9.0</ns2:p>
          </ns1:table-cell>
          <ns1:table-cell>
            <ns2:p>Tampa</ns2:p>
          </ns1:table-cell>
          <ns1:table-cell>
            <ns2:p>FL</ns2:p>
          </ns1:table-cell>
          <ns1:table-cell>
            <ns2:p>413554</ns2:p>
          </ns1:table-cell>
          <ns1:table-cell>
            <ns2:p>Olin Plumbing Inc.</ns2:p>
          </ns1:table-cell>
          <ns1:table-cell>
            <ns2:p>(813) 443-5820</ns2:p>
          </ns1:table-cell>
          <ns1:table-cell>
            <ns2:p>info@olinplumbinginc.com</ns2:p>
          </ns1:table-cell>
          <ns1:table-cell>
            <ns2:p>olinplumbing.com</ns2:p>
          </ns1:table-cell>
          <ns1:table-cell>
            <ns2:p>Tampa, FL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0.0</ns2:p>
          </ns1:table-cell>
          <ns1:table-cell>
            <ns2:p>Aurora</ns2:p>
          </ns1:table-cell>
          <ns1:table-cell>
            <ns2:p>CO</ns2:p>
          </ns1:table-cell>
          <ns1:table-cell>
            <ns2:p>410053</ns2:p>
          </ns1:table-cell>
          <ns1:table-cell>
            <ns2:p>Aurora Plumbing Company</ns2:p>
          </ns1:table-cell>
          <ns1:table-cell>
            <ns2:p>(303) 366-5828</ns2:p>
          </ns1:table-cell>
          <ns1:table-cell>
            <ns2:p/>
          </ns1:table-cell>
          <ns1:table-cell>
            <ns2:p>auroraplumbing.com</ns2:p>
          </ns1:table-cell>
          <ns1:table-cell>
            <ns2:p>Aurora, CO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1.0</ns2:p>
          </ns1:table-cell>
          <ns1:table-cell>
            <ns2:p>Arlington</ns2:p>
          </ns1:table-cell>
          <ns1:table-cell>
            <ns2:p>TX</ns2:p>
          </ns1:table-cell>
          <ns1:table-cell>
            <ns2:p>402134</ns2:p>
          </ns1:table-cell>
          <ns1:table-cell>
            <ns2:p>Family Friends Plumbing Service</ns2:p>
          </ns1:table-cell>
          <ns1:table-cell>
            <ns2:p>(817) 819-1471</ns2:p>
          </ns1:table-cell>
          <ns1:table-cell>
            <ns2:p>e7d54b729aaf49ea8b2f80dae22860aa@sentry.zipify.com</ns2:p>
          </ns1:table-cell>
          <ns1:table-cell>
            <ns2:p>familyfriends.com</ns2:p>
          </ns1:table-cell>
          <ns1:table-cell>
            <ns2:p>Arlington, TX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2.0</ns2:p>
          </ns1:table-cell>
          <ns1:table-cell>
            <ns2:p>Wichita</ns2:p>
          </ns1:table-cell>
          <ns1:table-cell>
            <ns2:p>KS</ns2:p>
          </ns1:table-cell>
          <ns1:table-cell>
            <ns2:p>40098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.0</ns2:p>
          </ns1:table-cell>
          <ns1:table-cell>
            <ns2:p>Cleveland</ns2:p>
          </ns1:table-cell>
          <ns1:table-cell>
            <ns2:p>OH</ns2:p>
          </ns1:table-cell>
          <ns1:table-cell>
            <ns2:p>3636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.0</ns2:p>
          </ns1:table-cell>
          <ns1:table-cell>
            <ns2:p>New Orleans</ns2:p>
          </ns1:table-cell>
          <ns1:table-cell>
            <ns2:p>LA</ns2:p>
          </ns1:table-cell>
          <ns1:table-cell>
            <ns2:p>362154</ns2:p>
          </ns1:table-cell>
          <ns1:table-cell>
            <ns2:p>Noel's Plumbing, LLC.</ns2:p>
          </ns1:table-cell>
          <ns1:table-cell>
            <ns2:p>(504) 445-7222</ns2:p>
          </ns1:table-cell>
          <ns1:table-cell>
            <ns2:p/>
          </ns1:table-cell>
          <ns1:table-cell>
            <ns2:p/>
          </ns1:table-cell>
          <ns1:table-cell>
            <ns2:p>New Orleans, L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5.0</ns2:p>
          </ns1:table-cell>
          <ns1:table-cell>
            <ns2:p>Henderson</ns2:p>
          </ns1:table-cell>
          <ns1:table-cell>
            <ns2:p>NV</ns2:p>
          </ns1:table-cell>
          <ns1:table-cell>
            <ns2:p>353289</ns2:p>
          </ns1:table-cell>
          <ns1:table-cell>
            <ns2:p>Robinson Family Plumbing &amp; HVAC</ns2:p>
          </ns1:table-cell>
          <ns1:table-cell>
            <ns2:p>(725) 234-3100</ns2:p>
          </ns1:table-cell>
          <ns1:table-cell>
            <ns2:p/>
          </ns1:table-cell>
          <ns1:table-cell>
            <ns2:p>robinsonfamilyplumbinghvac.com</ns2:p>
          </ns1:table-cell>
          <ns1:table-cell>
            <ns2:p>Henderson, NV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6.0</ns2:p>
          </ns1:table-cell>
          <ns1:table-cell>
            <ns2:p>Honolulu</ns2:p>
          </ns1:table-cell>
          <ns1:table-cell>
            <ns2:p>HI</ns2:p>
          </ns1:table-cell>
          <ns1:table-cell>
            <ns2:p>341868</ns2:p>
          </ns1:table-cell>
          <ns1:table-cell>
            <ns2:p>Allens Plumbing</ns2:p>
          </ns1:table-cell>
          <ns1:table-cell>
            <ns2:p>(808) 599-5511</ns2:p>
          </ns1:table-cell>
          <ns1:table-cell>
            <ns2:p/>
          </ns1:table-cell>
          <ns1:table-cell>
            <ns2:p>allensplumbinghi.com</ns2:p>
          </ns1:table-cell>
          <ns1:table-cell>
            <ns2:p>Honolulu, HI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7.0</ns2:p>
          </ns1:table-cell>
          <ns1:table-cell>
            <ns2:p>Anaheim</ns2:p>
          </ns1:table-cell>
          <ns1:table-cell>
            <ns2:p>CA</ns2:p>
          </ns1:table-cell>
          <ns1:table-cell>
            <ns2:p>341008</ns2:p>
          </ns1:table-cell>
          <ns1:table-cell>
            <ns2:p>Barker and Sons Plumbing &amp; Rooter</ns2:p>
          </ns1:table-cell>
          <ns1:table-cell>
            <ns2:p>(714) 667-7800</ns2:p>
          </ns1:table-cell>
          <ns1:table-cell>
            <ns2:p/>
          </ns1:table-cell>
          <ns1:table-cell>
            <ns2:p>barkerandsonsplumbing.com</ns2:p>
          </ns1:table-cell>
          <ns1:table-cell>
            <ns2:p>Anaheim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8.0</ns2:p>
          </ns1:table-cell>
          <ns1:table-cell>
            <ns2:p>Orlando</ns2:p>
          </ns1:table-cell>
          <ns1:table-cell>
            <ns2:p>FL</ns2:p>
          </ns1:table-cell>
          <ns1:table-cell>
            <ns2:p>333888</ns2:p>
          </ns1:table-cell>
          <ns1:table-cell>
            <ns2:p>Choice Plumbing Orlando</ns2:p>
          </ns1:table-cell>
          <ns1:table-cell>
            <ns2:p>(407) 422-7443</ns2:p>
          </ns1:table-cell>
          <ns1:table-cell>
            <ns2:p/>
          </ns1:table-cell>
          <ns1:table-cell>
            <ns2:p>choiceplumbingorlando.com</ns2:p>
          </ns1:table-cell>
          <ns1:table-cell>
            <ns2:p>Orlando, FL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59.0</ns2:p>
          </ns1:table-cell>
          <ns1:table-cell>
            <ns2:p>Lexington-Fayette urban county</ns2:p>
          </ns1:table-cell>
          <ns1:table-cell>
            <ns2:p>KY</ns2:p>
          </ns1:table-cell>
          <ns1:table-cell>
            <ns2:p>32975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.0</ns2:p>
          </ns1:table-cell>
          <ns1:table-cell>
            <ns2:p>Stockton</ns2:p>
          </ns1:table-cell>
          <ns1:table-cell>
            <ns2:p>CA</ns2:p>
          </ns1:table-cell>
          <ns1:table-cell>
            <ns2:p>324597</ns2:p>
          </ns1:table-cell>
          <ns1:table-cell>
            <ns2:p>Tony's Plumbing, Heating &amp; Air</ns2:p>
          </ns1:table-cell>
          <ns1:table-cell>
            <ns2:p>(209) 337-3788</ns2:p>
          </ns1:table-cell>
          <ns1:table-cell>
            <ns2:p/>
          </ns1:table-cell>
          <ns1:table-cell>
            <ns2:p>tonysplumbing.com</ns2:p>
          </ns1:table-cell>
          <ns1:table-cell>
            <ns2:p>Stockton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61.0</ns2:p>
          </ns1:table-cell>
          <ns1:table-cell>
            <ns2:p>Newark</ns2:p>
          </ns1:table-cell>
          <ns1:table-cell>
            <ns2:p>NJ</ns2:p>
          </ns1:table-cell>
          <ns1:table-cell>
            <ns2:p>323808</ns2:p>
          </ns1:table-cell>
          <ns1:table-cell>
            <ns2:p>Friends &amp; Family Plumbing and Heating</ns2:p>
          </ns1:table-cell>
          <ns1:table-cell>
            <ns2:p>(973) 955-6903</ns2:p>
          </ns1:table-cell>
          <ns1:table-cell>
            <ns2:p/>
          </ns1:table-cell>
          <ns1:table-cell>
            <ns2:p>ffheatingplumbing.com</ns2:p>
          </ns1:table-cell>
          <ns1:table-cell>
            <ns2:p>28 Samuel Ave, Newark, NJ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.0</ns2:p>
          </ns1:table-cell>
          <ns1:table-cell>
            <ns2:p>Riverside</ns2:p>
          </ns1:table-cell>
          <ns1:table-cell>
            <ns2:p>CA</ns2:p>
          </ns1:table-cell>
          <ns1:table-cell>
            <ns2:p>323057</ns2:p>
          </ns1:table-cell>
          <ns1:table-cell>
            <ns2:p>Campbell Family Plumbing &amp; Electric</ns2:p>
          </ns1:table-cell>
          <ns1:table-cell>
            <ns2:p>(951) 363-2666</ns2:p>
          </ns1:table-cell>
          <ns1:table-cell>
            <ns2:p/>
          </ns1:table-cell>
          <ns1:table-cell>
            <ns2:p/>
          </ns1:table-cell>
          <ns1:table-cell>
            <ns2:p>Riverside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63.0</ns2:p>
          </ns1:table-cell>
          <ns1:table-cell>
            <ns2:p>Irvine</ns2:p>
          </ns1:table-cell>
          <ns1:table-cell>
            <ns2:p>CA</ns2:p>
          </ns1:table-cell>
          <ns1:table-cell>
            <ns2:p>318764</ns2:p>
          </ns1:table-cell>
          <ns1:table-cell>
            <ns2:p>Irvine Plumbing</ns2:p>
          </ns1:table-cell>
          <ns1:table-cell>
            <ns2:p>(949) 850-4471</ns2:p>
          </ns1:table-cell>
          <ns1:table-cell>
            <ns2:p/>
          </ns1:table-cell>
          <ns1:table-cell>
            <ns2:p>irvineplumbing.com</ns2:p>
          </ns1:table-cell>
          <ns1:table-cell>
            <ns2:p>Irvine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64.0</ns2:p>
          </ns1:table-cell>
          <ns1:table-cell>
            <ns2:p>Corpus Christi</ns2:p>
          </ns1:table-cell>
          <ns1:table-cell>
            <ns2:p>TX</ns2:p>
          </ns1:table-cell>
          <ns1:table-cell>
            <ns2:p>317247</ns2:p>
          </ns1:table-cell>
          <ns1:table-cell>
            <ns2:p>Dwain McCain Plumbing</ns2:p>
          </ns1:table-cell>
          <ns1:table-cell>
            <ns2:p>(361) 241-6000</ns2:p>
          </ns1:table-cell>
          <ns1:table-cell>
            <ns2:p>mccainplumbing@sbcglobal.net</ns2:p>
          </ns1:table-cell>
          <ns1:table-cell>
            <ns2:p>dwainmccainplumbing.com</ns2:p>
          </ns1:table-cell>
          <ns1:table-cell>
            <ns2:p>Corpus Christi, TX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65.0</ns2:p>
          </ns1:table-cell>
          <ns1:table-cell>
            <ns2:p>Santa Ana</ns2:p>
          </ns1:table-cell>
          <ns1:table-cell>
            <ns2:p>CA</ns2:p>
          </ns1:table-cell>
          <ns1:table-cell>
            <ns2:p>315586</ns2:p>
          </ns1:table-cell>
          <ns1:table-cell>
            <ns2:p>Do It Right Plumbers</ns2:p>
          </ns1:table-cell>
          <ns1:table-cell>
            <ns2:p>(657) 229-2993</ns2:p>
          </ns1:table-cell>
          <ns1:table-cell>
            <ns2:p>leads@doitrightplumbers.com</ns2:p>
          </ns1:table-cell>
          <ns1:table-cell>
            <ns2:p>doitrightplumbers.com</ns2:p>
          </ns1:table-cell>
          <ns1:table-cell>
            <ns2:p>Santa Ana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66.0</ns2:p>
          </ns1:table-cell>
          <ns1:table-cell>
            <ns2:p>Cincinnati</ns2:p>
          </ns1:table-cell>
          <ns1:table-cell>
            <ns2:p>OH</ns2:p>
          </ns1:table-cell>
          <ns1:table-cell>
            <ns2:p>314367</ns2:p>
          </ns1:table-cell>
          <ns1:table-cell>
            <ns2:p>Halpin Plumbing Inc</ns2:p>
          </ns1:table-cell>
          <ns1:table-cell>
            <ns2:p>(513) 790-6985</ns2:p>
          </ns1:table-cell>
          <ns1:table-cell>
            <ns2:p/>
          </ns1:table-cell>
          <ns1:table-cell>
            <ns2:p>halpinplumbing.com</ns2:p>
          </ns1:table-cell>
          <ns1:table-cell>
            <ns2:p>Cincinnati, OH</ns2:p>
          </ns1:table-cell>
          <ns1:table-cell>
            <ns2:p>4.5+/5</ns2:p>
          </ns1:table-cell>
          <ns1:table-cell>
            <ns2:p>Family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67.0</ns2:p>
          </ns1:table-cell>
          <ns1:table-cell>
            <ns2:p>Greensboro</ns2:p>
          </ns1:table-cell>
          <ns1:table-cell>
            <ns2:p>NC</ns2:p>
          </ns1:table-cell>
          <ns1:table-cell>
            <ns2:p>308667</ns2:p>
          </ns1:table-cell>
          <ns1:table-cell>
            <ns2:p>Owens Plumbing Company LLC</ns2:p>
          </ns1:table-cell>
          <ns1:table-cell>
            <ns2:p>(336) 908-8478</ns2:p>
          </ns1:table-cell>
          <ns1:table-cell>
            <ns2:p/>
          </ns1:table-cell>
          <ns1:table-cell>
            <ns2:p>owensplumbingcompany.com</ns2:p>
          </ns1:table-cell>
          <ns1:table-cell>
            <ns2:p>Greensboro, NC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68.0</ns2:p>
          </ns1:table-cell>
          <ns1:table-cell>
            <ns2:p>Pittsburgh</ns2:p>
          </ns1:table-cell>
          <ns1:table-cell>
            <ns2:p>PA</ns2:p>
          </ns1:table-cell>
          <ns1:table-cell>
            <ns2:p>3076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.0</ns2:p>
          </ns1:table-cell>
          <ns1:table-cell>
            <ns2:p>St. Paul</ns2:p>
          </ns1:table-cell>
          <ns1:table-cell>
            <ns2:p>MN</ns2:p>
          </ns1:table-cell>
          <ns1:table-cell>
            <ns2:p>3066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.0</ns2:p>
          </ns1:table-cell>
          <ns1:table-cell>
            <ns2:p>Durham</ns2:p>
          </ns1:table-cell>
          <ns1:table-cell>
            <ns2:p>NC</ns2:p>
          </ns1:table-cell>
          <ns1:table-cell>
            <ns2:p>305561</ns2:p>
          </ns1:table-cell>
          <ns1:table-cell>
            <ns2:p>Brown Brothers Plumbing &amp; Heating</ns2:p>
          </ns1:table-cell>
          <ns1:table-cell>
            <ns2:p>(919) 220-2554</ns2:p>
          </ns1:table-cell>
          <ns1:table-cell>
            <ns2:p/>
          </ns1:table-cell>
          <ns1:table-cell>
            <ns2:p>brownbrothers.com</ns2:p>
          </ns1:table-cell>
          <ns1:table-cell>
            <ns2:p>Durham, NC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71.0</ns2:p>
          </ns1:table-cell>
          <ns1:table-cell>
            <ns2:p>Jersey City</ns2:p>
          </ns1:table-cell>
          <ns1:table-cell>
            <ns2:p>NJ</ns2:p>
          </ns1:table-cell>
          <ns1:table-cell>
            <ns2:p>302013</ns2:p>
          </ns1:table-cell>
          <ns1:table-cell>
            <ns2:p>M&amp;A Plumbing &amp; Heating</ns2:p>
          </ns1:table-cell>
          <ns1:table-cell>
            <ns2:p>(551) 208-8366</ns2:p>
          </ns1:table-cell>
          <ns1:table-cell>
            <ns2:p/>
          </ns1:table-cell>
          <ns1:table-cell>
            <ns2:p>https://business.google.com/v/m-a-plumbing-heating/0322610284500796106/8434/_?</ns2:p>
          </ns1:table-cell>
          <ns1:table-cell>
            <ns2:p>257 Dwight St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.0</ns2:p>
          </ns1:table-cell>
          <ns1:table-cell>
            <ns2:p>Lincoln</ns2:p>
          </ns1:table-cell>
          <ns1:table-cell>
            <ns2:p>NE</ns2:p>
          </ns1:table-cell>
          <ns1:table-cell>
            <ns2:p>30152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.0</ns2:p>
          </ns1:table-cell>
          <ns1:table-cell>
            <ns2:p>North Las Vegas</ns2:p>
          </ns1:table-cell>
          <ns1:table-cell>
            <ns2:p>NV</ns2:p>
          </ns1:table-cell>
          <ns1:table-cell>
            <ns2:p>29665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.0</ns2:p>
          </ns1:table-cell>
          <ns1:table-cell>
            <ns2:p>Plano</ns2:p>
          </ns1:table-cell>
          <ns1:table-cell>
            <ns2:p>TX</ns2:p>
          </ns1:table-cell>
          <ns1:table-cell>
            <ns2:p>293028</ns2:p>
          </ns1:table-cell>
          <ns1:table-cell>
            <ns2:p>Plano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Plano, TX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75.0</ns2:p>
          </ns1:table-cell>
          <ns1:table-cell>
            <ns2:p>Gilbert</ns2:p>
          </ns1:table-cell>
          <ns1:table-cell>
            <ns2:p>AZ</ns2:p>
          </ns1:table-cell>
          <ns1:table-cell>
            <ns2:p>287285</ns2:p>
          </ns1:table-cell>
          <ns1:table-cell>
            <ns2:p>Travis &amp; Sons Plumbing &amp; Rooter</ns2:p>
          </ns1:table-cell>
          <ns1:table-cell>
            <ns2:p>(480) 568-2309</ns2:p>
          </ns1:table-cell>
          <ns1:table-cell>
            <ns2:p/>
          </ns1:table-cell>
          <ns1:table-cell>
            <ns2:p>travisandsonsplumbing.com</ns2:p>
          </ns1:table-cell>
          <ns1:table-cell>
            <ns2:p>Gilbert, AZ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76.0</ns2:p>
          </ns1:table-cell>
          <ns1:table-cell>
            <ns2:p>Anchorage</ns2:p>
          </ns1:table-cell>
          <ns1:table-cell>
            <ns2:p>AK</ns2:p>
          </ns1:table-cell>
          <ns1:table-cell>
            <ns2:p>287155</ns2:p>
          </ns1:table-cell>
          <ns1:table-cell>
            <ns2:p>Anchorage Plumbing Pro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Anchorage, AK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77.0</ns2:p>
          </ns1:table-cell>
          <ns1:table-cell>
            <ns2:p>Madison</ns2:p>
          </ns1:table-cell>
          <ns1:table-cell>
            <ns2:p>WI</ns2:p>
          </ns1:table-cell>
          <ns1:table-cell>
            <ns2:p>286233</ns2:p>
          </ns1:table-cell>
          <ns1:table-cell>
            <ns2:p>Howe Brothers Plumbing LLC</ns2:p>
          </ns1:table-cell>
          <ns1:table-cell>
            <ns2:p>(608) 257-2884</ns2:p>
          </ns1:table-cell>
          <ns1:table-cell>
            <ns2:p/>
          </ns1:table-cell>
          <ns1:table-cell>
            <ns2:p/>
          </ns1:table-cell>
          <ns1:table-cell>
            <ns2:p>Madison, WI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78.0</ns2:p>
          </ns1:table-cell>
          <ns1:table-cell>
            <ns2:p>Reno</ns2:p>
          </ns1:table-cell>
          <ns1:table-cell>
            <ns2:p>NV</ns2:p>
          </ns1:table-cell>
          <ns1:table-cell>
            <ns2:p>28362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.0</ns2:p>
          </ns1:table-cell>
          <ns1:table-cell>
            <ns2:p>Chandler</ns2:p>
          </ns1:table-cell>
          <ns1:table-cell>
            <ns2:p>AZ</ns2:p>
          </ns1:table-cell>
          <ns1:table-cell>
            <ns2:p>278748</ns2:p>
          </ns1:table-cell>
          <ns1:table-cell>
            <ns2:p>Roy Dossey Plumbing</ns2:p>
          </ns1:table-cell>
          <ns1:table-cell>
            <ns2:p>(480) 963-3302</ns2:p>
          </ns1:table-cell>
          <ns1:table-cell>
            <ns2:p/>
          </ns1:table-cell>
          <ns1:table-cell>
            <ns2:p/>
          </ns1:table-cell>
          <ns1:table-cell>
            <ns2:p>Chandler, AZ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80.0</ns2:p>
          </ns1:table-cell>
          <ns1:table-cell>
            <ns2:p>St. Louis</ns2:p>
          </ns1:table-cell>
          <ns1:table-cell>
            <ns2:p>MO</ns2:p>
          </ns1:table-cell>
          <ns1:table-cell>
            <ns2:p>2781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.0</ns2:p>
          </ns1:table-cell>
          <ns1:table-cell>
            <ns2:p>Chula Vista</ns2:p>
          </ns1:table-cell>
          <ns1:table-cell>
            <ns2:p>CA</ns2:p>
          </ns1:table-cell>
          <ns1:table-cell>
            <ns2:p>275533</ns2:p>
          </ns1:table-cell>
          <ns1:table-cell>
            <ns2:p>Bob the Plumber of Chula Vista</ns2:p>
          </ns1:table-cell>
          <ns1:table-cell>
            <ns2:p>(619) 990-7960</ns2:p>
          </ns1:table-cell>
          <ns1:table-cell>
            <ns2:p/>
          </ns1:table-cell>
          <ns1:table-cell>
            <ns2:p>bobthe.com</ns2:p>
          </ns1:table-cell>
          <ns1:table-cell>
            <ns2:p>Chula Vista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82.0</ns2:p>
          </ns1:table-cell>
          <ns1:table-cell>
            <ns2:p>Fort Wayne</ns2:p>
          </ns1:table-cell>
          <ns1:table-cell>
            <ns2:p>IN</ns2:p>
          </ns1:table-cell>
          <ns1:table-cell>
            <ns2:p>275203</ns2:p>
          </ns1:table-cell>
          <ns1:table-cell>
            <ns2:p>A Hattersley &amp; Sons Inc</ns2:p>
          </ns1:table-cell>
          <ns1:table-cell>
            <ns2:p>(260) 483-6473</ns2:p>
          </ns1:table-cell>
          <ns1:table-cell>
            <ns2:p/>
          </ns1:table-cell>
          <ns1:table-cell>
            <ns2:p>ahattersley.com</ns2:p>
          </ns1:table-cell>
          <ns1:table-cell>
            <ns2:p>Fort Wayne, IN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83.0</ns2:p>
          </ns1:table-cell>
          <ns1:table-cell>
            <ns2:p>Buffalo</ns2:p>
          </ns1:table-cell>
          <ns1:table-cell>
            <ns2:p>NY</ns2:p>
          </ns1:table-cell>
          <ns1:table-cell>
            <ns2:p>2746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4.0</ns2:p>
          </ns1:table-cell>
          <ns1:table-cell>
            <ns2:p>Lubbock</ns2:p>
          </ns1:table-cell>
          <ns1:table-cell>
            <ns2:p>TX</ns2:p>
          </ns1:table-cell>
          <ns1:table-cell>
            <ns2:p>273071</ns2:p>
          </ns1:table-cell>
          <ns1:table-cell>
            <ns2:p>Lubbock Plumbing TX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Lubbock, TX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85.0</ns2:p>
          </ns1:table-cell>
          <ns1:table-cell>
            <ns2:p>Laredo</ns2:p>
          </ns1:table-cell>
          <ns1:table-cell>
            <ns2:p>TX</ns2:p>
          </ns1:table-cell>
          <ns1:table-cell>
            <ns2:p>269515</ns2:p>
          </ns1:table-cell>
          <ns1:table-cell>
            <ns2:p>South Texas Plumbing Contractors</ns2:p>
          </ns1:table-cell>
          <ns1:table-cell>
            <ns2:p>(956) 333-6935</ns2:p>
          </ns1:table-cell>
          <ns1:table-cell>
            <ns2:p/>
          </ns1:table-cell>
          <ns1:table-cell>
            <ns2:p>southtexas.com</ns2:p>
          </ns1:table-cell>
          <ns1:table-cell>
            <ns2:p>Laredo, TX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86.0</ns2:p>
          </ns1:table-cell>
          <ns1:table-cell>
            <ns2:p>Port St. Lucie</ns2:p>
          </ns1:table-cell>
          <ns1:table-cell>
            <ns2:p>FL</ns2:p>
          </ns1:table-cell>
          <ns1:table-cell>
            <ns2:p>268062</ns2:p>
          </ns1:table-cell>
          <ns1:table-cell>
            <ns2:p>First Choice Plus Plumbing &amp; Air</ns2:p>
          </ns1:table-cell>
          <ns1:table-cell>
            <ns2:p>(772) 275-3760</ns2:p>
          </ns1:table-cell>
          <ns1:table-cell>
            <ns2:p/>
          </ns1:table-cell>
          <ns1:table-cell>
            <ns2:p>firstchoice.com</ns2:p>
          </ns1:table-cell>
          <ns1:table-cell>
            <ns2:p>Port St. Lucie, FL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87.0</ns2:p>
          </ns1:table-cell>
          <ns1:table-cell>
            <ns2:p>St. Petersburg</ns2:p>
          </ns1:table-cell>
          <ns1:table-cell>
            <ns2:p>FL</ns2:p>
          </ns1:table-cell>
          <ns1:table-cell>
            <ns2:p>2640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8.0</ns2:p>
          </ns1:table-cell>
          <ns1:table-cell>
            <ns2:p>Toledo</ns2:p>
          </ns1:table-cell>
          <ns1:table-cell>
            <ns2:p>OH</ns2:p>
          </ns1:table-cell>
          <ns1:table-cell>
            <ns2:p>26342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9.0</ns2:p>
          </ns1:table-cell>
          <ns1:table-cell>
            <ns2:p>Glendale</ns2:p>
          </ns1:table-cell>
          <ns1:table-cell>
            <ns2:p>AZ</ns2:p>
          </ns1:table-cell>
          <ns1:table-cell>
            <ns2:p>260572</ns2:p>
          </ns1:table-cell>
          <ns1:table-cell>
            <ns2:p>Glendale Plumbing AZ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Glendale, AZ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90.0</ns2:p>
          </ns1:table-cell>
          <ns1:table-cell>
            <ns2:p>Winston-Salem</ns2:p>
          </ns1:table-cell>
          <ns1:table-cell>
            <ns2:p>NC</ns2:p>
          </ns1:table-cell>
          <ns1:table-cell>
            <ns2:p>257271</ns2:p>
          </ns1:table-cell>
          <ns1:table-cell>
            <ns2:p>Transou's Plumbing &amp; Septic</ns2:p>
          </ns1:table-cell>
          <ns1:table-cell>
            <ns2:p>(336) 276-1263</ns2:p>
          </ns1:table-cell>
          <ns1:table-cell>
            <ns2:p/>
          </ns1:table-cell>
          <ns1:table-cell>
            <ns2:p/>
          </ns1:table-cell>
          <ns1:table-cell>
            <ns2:p>Winston-Salem, NC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91.0</ns2:p>
          </ns1:table-cell>
          <ns1:table-cell>
            <ns2:p>Irving</ns2:p>
          </ns1:table-cell>
          <ns1:table-cell>
            <ns2:p>TX</ns2:p>
          </ns1:table-cell>
          <ns1:table-cell>
            <ns2:p>257076</ns2:p>
          </ns1:table-cell>
          <ns1:table-cell>
            <ns2:p>Reeves Family Plumbing</ns2:p>
          </ns1:table-cell>
          <ns1:table-cell>
            <ns2:p>(972) 247-3763</ns2:p>
          </ns1:table-cell>
          <ns1:table-cell>
            <ns2:p/>
          </ns1:table-cell>
          <ns1:table-cell>
            <ns2:p>reevesfamily.com</ns2:p>
          </ns1:table-cell>
          <ns1:table-cell>
            <ns2:p>Irving, TX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92.0</ns2:p>
          </ns1:table-cell>
          <ns1:table-cell>
            <ns2:p>Chesapeake</ns2:p>
          </ns1:table-cell>
          <ns1:table-cell>
            <ns2:p>VA</ns2:p>
          </ns1:table-cell>
          <ns1:table-cell>
            <ns2:p>2553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93.0</ns2:p>
          </ns1:table-cell>
          <ns1:table-cell>
            <ns2:p>Garland</ns2:p>
          </ns1:table-cell>
          <ns1:table-cell>
            <ns2:p>TX</ns2:p>
          </ns1:table-cell>
          <ns1:table-cell>
            <ns2:p>249625</ns2:p>
          </ns1:table-cell>
          <ns1:table-cell>
            <ns2:p>Family Ties Plumbing &amp; Construction</ns2:p>
          </ns1:table-cell>
          <ns1:table-cell>
            <ns2:p>(972) 824-8833</ns2:p>
          </ns1:table-cell>
          <ns1:table-cell>
            <ns2:p/>
          </ns1:table-cell>
          <ns1:table-cell>
            <ns2:p/>
          </ns1:table-cell>
          <ns1:table-cell>
            <ns2:p>Garland, TX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94.0</ns2:p>
          </ns1:table-cell>
          <ns1:table-cell>
            <ns2:p>Scottsdale</ns2:p>
          </ns1:table-cell>
          <ns1:table-cell>
            <ns2:p>AZ</ns2:p>
          </ns1:table-cell>
          <ns1:table-cell>
            <ns2:p>243006</ns2:p>
          </ns1:table-cell>
          <ns1:table-cell>
            <ns2:p>DC Family Plumbing</ns2:p>
          </ns1:table-cell>
          <ns1:table-cell>
            <ns2:p>(480) 300-4791</ns2:p>
          </ns1:table-cell>
          <ns1:table-cell>
            <ns2:p/>
          </ns1:table-cell>
          <ns1:table-cell>
            <ns2:p>dcfamilyplumbing.com</ns2:p>
          </ns1:table-cell>
          <ns1:table-cell>
            <ns2:p>Scottsdale, AZ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95.0</ns2:p>
          </ns1:table-cell>
          <ns1:table-cell>
            <ns2:p>Boise City</ns2:p>
          </ns1:table-cell>
          <ns1:table-cell>
            <ns2:p>ID</ns2:p>
          </ns1:table-cell>
          <ns1:table-cell>
            <ns2:p>23842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96.0</ns2:p>
          </ns1:table-cell>
          <ns1:table-cell>
            <ns2:p>Richmond</ns2:p>
          </ns1:table-cell>
          <ns1:table-cell>
            <ns2:p>VA</ns2:p>
          </ns1:table-cell>
          <ns1:table-cell>
            <ns2:p>23725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97.0</ns2:p>
          </ns1:table-cell>
          <ns1:table-cell>
            <ns2:p>Frisco</ns2:p>
          </ns1:table-cell>
          <ns1:table-cell>
            <ns2:p>TX</ns2:p>
          </ns1:table-cell>
          <ns1:table-cell>
            <ns2:p>23695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98.0</ns2:p>
          </ns1:table-cell>
          <ns1:table-cell>
            <ns2:p>Cape Coral</ns2:p>
          </ns1:table-cell>
          <ns1:table-cell>
            <ns2:p>FL</ns2:p>
          </ns1:table-cell>
          <ns1:table-cell>
            <ns2:p>23626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99.0</ns2:p>
          </ns1:table-cell>
          <ns1:table-cell>
            <ns2:p>McKinney</ns2:p>
          </ns1:table-cell>
          <ns1:table-cell>
            <ns2:p>TX</ns2:p>
          </ns1:table-cell>
          <ns1:table-cell>
            <ns2:p>2360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00.0</ns2:p>
          </ns1:table-cell>
          <ns1:table-cell>
            <ns2:p>Huntsville</ns2:p>
          </ns1:table-cell>
          <ns1:table-cell>
            <ns2:p>AL</ns2:p>
          </ns1:table-cell>
          <ns1:table-cell>
            <ns2:p>233627</ns2:p>
          </ns1:table-cell>
          <ns1:table-cell>
            <ns2:p>Dean Plumbing Company Inc.</ns2:p>
          </ns1:table-cell>
          <ns1:table-cell>
            <ns2:p>(256) 883-6130</ns2:p>
          </ns1:table-cell>
          <ns1:table-cell>
            <ns2:p/>
          </ns1:table-cell>
          <ns1:table-cell>
            <ns2:p>deanplumbing.com</ns2:p>
          </ns1:table-cell>
          <ns1:table-cell>
            <ns2:p>Huntsville, AL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01.0</ns2:p>
          </ns1:table-cell>
          <ns1:table-cell>
            <ns2:p>Norfolk</ns2:p>
          </ns1:table-cell>
          <ns1:table-cell>
            <ns2:p>VA</ns2:p>
          </ns1:table-cell>
          <ns1:table-cell>
            <ns2:p>231013</ns2:p>
          </ns1:table-cell>
          <ns1:table-cell>
            <ns2:p>Eaton Family Plumbing</ns2:p>
          </ns1:table-cell>
          <ns1:table-cell>
            <ns2:p>(757) 913-9100</ns2:p>
          </ns1:table-cell>
          <ns1:table-cell>
            <ns2:p/>
          </ns1:table-cell>
          <ns1:table-cell>
            <ns2:p>eatonfamily.com</ns2:p>
          </ns1:table-cell>
          <ns1:table-cell>
            <ns2:p>Norfolk, VA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02.0</ns2:p>
          </ns1:table-cell>
          <ns1:table-cell>
            <ns2:p>Hialeah</ns2:p>
          </ns1:table-cell>
          <ns1:table-cell>
            <ns2:p>FL</ns2:p>
          </ns1:table-cell>
          <ns1:table-cell>
            <ns2:p>230968</ns2:p>
          </ns1:table-cell>
          <ns1:table-cell>
            <ns2:p>Hernandez Plumbing Co.</ns2:p>
          </ns1:table-cell>
          <ns1:table-cell>
            <ns2:p>(305) 428-3782</ns2:p>
          </ns1:table-cell>
          <ns1:table-cell>
            <ns2:p/>
          </ns1:table-cell>
          <ns1:table-cell>
            <ns2:p>hernandezplumbing.com</ns2:p>
          </ns1:table-cell>
          <ns1:table-cell>
            <ns2:p>Hialeah, FL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03.0</ns2:p>
          </ns1:table-cell>
          <ns1:table-cell>
            <ns2:p>Spokane</ns2:p>
          </ns1:table-cell>
          <ns1:table-cell>
            <ns2:p>WA</ns2:p>
          </ns1:table-cell>
          <ns1:table-cell>
            <ns2:p>230783</ns2:p>
          </ns1:table-cell>
          <ns1:table-cell>
            <ns2:p>Shaw Plumbing Heating &amp; Air Conditioning</ns2:p>
          </ns1:table-cell>
          <ns1:table-cell>
            <ns2:p>(509) 642-6166</ns2:p>
          </ns1:table-cell>
          <ns1:table-cell>
            <ns2:p/>
          </ns1:table-cell>
          <ns1:table-cell>
            <ns2:p>shawplumbing.com</ns2:p>
          </ns1:table-cell>
          <ns1:table-cell>
            <ns2:p>Spokane, W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04.0</ns2:p>
          </ns1:table-cell>
          <ns1:table-cell>
            <ns2:p>Tacoma</ns2:p>
          </ns1:table-cell>
          <ns1:table-cell>
            <ns2:p>WA</ns2:p>
          </ns1:table-cell>
          <ns1:table-cell>
            <ns2:p>22981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05.0</ns2:p>
          </ns1:table-cell>
          <ns1:table-cell>
            <ns2:p>Santa Clarita</ns2:p>
          </ns1:table-cell>
          <ns1:table-cell>
            <ns2:p>CA</ns2:p>
          </ns1:table-cell>
          <ns1:table-cell>
            <ns2:p>228430</ns2:p>
          </ns1:table-cell>
          <ns1:table-cell>
            <ns2:p>Matthew's Plumbing Inc</ns2:p>
          </ns1:table-cell>
          <ns1:table-cell>
            <ns2:p>(661) 299-6707</ns2:p>
          </ns1:table-cell>
          <ns1:table-cell>
            <ns2:p/>
          </ns1:table-cell>
          <ns1:table-cell>
            <ns2:p/>
          </ns1:table-cell>
          <ns1:table-cell>
            <ns2:p>Santa Clarita, CA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06.0</ns2:p>
          </ns1:table-cell>
          <ns1:table-cell>
            <ns2:p>Fremont</ns2:p>
          </ns1:table-cell>
          <ns1:table-cell>
            <ns2:p>CA</ns2:p>
          </ns1:table-cell>
          <ns1:table-cell>
            <ns2:p>2264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07.0</ns2:p>
          </ns1:table-cell>
          <ns1:table-cell>
            <ns2:p>Baton Rouge</ns2:p>
          </ns1:table-cell>
          <ns1:table-cell>
            <ns2:p>LA</ns2:p>
          </ns1:table-cell>
          <ns1:table-cell>
            <ns2:p>222795</ns2:p>
          </ns1:table-cell>
          <ns1:table-cell>
            <ns2:p>Trinity Plumbing</ns2:p>
          </ns1:table-cell>
          <ns1:table-cell>
            <ns2:p>(225) 501-5554</ns2:p>
          </ns1:table-cell>
          <ns1:table-cell>
            <ns2:p/>
          </ns1:table-cell>
          <ns1:table-cell>
            <ns2:p>trinityplumbingla.com</ns2:p>
          </ns1:table-cell>
          <ns1:table-cell>
            <ns2:p>Baton Rouge, L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08.0</ns2:p>
          </ns1:table-cell>
          <ns1:table-cell>
            <ns2:p>San Bernardino</ns2:p>
          </ns1:table-cell>
          <ns1:table-cell>
            <ns2:p>CA</ns2:p>
          </ns1:table-cell>
          <ns1:table-cell>
            <ns2:p>222044</ns2:p>
          </ns1:table-cell>
          <ns1:table-cell>
            <ns2:p>Thompson Family Plumbing &amp; Drain</ns2:p>
          </ns1:table-cell>
          <ns1:table-cell>
            <ns2:p>(909) 332-2838</ns2:p>
          </ns1:table-cell>
          <ns1:table-cell>
            <ns2:p/>
          </ns1:table-cell>
          <ns1:table-cell>
            <ns2:p>thompsonfamily.com</ns2:p>
          </ns1:table-cell>
          <ns1:table-cell>
            <ns2:p>San Bernardino, CA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09.0</ns2:p>
          </ns1:table-cell>
          <ns1:table-cell>
            <ns2:p>Fontana</ns2:p>
          </ns1:table-cell>
          <ns1:table-cell>
            <ns2:p>CA</ns2:p>
          </ns1:table-cell>
          <ns1:table-cell>
            <ns2:p>221223</ns2:p>
          </ns1:table-cell>
          <ns1:table-cell>
            <ns2:p>Family Ties Air, Plumbing, &amp; Drain</ns2:p>
          </ns1:table-cell>
          <ns1:table-cell>
            <ns2:p>(909) 332-2558</ns2:p>
          </ns1:table-cell>
          <ns1:table-cell>
            <ns2:p/>
          </ns1:table-cell>
          <ns1:table-cell>
            <ns2:p>familytiesair.com</ns2:p>
          </ns1:table-cell>
          <ns1:table-cell>
            <ns2:p>Fontana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10.0</ns2:p>
          </ns1:table-cell>
          <ns1:table-cell>
            <ns2:p>Modesto</ns2:p>
          </ns1:table-cell>
          <ns1:table-cell>
            <ns2:p>CA</ns2:p>
          </ns1:table-cell>
          <ns1:table-cell>
            <ns2:p>219652</ns2:p>
          </ns1:table-cell>
          <ns1:table-cell>
            <ns2:p>Herk's Plumbing</ns2:p>
          </ns1:table-cell>
          <ns1:table-cell>
            <ns2:p>(209) 496-1388</ns2:p>
          </ns1:table-cell>
          <ns1:table-cell>
            <ns2:p/>
          </ns1:table-cell>
          <ns1:table-cell>
            <ns2:p>herksplumbing.com</ns2:p>
          </ns1:table-cell>
          <ns1:table-cell>
            <ns2:p>Modesto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11.0</ns2:p>
          </ns1:table-cell>
          <ns1:table-cell>
            <ns2:p>Salt Lake City</ns2:p>
          </ns1:table-cell>
          <ns1:table-cell>
            <ns2:p>UT</ns2:p>
          </ns1:table-cell>
          <ns1:table-cell>
            <ns2:p>21842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12.0</ns2:p>
          </ns1:table-cell>
          <ns1:table-cell>
            <ns2:p>Moreno Valley</ns2:p>
          </ns1:table-cell>
          <ns1:table-cell>
            <ns2:p>CA</ns2:p>
          </ns1:table-cell>
          <ns1:table-cell>
            <ns2:p>214263</ns2:p>
          </ns1:table-cell>
          <ns1:table-cell>
            <ns2:p>McPherson Bros Plumbing</ns2:p>
          </ns1:table-cell>
          <ns1:table-cell>
            <ns2:p>(833) 627-2767</ns2:p>
          </ns1:table-cell>
          <ns1:table-cell>
            <ns2:p/>
          </ns1:table-cell>
          <ns1:table-cell>
            <ns2:p>mcphersonbros.com</ns2:p>
          </ns1:table-cell>
          <ns1:table-cell>
            <ns2:p>Moreno Valley, CA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13.0</ns2:p>
          </ns1:table-cell>
          <ns1:table-cell>
            <ns2:p>Worcester</ns2:p>
          </ns1:table-cell>
          <ns1:table-cell>
            <ns2:p>MA</ns2:p>
          </ns1:table-cell>
          <ns1:table-cell>
            <ns2:p>21386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14.0</ns2:p>
          </ns1:table-cell>
          <ns1:table-cell>
            <ns2:p>Sioux Falls</ns2:p>
          </ns1:table-cell>
          <ns1:table-cell>
            <ns2:p>SD</ns2:p>
          </ns1:table-cell>
          <ns1:table-cell>
            <ns2:p>213748</ns2:p>
          </ns1:table-cell>
          <ns1:table-cell>
            <ns2:p>Sioux Falls Plumbing LLC.</ns2:p>
          </ns1:table-cell>
          <ns1:table-cell>
            <ns2:p>(605) 800-6537</ns2:p>
          </ns1:table-cell>
          <ns1:table-cell>
            <ns2:p/>
          </ns1:table-cell>
          <ns1:table-cell>
            <ns2:p>http://siouxfalls-plumbing.com/</ns2:p>
          </ns1:table-cell>
          <ns1:table-cell>
            <ns2:p>1508 E 32nd St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15.0</ns2:p>
          </ns1:table-cell>
          <ns1:table-cell>
            <ns2:p>Yonkers</ns2:p>
          </ns1:table-cell>
          <ns1:table-cell>
            <ns2:p>NY</ns2:p>
          </ns1:table-cell>
          <ns1:table-cell>
            <ns2:p>212603</ns2:p>
          </ns1:table-cell>
          <ns1:table-cell>
            <ns2:p>JP Plumbing and Sewer</ns2:p>
          </ns1:table-cell>
          <ns1:table-cell>
            <ns2:p>(914) 527-2773</ns2:p>
          </ns1:table-cell>
          <ns1:table-cell>
            <ns2:p/>
          </ns1:table-cell>
          <ns1:table-cell>
            <ns2:p>jpplumbingandsewer.com</ns2:p>
          </ns1:table-cell>
          <ns1:table-cell>
            <ns2:p>Yonkers, NY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16.0</ns2:p>
          </ns1:table-cell>
          <ns1:table-cell>
            <ns2:p>Des Moines</ns2:p>
          </ns1:table-cell>
          <ns1:table-cell>
            <ns2:p>IA</ns2:p>
          </ns1:table-cell>
          <ns1:table-cell>
            <ns2:p>212086</ns2:p>
          </ns1:table-cell>
          <ns1:table-cell>
            <ns2:p>Schaal Plumbing, Heating and Cooling</ns2:p>
          </ns1:table-cell>
          <ns1:table-cell>
            <ns2:p>(515) 207-2272</ns2:p>
          </ns1:table-cell>
          <ns1:table-cell>
            <ns2:p/>
          </ns1:table-cell>
          <ns1:table-cell>
            <ns2:p/>
          </ns1:table-cell>
          <ns1:table-cell>
            <ns2:p>Des Moines, I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17.0</ns2:p>
          </ns1:table-cell>
          <ns1:table-cell>
            <ns2:p>Grand Prairie</ns2:p>
          </ns1:table-cell>
          <ns1:table-cell>
            <ns2:p>TX</ns2:p>
          </ns1:table-cell>
          <ns1:table-cell>
            <ns2:p>209434</ns2:p>
          </ns1:table-cell>
          <ns1:table-cell>
            <ns2:p>Grand Prairie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Grand Prairie, TX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18.0</ns2:p>
          </ns1:table-cell>
          <ns1:table-cell>
            <ns2:p>Fayetteville</ns2:p>
          </ns1:table-cell>
          <ns1:table-cell>
            <ns2:p>NC</ns2:p>
          </ns1:table-cell>
          <ns1:table-cell>
            <ns2:p>209120</ns2:p>
          </ns1:table-cell>
          <ns1:table-cell>
            <ns2:p>Woods Plumbing Service LLC</ns2:p>
          </ns1:table-cell>
          <ns1:table-cell>
            <ns2:p>(910) 920-3908</ns2:p>
          </ns1:table-cell>
          <ns1:table-cell>
            <ns2:p/>
          </ns1:table-cell>
          <ns1:table-cell>
            <ns2:p>woodsplumbing.com</ns2:p>
          </ns1:table-cell>
          <ns1:table-cell>
            <ns2:p>Fayetteville, NC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19.0</ns2:p>
          </ns1:table-cell>
          <ns1:table-cell>
            <ns2:p>Augusta</ns2:p>
          </ns1:table-cell>
          <ns1:table-cell>
            <ns2:p>GA</ns2:p>
          </ns1:table-cell>
          <ns1:table-cell>
            <ns2:p>20655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0.0</ns2:p>
          </ns1:table-cell>
          <ns1:table-cell>
            <ns2:p>Little Rock</ns2:p>
          </ns1:table-cell>
          <ns1:table-cell>
            <ns2:p>AR</ns2:p>
          </ns1:table-cell>
          <ns1:table-cell>
            <ns2:p>2064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1.0</ns2:p>
          </ns1:table-cell>
          <ns1:table-cell>
            <ns2:p>Rochester</ns2:p>
          </ns1:table-cell>
          <ns1:table-cell>
            <ns2:p>NY</ns2:p>
          </ns1:table-cell>
          <ns1:table-cell>
            <ns2:p>2061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2.0</ns2:p>
          </ns1:table-cell>
          <ns1:table-cell>
            <ns2:p>Amarillo</ns2:p>
          </ns1:table-cell>
          <ns1:table-cell>
            <ns2:p>TX</ns2:p>
          </ns1:table-cell>
          <ns1:table-cell>
            <ns2:p>2051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3.0</ns2:p>
          </ns1:table-cell>
          <ns1:table-cell>
            <ns2:p>Tallahassee</ns2:p>
          </ns1:table-cell>
          <ns1:table-cell>
            <ns2:p>FL</ns2:p>
          </ns1:table-cell>
          <ns1:table-cell>
            <ns2:p>204902</ns2:p>
          </ns1:table-cell>
          <ns1:table-cell>
            <ns2:p>White's Plumbing Inc</ns2:p>
          </ns1:table-cell>
          <ns1:table-cell>
            <ns2:p>(850) 576-3510</ns2:p>
          </ns1:table-cell>
          <ns1:table-cell>
            <ns2:p/>
          </ns1:table-cell>
          <ns1:table-cell>
            <ns2:p>whitesplumbing.com</ns2:p>
          </ns1:table-cell>
          <ns1:table-cell>
            <ns2:p>Tallahassee, FL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24.0</ns2:p>
          </ns1:table-cell>
          <ns1:table-cell>
            <ns2:p>Overland Park</ns2:p>
          </ns1:table-cell>
          <ns1:table-cell>
            <ns2:p>KS</ns2:p>
          </ns1:table-cell>
          <ns1:table-cell>
            <ns2:p>20367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5.0</ns2:p>
          </ns1:table-cell>
          <ns1:table-cell>
            <ns2:p>Columbus</ns2:p>
          </ns1:table-cell>
          <ns1:table-cell>
            <ns2:p>GA</ns2:p>
          </ns1:table-cell>
          <ns1:table-cell>
            <ns2:p>2021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6.0</ns2:p>
          </ns1:table-cell>
          <ns1:table-cell>
            <ns2:p>Knoxville</ns2:p>
          </ns1:table-cell>
          <ns1:table-cell>
            <ns2:p>TN</ns2:p>
          </ns1:table-cell>
          <ns1:table-cell>
            <ns2:p>20202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7.0</ns2:p>
          </ns1:table-cell>
          <ns1:table-cell>
            <ns2:p>Grand Rapids</ns2:p>
          </ns1:table-cell>
          <ns1:table-cell>
            <ns2:p>MI</ns2:p>
          </ns1:table-cell>
          <ns1:table-cell>
            <ns2:p>2011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8.0</ns2:p>
          </ns1:table-cell>
          <ns1:table-cell>
            <ns2:p>Peoria</ns2:p>
          </ns1:table-cell>
          <ns1:table-cell>
            <ns2:p>AZ</ns2:p>
          </ns1:table-cell>
          <ns1:table-cell>
            <ns2:p>2008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29.0</ns2:p>
          </ns1:table-cell>
          <ns1:table-cell>
            <ns2:p>Mobile</ns2:p>
          </ns1:table-cell>
          <ns1:table-cell>
            <ns2:p>AL</ns2:p>
          </ns1:table-cell>
          <ns1:table-cell>
            <ns2:p>20082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30.0</ns2:p>
          </ns1:table-cell>
          <ns1:table-cell>
            <ns2:p>Vancouver</ns2:p>
          </ns1:table-cell>
          <ns1:table-cell>
            <ns2:p>WA</ns2:p>
          </ns1:table-cell>
          <ns1:table-cell>
            <ns2:p>19969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31.0</ns2:p>
          </ns1:table-cell>
          <ns1:table-cell>
            <ns2:p>Oxnard</ns2:p>
          </ns1:table-cell>
          <ns1:table-cell>
            <ns2:p>CA</ns2:p>
          </ns1:table-cell>
          <ns1:table-cell>
            <ns2:p>199651</ns2:p>
          </ns1:table-cell>
          <ns1:table-cell>
            <ns2:p>Salinas and Sons Rooter</ns2:p>
          </ns1:table-cell>
          <ns1:table-cell>
            <ns2:p>(805) 486-7030</ns2:p>
          </ns1:table-cell>
          <ns1:table-cell>
            <ns2:p/>
          </ns1:table-cell>
          <ns1:table-cell>
            <ns2:p/>
          </ns1:table-cell>
          <ns1:table-cell>
            <ns2:p>Oxnard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32.0</ns2:p>
          </ns1:table-cell>
          <ns1:table-cell>
            <ns2:p>Birmingham</ns2:p>
          </ns1:table-cell>
          <ns1:table-cell>
            <ns2:p>AL</ns2:p>
          </ns1:table-cell>
          <ns1:table-cell>
            <ns2:p>19589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33.0</ns2:p>
          </ns1:table-cell>
          <ns1:table-cell>
            <ns2:p>Providence</ns2:p>
          </ns1:table-cell>
          <ns1:table-cell>
            <ns2:p>RI</ns2:p>
          </ns1:table-cell>
          <ns1:table-cell>
            <ns2:p>1953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34.0</ns2:p>
          </ns1:table-cell>
          <ns1:table-cell>
            <ns2:p>Montgomery</ns2:p>
          </ns1:table-cell>
          <ns1:table-cell>
            <ns2:p>AL</ns2:p>
          </ns1:table-cell>
          <ns1:table-cell>
            <ns2:p>1953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35.0</ns2:p>
          </ns1:table-cell>
          <ns1:table-cell>
            <ns2:p>Chattanooga</ns2:p>
          </ns1:table-cell>
          <ns1:table-cell>
            <ns2:p>TN</ns2:p>
          </ns1:table-cell>
          <ns1:table-cell>
            <ns2:p>1941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36.0</ns2:p>
          </ns1:table-cell>
          <ns1:table-cell>
            <ns2:p>Brownsville</ns2:p>
          </ns1:table-cell>
          <ns1:table-cell>
            <ns2:p>TX</ns2:p>
          </ns1:table-cell>
          <ns1:table-cell>
            <ns2:p>192957</ns2:p>
          </ns1:table-cell>
          <ns1:table-cell>
            <ns2:p>Robert's Repair Plumbing</ns2:p>
          </ns1:table-cell>
          <ns1:table-cell>
            <ns2:p>(956) 203-9993</ns2:p>
          </ns1:table-cell>
          <ns1:table-cell>
            <ns2:p/>
          </ns1:table-cell>
          <ns1:table-cell>
            <ns2:p>robertsrepair.com</ns2:p>
          </ns1:table-cell>
          <ns1:table-cell>
            <ns2:p>Brownsville, TX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37.0</ns2:p>
          </ns1:table-cell>
          <ns1:table-cell>
            <ns2:p>Huntington Beach</ns2:p>
          </ns1:table-cell>
          <ns1:table-cell>
            <ns2:p>CA</ns2:p>
          </ns1:table-cell>
          <ns1:table-cell>
            <ns2:p>191451</ns2:p>
          </ns1:table-cell>
          <ns1:table-cell>
            <ns2:p>DeVinney Plumbing, Inc.</ns2:p>
          </ns1:table-cell>
          <ns1:table-cell>
            <ns2:p>(714) 375-0126</ns2:p>
          </ns1:table-cell>
          <ns1:table-cell>
            <ns2:p/>
          </ns1:table-cell>
          <ns1:table-cell>
            <ns2:p>devinneyplumbing.com</ns2:p>
          </ns1:table-cell>
          <ns1:table-cell>
            <ns2:p>Huntington Beach, CA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38.0</ns2:p>
          </ns1:table-cell>
          <ns1:table-cell>
            <ns2:p>Tempe</ns2:p>
          </ns1:table-cell>
          <ns1:table-cell>
            <ns2:p>AZ</ns2:p>
          </ns1:table-cell>
          <ns1:table-cell>
            <ns2:p>1905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39.0</ns2:p>
          </ns1:table-cell>
          <ns1:table-cell>
            <ns2:p>Akron</ns2:p>
          </ns1:table-cell>
          <ns1:table-cell>
            <ns2:p>OH</ns2:p>
          </ns1:table-cell>
          <ns1:table-cell>
            <ns2:p>189691</ns2:p>
          </ns1:table-cell>
          <ns1:table-cell>
            <ns2:p>J&amp;J Plumbing, Heating, Cooling, &amp; Electric</ns2:p>
          </ns1:table-cell>
          <ns1:table-cell>
            <ns2:p>(330) 967-0147</ns2:p>
          </ns1:table-cell>
          <ns1:table-cell>
            <ns2:p/>
          </ns1:table-cell>
          <ns1:table-cell>
            <ns2:p>jandjplumbing.com</ns2:p>
          </ns1:table-cell>
          <ns1:table-cell>
            <ns2:p>Akron, OH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40.0</ns2:p>
          </ns1:table-cell>
          <ns1:table-cell>
            <ns2:p>Clarksville</ns2:p>
          </ns1:table-cell>
          <ns1:table-cell>
            <ns2:p>TN</ns2:p>
          </ns1:table-cell>
          <ns1:table-cell>
            <ns2:p>18882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41.0</ns2:p>
          </ns1:table-cell>
          <ns1:table-cell>
            <ns2:p>Fort Lauderdale</ns2:p>
          </ns1:table-cell>
          <ns1:table-cell>
            <ns2:p>FL</ns2:p>
          </ns1:table-cell>
          <ns1:table-cell>
            <ns2:p>18867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42.0</ns2:p>
          </ns1:table-cell>
          <ns1:table-cell>
            <ns2:p>Glendale</ns2:p>
          </ns1:table-cell>
          <ns1:table-cell>
            <ns2:p>CA</ns2:p>
          </ns1:table-cell>
          <ns1:table-cell>
            <ns2:p>187160</ns2:p>
          </ns1:table-cell>
          <ns1:table-cell>
            <ns2:p>Morrissey Family Plumbing</ns2:p>
          </ns1:table-cell>
          <ns1:table-cell>
            <ns2:p>(818) 915-6630</ns2:p>
          </ns1:table-cell>
          <ns1:table-cell>
            <ns2:p/>
          </ns1:table-cell>
          <ns1:table-cell>
            <ns2:p>morrisseyfamily.com</ns2:p>
          </ns1:table-cell>
          <ns1:table-cell>
            <ns2:p>Glendale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43.0</ns2:p>
          </ns1:table-cell>
          <ns1:table-cell>
            <ns2:p>Ontario</ns2:p>
          </ns1:table-cell>
          <ns1:table-cell>
            <ns2:p>CA</ns2:p>
          </ns1:table-cell>
          <ns1:table-cell>
            <ns2:p>1870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44.0</ns2:p>
          </ns1:table-cell>
          <ns1:table-cell>
            <ns2:p>Elk Grove</ns2:p>
          </ns1:table-cell>
          <ns1:table-cell>
            <ns2:p>CA</ns2:p>
          </ns1:table-cell>
          <ns1:table-cell>
            <ns2:p>1850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45.0</ns2:p>
          </ns1:table-cell>
          <ns1:table-cell>
            <ns2:p>Cary</ns2:p>
          </ns1:table-cell>
          <ns1:table-cell>
            <ns2:p>NC</ns2:p>
          </ns1:table-cell>
          <ns1:table-cell>
            <ns2:p>18358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46.0</ns2:p>
          </ns1:table-cell>
          <ns1:table-cell>
            <ns2:p>Newport News</ns2:p>
          </ns1:table-cell>
          <ns1:table-cell>
            <ns2:p>VA</ns2:p>
          </ns1:table-cell>
          <ns1:table-cell>
            <ns2:p>183230</ns2:p>
          </ns1:table-cell>
          <ns1:table-cell>
            <ns2:p>Blair's Plumbing Repair &amp; Drains</ns2:p>
          </ns1:table-cell>
          <ns1:table-cell>
            <ns2:p>(757) 719-1236</ns2:p>
          </ns1:table-cell>
          <ns1:table-cell>
            <ns2:p/>
          </ns1:table-cell>
          <ns1:table-cell>
            <ns2:p>blairsplumbingrepair.com</ns2:p>
          </ns1:table-cell>
          <ns1:table-cell>
            <ns2:p>Newport News, VA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47.0</ns2:p>
          </ns1:table-cell>
          <ns1:table-cell>
            <ns2:p>Salem</ns2:p>
          </ns1:table-cell>
          <ns1:table-cell>
            <ns2:p>OR</ns2:p>
          </ns1:table-cell>
          <ns1:table-cell>
            <ns2:p>18177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48.0</ns2:p>
          </ns1:table-cell>
          <ns1:table-cell>
            <ns2:p>Aurora</ns2:p>
          </ns1:table-cell>
          <ns1:table-cell>
            <ns2:p>IL</ns2:p>
          </ns1:table-cell>
          <ns1:table-cell>
            <ns2:p>181505</ns2:p>
          </ns1:table-cell>
          <ns1:table-cell>
            <ns2:p>Michels Plumbing Inc</ns2:p>
          </ns1:table-cell>
          <ns1:table-cell>
            <ns2:p>(630) 801-9700</ns2:p>
          </ns1:table-cell>
          <ns1:table-cell>
            <ns2:p/>
          </ns1:table-cell>
          <ns1:table-cell>
            <ns2:p>michelsplumbing.com</ns2:p>
          </ns1:table-cell>
          <ns1:table-cell>
            <ns2:p>Aurora, IL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49.0</ns2:p>
          </ns1:table-cell>
          <ns1:table-cell>
            <ns2:p>Santa Rosa</ns2:p>
          </ns1:table-cell>
          <ns1:table-cell>
            <ns2:p>CA</ns2:p>
          </ns1:table-cell>
          <ns1:table-cell>
            <ns2:p>17943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50.0</ns2:p>
          </ns1:table-cell>
          <ns1:table-cell>
            <ns2:p>Eugene</ns2:p>
          </ns1:table-cell>
          <ns1:table-cell>
            <ns2:p>OR</ns2:p>
          </ns1:table-cell>
          <ns1:table-cell>
            <ns2:p>17861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51.0</ns2:p>
          </ns1:table-cell>
          <ns1:table-cell>
            <ns2:p>Rancho Cucamonga</ns2:p>
          </ns1:table-cell>
          <ns1:table-cell>
            <ns2:p>CA</ns2:p>
          </ns1:table-cell>
          <ns1:table-cell>
            <ns2:p>17785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52.0</ns2:p>
          </ns1:table-cell>
          <ns1:table-cell>
            <ns2:p>Pembroke Pines</ns2:p>
          </ns1:table-cell>
          <ns1:table-cell>
            <ns2:p>FL</ns2:p>
          </ns1:table-cell>
          <ns1:table-cell>
            <ns2:p>1767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53.0</ns2:p>
          </ns1:table-cell>
          <ns1:table-cell>
            <ns2:p>Shreveport</ns2:p>
          </ns1:table-cell>
          <ns1:table-cell>
            <ns2:p>LA</ns2:p>
          </ns1:table-cell>
          <ns1:table-cell>
            <ns2:p>175902</ns2:p>
          </ns1:table-cell>
          <ns1:table-cell>
            <ns2:p>Bobby L. Greene Plumbing</ns2:p>
          </ns1:table-cell>
          <ns1:table-cell>
            <ns2:p>(318) 929-6574</ns2:p>
          </ns1:table-cell>
          <ns1:table-cell>
            <ns2:p/>
          </ns1:table-cell>
          <ns1:table-cell>
            <ns2:p/>
          </ns1:table-cell>
          <ns1:table-cell>
            <ns2:p>Shreveport, LA</ns2:p>
          </ns1:table-cell>
          <ns1:table-cell>
            <ns2:p>4.5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54.0</ns2:p>
          </ns1:table-cell>
          <ns1:table-cell>
            <ns2:p>Surprise</ns2:p>
          </ns1:table-cell>
          <ns1:table-cell>
            <ns2:p>AZ</ns2:p>
          </ns1:table-cell>
          <ns1:table-cell>
            <ns2:p>17530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55.0</ns2:p>
          </ns1:table-cell>
          <ns1:table-cell>
            <ns2:p>Fort Collins</ns2:p>
          </ns1:table-cell>
          <ns1:table-cell>
            <ns2:p>CO</ns2:p>
          </ns1:table-cell>
          <ns1:table-cell>
            <ns2:p>1715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56.0</ns2:p>
          </ns1:table-cell>
          <ns1:table-cell>
            <ns2:p>Murfreesboro</ns2:p>
          </ns1:table-cell>
          <ns1:table-cell>
            <ns2:p>TN</ns2:p>
          </ns1:table-cell>
          <ns1:table-cell>
            <ns2:p>17117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57.0</ns2:p>
          </ns1:table-cell>
          <ns1:table-cell>
            <ns2:p>Oceanside</ns2:p>
          </ns1:table-cell>
          <ns1:table-cell>
            <ns2:p>CA</ns2:p>
          </ns1:table-cell>
          <ns1:table-cell>
            <ns2:p>170483</ns2:p>
          </ns1:table-cell>
          <ns1:table-cell>
            <ns2:p>Parmley Plumbing</ns2:p>
          </ns1:table-cell>
          <ns1:table-cell>
            <ns2:p>(858) 229-3341</ns2:p>
          </ns1:table-cell>
          <ns1:table-cell>
            <ns2:p/>
          </ns1:table-cell>
          <ns1:table-cell>
            <ns2:p>parmleyplumbing.com</ns2:p>
          </ns1:table-cell>
          <ns1:table-cell>
            <ns2:p>Oceanside, C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158.0</ns2:p>
          </ns1:table-cell>
          <ns1:table-cell>
            <ns2:p>Garden Grove</ns2:p>
          </ns1:table-cell>
          <ns1:table-cell>
            <ns2:p>CA</ns2:p>
          </ns1:table-cell>
          <ns1:table-cell>
            <ns2:p>17045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59.0</ns2:p>
          </ns1:table-cell>
          <ns1:table-cell>
            <ns2:p>Lancaster</ns2:p>
          </ns1:table-cell>
          <ns1:table-cell>
            <ns2:p>CA</ns2:p>
          </ns1:table-cell>
          <ns1:table-cell>
            <ns2:p>1700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0.0</ns2:p>
          </ns1:table-cell>
          <ns1:table-cell>
            <ns2:p>Springfield</ns2:p>
          </ns1:table-cell>
          <ns1:table-cell>
            <ns2:p>MO</ns2:p>
          </ns1:table-cell>
          <ns1:table-cell>
            <ns2:p>169847</ns2:p>
          </ns1:table-cell>
          <ns1:table-cell>
            <ns2:p>Junior's Plumbing LLC</ns2:p>
          </ns1:table-cell>
          <ns1:table-cell>
            <ns2:p>(417) 655-0536</ns2:p>
          </ns1:table-cell>
          <ns1:table-cell>
            <ns2:p/>
          </ns1:table-cell>
          <ns1:table-cell>
            <ns2:p>https://juniorsplumbingmo.com/</ns2:p>
          </ns1:table-cell>
          <ns1:table-cell>
            <ns2:p>7325 E Division St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1.0</ns2:p>
          </ns1:table-cell>
          <ns1:table-cell>
            <ns2:p>Denton</ns2:p>
          </ns1:table-cell>
          <ns1:table-cell>
            <ns2:p>TX</ns2:p>
          </ns1:table-cell>
          <ns1:table-cell>
            <ns2:p>16943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2.0</ns2:p>
          </ns1:table-cell>
          <ns1:table-cell>
            <ns2:p>Roseville</ns2:p>
          </ns1:table-cell>
          <ns1:table-cell>
            <ns2:p>CA</ns2:p>
          </ns1:table-cell>
          <ns1:table-cell>
            <ns2:p>16730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3.0</ns2:p>
          </ns1:table-cell>
          <ns1:table-cell>
            <ns2:p>Killeen</ns2:p>
          </ns1:table-cell>
          <ns1:table-cell>
            <ns2:p>TX</ns2:p>
          </ns1:table-cell>
          <ns1:table-cell>
            <ns2:p>1618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4.0</ns2:p>
          </ns1:table-cell>
          <ns1:table-cell>
            <ns2:p>Palmdale</ns2:p>
          </ns1:table-cell>
          <ns1:table-cell>
            <ns2:p>CA</ns2:p>
          </ns1:table-cell>
          <ns1:table-cell>
            <ns2:p>16184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5.0</ns2:p>
          </ns1:table-cell>
          <ns1:table-cell>
            <ns2:p>Paterson</ns2:p>
          </ns1:table-cell>
          <ns1:table-cell>
            <ns2:p>NJ</ns2:p>
          </ns1:table-cell>
          <ns1:table-cell>
            <ns2:p>16179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6.0</ns2:p>
          </ns1:table-cell>
          <ns1:table-cell>
            <ns2:p>Corona</ns2:p>
          </ns1:table-cell>
          <ns1:table-cell>
            <ns2:p>CA</ns2:p>
          </ns1:table-cell>
          <ns1:table-cell>
            <ns2:p>1617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7.0</ns2:p>
          </ns1:table-cell>
          <ns1:table-cell>
            <ns2:p>Alexandria</ns2:p>
          </ns1:table-cell>
          <ns1:table-cell>
            <ns2:p>VA</ns2:p>
          </ns1:table-cell>
          <ns1:table-cell>
            <ns2:p>16066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8.0</ns2:p>
          </ns1:table-cell>
          <ns1:table-cell>
            <ns2:p>Charleston</ns2:p>
          </ns1:table-cell>
          <ns1:table-cell>
            <ns2:p>SC</ns2:p>
          </ns1:table-cell>
          <ns1:table-cell>
            <ns2:p>159423</ns2:p>
          </ns1:table-cell>
          <ns1:table-cell>
            <ns2:p>Plumb Easy</ns2:p>
          </ns1:table-cell>
          <ns1:table-cell>
            <ns2:p>(843) 270-3983</ns2:p>
          </ns1:table-cell>
          <ns1:table-cell>
            <ns2:p/>
          </ns1:table-cell>
          <ns1:table-cell>
            <ns2:p>https://plumbeasy.com/</ns2:p>
          </ns1:table-cell>
          <ns1:table-cell>
            <ns2:p>1212 Wappoo Rd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69.0</ns2:p>
          </ns1:table-cell>
          <ns1:table-cell>
            <ns2:p>Salinas</ns2:p>
          </ns1:table-cell>
          <ns1:table-cell>
            <ns2:p>CA</ns2:p>
          </ns1:table-cell>
          <ns1:table-cell>
            <ns2:p>1591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0.0</ns2:p>
          </ns1:table-cell>
          <ns1:table-cell>
            <ns2:p>Kansas City</ns2:p>
          </ns1:table-cell>
          <ns1:table-cell>
            <ns2:p>KS</ns2:p>
          </ns1:table-cell>
          <ns1:table-cell>
            <ns2:p>15780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1.0</ns2:p>
          </ns1:table-cell>
          <ns1:table-cell>
            <ns2:p>Macon-Bibb County</ns2:p>
          </ns1:table-cell>
          <ns1:table-cell>
            <ns2:p>GA</ns2:p>
          </ns1:table-cell>
          <ns1:table-cell>
            <ns2:p>15755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2.0</ns2:p>
          </ns1:table-cell>
          <ns1:table-cell>
            <ns2:p>Hayward</ns2:p>
          </ns1:table-cell>
          <ns1:table-cell>
            <ns2:p>CA</ns2:p>
          </ns1:table-cell>
          <ns1:table-cell>
            <ns2:p>1571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3.0</ns2:p>
          </ns1:table-cell>
          <ns1:table-cell>
            <ns2:p>Hollywood</ns2:p>
          </ns1:table-cell>
          <ns1:table-cell>
            <ns2:p>FL</ns2:p>
          </ns1:table-cell>
          <ns1:table-cell>
            <ns2:p>1570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4.0</ns2:p>
          </ns1:table-cell>
          <ns1:table-cell>
            <ns2:p>Lakewood</ns2:p>
          </ns1:table-cell>
          <ns1:table-cell>
            <ns2:p>CO</ns2:p>
          </ns1:table-cell>
          <ns1:table-cell>
            <ns2:p>1569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5.0</ns2:p>
          </ns1:table-cell>
          <ns1:table-cell>
            <ns2:p>Sunnyvale</ns2:p>
          </ns1:table-cell>
          <ns1:table-cell>
            <ns2:p>CA</ns2:p>
          </ns1:table-cell>
          <ns1:table-cell>
            <ns2:p>15657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6.0</ns2:p>
          </ns1:table-cell>
          <ns1:table-cell>
            <ns2:p>Springfield</ns2:p>
          </ns1:table-cell>
          <ns1:table-cell>
            <ns2:p>MA</ns2:p>
          </ns1:table-cell>
          <ns1:table-cell>
            <ns2:p>15470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7.0</ns2:p>
          </ns1:table-cell>
          <ns1:table-cell>
            <ns2:p>Bellevue</ns2:p>
          </ns1:table-cell>
          <ns1:table-cell>
            <ns2:p>WA</ns2:p>
          </ns1:table-cell>
          <ns1:table-cell>
            <ns2:p>15419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8.0</ns2:p>
          </ns1:table-cell>
          <ns1:table-cell>
            <ns2:p>Naperville</ns2:p>
          </ns1:table-cell>
          <ns1:table-cell>
            <ns2:p>IL</ns2:p>
          </ns1:table-cell>
          <ns1:table-cell>
            <ns2:p>1531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79.0</ns2:p>
          </ns1:table-cell>
          <ns1:table-cell>
            <ns2:p>Bridgeport</ns2:p>
          </ns1:table-cell>
          <ns1:table-cell>
            <ns2:p>CT</ns2:p>
          </ns1:table-cell>
          <ns1:table-cell>
            <ns2:p>15227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0.0</ns2:p>
          </ns1:table-cell>
          <ns1:table-cell>
            <ns2:p>Joliet</ns2:p>
          </ns1:table-cell>
          <ns1:table-cell>
            <ns2:p>IL</ns2:p>
          </ns1:table-cell>
          <ns1:table-cell>
            <ns2:p>1522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1.0</ns2:p>
          </ns1:table-cell>
          <ns1:table-cell>
            <ns2:p>Mesquite</ns2:p>
          </ns1:table-cell>
          <ns1:table-cell>
            <ns2:p>TX</ns2:p>
          </ns1:table-cell>
          <ns1:table-cell>
            <ns2:p>15069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2.0</ns2:p>
          </ns1:table-cell>
          <ns1:table-cell>
            <ns2:p>McAllen</ns2:p>
          </ns1:table-cell>
          <ns1:table-cell>
            <ns2:p>TX</ns2:p>
          </ns1:table-cell>
          <ns1:table-cell>
            <ns2:p>15064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3.0</ns2:p>
          </ns1:table-cell>
          <ns1:table-cell>
            <ns2:p>Olathe</ns2:p>
          </ns1:table-cell>
          <ns1:table-cell>
            <ns2:p>KS</ns2:p>
          </ns1:table-cell>
          <ns1:table-cell>
            <ns2:p>15002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4.0</ns2:p>
          </ns1:table-cell>
          <ns1:table-cell>
            <ns2:p>Savannah</ns2:p>
          </ns1:table-cell>
          <ns1:table-cell>
            <ns2:p>GA</ns2:p>
          </ns1:table-cell>
          <ns1:table-cell>
            <ns2:p>14944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5.0</ns2:p>
          </ns1:table-cell>
          <ns1:table-cell>
            <ns2:p>Gainesville</ns2:p>
          </ns1:table-cell>
          <ns1:table-cell>
            <ns2:p>FL</ns2:p>
          </ns1:table-cell>
          <ns1:table-cell>
            <ns2:p>1486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6.0</ns2:p>
          </ns1:table-cell>
          <ns1:table-cell>
            <ns2:p>Pasadena</ns2:p>
          </ns1:table-cell>
          <ns1:table-cell>
            <ns2:p>TX</ns2:p>
          </ns1:table-cell>
          <ns1:table-cell>
            <ns2:p>14853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7.0</ns2:p>
          </ns1:table-cell>
          <ns1:table-cell>
            <ns2:p>Palm Bay</ns2:p>
          </ns1:table-cell>
          <ns1:table-cell>
            <ns2:p>FL</ns2:p>
          </ns1:table-cell>
          <ns1:table-cell>
            <ns2:p>1480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8.0</ns2:p>
          </ns1:table-cell>
          <ns1:table-cell>
            <ns2:p>Pomona</ns2:p>
          </ns1:table-cell>
          <ns1:table-cell>
            <ns2:p>CA</ns2:p>
          </ns1:table-cell>
          <ns1:table-cell>
            <ns2:p>1478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89.0</ns2:p>
          </ns1:table-cell>
          <ns1:table-cell>
            <ns2:p>Waco</ns2:p>
          </ns1:table-cell>
          <ns1:table-cell>
            <ns2:p>TX</ns2:p>
          </ns1:table-cell>
          <ns1:table-cell>
            <ns2:p>1477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0.0</ns2:p>
          </ns1:table-cell>
          <ns1:table-cell>
            <ns2:p>Thornton</ns2:p>
          </ns1:table-cell>
          <ns1:table-cell>
            <ns2:p>CO</ns2:p>
          </ns1:table-cell>
          <ns1:table-cell>
            <ns2:p>14776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1.0</ns2:p>
          </ns1:table-cell>
          <ns1:table-cell>
            <ns2:p>Midland</ns2:p>
          </ns1:table-cell>
          <ns1:table-cell>
            <ns2:p>TX</ns2:p>
          </ns1:table-cell>
          <ns1:table-cell>
            <ns2:p>14761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2.0</ns2:p>
          </ns1:table-cell>
          <ns1:table-cell>
            <ns2:p>Rockford</ns2:p>
          </ns1:table-cell>
          <ns1:table-cell>
            <ns2:p>IL</ns2:p>
          </ns1:table-cell>
          <ns1:table-cell>
            <ns2:p>1473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3.0</ns2:p>
          </ns1:table-cell>
          <ns1:table-cell>
            <ns2:p>Columbia</ns2:p>
          </ns1:table-cell>
          <ns1:table-cell>
            <ns2:p>SC</ns2:p>
          </ns1:table-cell>
          <ns1:table-cell>
            <ns2:p>147035</ns2:p>
          </ns1:table-cell>
          <ns1:table-cell>
            <ns2:p>Franklin Plumbing &amp; Drain Cleaning</ns2:p>
          </ns1:table-cell>
          <ns1:table-cell>
            <ns2:p>(803) 515-7753</ns2:p>
          </ns1:table-cell>
          <ns1:table-cell>
            <ns2:p/>
          </ns1:table-cell>
          <ns1:table-cell>
            <ns2:p>https://www.franklinplumbingsc.com/</ns2:p>
          </ns1:table-cell>
          <ns1:table-cell>
            <ns2:p>3004 Millwood Ave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4.0</ns2:p>
          </ns1:table-cell>
          <ns1:table-cell>
            <ns2:p>Visalia</ns2:p>
          </ns1:table-cell>
          <ns1:table-cell>
            <ns2:p>CA</ns2:p>
          </ns1:table-cell>
          <ns1:table-cell>
            <ns2:p>1465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5.0</ns2:p>
          </ns1:table-cell>
          <ns1:table-cell>
            <ns2:p>Escondido</ns2:p>
          </ns1:table-cell>
          <ns1:table-cell>
            <ns2:p>CA</ns2:p>
          </ns1:table-cell>
          <ns1:table-cell>
            <ns2:p>1460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6.0</ns2:p>
          </ns1:table-cell>
          <ns1:table-cell>
            <ns2:p>Syracuse</ns2:p>
          </ns1:table-cell>
          <ns1:table-cell>
            <ns2:p>NY</ns2:p>
          </ns1:table-cell>
          <ns1:table-cell>
            <ns2:p>14489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7.0</ns2:p>
          </ns1:table-cell>
          <ns1:table-cell>
            <ns2:p>Meridian</ns2:p>
          </ns1:table-cell>
          <ns1:table-cell>
            <ns2:p>ID</ns2:p>
          </ns1:table-cell>
          <ns1:table-cell>
            <ns2:p>1429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8.0</ns2:p>
          </ns1:table-cell>
          <ns1:table-cell>
            <ns2:p>Miramar</ns2:p>
          </ns1:table-cell>
          <ns1:table-cell>
            <ns2:p>FL</ns2:p>
          </ns1:table-cell>
          <ns1:table-cell>
            <ns2:p>14257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199.0</ns2:p>
          </ns1:table-cell>
          <ns1:table-cell>
            <ns2:p>Elizabeth</ns2:p>
          </ns1:table-cell>
          <ns1:table-cell>
            <ns2:p>NJ</ns2:p>
          </ns1:table-cell>
          <ns1:table-cell>
            <ns2:p>1416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0.0</ns2:p>
          </ns1:table-cell>
          <ns1:table-cell>
            <ns2:p>Victorville</ns2:p>
          </ns1:table-cell>
          <ns1:table-cell>
            <ns2:p>CA</ns2:p>
          </ns1:table-cell>
          <ns1:table-cell>
            <ns2:p>14139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1.0</ns2:p>
          </ns1:table-cell>
          <ns1:table-cell>
            <ns2:p>Round Rock</ns2:p>
          </ns1:table-cell>
          <ns1:table-cell>
            <ns2:p>TX</ns2:p>
          </ns1:table-cell>
          <ns1:table-cell>
            <ns2:p>14128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2.0</ns2:p>
          </ns1:table-cell>
          <ns1:table-cell>
            <ns2:p>Jackson</ns2:p>
          </ns1:table-cell>
          <ns1:table-cell>
            <ns2:p>MS</ns2:p>
          </ns1:table-cell>
          <ns1:table-cell>
            <ns2:p>141196</ns2:p>
          </ns1:table-cell>
          <ns1:table-cell>
            <ns2:p>Mississippi Plumbing Solutions - Formerly Reid Plumbing</ns2:p>
          </ns1:table-cell>
          <ns1:table-cell>
            <ns2:p>(601) 850-1828</ns2:p>
          </ns1:table-cell>
          <ns1:table-cell>
            <ns2:p/>
          </ns1:table-cell>
          <ns1:table-cell>
            <ns2:p>http://msplumbingsolutions.com/</ns2:p>
          </ns1:table-cell>
          <ns1:table-cell>
            <ns2:p>1775 Lelia Dr A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3.0</ns2:p>
          </ns1:table-cell>
          <ns1:table-cell>
            <ns2:p>Stamford</ns2:p>
          </ns1:table-cell>
          <ns1:table-cell>
            <ns2:p>CT</ns2:p>
          </ns1:table-cell>
          <ns1:table-cell>
            <ns2:p>13953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4.0</ns2:p>
          </ns1:table-cell>
          <ns1:table-cell>
            <ns2:p>Lewisville</ns2:p>
          </ns1:table-cell>
          <ns1:table-cell>
            <ns2:p>TX</ns2:p>
          </ns1:table-cell>
          <ns1:table-cell>
            <ns2:p>13900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5.0</ns2:p>
          </ns1:table-cell>
          <ns1:table-cell>
            <ns2:p>Coral Springs</ns2:p>
          </ns1:table-cell>
          <ns1:table-cell>
            <ns2:p>FL</ns2:p>
          </ns1:table-cell>
          <ns1:table-cell>
            <ns2:p>1387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6.0</ns2:p>
          </ns1:table-cell>
          <ns1:table-cell>
            <ns2:p>New Haven</ns2:p>
          </ns1:table-cell>
          <ns1:table-cell>
            <ns2:p>CT</ns2:p>
          </ns1:table-cell>
          <ns1:table-cell>
            <ns2:p>13877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7.0</ns2:p>
          </ns1:table-cell>
          <ns1:table-cell>
            <ns2:p>Fullerton</ns2:p>
          </ns1:table-cell>
          <ns1:table-cell>
            <ns2:p>CA</ns2:p>
          </ns1:table-cell>
          <ns1:table-cell>
            <ns2:p>1386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8.0</ns2:p>
          </ns1:table-cell>
          <ns1:table-cell>
            <ns2:p>Torrance</ns2:p>
          </ns1:table-cell>
          <ns1:table-cell>
            <ns2:p>CA</ns2:p>
          </ns1:table-cell>
          <ns1:table-cell>
            <ns2:p>13839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09.0</ns2:p>
          </ns1:table-cell>
          <ns1:table-cell>
            <ns2:p>Orange</ns2:p>
          </ns1:table-cell>
          <ns1:table-cell>
            <ns2:p>CA</ns2:p>
          </ns1:table-cell>
          <ns1:table-cell>
            <ns2:p>13836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0.0</ns2:p>
          </ns1:table-cell>
          <ns1:table-cell>
            <ns2:p>Cedar Rapids</ns2:p>
          </ns1:table-cell>
          <ns1:table-cell>
            <ns2:p>IA</ns2:p>
          </ns1:table-cell>
          <ns1:table-cell>
            <ns2:p>13793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1.0</ns2:p>
          </ns1:table-cell>
          <ns1:table-cell>
            <ns2:p>West Valley City</ns2:p>
          </ns1:table-cell>
          <ns1:table-cell>
            <ns2:p>UT</ns2:p>
          </ns1:table-cell>
          <ns1:table-cell>
            <ns2:p>13749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2.0</ns2:p>
          </ns1:table-cell>
          <ns1:table-cell>
            <ns2:p>Hampton</ns2:p>
          </ns1:table-cell>
          <ns1:table-cell>
            <ns2:p>VA</ns2:p>
          </ns1:table-cell>
          <ns1:table-cell>
            <ns2:p>13731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3.0</ns2:p>
          </ns1:table-cell>
          <ns1:table-cell>
            <ns2:p>Warren</ns2:p>
          </ns1:table-cell>
          <ns1:table-cell>
            <ns2:p>MI</ns2:p>
          </ns1:table-cell>
          <ns1:table-cell>
            <ns2:p>13713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4.0</ns2:p>
          </ns1:table-cell>
          <ns1:table-cell>
            <ns2:p>Dayton</ns2:p>
          </ns1:table-cell>
          <ns1:table-cell>
            <ns2:p>OH</ns2:p>
          </ns1:table-cell>
          <ns1:table-cell>
            <ns2:p>1366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5.0</ns2:p>
          </ns1:table-cell>
          <ns1:table-cell>
            <ns2:p>Fargo</ns2:p>
          </ns1:table-cell>
          <ns1:table-cell>
            <ns2:p>ND</ns2:p>
          </ns1:table-cell>
          <ns1:table-cell>
            <ns2:p>136275</ns2:p>
          </ns1:table-cell>
          <ns1:table-cell>
            <ns2:p>LEGACY PLUMBING &amp; HEATING</ns2:p>
          </ns1:table-cell>
          <ns1:table-cell>
            <ns2:p>(701) 306-3375</ns2:p>
          </ns1:table-cell>
          <ns1:table-cell>
            <ns2:p/>
          </ns1:table-cell>
          <ns1:table-cell>
            <ns2:p>https://www.legacyplumbingfm.com/</ns2:p>
          </ns1:table-cell>
          <ns1:table-cell>
            <ns2:p>3522 4th Ave S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6.0</ns2:p>
          </ns1:table-cell>
          <ns1:table-cell>
            <ns2:p>Pasadena</ns2:p>
          </ns1:table-cell>
          <ns1:table-cell>
            <ns2:p>CA</ns2:p>
          </ns1:table-cell>
          <ns1:table-cell>
            <ns2:p>13580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7.0</ns2:p>
          </ns1:table-cell>
          <ns1:table-cell>
            <ns2:p>Kent</ns2:p>
          </ns1:table-cell>
          <ns1:table-cell>
            <ns2:p>WA</ns2:p>
          </ns1:table-cell>
          <ns1:table-cell>
            <ns2:p>1348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8.0</ns2:p>
          </ns1:table-cell>
          <ns1:table-cell>
            <ns2:p>Carrollton</ns2:p>
          </ns1:table-cell>
          <ns1:table-cell>
            <ns2:p>TX</ns2:p>
          </ns1:table-cell>
          <ns1:table-cell>
            <ns2:p>13456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19.0</ns2:p>
          </ns1:table-cell>
          <ns1:table-cell>
            <ns2:p>Sterling Heights</ns2:p>
          </ns1:table-cell>
          <ns1:table-cell>
            <ns2:p>MI</ns2:p>
          </ns1:table-cell>
          <ns1:table-cell>
            <ns2:p>13393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0.0</ns2:p>
          </ns1:table-cell>
          <ns1:table-cell>
            <ns2:p>Santa Clara</ns2:p>
          </ns1:table-cell>
          <ns1:table-cell>
            <ns2:p>CA</ns2:p>
          </ns1:table-cell>
          <ns1:table-cell>
            <ns2:p>13344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1.0</ns2:p>
          </ns1:table-cell>
          <ns1:table-cell>
            <ns2:p>Abilene</ns2:p>
          </ns1:table-cell>
          <ns1:table-cell>
            <ns2:p>TX</ns2:p>
          </ns1:table-cell>
          <ns1:table-cell>
            <ns2:p>1315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2.0</ns2:p>
          </ns1:table-cell>
          <ns1:table-cell>
            <ns2:p>Norman</ns2:p>
          </ns1:table-cell>
          <ns1:table-cell>
            <ns2:p>OK</ns2:p>
          </ns1:table-cell>
          <ns1:table-cell>
            <ns2:p>1309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3.0</ns2:p>
          </ns1:table-cell>
          <ns1:table-cell>
            <ns2:p>Columbia</ns2:p>
          </ns1:table-cell>
          <ns1:table-cell>
            <ns2:p>MO</ns2:p>
          </ns1:table-cell>
          <ns1:table-cell>
            <ns2:p>130851</ns2:p>
          </ns1:table-cell>
          <ns1:table-cell>
            <ns2:p>Brian Wear Plumbing &amp; Restoration</ns2:p>
          </ns1:table-cell>
          <ns1:table-cell>
            <ns2:p>(573) 864-4463</ns2:p>
          </ns1:table-cell>
          <ns1:table-cell>
            <ns2:p/>
          </ns1:table-cell>
          <ns1:table-cell>
            <ns2:p>https://brianwearplumbing.com/</ns2:p>
          </ns1:table-cell>
          <ns1:table-cell>
            <ns2:p>2501 Rangeline St Suite B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4.0</ns2:p>
          </ns1:table-cell>
          <ns1:table-cell>
            <ns2:p>Pearland</ns2:p>
          </ns1:table-cell>
          <ns1:table-cell>
            <ns2:p>TX</ns2:p>
          </ns1:table-cell>
          <ns1:table-cell>
            <ns2:p>1299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5.0</ns2:p>
          </ns1:table-cell>
          <ns1:table-cell>
            <ns2:p>Athens</ns2:p>
          </ns1:table-cell>
          <ns1:table-cell>
            <ns2:p>GA</ns2:p>
          </ns1:table-cell>
          <ns1:table-cell>
            <ns2:p>12992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6.0</ns2:p>
          </ns1:table-cell>
          <ns1:table-cell>
            <ns2:p>Clovis</ns2:p>
          </ns1:table-cell>
          <ns1:table-cell>
            <ns2:p>CA</ns2:p>
          </ns1:table-cell>
          <ns1:table-cell>
            <ns2:p>12934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7.0</ns2:p>
          </ns1:table-cell>
          <ns1:table-cell>
            <ns2:p>North Charleston</ns2:p>
          </ns1:table-cell>
          <ns1:table-cell>
            <ns2:p>SC</ns2:p>
          </ns1:table-cell>
          <ns1:table-cell>
            <ns2:p>12924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8.0</ns2:p>
          </ns1:table-cell>
          <ns1:table-cell>
            <ns2:p>College Station</ns2:p>
          </ns1:table-cell>
          <ns1:table-cell>
            <ns2:p>TX</ns2:p>
          </ns1:table-cell>
          <ns1:table-cell>
            <ns2:p>12747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29.0</ns2:p>
          </ns1:table-cell>
          <ns1:table-cell>
            <ns2:p>West Palm Beach</ns2:p>
          </ns1:table-cell>
          <ns1:table-cell>
            <ns2:p>FL</ns2:p>
          </ns1:table-cell>
          <ns1:table-cell>
            <ns2:p>12718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0.0</ns2:p>
          </ns1:table-cell>
          <ns1:table-cell>
            <ns2:p>Wilmington</ns2:p>
          </ns1:table-cell>
          <ns1:table-cell>
            <ns2:p>NC</ns2:p>
          </ns1:table-cell>
          <ns1:table-cell>
            <ns2:p>12680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1.0</ns2:p>
          </ns1:table-cell>
          <ns1:table-cell>
            <ns2:p>Allentown</ns2:p>
          </ns1:table-cell>
          <ns1:table-cell>
            <ns2:p>PA</ns2:p>
          </ns1:table-cell>
          <ns1:table-cell>
            <ns2:p>1260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2.0</ns2:p>
          </ns1:table-cell>
          <ns1:table-cell>
            <ns2:p>Topeka</ns2:p>
          </ns1:table-cell>
          <ns1:table-cell>
            <ns2:p>KS</ns2:p>
          </ns1:table-cell>
          <ns1:table-cell>
            <ns2:p>12579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3.0</ns2:p>
          </ns1:table-cell>
          <ns1:table-cell>
            <ns2:p>Lakeland</ns2:p>
          </ns1:table-cell>
          <ns1:table-cell>
            <ns2:p>FL</ns2:p>
          </ns1:table-cell>
          <ns1:table-cell>
            <ns2:p>1255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4.0</ns2:p>
          </ns1:table-cell>
          <ns1:table-cell>
            <ns2:p>Buckeye</ns2:p>
          </ns1:table-cell>
          <ns1:table-cell>
            <ns2:p>AZ</ns2:p>
          </ns1:table-cell>
          <ns1:table-cell>
            <ns2:p>12544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5.0</ns2:p>
          </ns1:table-cell>
          <ns1:table-cell>
            <ns2:p>Goodyear</ns2:p>
          </ns1:table-cell>
          <ns1:table-cell>
            <ns2:p>AZ</ns2:p>
          </ns1:table-cell>
          <ns1:table-cell>
            <ns2:p>12535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6.0</ns2:p>
          </ns1:table-cell>
          <ns1:table-cell>
            <ns2:p>Broken Arrow</ns2:p>
          </ns1:table-cell>
          <ns1:table-cell>
            <ns2:p>OK</ns2:p>
          </ns1:table-cell>
          <ns1:table-cell>
            <ns2:p>12499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7.0</ns2:p>
          </ns1:table-cell>
          <ns1:table-cell>
            <ns2:p>Simi Valley</ns2:p>
          </ns1:table-cell>
          <ns1:table-cell>
            <ns2:p>CA</ns2:p>
          </ns1:table-cell>
          <ns1:table-cell>
            <ns2:p>12486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8.0</ns2:p>
          </ns1:table-cell>
          <ns1:table-cell>
            <ns2:p>Rochester</ns2:p>
          </ns1:table-cell>
          <ns1:table-cell>
            <ns2:p>MN</ns2:p>
          </ns1:table-cell>
          <ns1:table-cell>
            <ns2:p>1242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39.0</ns2:p>
          </ns1:table-cell>
          <ns1:table-cell>
            <ns2:p>Lafayette</ns2:p>
          </ns1:table-cell>
          <ns1:table-cell>
            <ns2:p>LA</ns2:p>
          </ns1:table-cell>
          <ns1:table-cell>
            <ns2:p>1233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0.0</ns2:p>
          </ns1:table-cell>
          <ns1:table-cell>
            <ns2:p>Vallejo</ns2:p>
          </ns1:table-cell>
          <ns1:table-cell>
            <ns2:p>CA</ns2:p>
          </ns1:table-cell>
          <ns1:table-cell>
            <ns2:p>12328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1.0</ns2:p>
          </ns1:table-cell>
          <ns1:table-cell>
            <ns2:p>Concord</ns2:p>
          </ns1:table-cell>
          <ns1:table-cell>
            <ns2:p>CA</ns2:p>
          </ns1:table-cell>
          <ns1:table-cell>
            <ns2:p>12326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2.0</ns2:p>
          </ns1:table-cell>
          <ns1:table-cell>
            <ns2:p>Arvada</ns2:p>
          </ns1:table-cell>
          <ns1:table-cell>
            <ns2:p>CO</ns2:p>
          </ns1:table-cell>
          <ns1:table-cell>
            <ns2:p>1229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3.0</ns2:p>
          </ns1:table-cell>
          <ns1:table-cell>
            <ns2:p>Odessa</ns2:p>
          </ns1:table-cell>
          <ns1:table-cell>
            <ns2:p>TX</ns2:p>
          </ns1:table-cell>
          <ns1:table-cell>
            <ns2:p>1227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4.0</ns2:p>
          </ns1:table-cell>
          <ns1:table-cell>
            <ns2:p>Cambridge</ns2:p>
          </ns1:table-cell>
          <ns1:table-cell>
            <ns2:p>MA</ns2:p>
          </ns1:table-cell>
          <ns1:table-cell>
            <ns2:p>1225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5.0</ns2:p>
          </ns1:table-cell>
          <ns1:table-cell>
            <ns2:p>New Braunfels</ns2:p>
          </ns1:table-cell>
          <ns1:table-cell>
            <ns2:p>TX</ns2:p>
          </ns1:table-cell>
          <ns1:table-cell>
            <ns2:p>1224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6.0</ns2:p>
          </ns1:table-cell>
          <ns1:table-cell>
            <ns2:p>Fairfield</ns2:p>
          </ns1:table-cell>
          <ns1:table-cell>
            <ns2:p>CA</ns2:p>
          </ns1:table-cell>
          <ns1:table-cell>
            <ns2:p>12248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7.0</ns2:p>
          </ns1:table-cell>
          <ns1:table-cell>
            <ns2:p>Ann Arbor</ns2:p>
          </ns1:table-cell>
          <ns1:table-cell>
            <ns2:p>MI</ns2:p>
          </ns1:table-cell>
          <ns1:table-cell>
            <ns2:p>1222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8.0</ns2:p>
          </ns1:table-cell>
          <ns1:table-cell>
            <ns2:p>Thousand Oaks</ns2:p>
          </ns1:table-cell>
          <ns1:table-cell>
            <ns2:p>CA</ns2:p>
          </ns1:table-cell>
          <ns1:table-cell>
            <ns2:p>1222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49.0</ns2:p>
          </ns1:table-cell>
          <ns1:table-cell>
            <ns2:p>Hartford</ns2:p>
          </ns1:table-cell>
          <ns1:table-cell>
            <ns2:p>CT</ns2:p>
          </ns1:table-cell>
          <ns1:table-cell>
            <ns2:p>1219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0.0</ns2:p>
          </ns1:table-cell>
          <ns1:table-cell>
            <ns2:p>Berkeley</ns2:p>
          </ns1:table-cell>
          <ns1:table-cell>
            <ns2:p>CA</ns2:p>
          </ns1:table-cell>
          <ns1:table-cell>
            <ns2:p>1219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1.0</ns2:p>
          </ns1:table-cell>
          <ns1:table-cell>
            <ns2:p>Independence</ns2:p>
          </ns1:table-cell>
          <ns1:table-cell>
            <ns2:p>MO</ns2:p>
          </ns1:table-cell>
          <ns1:table-cell>
            <ns2:p>1216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2.0</ns2:p>
          </ns1:table-cell>
          <ns1:table-cell>
            <ns2:p>Billings</ns2:p>
          </ns1:table-cell>
          <ns1:table-cell>
            <ns2:p>MT</ns2:p>
          </ns1:table-cell>
          <ns1:table-cell>
            <ns2:p>121239</ns2:p>
          </ns1:table-cell>
          <ns1:table-cell>
            <ns2:p>Rimrock Plumbing</ns2:p>
          </ns1:table-cell>
          <ns1:table-cell>
            <ns2:p>(406) 855-7131</ns2:p>
          </ns1:table-cell>
          <ns1:table-cell>
            <ns2:p/>
          </ns1:table-cell>
          <ns1:table-cell>
            <ns2:p>http://rimrockplumbing.com/</ns2:p>
          </ns1:table-cell>
          <ns1:table-cell>
            <ns2:p>3419 Central Ave Suite C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3.0</ns2:p>
          </ns1:table-cell>
          <ns1:table-cell>
            <ns2:p>High Point</ns2:p>
          </ns1:table-cell>
          <ns1:table-cell>
            <ns2:p>NC</ns2:p>
          </ns1:table-cell>
          <ns1:table-cell>
            <ns2:p>1205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4.0</ns2:p>
          </ns1:table-cell>
          <ns1:table-cell>
            <ns2:p>Nampa</ns2:p>
          </ns1:table-cell>
          <ns1:table-cell>
            <ns2:p>ID</ns2:p>
          </ns1:table-cell>
          <ns1:table-cell>
            <ns2:p>120384</ns2:p>
          </ns1:table-cell>
          <ns1:table-cell>
            <ns2:p>Dillon Plumbing</ns2:p>
          </ns1:table-cell>
          <ns1:table-cell>
            <ns2:p>(208) 466-3707</ns2:p>
          </ns1:table-cell>
          <ns1:table-cell>
            <ns2:p/>
          </ns1:table-cell>
          <ns1:table-cell>
            <ns2:p>http://www.dillonplumbing.com/</ns2:p>
          </ns1:table-cell>
          <ns1:table-cell>
            <ns2:p>605 E Hawaii Ave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5.0</ns2:p>
          </ns1:table-cell>
          <ns1:table-cell>
            <ns2:p>Lowell</ns2:p>
          </ns1:table-cell>
          <ns1:table-cell>
            <ns2:p>MA</ns2:p>
          </ns1:table-cell>
          <ns1:table-cell>
            <ns2:p>1199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6.0</ns2:p>
          </ns1:table-cell>
          <ns1:table-cell>
            <ns2:p>League City</ns2:p>
          </ns1:table-cell>
          <ns1:table-cell>
            <ns2:p>TX</ns2:p>
          </ns1:table-cell>
          <ns1:table-cell>
            <ns2:p>11990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7.0</ns2:p>
          </ns1:table-cell>
          <ns1:table-cell>
            <ns2:p>Conroe</ns2:p>
          </ns1:table-cell>
          <ns1:table-cell>
            <ns2:p>TX</ns2:p>
          </ns1:table-cell>
          <ns1:table-cell>
            <ns2:p>11956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8.0</ns2:p>
          </ns1:table-cell>
          <ns1:table-cell>
            <ns2:p>Antioch</ns2:p>
          </ns1:table-cell>
          <ns1:table-cell>
            <ns2:p>CA</ns2:p>
          </ns1:table-cell>
          <ns1:table-cell>
            <ns2:p>1189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59.0</ns2:p>
          </ns1:table-cell>
          <ns1:table-cell>
            <ns2:p>Menifee</ns2:p>
          </ns1:table-cell>
          <ns1:table-cell>
            <ns2:p>CA</ns2:p>
          </ns1:table-cell>
          <ns1:table-cell>
            <ns2:p>1185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0.0</ns2:p>
          </ns1:table-cell>
          <ns1:table-cell>
            <ns2:p>Richardson</ns2:p>
          </ns1:table-cell>
          <ns1:table-cell>
            <ns2:p>TX</ns2:p>
          </ns1:table-cell>
          <ns1:table-cell>
            <ns2:p>1185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1.0</ns2:p>
          </ns1:table-cell>
          <ns1:table-cell>
            <ns2:p>Pompano Beach</ns2:p>
          </ns1:table-cell>
          <ns1:table-cell>
            <ns2:p>FL</ns2:p>
          </ns1:table-cell>
          <ns1:table-cell>
            <ns2:p>1172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2.0</ns2:p>
          </ns1:table-cell>
          <ns1:table-cell>
            <ns2:p>Las Cruces</ns2:p>
          </ns1:table-cell>
          <ns1:table-cell>
            <ns2:p>NM</ns2:p>
          </ns1:table-cell>
          <ns1:table-cell>
            <ns2:p>11697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3.0</ns2:p>
          </ns1:table-cell>
          <ns1:table-cell>
            <ns2:p>Manchester</ns2:p>
          </ns1:table-cell>
          <ns1:table-cell>
            <ns2:p>NH</ns2:p>
          </ns1:table-cell>
          <ns1:table-cell>
            <ns2:p>116818</ns2:p>
          </ns1:table-cell>
          <ns1:table-cell>
            <ns2:p>Paul The Plumber - Manchester</ns2:p>
          </ns1:table-cell>
          <ns1:table-cell>
            <ns2:p>(603) 437-7039</ns2:p>
          </ns1:table-cell>
          <ns1:table-cell>
            <ns2:p/>
          </ns1:table-cell>
          <ns1:table-cell>
            <ns2:p>https://www.paultheplumbernh.com/</ns2:p>
          </ns1:table-cell>
          <ns1:table-cell>
            <ns2:p>1087 Elm St Suite 406</ns2:p>
          </ns1:table-cell>
          <ns1:table-cell>
            <ns2:p>4.8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4.0</ns2:p>
          </ns1:table-cell>
          <ns1:table-cell>
            <ns2:p>West Jordan</ns2:p>
          </ns1:table-cell>
          <ns1:table-cell>
            <ns2:p>UT</ns2:p>
          </ns1:table-cell>
          <ns1:table-cell>
            <ns2:p>1168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5.0</ns2:p>
          </ns1:table-cell>
          <ns1:table-cell>
            <ns2:p>Westminster</ns2:p>
          </ns1:table-cell>
          <ns1:table-cell>
            <ns2:p>CO</ns2:p>
          </ns1:table-cell>
          <ns1:table-cell>
            <ns2:p>11618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6.0</ns2:p>
          </ns1:table-cell>
          <ns1:table-cell>
            <ns2:p>Evansville</ns2:p>
          </ns1:table-cell>
          <ns1:table-cell>
            <ns2:p>IN</ns2:p>
          </ns1:table-cell>
          <ns1:table-cell>
            <ns2:p>11617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7.0</ns2:p>
          </ns1:table-cell>
          <ns1:table-cell>
            <ns2:p>Waterbury</ns2:p>
          </ns1:table-cell>
          <ns1:table-cell>
            <ns2:p>CT</ns2:p>
          </ns1:table-cell>
          <ns1:table-cell>
            <ns2:p>1157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8.0</ns2:p>
          </ns1:table-cell>
          <ns1:table-cell>
            <ns2:p>Elgin</ns2:p>
          </ns1:table-cell>
          <ns1:table-cell>
            <ns2:p>IL</ns2:p>
          </ns1:table-cell>
          <ns1:table-cell>
            <ns2:p>11547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69.0</ns2:p>
          </ns1:table-cell>
          <ns1:table-cell>
            <ns2:p>Greeley</ns2:p>
          </ns1:table-cell>
          <ns1:table-cell>
            <ns2:p>CO</ns2:p>
          </ns1:table-cell>
          <ns1:table-cell>
            <ns2:p>11507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0.0</ns2:p>
          </ns1:table-cell>
          <ns1:table-cell>
            <ns2:p>Temecula</ns2:p>
          </ns1:table-cell>
          <ns1:table-cell>
            <ns2:p>CA</ns2:p>
          </ns1:table-cell>
          <ns1:table-cell>
            <ns2:p>11486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1.0</ns2:p>
          </ns1:table-cell>
          <ns1:table-cell>
            <ns2:p>Richmond</ns2:p>
          </ns1:table-cell>
          <ns1:table-cell>
            <ns2:p>CA</ns2:p>
          </ns1:table-cell>
          <ns1:table-cell>
            <ns2:p>11486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2.0</ns2:p>
          </ns1:table-cell>
          <ns1:table-cell>
            <ns2:p>Concord</ns2:p>
          </ns1:table-cell>
          <ns1:table-cell>
            <ns2:p>NC</ns2:p>
          </ns1:table-cell>
          <ns1:table-cell>
            <ns2:p>11459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3.0</ns2:p>
          </ns1:table-cell>
          <ns1:table-cell>
            <ns2:p>Provo</ns2:p>
          </ns1:table-cell>
          <ns1:table-cell>
            <ns2:p>UT</ns2:p>
          </ns1:table-cell>
          <ns1:table-cell>
            <ns2:p>1145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4.0</ns2:p>
          </ns1:table-cell>
          <ns1:table-cell>
            <ns2:p>Rio Rancho</ns2:p>
          </ns1:table-cell>
          <ns1:table-cell>
            <ns2:p>NM</ns2:p>
          </ns1:table-cell>
          <ns1:table-cell>
            <ns2:p>114419</ns2:p>
          </ns1:table-cell>
          <ns1:table-cell>
            <ns2:p>TLC Plumbing Heating Cooling Electrical</ns2:p>
          </ns1:table-cell>
          <ns1:table-cell>
            <ns2:p>(505) 891-2962</ns2:p>
          </ns1:table-cell>
          <ns1:table-cell>
            <ns2:p/>
          </ns1:table-cell>
          <ns1:table-cell>
            <ns2:p>https://www.tlcplumbing.com/rio-rancho</ns2:p>
          </ns1:table-cell>
          <ns1:table-cell>
            <ns2:p>506 Frontage Rd NE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5.0</ns2:p>
          </ns1:table-cell>
          <ns1:table-cell>
            <ns2:p>Clearwater</ns2:p>
          </ns1:table-cell>
          <ns1:table-cell>
            <ns2:p>FL</ns2:p>
          </ns1:table-cell>
          <ns1:table-cell>
            <ns2:p>11436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6.0</ns2:p>
          </ns1:table-cell>
          <ns1:table-cell>
            <ns2:p>Tuscaloosa</ns2:p>
          </ns1:table-cell>
          <ns1:table-cell>
            <ns2:p>AL</ns2:p>
          </ns1:table-cell>
          <ns1:table-cell>
            <ns2:p>11431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7.0</ns2:p>
          </ns1:table-cell>
          <ns1:table-cell>
            <ns2:p>Murrieta</ns2:p>
          </ns1:table-cell>
          <ns1:table-cell>
            <ns2:p>CA</ns2:p>
          </ns1:table-cell>
          <ns1:table-cell>
            <ns2:p>11412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8.0</ns2:p>
          </ns1:table-cell>
          <ns1:table-cell>
            <ns2:p>Lansing</ns2:p>
          </ns1:table-cell>
          <ns1:table-cell>
            <ns2:p>MI</ns2:p>
          </ns1:table-cell>
          <ns1:table-cell>
            <ns2:p>1138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79.0</ns2:p>
          </ns1:table-cell>
          <ns1:table-cell>
            <ns2:p>Tyler</ns2:p>
          </ns1:table-cell>
          <ns1:table-cell>
            <ns2:p>TX</ns2:p>
          </ns1:table-cell>
          <ns1:table-cell>
            <ns2:p>11372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0.0</ns2:p>
          </ns1:table-cell>
          <ns1:table-cell>
            <ns2:p>Miami Gardens</ns2:p>
          </ns1:table-cell>
          <ns1:table-cell>
            <ns2:p>FL</ns2:p>
          </ns1:table-cell>
          <ns1:table-cell>
            <ns2:p>11357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1.0</ns2:p>
          </ns1:table-cell>
          <ns1:table-cell>
            <ns2:p>Everett</ns2:p>
          </ns1:table-cell>
          <ns1:table-cell>
            <ns2:p>WA</ns2:p>
          </ns1:table-cell>
          <ns1:table-cell>
            <ns2:p>11356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2.0</ns2:p>
          </ns1:table-cell>
          <ns1:table-cell>
            <ns2:p>Allen</ns2:p>
          </ns1:table-cell>
          <ns1:table-cell>
            <ns2:p>TX</ns2:p>
          </ns1:table-cell>
          <ns1:table-cell>
            <ns2:p>11344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3.0</ns2:p>
          </ns1:table-cell>
          <ns1:table-cell>
            <ns2:p>Springfield</ns2:p>
          </ns1:table-cell>
          <ns1:table-cell>
            <ns2:p>IL</ns2:p>
          </ns1:table-cell>
          <ns1:table-cell>
            <ns2:p>11298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4.0</ns2:p>
          </ns1:table-cell>
          <ns1:table-cell>
            <ns2:p>Beaumont</ns2:p>
          </ns1:table-cell>
          <ns1:table-cell>
            <ns2:p>TX</ns2:p>
          </ns1:table-cell>
          <ns1:table-cell>
            <ns2:p>11296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5.0</ns2:p>
          </ns1:table-cell>
          <ns1:table-cell>
            <ns2:p>South Fulton</ns2:p>
          </ns1:table-cell>
          <ns1:table-cell>
            <ns2:p>GA</ns2:p>
          </ns1:table-cell>
          <ns1:table-cell>
            <ns2:p>1128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6.0</ns2:p>
          </ns1:table-cell>
          <ns1:table-cell>
            <ns2:p>Carlsbad</ns2:p>
          </ns1:table-cell>
          <ns1:table-cell>
            <ns2:p>CA</ns2:p>
          </ns1:table-cell>
          <ns1:table-cell>
            <ns2:p>11226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7.0</ns2:p>
          </ns1:table-cell>
          <ns1:table-cell>
            <ns2:p>Sparks</ns2:p>
          </ns1:table-cell>
          <ns1:table-cell>
            <ns2:p>NV</ns2:p>
          </ns1:table-cell>
          <ns1:table-cell>
            <ns2:p>11190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8.0</ns2:p>
          </ns1:table-cell>
          <ns1:table-cell>
            <ns2:p>Gresham</ns2:p>
          </ns1:table-cell>
          <ns1:table-cell>
            <ns2:p>OR</ns2:p>
          </ns1:table-cell>
          <ns1:table-cell>
            <ns2:p>1115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89.0</ns2:p>
          </ns1:table-cell>
          <ns1:table-cell>
            <ns2:p>Santa Maria</ns2:p>
          </ns1:table-cell>
          <ns1:table-cell>
            <ns2:p>CA</ns2:p>
          </ns1:table-cell>
          <ns1:table-cell>
            <ns2:p>11139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0.0</ns2:p>
          </ns1:table-cell>
          <ns1:table-cell>
            <ns2:p>Hillsboro</ns2:p>
          </ns1:table-cell>
          <ns1:table-cell>
            <ns2:p>OR</ns2:p>
          </ns1:table-cell>
          <ns1:table-cell>
            <ns2:p>11112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1.0</ns2:p>
          </ns1:table-cell>
          <ns1:table-cell>
            <ns2:p>Peoria</ns2:p>
          </ns1:table-cell>
          <ns1:table-cell>
            <ns2:p>IL</ns2:p>
          </ns1:table-cell>
          <ns1:table-cell>
            <ns2:p>1109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2.0</ns2:p>
          </ns1:table-cell>
          <ns1:table-cell>
            <ns2:p>Davie</ns2:p>
          </ns1:table-cell>
          <ns1:table-cell>
            <ns2:p>FL</ns2:p>
          </ns1:table-cell>
          <ns1:table-cell>
            <ns2:p>11085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3.0</ns2:p>
          </ns1:table-cell>
          <ns1:table-cell>
            <ns2:p>Edinburg</ns2:p>
          </ns1:table-cell>
          <ns1:table-cell>
            <ns2:p>TX</ns2:p>
          </ns1:table-cell>
          <ns1:table-cell>
            <ns2:p>1107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4.0</ns2:p>
          </ns1:table-cell>
          <ns1:table-cell>
            <ns2:p>Pueblo</ns2:p>
          </ns1:table-cell>
          <ns1:table-cell>
            <ns2:p>CO</ns2:p>
          </ns1:table-cell>
          <ns1:table-cell>
            <ns2:p>11040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5.0</ns2:p>
          </ns1:table-cell>
          <ns1:table-cell>
            <ns2:p>San Buenaventura (Ventura)</ns2:p>
          </ns1:table-cell>
          <ns1:table-cell>
            <ns2:p>CA</ns2:p>
          </ns1:table-cell>
          <ns1:table-cell>
            <ns2:p>1099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6.0</ns2:p>
          </ns1:table-cell>
          <ns1:table-cell>
            <ns2:p>Palm Coast</ns2:p>
          </ns1:table-cell>
          <ns1:table-cell>
            <ns2:p>FL</ns2:p>
          </ns1:table-cell>
          <ns1:table-cell>
            <ns2:p>10988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7.0</ns2:p>
          </ns1:table-cell>
          <ns1:table-cell>
            <ns2:p>Costa Mesa</ns2:p>
          </ns1:table-cell>
          <ns1:table-cell>
            <ns2:p>CA</ns2:p>
          </ns1:table-cell>
          <ns1:table-cell>
            <ns2:p>1088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8.0</ns2:p>
          </ns1:table-cell>
          <ns1:table-cell>
            <ns2:p>St. George</ns2:p>
          </ns1:table-cell>
          <ns1:table-cell>
            <ns2:p>UT</ns2:p>
          </ns1:table-cell>
          <ns1:table-cell>
            <ns2:p>1087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299.0</ns2:p>
          </ns1:table-cell>
          <ns1:table-cell>
            <ns2:p>Centennial</ns2:p>
          </ns1:table-cell>
          <ns1:table-cell>
            <ns2:p>CO</ns2:p>
          </ns1:table-cell>
          <ns1:table-cell>
            <ns2:p>1086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0.0</ns2:p>
          </ns1:table-cell>
          <ns1:table-cell>
            <ns2:p>Downey</ns2:p>
          </ns1:table-cell>
          <ns1:table-cell>
            <ns2:p>CA</ns2:p>
          </ns1:table-cell>
          <ns1:table-cell>
            <ns2:p>10846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1.0</ns2:p>
          </ns1:table-cell>
          <ns1:table-cell>
            <ns2:p>Spokane Valley</ns2:p>
          </ns1:table-cell>
          <ns1:table-cell>
            <ns2:p>WA</ns2:p>
          </ns1:table-cell>
          <ns1:table-cell>
            <ns2:p>10840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2.0</ns2:p>
          </ns1:table-cell>
          <ns1:table-cell>
            <ns2:p>Sugar Land</ns2:p>
          </ns1:table-cell>
          <ns1:table-cell>
            <ns2:p>TX</ns2:p>
          </ns1:table-cell>
          <ns1:table-cell>
            <ns2:p>10772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3.0</ns2:p>
          </ns1:table-cell>
          <ns1:table-cell>
            <ns2:p>Lee's Summit</ns2:p>
          </ns1:table-cell>
          <ns1:table-cell>
            <ns2:p>MO</ns2:p>
          </ns1:table-cell>
          <ns1:table-cell>
            <ns2:p>1075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4.0</ns2:p>
          </ns1:table-cell>
          <ns1:table-cell>
            <ns2:p>Bend</ns2:p>
          </ns1:table-cell>
          <ns1:table-cell>
            <ns2:p>OR</ns2:p>
          </ns1:table-cell>
          <ns1:table-cell>
            <ns2:p>1073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5.0</ns2:p>
          </ns1:table-cell>
          <ns1:table-cell>
            <ns2:p>Jurupa Valley</ns2:p>
          </ns1:table-cell>
          <ns1:table-cell>
            <ns2:p>CA</ns2:p>
          </ns1:table-cell>
          <ns1:table-cell>
            <ns2:p>1073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6.0</ns2:p>
          </ns1:table-cell>
          <ns1:table-cell>
            <ns2:p>Georgetown</ns2:p>
          </ns1:table-cell>
          <ns1:table-cell>
            <ns2:p>TX</ns2:p>
          </ns1:table-cell>
          <ns1:table-cell>
            <ns2:p>1069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7.0</ns2:p>
          </ns1:table-cell>
          <ns1:table-cell>
            <ns2:p>Green Bay</ns2:p>
          </ns1:table-cell>
          <ns1:table-cell>
            <ns2:p>WI</ns2:p>
          </ns1:table-cell>
          <ns1:table-cell>
            <ns2:p>1066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8.0</ns2:p>
          </ns1:table-cell>
          <ns1:table-cell>
            <ns2:p>Fayetteville</ns2:p>
          </ns1:table-cell>
          <ns1:table-cell>
            <ns2:p>AR</ns2:p>
          </ns1:table-cell>
          <ns1:table-cell>
            <ns2:p>106623</ns2:p>
          </ns1:table-cell>
          <ns1:table-cell>
            <ns2:p>Fayetteville Plumbing Services</ns2:p>
          </ns1:table-cell>
          <ns1:table-cell>
            <ns2:p>(479) 888-5522</ns2:p>
          </ns1:table-cell>
          <ns1:table-cell>
            <ns2:p/>
          </ns1:table-cell>
          <ns1:table-cell>
            <ns2:p>https://www.plumbingfayettevillear.com/</ns2:p>
          </ns1:table-cell>
          <ns1:table-cell>
            <ns2:p>34 E Center St #4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09.0</ns2:p>
          </ns1:table-cell>
          <ns1:table-cell>
            <ns2:p>Rialto</ns2:p>
          </ns1:table-cell>
          <ns1:table-cell>
            <ns2:p>CA</ns2:p>
          </ns1:table-cell>
          <ns1:table-cell>
            <ns2:p>10655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0.0</ns2:p>
          </ns1:table-cell>
          <ns1:table-cell>
            <ns2:p>Brockton</ns2:p>
          </ns1:table-cell>
          <ns1:table-cell>
            <ns2:p>MA</ns2:p>
          </ns1:table-cell>
          <ns1:table-cell>
            <ns2:p>1061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1.0</ns2:p>
          </ns1:table-cell>
          <ns1:table-cell>
            <ns2:p>Boulder</ns2:p>
          </ns1:table-cell>
          <ns1:table-cell>
            <ns2:p>CO</ns2:p>
          </ns1:table-cell>
          <ns1:table-cell>
            <ns2:p>10568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2.0</ns2:p>
          </ns1:table-cell>
          <ns1:table-cell>
            <ns2:p>Carmel</ns2:p>
          </ns1:table-cell>
          <ns1:table-cell>
            <ns2:p>IN</ns2:p>
          </ns1:table-cell>
          <ns1:table-cell>
            <ns2:p>1056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3.0</ns2:p>
          </ns1:table-cell>
          <ns1:table-cell>
            <ns2:p>Dearborn</ns2:p>
          </ns1:table-cell>
          <ns1:table-cell>
            <ns2:p>MI</ns2:p>
          </ns1:table-cell>
          <ns1:table-cell>
            <ns2:p>1056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4.0</ns2:p>
          </ns1:table-cell>
          <ns1:table-cell>
            <ns2:p>West Covina</ns2:p>
          </ns1:table-cell>
          <ns1:table-cell>
            <ns2:p>CA</ns2:p>
          </ns1:table-cell>
          <ns1:table-cell>
            <ns2:p>1053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5.0</ns2:p>
          </ns1:table-cell>
          <ns1:table-cell>
            <ns2:p>Yuma</ns2:p>
          </ns1:table-cell>
          <ns1:table-cell>
            <ns2:p>AZ</ns2:p>
          </ns1:table-cell>
          <ns1:table-cell>
            <ns2:p>1052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6.0</ns2:p>
          </ns1:table-cell>
          <ns1:table-cell>
            <ns2:p>Chico</ns2:p>
          </ns1:table-cell>
          <ns1:table-cell>
            <ns2:p>CA</ns2:p>
          </ns1:table-cell>
          <ns1:table-cell>
            <ns2:p>1050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7.0</ns2:p>
          </ns1:table-cell>
          <ns1:table-cell>
            <ns2:p>El Monte</ns2:p>
          </ns1:table-cell>
          <ns1:table-cell>
            <ns2:p>CA</ns2:p>
          </ns1:table-cell>
          <ns1:table-cell>
            <ns2:p>1050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8.0</ns2:p>
          </ns1:table-cell>
          <ns1:table-cell>
            <ns2:p>Sandy Springs</ns2:p>
          </ns1:table-cell>
          <ns1:table-cell>
            <ns2:p>GA</ns2:p>
          </ns1:table-cell>
          <ns1:table-cell>
            <ns2:p>1050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19.0</ns2:p>
          </ns1:table-cell>
          <ns1:table-cell>
            <ns2:p>Renton</ns2:p>
          </ns1:table-cell>
          <ns1:table-cell>
            <ns2:p>WA</ns2:p>
          </ns1:table-cell>
          <ns1:table-cell>
            <ns2:p>1049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0.0</ns2:p>
          </ns1:table-cell>
          <ns1:table-cell>
            <ns2:p>Fishers</ns2:p>
          </ns1:table-cell>
          <ns1:table-cell>
            <ns2:p>IN</ns2:p>
          </ns1:table-cell>
          <ns1:table-cell>
            <ns2:p>1048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1.0</ns2:p>
          </ns1:table-cell>
          <ns1:table-cell>
            <ns2:p>Suffolk</ns2:p>
          </ns1:table-cell>
          <ns1:table-cell>
            <ns2:p>VA</ns2:p>
          </ns1:table-cell>
          <ns1:table-cell>
            <ns2:p>10469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2.0</ns2:p>
          </ns1:table-cell>
          <ns1:table-cell>
            <ns2:p>Lynn</ns2:p>
          </ns1:table-cell>
          <ns1:table-cell>
            <ns2:p>MA</ns2:p>
          </ns1:table-cell>
          <ns1:table-cell>
            <ns2:p>10423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3.0</ns2:p>
          </ns1:table-cell>
          <ns1:table-cell>
            <ns2:p>Vacaville</ns2:p>
          </ns1:table-cell>
          <ns1:table-cell>
            <ns2:p>CA</ns2:p>
          </ns1:table-cell>
          <ns1:table-cell>
            <ns2:p>10385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4.0</ns2:p>
          </ns1:table-cell>
          <ns1:table-cell>
            <ns2:p>San Mateo</ns2:p>
          </ns1:table-cell>
          <ns1:table-cell>
            <ns2:p>CA</ns2:p>
          </ns1:table-cell>
          <ns1:table-cell>
            <ns2:p>10333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5.0</ns2:p>
          </ns1:table-cell>
          <ns1:table-cell>
            <ns2:p>South Bend</ns2:p>
          </ns1:table-cell>
          <ns1:table-cell>
            <ns2:p>IN</ns2:p>
          </ns1:table-cell>
          <ns1:table-cell>
            <ns2:p>1032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6.0</ns2:p>
          </ns1:table-cell>
          <ns1:table-cell>
            <ns2:p>Quincy</ns2:p>
          </ns1:table-cell>
          <ns1:table-cell>
            <ns2:p>MA</ns2:p>
          </ns1:table-cell>
          <ns1:table-cell>
            <ns2:p>10317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7.0</ns2:p>
          </ns1:table-cell>
          <ns1:table-cell>
            <ns2:p>Burbank</ns2:p>
          </ns1:table-cell>
          <ns1:table-cell>
            <ns2:p>CA</ns2:p>
          </ns1:table-cell>
          <ns1:table-cell>
            <ns2:p>1029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8.0</ns2:p>
          </ns1:table-cell>
          <ns1:table-cell>
            <ns2:p>Hesperia</ns2:p>
          </ns1:table-cell>
          <ns1:table-cell>
            <ns2:p>CA</ns2:p>
          </ns1:table-cell>
          <ns1:table-cell>
            <ns2:p>10260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29.0</ns2:p>
          </ns1:table-cell>
          <ns1:table-cell>
            <ns2:p>Wichita Falls</ns2:p>
          </ns1:table-cell>
          <ns1:table-cell>
            <ns2:p>TX</ns2:p>
          </ns1:table-cell>
          <ns1:table-cell>
            <ns2:p>10195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0.0</ns2:p>
          </ns1:table-cell>
          <ns1:table-cell>
            <ns2:p>Tracy</ns2:p>
          </ns1:table-cell>
          <ns1:table-cell>
            <ns2:p>CA</ns2:p>
          </ns1:table-cell>
          <ns1:table-cell>
            <ns2:p>1019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1.0</ns2:p>
          </ns1:table-cell>
          <ns1:table-cell>
            <ns2:p>New Bedford</ns2:p>
          </ns1:table-cell>
          <ns1:table-cell>
            <ns2:p>MA</ns2:p>
          </ns1:table-cell>
          <ns1:table-cell>
            <ns2:p>1018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2.0</ns2:p>
          </ns1:table-cell>
          <ns1:table-cell>
            <ns2:p>El Cajon</ns2:p>
          </ns1:table-cell>
          <ns1:table-cell>
            <ns2:p>CA</ns2:p>
          </ns1:table-cell>
          <ns1:table-cell>
            <ns2:p>10175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3.0</ns2:p>
          </ns1:table-cell>
          <ns1:table-cell>
            <ns2:p>Albany</ns2:p>
          </ns1:table-cell>
          <ns1:table-cell>
            <ns2:p>NY</ns2:p>
          </ns1:table-cell>
          <ns1:table-cell>
            <ns2:p>10169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4.0</ns2:p>
          </ns1:table-cell>
          <ns1:table-cell>
            <ns2:p>Inglewood</ns2:p>
          </ns1:table-cell>
          <ns1:table-cell>
            <ns2:p>CA</ns2:p>
          </ns1:table-cell>
          <ns1:table-cell>
            <ns2:p>10166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5.0</ns2:p>
          </ns1:table-cell>
          <ns1:table-cell>
            <ns2:p>Boca Raton</ns2:p>
          </ns1:table-cell>
          <ns1:table-cell>
            <ns2:p>FL</ns2:p>
          </ns1:table-cell>
          <ns1:table-cell>
            <ns2:p>10158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6.0</ns2:p>
          </ns1:table-cell>
          <ns1:table-cell>
            <ns2:p>Fort Myers</ns2:p>
          </ns1:table-cell>
          <ns1:table-cell>
            <ns2:p>FL</ns2:p>
          </ns1:table-cell>
          <ns1:table-cell>
            <ns2:p>1015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7.0</ns2:p>
          </ns1:table-cell>
          <ns1:table-cell>
            <ns2:p>Daly City</ns2:p>
          </ns1:table-cell>
          <ns1:table-cell>
            <ns2:p>CA</ns2:p>
          </ns1:table-cell>
          <ns1:table-cell>
            <ns2:p>10126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8.0</ns2:p>
          </ns1:table-cell>
          <ns1:table-cell>
            <ns2:p>Avondale</ns2:p>
          </ns1:table-cell>
          <ns1:table-cell>
            <ns2:p>AZ</ns2:p>
          </ns1:table-cell>
          <ns1:table-cell>
            <ns2:p>1009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39.0</ns2:p>
          </ns1:table-cell>
          <ns1:table-cell>
            <ns2:p>San Angelo</ns2:p>
          </ns1:table-cell>
          <ns1:table-cell>
            <ns2:p>TX</ns2:p>
          </ns1:table-cell>
          <ns1:table-cell>
            <ns2:p>10064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0.0</ns2:p>
          </ns1:table-cell>
          <ns1:table-cell>
            <ns2:p>Edmond</ns2:p>
          </ns1:table-cell>
          <ns1:table-cell>
            <ns2:p>OK</ns2:p>
          </ns1:table-cell>
          <ns1:table-cell>
            <ns2:p>10047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1.0</ns2:p>
          </ns1:table-cell>
          <ns1:table-cell>
            <ns2:p>Davenport</ns2:p>
          </ns1:table-cell>
          <ns1:table-cell>
            <ns2:p>IA</ns2:p>
          </ns1:table-cell>
          <ns1:table-cell>
            <ns2:p>1003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2.0</ns2:p>
          </ns1:table-cell>
          <ns1:table-cell>
            <ns2:p>Deltona</ns2:p>
          </ns1:table-cell>
          <ns1:table-cell>
            <ns2:p>FL</ns2:p>
          </ns1:table-cell>
          <ns1:table-cell>
            <ns2:p>10026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3.0</ns2:p>
          </ns1:table-cell>
          <ns1:table-cell>
            <ns2:p>Longmont</ns2:p>
          </ns1:table-cell>
          <ns1:table-cell>
            <ns2:p>CO</ns2:p>
          </ns1:table-cell>
          <ns1:table-cell>
            <ns2:p>10010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4.0</ns2:p>
          </ns1:table-cell>
          <ns1:table-cell>
            <ns2:p>Federal Way</ns2:p>
          </ns1:table-cell>
          <ns1:table-cell>
            <ns2:p>WA</ns2:p>
          </ns1:table-cell>
          <ns1:table-cell>
            <ns2:p>9972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5.0</ns2:p>
          </ns1:table-cell>
          <ns1:table-cell>
            <ns2:p>Merced</ns2:p>
          </ns1:table-cell>
          <ns1:table-cell>
            <ns2:p>CA</ns2:p>
          </ns1:table-cell>
          <ns1:table-cell>
            <ns2:p>9972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6.0</ns2:p>
          </ns1:table-cell>
          <ns1:table-cell>
            <ns2:p>Kenosha</ns2:p>
          </ns1:table-cell>
          <ns1:table-cell>
            <ns2:p>WI</ns2:p>
          </ns1:table-cell>
          <ns1:table-cell>
            <ns2:p>9923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7.0</ns2:p>
          </ns1:table-cell>
          <ns1:table-cell>
            <ns2:p>Plantation</ns2:p>
          </ns1:table-cell>
          <ns1:table-cell>
            <ns2:p>FL</ns2:p>
          </ns1:table-cell>
          <ns1:table-cell>
            <ns2:p>991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8.0</ns2:p>
          </ns1:table-cell>
          <ns1:table-cell>
            <ns2:p>Roanoke</ns2:p>
          </ns1:table-cell>
          <ns1:table-cell>
            <ns2:p>VA</ns2:p>
          </ns1:table-cell>
          <ns1:table-cell>
            <ns2:p>991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49.0</ns2:p>
          </ns1:table-cell>
          <ns1:table-cell>
            <ns2:p>Sunrise</ns2:p>
          </ns1:table-cell>
          <ns1:table-cell>
            <ns2:p>FL</ns2:p>
          </ns1:table-cell>
          <ns1:table-cell>
            <ns2:p>9884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0.0</ns2:p>
          </ns1:table-cell>
          <ns1:table-cell>
            <ns2:p>Temple</ns2:p>
          </ns1:table-cell>
          <ns1:table-cell>
            <ns2:p>TX</ns2:p>
          </ns1:table-cell>
          <ns1:table-cell>
            <ns2:p>984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1.0</ns2:p>
          </ns1:table-cell>
          <ns1:table-cell>
            <ns2:p>Vista</ns2:p>
          </ns1:table-cell>
          <ns1:table-cell>
            <ns2:p>CA</ns2:p>
          </ns1:table-cell>
          <ns1:table-cell>
            <ns2:p>9827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2.0</ns2:p>
          </ns1:table-cell>
          <ns1:table-cell>
            <ns2:p>Beaverton</ns2:p>
          </ns1:table-cell>
          <ns1:table-cell>
            <ns2:p>OR</ns2:p>
          </ns1:table-cell>
          <ns1:table-cell>
            <ns2:p>978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3.0</ns2:p>
          </ns1:table-cell>
          <ns1:table-cell>
            <ns2:p>Yakima</ns2:p>
          </ns1:table-cell>
          <ns1:table-cell>
            <ns2:p>WA</ns2:p>
          </ns1:table-cell>
          <ns1:table-cell>
            <ns2:p>974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4.0</ns2:p>
          </ns1:table-cell>
          <ns1:table-cell>
            <ns2:p>Kirkland</ns2:p>
          </ns1:table-cell>
          <ns1:table-cell>
            <ns2:p>WA</ns2:p>
          </ns1:table-cell>
          <ns1:table-cell>
            <ns2:p>974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5.0</ns2:p>
          </ns1:table-cell>
          <ns1:table-cell>
            <ns2:p>Norwalk</ns2:p>
          </ns1:table-cell>
          <ns1:table-cell>
            <ns2:p>CA</ns2:p>
          </ns1:table-cell>
          <ns1:table-cell>
            <ns2:p>9710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6.0</ns2:p>
          </ns1:table-cell>
          <ns1:table-cell>
            <ns2:p>Chino</ns2:p>
          </ns1:table-cell>
          <ns1:table-cell>
            <ns2:p>CA</ns2:p>
          </ns1:table-cell>
          <ns1:table-cell>
            <ns2:p>9695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7.0</ns2:p>
          </ns1:table-cell>
          <ns1:table-cell>
            <ns2:p>Portsmouth</ns2:p>
          </ns1:table-cell>
          <ns1:table-cell>
            <ns2:p>VA</ns2:p>
          </ns1:table-cell>
          <ns1:table-cell>
            <ns2:p>9677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8.0</ns2:p>
          </ns1:table-cell>
          <ns1:table-cell>
            <ns2:p>Manteca</ns2:p>
          </ns1:table-cell>
          <ns1:table-cell>
            <ns2:p>CA</ns2:p>
          </ns1:table-cell>
          <ns1:table-cell>
            <ns2:p>9669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59.0</ns2:p>
          </ns1:table-cell>
          <ns1:table-cell>
            <ns2:p>North Port</ns2:p>
          </ns1:table-cell>
          <ns1:table-cell>
            <ns2:p>FL</ns2:p>
          </ns1:table-cell>
          <ns1:table-cell>
            <ns2:p>9655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0.0</ns2:p>
          </ns1:table-cell>
          <ns1:table-cell>
            <ns2:p>Greenville</ns2:p>
          </ns1:table-cell>
          <ns1:table-cell>
            <ns2:p>NC</ns2:p>
          </ns1:table-cell>
          <ns1:table-cell>
            <ns2:p>964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1.0</ns2:p>
          </ns1:table-cell>
          <ns1:table-cell>
            <ns2:p>Bellingham</ns2:p>
          </ns1:table-cell>
          <ns1:table-cell>
            <ns2:p>WA</ns2:p>
          </ns1:table-cell>
          <ns1:table-cell>
            <ns2:p>9639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2.0</ns2:p>
          </ns1:table-cell>
          <ns1:table-cell>
            <ns2:p>Lawrence</ns2:p>
          </ns1:table-cell>
          <ns1:table-cell>
            <ns2:p>KS</ns2:p>
          </ns1:table-cell>
          <ns1:table-cell>
            <ns2:p>9636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3.0</ns2:p>
          </ns1:table-cell>
          <ns1:table-cell>
            <ns2:p>O'Fallon</ns2:p>
          </ns1:table-cell>
          <ns1:table-cell>
            <ns2:p>MO</ns2:p>
          </ns1:table-cell>
          <ns1:table-cell>
            <ns2:p>961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4.0</ns2:p>
          </ns1:table-cell>
          <ns1:table-cell>
            <ns2:p>Reading</ns2:p>
          </ns1:table-cell>
          <ns1:table-cell>
            <ns2:p>PA</ns2:p>
          </ns1:table-cell>
          <ns1:table-cell>
            <ns2:p>958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5.0</ns2:p>
          </ns1:table-cell>
          <ns1:table-cell>
            <ns2:p>Mount Pleasant</ns2:p>
          </ns1:table-cell>
          <ns1:table-cell>
            <ns2:p>SC</ns2:p>
          </ns1:table-cell>
          <ns1:table-cell>
            <ns2:p>9546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6.0</ns2:p>
          </ns1:table-cell>
          <ns1:table-cell>
            <ns2:p>Lehi</ns2:p>
          </ns1:table-cell>
          <ns1:table-cell>
            <ns2:p>UT</ns2:p>
          </ns1:table-cell>
          <ns1:table-cell>
            <ns2:p>953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7.0</ns2:p>
          </ns1:table-cell>
          <ns1:table-cell>
            <ns2:p>Fall River</ns2:p>
          </ns1:table-cell>
          <ns1:table-cell>
            <ns2:p>MA</ns2:p>
          </ns1:table-cell>
          <ns1:table-cell>
            <ns2:p>9529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8.0</ns2:p>
          </ns1:table-cell>
          <ns1:table-cell>
            <ns2:p>Orem</ns2:p>
          </ns1:table-cell>
          <ns1:table-cell>
            <ns2:p>UT</ns2:p>
          </ns1:table-cell>
          <ns1:table-cell>
            <ns2:p>952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69.0</ns2:p>
          </ns1:table-cell>
          <ns1:table-cell>
            <ns2:p>San Marcos</ns2:p>
          </ns1:table-cell>
          <ns1:table-cell>
            <ns2:p>CA</ns2:p>
          </ns1:table-cell>
          <ns1:table-cell>
            <ns2:p>949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0.0</ns2:p>
          </ns1:table-cell>
          <ns1:table-cell>
            <ns2:p>Norwalk</ns2:p>
          </ns1:table-cell>
          <ns1:table-cell>
            <ns2:p>CT</ns2:p>
          </ns1:table-cell>
          <ns1:table-cell>
            <ns2:p>945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1.0</ns2:p>
          </ns1:table-cell>
          <ns1:table-cell>
            <ns2:p>Indio</ns2:p>
          </ns1:table-cell>
          <ns1:table-cell>
            <ns2:p>CA</ns2:p>
          </ns1:table-cell>
          <ns1:table-cell>
            <ns2:p>9426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2.0</ns2:p>
          </ns1:table-cell>
          <ns1:table-cell>
            <ns2:p>Redding</ns2:p>
          </ns1:table-cell>
          <ns1:table-cell>
            <ns2:p>CA</ns2:p>
          </ns1:table-cell>
          <ns1:table-cell>
            <ns2:p>940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3.0</ns2:p>
          </ns1:table-cell>
          <ns1:table-cell>
            <ns2:p>Hemet</ns2:p>
          </ns1:table-cell>
          <ns1:table-cell>
            <ns2:p>CA</ns2:p>
          </ns1:table-cell>
          <ns1:table-cell>
            <ns2:p>9364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4.0</ns2:p>
          </ns1:table-cell>
          <ns1:table-cell>
            <ns2:p>Hoover</ns2:p>
          </ns1:table-cell>
          <ns1:table-cell>
            <ns2:p>AL</ns2:p>
          </ns1:table-cell>
          <ns1:table-cell>
            <ns2:p>9355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5.0</ns2:p>
          </ns1:table-cell>
          <ns1:table-cell>
            <ns2:p>Asheville</ns2:p>
          </ns1:table-cell>
          <ns1:table-cell>
            <ns2:p>NC</ns2:p>
          </ns1:table-cell>
          <ns1:table-cell>
            <ns2:p>9352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6.0</ns2:p>
          </ns1:table-cell>
          <ns1:table-cell>
            <ns2:p>Livonia</ns2:p>
          </ns1:table-cell>
          <ns1:table-cell>
            <ns2:p>MI</ns2:p>
          </ns1:table-cell>
          <ns1:table-cell>
            <ns2:p>9260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7.0</ns2:p>
          </ns1:table-cell>
          <ns1:table-cell>
            <ns2:p>Nashua</ns2:p>
          </ns1:table-cell>
          <ns1:table-cell>
            <ns2:p>NH</ns2:p>
          </ns1:table-cell>
          <ns1:table-cell>
            <ns2:p>92435</ns2:p>
          </ns1:table-cell>
          <ns1:table-cell>
            <ns2:p>Fagundes Plumbing Heating AC</ns2:p>
          </ns1:table-cell>
          <ns1:table-cell>
            <ns2:p>(603) 605-1919</ns2:p>
          </ns1:table-cell>
          <ns1:table-cell>
            <ns2:p/>
          </ns1:table-cell>
          <ns1:table-cell>
            <ns2:p>https://www.afphpro.com/</ns2:p>
          </ns1:table-cell>
          <ns1:table-cell>
            <ns2:p>230 Amherst St Unit 103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8.0</ns2:p>
          </ns1:table-cell>
          <ns1:table-cell>
            <ns2:p>Sandy</ns2:p>
          </ns1:table-cell>
          <ns1:table-cell>
            <ns2:p>UT</ns2:p>
          </ns1:table-cell>
          <ns1:table-cell>
            <ns2:p>9238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79.0</ns2:p>
          </ns1:table-cell>
          <ns1:table-cell>
            <ns2:p>Frederick</ns2:p>
          </ns1:table-cell>
          <ns1:table-cell>
            <ns2:p>MD</ns2:p>
          </ns1:table-cell>
          <ns1:table-cell>
            <ns2:p>9205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0.0</ns2:p>
          </ns1:table-cell>
          <ns1:table-cell>
            <ns2:p>Bryan</ns2:p>
          </ns1:table-cell>
          <ns1:table-cell>
            <ns2:p>TX</ns2:p>
          </ns1:table-cell>
          <ns1:table-cell>
            <ns2:p>9199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1.0</ns2:p>
          </ns1:table-cell>
          <ns1:table-cell>
            <ns2:p>Folsom</ns2:p>
          </ns1:table-cell>
          <ns1:table-cell>
            <ns2:p>CA</ns2:p>
          </ns1:table-cell>
          <ns1:table-cell>
            <ns2:p>919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2.0</ns2:p>
          </ns1:table-cell>
          <ns1:table-cell>
            <ns2:p>Erie</ns2:p>
          </ns1:table-cell>
          <ns1:table-cell>
            <ns2:p>PA</ns2:p>
          </ns1:table-cell>
          <ns1:table-cell>
            <ns2:p>9183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3.0</ns2:p>
          </ns1:table-cell>
          <ns1:table-cell>
            <ns2:p>Trenton</ns2:p>
          </ns1:table-cell>
          <ns1:table-cell>
            <ns2:p>NJ</ns2:p>
          </ns1:table-cell>
          <ns1:table-cell>
            <ns2:p>9150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4.0</ns2:p>
          </ns1:table-cell>
          <ns1:table-cell>
            <ns2:p>Roswell</ns2:p>
          </ns1:table-cell>
          <ns1:table-cell>
            <ns2:p>GA</ns2:p>
          </ns1:table-cell>
          <ns1:table-cell>
            <ns2:p>9150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5.0</ns2:p>
          </ns1:table-cell>
          <ns1:table-cell>
            <ns2:p>Champaign</ns2:p>
          </ns1:table-cell>
          <ns1:table-cell>
            <ns2:p>IL</ns2:p>
          </ns1:table-cell>
          <ns1:table-cell>
            <ns2:p>9119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6.0</ns2:p>
          </ns1:table-cell>
          <ns1:table-cell>
            <ns2:p>Leander</ns2:p>
          </ns1:table-cell>
          <ns1:table-cell>
            <ns2:p>TX</ns2:p>
          </ns1:table-cell>
          <ns1:table-cell>
            <ns2:p>911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7.0</ns2:p>
          </ns1:table-cell>
          <ns1:table-cell>
            <ns2:p>Clifton</ns2:p>
          </ns1:table-cell>
          <ns1:table-cell>
            <ns2:p>NJ</ns2:p>
          </ns1:table-cell>
          <ns1:table-cell>
            <ns2:p>911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8.0</ns2:p>
          </ns1:table-cell>
          <ns1:table-cell>
            <ns2:p>Fort Smith</ns2:p>
          </ns1:table-cell>
          <ns1:table-cell>
            <ns2:p>AR</ns2:p>
          </ns1:table-cell>
          <ns1:table-cell>
            <ns2:p>9085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89.0</ns2:p>
          </ns1:table-cell>
          <ns1:table-cell>
            <ns2:p>Carson</ns2:p>
          </ns1:table-cell>
          <ns1:table-cell>
            <ns2:p>CA</ns2:p>
          </ns1:table-cell>
          <ns1:table-cell>
            <ns2:p>908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0.0</ns2:p>
          </ns1:table-cell>
          <ns1:table-cell>
            <ns2:p>Newton</ns2:p>
          </ns1:table-cell>
          <ns1:table-cell>
            <ns2:p>MA</ns2:p>
          </ns1:table-cell>
          <ns1:table-cell>
            <ns2:p>907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1.0</ns2:p>
          </ns1:table-cell>
          <ns1:table-cell>
            <ns2:p>Springdale</ns2:p>
          </ns1:table-cell>
          <ns1:table-cell>
            <ns2:p>AR</ns2:p>
          </ns1:table-cell>
          <ns1:table-cell>
            <ns2:p>90685</ns2:p>
          </ns1:table-cell>
          <ns1:table-cell>
            <ns2:p>A Plus Plumbing of NWA</ns2:p>
          </ns1:table-cell>
          <ns1:table-cell>
            <ns2:p>(479) 408-4845</ns2:p>
          </ns1:table-cell>
          <ns1:table-cell>
            <ns2:p/>
          </ns1:table-cell>
          <ns1:table-cell>
            <ns2:p>https://aplusplumbingofnwa.com/</ns2:p>
          </ns1:table-cell>
          <ns1:table-cell>
            <ns2:p>284 Ranalli Ave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2.0</ns2:p>
          </ns1:table-cell>
          <ns1:table-cell>
            <ns2:p>Lawton</ns2:p>
          </ns1:table-cell>
          <ns1:table-cell>
            <ns2:p>OK</ns2:p>
          </ns1:table-cell>
          <ns1:table-cell>
            <ns2:p>9050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3.0</ns2:p>
          </ns1:table-cell>
          <ns1:table-cell>
            <ns2:p>Compton</ns2:p>
          </ns1:table-cell>
          <ns1:table-cell>
            <ns2:p>CA</ns2:p>
          </ns1:table-cell>
          <ns1:table-cell>
            <ns2:p>905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4.0</ns2:p>
          </ns1:table-cell>
          <ns1:table-cell>
            <ns2:p>Mission Viejo</ns2:p>
          </ns1:table-cell>
          <ns1:table-cell>
            <ns2:p>CA</ns2:p>
          </ns1:table-cell>
          <ns1:table-cell>
            <ns2:p>904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5.0</ns2:p>
          </ns1:table-cell>
          <ns1:table-cell>
            <ns2:p>Franklin</ns2:p>
          </ns1:table-cell>
          <ns1:table-cell>
            <ns2:p>TN</ns2:p>
          </ns1:table-cell>
          <ns1:table-cell>
            <ns2:p>9022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6.0</ns2:p>
          </ns1:table-cell>
          <ns1:table-cell>
            <ns2:p>Santa Monica</ns2:p>
          </ns1:table-cell>
          <ns1:table-cell>
            <ns2:p>CA</ns2:p>
          </ns1:table-cell>
          <ns1:table-cell>
            <ns2:p>9008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7.0</ns2:p>
          </ns1:table-cell>
          <ns1:table-cell>
            <ns2:p>South Gate</ns2:p>
          </ns1:table-cell>
          <ns1:table-cell>
            <ns2:p>CA</ns2:p>
          </ns1:table-cell>
          <ns1:table-cell>
            <ns2:p>900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8.0</ns2:p>
          </ns1:table-cell>
          <ns1:table-cell>
            <ns2:p>Santa Fe</ns2:p>
          </ns1:table-cell>
          <ns1:table-cell>
            <ns2:p>NM</ns2:p>
          </ns1:table-cell>
          <ns1:table-cell>
            <ns2:p>89837</ns2:p>
          </ns1:table-cell>
          <ns1:table-cell>
            <ns2:p>James Plumbing and Heating</ns2:p>
          </ns1:table-cell>
          <ns1:table-cell>
            <ns2:p>(505) 473-7148</ns2:p>
          </ns1:table-cell>
          <ns1:table-cell>
            <ns2:p/>
          </ns1:table-cell>
          <ns1:table-cell>
            <ns2:p>jamesplumbingandheating.com</ns2:p>
          </ns1:table-cell>
          <ns1:table-cell>
            <ns2:p>1159 Coriander Rd, Santa Fe, NM</ns2:p>
          </ns1:table-cell>
          <ns1:table-cell>
            <ns2:p>4.8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399.0</ns2:p>
          </ns1:table-cell>
          <ns1:table-cell>
            <ns2:p>Queen Creek</ns2:p>
          </ns1:table-cell>
          <ns1:table-cell>
            <ns2:p>AZ</ns2:p>
          </ns1:table-cell>
          <ns1:table-cell>
            <ns2:p>8977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0.0</ns2:p>
          </ns1:table-cell>
          <ns1:table-cell>
            <ns2:p>Ogden</ns2:p>
          </ns1:table-cell>
          <ns1:table-cell>
            <ns2:p>UT</ns2:p>
          </ns1:table-cell>
          <ns1:table-cell>
            <ns2:p>895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1.0</ns2:p>
          </ns1:table-cell>
          <ns1:table-cell>
            <ns2:p>Deerfield Beach</ns2:p>
          </ns1:table-cell>
          <ns1:table-cell>
            <ns2:p>FL</ns2:p>
          </ns1:table-cell>
          <ns1:table-cell>
            <ns2:p>8933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2.0</ns2:p>
          </ns1:table-cell>
          <ns1:table-cell>
            <ns2:p>Lawrence</ns2:p>
          </ns1:table-cell>
          <ns1:table-cell>
            <ns2:p>MA</ns2:p>
          </ns1:table-cell>
          <ns1:table-cell>
            <ns2:p>893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3.0</ns2:p>
          </ns1:table-cell>
          <ns1:table-cell>
            <ns2:p>Bloomington</ns2:p>
          </ns1:table-cell>
          <ns1:table-cell>
            <ns2:p>MN</ns2:p>
          </ns1:table-cell>
          <ns1:table-cell>
            <ns2:p>890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4.0</ns2:p>
          </ns1:table-cell>
          <ns1:table-cell>
            <ns2:p>Danbury</ns2:p>
          </ns1:table-cell>
          <ns1:table-cell>
            <ns2:p>CT</ns2:p>
          </ns1:table-cell>
          <ns1:table-cell>
            <ns2:p>890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5.0</ns2:p>
          </ns1:table-cell>
          <ns1:table-cell>
            <ns2:p>Mission</ns2:p>
          </ns1:table-cell>
          <ns1:table-cell>
            <ns2:p>TX</ns2:p>
          </ns1:table-cell>
          <ns1:table-cell>
            <ns2:p>889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6.0</ns2:p>
          </ns1:table-cell>
          <ns1:table-cell>
            <ns2:p>Westminster</ns2:p>
          </ns1:table-cell>
          <ns1:table-cell>
            <ns2:p>CA</ns2:p>
          </ns1:table-cell>
          <ns1:table-cell>
            <ns2:p>8896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7.0</ns2:p>
          </ns1:table-cell>
          <ns1:table-cell>
            <ns2:p>Troy</ns2:p>
          </ns1:table-cell>
          <ns1:table-cell>
            <ns2:p>MI</ns2:p>
          </ns1:table-cell>
          <ns1:table-cell>
            <ns2:p>887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8.0</ns2:p>
          </ns1:table-cell>
          <ns1:table-cell>
            <ns2:p>Daytona Beach</ns2:p>
          </ns1:table-cell>
          <ns1:table-cell>
            <ns2:p>FL</ns2:p>
          </ns1:table-cell>
          <ns1:table-cell>
            <ns2:p>884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09.0</ns2:p>
          </ns1:table-cell>
          <ns1:table-cell>
            <ns2:p>Kennewick</ns2:p>
          </ns1:table-cell>
          <ns1:table-cell>
            <ns2:p>WA</ns2:p>
          </ns1:table-cell>
          <ns1:table-cell>
            <ns2:p>8836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0.0</ns2:p>
          </ns1:table-cell>
          <ns1:table-cell>
            <ns2:p>Duluth</ns2:p>
          </ns1:table-cell>
          <ns1:table-cell>
            <ns2:p>MN</ns2:p>
          </ns1:table-cell>
          <ns1:table-cell>
            <ns2:p>883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1.0</ns2:p>
          </ns1:table-cell>
          <ns1:table-cell>
            <ns2:p>Waukegan</ns2:p>
          </ns1:table-cell>
          <ns1:table-cell>
            <ns2:p>IL</ns2:p>
          </ns1:table-cell>
          <ns1:table-cell>
            <ns2:p>8794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2.0</ns2:p>
          </ns1:table-cell>
          <ns1:table-cell>
            <ns2:p>Warner Robins</ns2:p>
          </ns1:table-cell>
          <ns1:table-cell>
            <ns2:p>GA</ns2:p>
          </ns1:table-cell>
          <ns1:table-cell>
            <ns2:p>8776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3.0</ns2:p>
          </ns1:table-cell>
          <ns1:table-cell>
            <ns2:p>South Jordan</ns2:p>
          </ns1:table-cell>
          <ns1:table-cell>
            <ns2:p>UT</ns2:p>
          </ns1:table-cell>
          <ns1:table-cell>
            <ns2:p>876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4.0</ns2:p>
          </ns1:table-cell>
          <ns1:table-cell>
            <ns2:p>Rancho Cordova</ns2:p>
          </ns1:table-cell>
          <ns1:table-cell>
            <ns2:p>CA</ns2:p>
          </ns1:table-cell>
          <ns1:table-cell>
            <ns2:p>8755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5.0</ns2:p>
          </ns1:table-cell>
          <ns1:table-cell>
            <ns2:p>Melbourne</ns2:p>
          </ns1:table-cell>
          <ns1:table-cell>
            <ns2:p>FL</ns2:p>
          </ns1:table-cell>
          <ns1:table-cell>
            <ns2:p>8709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6.0</ns2:p>
          </ns1:table-cell>
          <ns1:table-cell>
            <ns2:p>Gastonia</ns2:p>
          </ns1:table-cell>
          <ns1:table-cell>
            <ns2:p>NC</ns2:p>
          </ns1:table-cell>
          <ns1:table-cell>
            <ns2:p>8706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7.0</ns2:p>
          </ns1:table-cell>
          <ns1:table-cell>
            <ns2:p>Baytown</ns2:p>
          </ns1:table-cell>
          <ns1:table-cell>
            <ns2:p>TX</ns2:p>
          </ns1:table-cell>
          <ns1:table-cell>
            <ns2:p>8656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8.0</ns2:p>
          </ns1:table-cell>
          <ns1:table-cell>
            <ns2:p>Medford</ns2:p>
          </ns1:table-cell>
          <ns1:table-cell>
            <ns2:p>OR</ns2:p>
          </ns1:table-cell>
          <ns1:table-cell>
            <ns2:p>8649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19.0</ns2:p>
          </ns1:table-cell>
          <ns1:table-cell>
            <ns2:p>Santa Barbara</ns2:p>
          </ns1:table-cell>
          <ns1:table-cell>
            <ns2:p>CA</ns2:p>
          </ns1:table-cell>
          <ns1:table-cell>
            <ns2:p>8642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0.0</ns2:p>
          </ns1:table-cell>
          <ns1:table-cell>
            <ns2:p>Sioux City</ns2:p>
          </ns1:table-cell>
          <ns1:table-cell>
            <ns2:p>IA</ns2:p>
          </ns1:table-cell>
          <ns1:table-cell>
            <ns2:p>8635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1.0</ns2:p>
          </ns1:table-cell>
          <ns1:table-cell>
            <ns2:p>Citrus Heights</ns2:p>
          </ns1:table-cell>
          <ns1:table-cell>
            <ns2:p>CA</ns2:p>
          </ns1:table-cell>
          <ns1:table-cell>
            <ns2:p>8634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2.0</ns2:p>
          </ns1:table-cell>
          <ns1:table-cell>
            <ns2:p>Lake Forest</ns2:p>
          </ns1:table-cell>
          <ns1:table-cell>
            <ns2:p>CA</ns2:p>
          </ns1:table-cell>
          <ns1:table-cell>
            <ns2:p>863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3.0</ns2:p>
          </ns1:table-cell>
          <ns1:table-cell>
            <ns2:p>Auburn</ns2:p>
          </ns1:table-cell>
          <ns1:table-cell>
            <ns2:p>WA</ns2:p>
          </ns1:table-cell>
          <ns1:table-cell>
            <ns2:p>863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4.0</ns2:p>
          </ns1:table-cell>
          <ns1:table-cell>
            <ns2:p>Homestead</ns2:p>
          </ns1:table-cell>
          <ns1:table-cell>
            <ns2:p>FL</ns2:p>
          </ns1:table-cell>
          <ns1:table-cell>
            <ns2:p>862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5.0</ns2:p>
          </ns1:table-cell>
          <ns1:table-cell>
            <ns2:p>San Ramon</ns2:p>
          </ns1:table-cell>
          <ns1:table-cell>
            <ns2:p>CA</ns2:p>
          </ns1:table-cell>
          <ns1:table-cell>
            <ns2:p>8620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6.0</ns2:p>
          </ns1:table-cell>
          <ns1:table-cell>
            <ns2:p>New Rochelle</ns2:p>
          </ns1:table-cell>
          <ns1:table-cell>
            <ns2:p>NY</ns2:p>
          </ns1:table-cell>
          <ns1:table-cell>
            <ns2:p>8586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7.0</ns2:p>
          </ns1:table-cell>
          <ns1:table-cell>
            <ns2:p>Whittier</ns2:p>
          </ns1:table-cell>
          <ns1:table-cell>
            <ns2:p>CA</ns2:p>
          </ns1:table-cell>
          <ns1:table-cell>
            <ns2:p>8581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8.0</ns2:p>
          </ns1:table-cell>
          <ns1:table-cell>
            <ns2:p>Kissimmee</ns2:p>
          </ns1:table-cell>
          <ns1:table-cell>
            <ns2:p>FL</ns2:p>
          </ns1:table-cell>
          <ns1:table-cell>
            <ns2:p>8559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29.0</ns2:p>
          </ns1:table-cell>
          <ns1:table-cell>
            <ns2:p>Mountain View</ns2:p>
          </ns1:table-cell>
          <ns1:table-cell>
            <ns2:p>CA</ns2:p>
          </ns1:table-cell>
          <ns1:table-cell>
            <ns2:p>8543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0.0</ns2:p>
          </ns1:table-cell>
          <ns1:table-cell>
            <ns2:p>San Leandro</ns2:p>
          </ns1:table-cell>
          <ns1:table-cell>
            <ns2:p>CA</ns2:p>
          </ns1:table-cell>
          <ns1:table-cell>
            <ns2:p>8535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1.0</ns2:p>
          </ns1:table-cell>
          <ns1:table-cell>
            <ns2:p>Layton</ns2:p>
          </ns1:table-cell>
          <ns1:table-cell>
            <ns2:p>UT</ns2:p>
          </ns1:table-cell>
          <ns1:table-cell>
            <ns2:p>853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2.0</ns2:p>
          </ns1:table-cell>
          <ns1:table-cell>
            <ns2:p>Auburn</ns2:p>
          </ns1:table-cell>
          <ns1:table-cell>
            <ns2:p>AL</ns2:p>
          </ns1:table-cell>
          <ns1:table-cell>
            <ns2:p>851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3.0</ns2:p>
          </ns1:table-cell>
          <ns1:table-cell>
            <ns2:p>Cranston</ns2:p>
          </ns1:table-cell>
          <ns1:table-cell>
            <ns2:p>RI</ns2:p>
          </ns1:table-cell>
          <ns1:table-cell>
            <ns2:p>8464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4.0</ns2:p>
          </ns1:table-cell>
          <ns1:table-cell>
            <ns2:p>Mansfield</ns2:p>
          </ns1:table-cell>
          <ns1:table-cell>
            <ns2:p>TX</ns2:p>
          </ns1:table-cell>
          <ns1:table-cell>
            <ns2:p>844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5.0</ns2:p>
          </ns1:table-cell>
          <ns1:table-cell>
            <ns2:p>Somerville</ns2:p>
          </ns1:table-cell>
          <ns1:table-cell>
            <ns2:p>MA</ns2:p>
          </ns1:table-cell>
          <ns1:table-cell>
            <ns2:p>842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6.0</ns2:p>
          </ns1:table-cell>
          <ns1:table-cell>
            <ns2:p>Warwick</ns2:p>
          </ns1:table-cell>
          <ns1:table-cell>
            <ns2:p>RI</ns2:p>
          </ns1:table-cell>
          <ns1:table-cell>
            <ns2:p>8418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7.0</ns2:p>
          </ns1:table-cell>
          <ns1:table-cell>
            <ns2:p>Castle Rock</ns2:p>
          </ns1:table-cell>
          <ns1:table-cell>
            <ns2:p>CO</ns2:p>
          </ns1:table-cell>
          <ns1:table-cell>
            <ns2:p>8381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8.0</ns2:p>
          </ns1:table-cell>
          <ns1:table-cell>
            <ns2:p>Brooklyn Park</ns2:p>
          </ns1:table-cell>
          <ns1:table-cell>
            <ns2:p>MN</ns2:p>
          </ns1:table-cell>
          <ns1:table-cell>
            <ns2:p>835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39.0</ns2:p>
          </ns1:table-cell>
          <ns1:table-cell>
            <ns2:p>Livermore</ns2:p>
          </ns1:table-cell>
          <ns1:table-cell>
            <ns2:p>CA</ns2:p>
          </ns1:table-cell>
          <ns1:table-cell>
            <ns2:p>8345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0.0</ns2:p>
          </ns1:table-cell>
          <ns1:table-cell>
            <ns2:p>Bloomington</ns2:p>
          </ns1:table-cell>
          <ns1:table-cell>
            <ns2:p>IN</ns2:p>
          </ns1:table-cell>
          <ns1:table-cell>
            <ns2:p>833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1.0</ns2:p>
          </ns1:table-cell>
          <ns1:table-cell>
            <ns2:p>Jonesboro</ns2:p>
          </ns1:table-cell>
          <ns1:table-cell>
            <ns2:p>AR</ns2:p>
          </ns1:table-cell>
          <ns1:table-cell>
            <ns2:p>8329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2.0</ns2:p>
          </ns1:table-cell>
          <ns1:table-cell>
            <ns2:p>Farmington Hills</ns2:p>
          </ns1:table-cell>
          <ns1:table-cell>
            <ns2:p>MI</ns2:p>
          </ns1:table-cell>
          <ns1:table-cell>
            <ns2:p>8329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3.0</ns2:p>
          </ns1:table-cell>
          <ns1:table-cell>
            <ns2:p>Perris</ns2:p>
          </ns1:table-cell>
          <ns1:table-cell>
            <ns2:p>CA</ns2:p>
          </ns1:table-cell>
          <ns1:table-cell>
            <ns2:p>8323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4.0</ns2:p>
          </ns1:table-cell>
          <ns1:table-cell>
            <ns2:p>Longview</ns2:p>
          </ns1:table-cell>
          <ns1:table-cell>
            <ns2:p>TX</ns2:p>
          </ns1:table-cell>
          <ns1:table-cell>
            <ns2:p>8323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5.0</ns2:p>
          </ns1:table-cell>
          <ns1:table-cell>
            <ns2:p>Pasco</ns2:p>
          </ns1:table-cell>
          <ns1:table-cell>
            <ns2:p>WA</ns2:p>
          </ns1:table-cell>
          <ns1:table-cell>
            <ns2:p>8284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6.0</ns2:p>
          </ns1:table-cell>
          <ns1:table-cell>
            <ns2:p>Hawthorne</ns2:p>
          </ns1:table-cell>
          <ns1:table-cell>
            <ns2:p>CA</ns2:p>
          </ns1:table-cell>
          <ns1:table-cell>
            <ns2:p>827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7.0</ns2:p>
          </ns1:table-cell>
          <ns1:table-cell>
            <ns2:p>Lake Charles</ns2:p>
          </ns1:table-cell>
          <ns1:table-cell>
            <ns2:p>LA</ns2:p>
          </ns1:table-cell>
          <ns1:table-cell>
            <ns2:p>8267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8.0</ns2:p>
          </ns1:table-cell>
          <ns1:table-cell>
            <ns2:p>Redmond</ns2:p>
          </ns1:table-cell>
          <ns1:table-cell>
            <ns2:p>WA</ns2:p>
          </ns1:table-cell>
          <ns1:table-cell>
            <ns2:p>8250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49.0</ns2:p>
          </ns1:table-cell>
          <ns1:table-cell>
            <ns2:p>Boynton Beach</ns2:p>
          </ns1:table-cell>
          <ns1:table-cell>
            <ns2:p>FL</ns2:p>
          </ns1:table-cell>
          <ns1:table-cell>
            <ns2:p>8239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0.0</ns2:p>
          </ns1:table-cell>
          <ns1:table-cell>
            <ns2:p>Westland</ns2:p>
          </ns1:table-cell>
          <ns1:table-cell>
            <ns2:p>MI</ns2:p>
          </ns1:table-cell>
          <ns1:table-cell>
            <ns2:p>823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1.0</ns2:p>
          </ns1:table-cell>
          <ns1:table-cell>
            <ns2:p>Redwood City</ns2:p>
          </ns1:table-cell>
          <ns1:table-cell>
            <ns2:p>CA</ns2:p>
          </ns1:table-cell>
          <ns1:table-cell>
            <ns2:p>8217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2.0</ns2:p>
          </ns1:table-cell>
          <ns1:table-cell>
            <ns2:p>Newport Beach</ns2:p>
          </ns1:table-cell>
          <ns1:table-cell>
            <ns2:p>CA</ns2:p>
          </ns1:table-cell>
          <ns1:table-cell>
            <ns2:p>8197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3.0</ns2:p>
          </ns1:table-cell>
          <ns1:table-cell>
            <ns2:p>Cicero</ns2:p>
          </ns1:table-cell>
          <ns1:table-cell>
            <ns2:p>IL</ns2:p>
          </ns1:table-cell>
          <ns1:table-cell>
            <ns2:p>818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4.0</ns2:p>
          </ns1:table-cell>
          <ns1:table-cell>
            <ns2:p>Buena Park</ns2:p>
          </ns1:table-cell>
          <ns1:table-cell>
            <ns2:p>CA</ns2:p>
          </ns1:table-cell>
          <ns1:table-cell>
            <ns2:p>817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5.0</ns2:p>
          </ns1:table-cell>
          <ns1:table-cell>
            <ns2:p>Doral</ns2:p>
          </ns1:table-cell>
          <ns1:table-cell>
            <ns2:p>FL</ns2:p>
          </ns1:table-cell>
          <ns1:table-cell>
            <ns2:p>816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6.0</ns2:p>
          </ns1:table-cell>
          <ns1:table-cell>
            <ns2:p>Miami Beach</ns2:p>
          </ns1:table-cell>
          <ns1:table-cell>
            <ns2:p>FL</ns2:p>
          </ns1:table-cell>
          <ns1:table-cell>
            <ns2:p>8159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7.0</ns2:p>
          </ns1:table-cell>
          <ns1:table-cell>
            <ns2:p>Woodbury</ns2:p>
          </ns1:table-cell>
          <ns1:table-cell>
            <ns2:p>MN</ns2:p>
          </ns1:table-cell>
          <ns1:table-cell>
            <ns2:p>815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58.0</ns2:p>
          </ns1:table-cell>
          <ns1:table-cell>
            <ns2:p>Loveland</ns2:p>
          </ns1:table-cell>
          <ns1:table-cell>
            <ns2:p>CO</ns2:p>
          </ns1:table-cell>
          <ns1:table-cell>
            <ns2:p>81387</ns2:p>
          </ns1:table-cell>
          <ns1:table-cell>
            <ns2:p>Loveland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Loveland, CO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>459.0</ns2:p>
          </ns1:table-cell>
          <ns1:table-cell>
            <ns2:p>Lynchburg</ns2:p>
          </ns1:table-cell>
          <ns1:table-cell>
            <ns2:p>VA</ns2:p>
          </ns1:table-cell>
          <ns1:table-cell>
            <ns2:p>8134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0.0</ns2:p>
          </ns1:table-cell>
          <ns1:table-cell>
            <ns2:p>Pharr</ns2:p>
          </ns1:table-cell>
          <ns1:table-cell>
            <ns2:p>TX</ns2:p>
          </ns1:table-cell>
          <ns1:table-cell>
            <ns2:p>808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1.0</ns2:p>
          </ns1:table-cell>
          <ns1:table-cell>
            <ns2:p>Largo</ns2:p>
          </ns1:table-cell>
          <ns1:table-cell>
            <ns2:p>FL</ns2:p>
          </ns1:table-cell>
          <ns1:table-cell>
            <ns2:p>8069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2.0</ns2:p>
          </ns1:table-cell>
          <ns1:table-cell>
            <ns2:p>Rapid City</ns2:p>
          </ns1:table-cell>
          <ns1:table-cell>
            <ns2:p>SD</ns2:p>
          </ns1:table-cell>
          <ns1:table-cell>
            <ns2:p>80589</ns2:p>
          </ns1:table-cell>
          <ns1:table-cell>
            <ns2:p>Loyal Plumbing Heating and Cooling</ns2:p>
          </ns1:table-cell>
          <ns1:table-cell>
            <ns2:p>(605) 315-3683</ns2:p>
          </ns1:table-cell>
          <ns1:table-cell>
            <ns2:p/>
          </ns1:table-cell>
          <ns1:table-cell>
            <ns2:p>https://www.loyalplumbing.com/</ns2:p>
          </ns1:table-cell>
          <ns1:table-cell>
            <ns2:p>814 E Omaha St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3.0</ns2:p>
          </ns1:table-cell>
          <ns1:table-cell>
            <ns2:p>Apex</ns2:p>
          </ns1:table-cell>
          <ns1:table-cell>
            <ns2:p>NC</ns2:p>
          </ns1:table-cell>
          <ns1:table-cell>
            <ns2:p>804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4.0</ns2:p>
          </ns1:table-cell>
          <ns1:table-cell>
            <ns2:p>Johns Creek</ns2:p>
          </ns1:table-cell>
          <ns1:table-cell>
            <ns2:p>GA</ns2:p>
          </ns1:table-cell>
          <ns1:table-cell>
            <ns2:p>804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5.0</ns2:p>
          </ns1:table-cell>
          <ns1:table-cell>
            <ns2:p>Alhambra</ns2:p>
          </ns1:table-cell>
          <ns1:table-cell>
            <ns2:p>CA</ns2:p>
          </ns1:table-cell>
          <ns1:table-cell>
            <ns2:p>798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6.0</ns2:p>
          </ns1:table-cell>
          <ns1:table-cell>
            <ns2:p>Bethlehem</ns2:p>
          </ns1:table-cell>
          <ns1:table-cell>
            <ns2:p>PA</ns2:p>
          </ns1:table-cell>
          <ns1:table-cell>
            <ns2:p>796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7.0</ns2:p>
          </ns1:table-cell>
          <ns1:table-cell>
            <ns2:p>Flower Mound</ns2:p>
          </ns1:table-cell>
          <ns1:table-cell>
            <ns2:p>TX</ns2:p>
          </ns1:table-cell>
          <ns1:table-cell>
            <ns2:p>7954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8.0</ns2:p>
          </ns1:table-cell>
          <ns1:table-cell>
            <ns2:p>Upland</ns2:p>
          </ns1:table-cell>
          <ns1:table-cell>
            <ns2:p>CA</ns2:p>
          </ns1:table-cell>
          <ns1:table-cell>
            <ns2:p>7944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69.0</ns2:p>
          </ns1:table-cell>
          <ns1:table-cell>
            <ns2:p>Flint</ns2:p>
          </ns1:table-cell>
          <ns1:table-cell>
            <ns2:p>MI</ns2:p>
          </ns1:table-cell>
          <ns1:table-cell>
            <ns2:p>7930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0.0</ns2:p>
          </ns1:table-cell>
          <ns1:table-cell>
            <ns2:p>Lakeville</ns2:p>
          </ns1:table-cell>
          <ns1:table-cell>
            <ns2:p>MN</ns2:p>
          </ns1:table-cell>
          <ns1:table-cell>
            <ns2:p>7927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1.0</ns2:p>
          </ns1:table-cell>
          <ns1:table-cell>
            <ns2:p>Broomfield</ns2:p>
          </ns1:table-cell>
          <ns1:table-cell>
            <ns2:p>CO</ns2:p>
          </ns1:table-cell>
          <ns1:table-cell>
            <ns2:p>7917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2.0</ns2:p>
          </ns1:table-cell>
          <ns1:table-cell>
            <ns2:p>Cedar Park</ns2:p>
          </ns1:table-cell>
          <ns1:table-cell>
            <ns2:p>TX</ns2:p>
          </ns1:table-cell>
          <ns1:table-cell>
            <ns2:p>790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3.0</ns2:p>
          </ns1:table-cell>
          <ns1:table-cell>
            <ns2:p>Plymouth</ns2:p>
          </ns1:table-cell>
          <ns1:table-cell>
            <ns2:p>MN</ns2:p>
          </ns1:table-cell>
          <ns1:table-cell>
            <ns2:p>789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4.0</ns2:p>
          </ns1:table-cell>
          <ns1:table-cell>
            <ns2:p>Missoula</ns2:p>
          </ns1:table-cell>
          <ns1:table-cell>
            <ns2:p>MT</ns2:p>
          </ns1:table-cell>
          <ns1:table-cell>
            <ns2:p>78903</ns2:p>
          </ns1:table-cell>
          <ns1:table-cell>
            <ns2:p>Plumb-Tech Plumbing, Heating &amp; Drain Missoula</ns2:p>
          </ns1:table-cell>
          <ns1:table-cell>
            <ns2:p>(406) 233-0662</ns2:p>
          </ns1:table-cell>
          <ns1:table-cell>
            <ns2:p/>
          </ns1:table-cell>
          <ns1:table-cell>
            <ns2:p>https://plumbtechmt.com/</ns2:p>
          </ns1:table-cell>
          <ns1:table-cell>
            <ns2:p>1530 Livingston Ave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5.0</ns2:p>
          </ns1:table-cell>
          <ns1:table-cell>
            <ns2:p>Mableton</ns2:p>
          </ns1:table-cell>
          <ns1:table-cell>
            <ns2:p>GA</ns2:p>
          </ns1:table-cell>
          <ns1:table-cell>
            <ns2:p>788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6.0</ns2:p>
          </ns1:table-cell>
          <ns1:table-cell>
            <ns2:p>Bloomington</ns2:p>
          </ns1:table-cell>
          <ns1:table-cell>
            <ns2:p>IL</ns2:p>
          </ns1:table-cell>
          <ns1:table-cell>
            <ns2:p>7880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7.0</ns2:p>
          </ns1:table-cell>
          <ns1:table-cell>
            <ns2:p>Milpitas</ns2:p>
          </ns1:table-cell>
          <ns1:table-cell>
            <ns2:p>CA</ns2:p>
          </ns1:table-cell>
          <ns1:table-cell>
            <ns2:p>7859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8.0</ns2:p>
          </ns1:table-cell>
          <ns1:table-cell>
            <ns2:p>Wyoming</ns2:p>
          </ns1:table-cell>
          <ns1:table-cell>
            <ns2:p>MI</ns2:p>
          </ns1:table-cell>
          <ns1:table-cell>
            <ns2:p>785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79.0</ns2:p>
          </ns1:table-cell>
          <ns1:table-cell>
            <ns2:p>Parma</ns2:p>
          </ns1:table-cell>
          <ns1:table-cell>
            <ns2:p>OH</ns2:p>
          </ns1:table-cell>
          <ns1:table-cell>
            <ns2:p>785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0.0</ns2:p>
          </ns1:table-cell>
          <ns1:table-cell>
            <ns2:p>St. George</ns2:p>
          </ns1:table-cell>
          <ns1:table-cell>
            <ns2:p>LA</ns2:p>
          </ns1:table-cell>
          <ns1:table-cell>
            <ns2:p>7853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1.0</ns2:p>
          </ns1:table-cell>
          <ns1:table-cell>
            <ns2:p>Bowling Green</ns2:p>
          </ns1:table-cell>
          <ns1:table-cell>
            <ns2:p>KY</ns2:p>
          </ns1:table-cell>
          <ns1:table-cell>
            <ns2:p>7850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2.0</ns2:p>
          </ns1:table-cell>
          <ns1:table-cell>
            <ns2:p>Maricopa</ns2:p>
          </ns1:table-cell>
          <ns1:table-cell>
            <ns2:p>AZ</ns2:p>
          </ns1:table-cell>
          <ns1:table-cell>
            <ns2:p>7836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3.0</ns2:p>
          </ns1:table-cell>
          <ns1:table-cell>
            <ns2:p>Lakewood</ns2:p>
          </ns1:table-cell>
          <ns1:table-cell>
            <ns2:p>CA</ns2:p>
          </ns1:table-cell>
          <ns1:table-cell>
            <ns2:p>780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4.0</ns2:p>
          </ns1:table-cell>
          <ns1:table-cell>
            <ns2:p>Bismarck</ns2:p>
          </ns1:table-cell>
          <ns1:table-cell>
            <ns2:p>ND</ns2:p>
          </ns1:table-cell>
          <ns1:table-cell>
            <ns2:p>77963</ns2:p>
          </ns1:table-cell>
          <ns1:table-cell>
            <ns2:p>Timber Ridge Plumbing &amp; Heating</ns2:p>
          </ns1:table-cell>
          <ns1:table-cell>
            <ns2:p>(701) 289-3106</ns2:p>
          </ns1:table-cell>
          <ns1:table-cell>
            <ns2:p/>
          </ns1:table-cell>
          <ns1:table-cell>
            <ns2:p>https://www.timberridgephnd.com/</ns2:p>
          </ns1:table-cell>
          <ns1:table-cell>
            <ns2:p>1512 Basin Ave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5.0</ns2:p>
          </ns1:table-cell>
          <ns1:table-cell>
            <ns2:p>Racine</ns2:p>
          </ns1:table-cell>
          <ns1:table-cell>
            <ns2:p>WI</ns2:p>
          </ns1:table-cell>
          <ns1:table-cell>
            <ns2:p>779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6.0</ns2:p>
          </ns1:table-cell>
          <ns1:table-cell>
            <ns2:p>Tustin</ns2:p>
          </ns1:table-cell>
          <ns1:table-cell>
            <ns2:p>CA</ns2:p>
          </ns1:table-cell>
          <ns1:table-cell>
            <ns2:p>778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7.0</ns2:p>
          </ns1:table-cell>
          <ns1:table-cell>
            <ns2:p>Ankeny</ns2:p>
          </ns1:table-cell>
          <ns1:table-cell>
            <ns2:p>IA</ns2:p>
          </ns1:table-cell>
          <ns1:table-cell>
            <ns2:p>778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8.0</ns2:p>
          </ns1:table-cell>
          <ns1:table-cell>
            <ns2:p>San Marcos</ns2:p>
          </ns1:table-cell>
          <ns1:table-cell>
            <ns2:p>TX</ns2:p>
          </ns1:table-cell>
          <ns1:table-cell>
            <ns2:p>778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89.0</ns2:p>
          </ns1:table-cell>
          <ns1:table-cell>
            <ns2:p>Marysville</ns2:p>
          </ns1:table-cell>
          <ns1:table-cell>
            <ns2:p>WA</ns2:p>
          </ns1:table-cell>
          <ns1:table-cell>
            <ns2:p>7768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0.0</ns2:p>
          </ns1:table-cell>
          <ns1:table-cell>
            <ns2:p>Pittsburg</ns2:p>
          </ns1:table-cell>
          <ns1:table-cell>
            <ns2:p>CA</ns2:p>
          </ns1:table-cell>
          <ns1:table-cell>
            <ns2:p>775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1.0</ns2:p>
          </ns1:table-cell>
          <ns1:table-cell>
            <ns2:p>Rochester Hills</ns2:p>
          </ns1:table-cell>
          <ns1:table-cell>
            <ns2:p>MI</ns2:p>
          </ns1:table-cell>
          <ns1:table-cell>
            <ns2:p>7753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2.0</ns2:p>
          </ns1:table-cell>
          <ns1:table-cell>
            <ns2:p>Chino Hills</ns2:p>
          </ns1:table-cell>
          <ns1:table-cell>
            <ns2:p>CA</ns2:p>
          </ns1:table-cell>
          <ns1:table-cell>
            <ns2:p>775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3.0</ns2:p>
          </ns1:table-cell>
          <ns1:table-cell>
            <ns2:p>Missouri City</ns2:p>
          </ns1:table-cell>
          <ns1:table-cell>
            <ns2:p>TX</ns2:p>
          </ns1:table-cell>
          <ns1:table-cell>
            <ns2:p>773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4.0</ns2:p>
          </ns1:table-cell>
          <ns1:table-cell>
            <ns2:p>Flagstaff</ns2:p>
          </ns1:table-cell>
          <ns1:table-cell>
            <ns2:p>AZ</ns2:p>
          </ns1:table-cell>
          <ns1:table-cell>
            <ns2:p>7726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5.0</ns2:p>
          </ns1:table-cell>
          <ns1:table-cell>
            <ns2:p>Schaumburg</ns2:p>
          </ns1:table-cell>
          <ns1:table-cell>
            <ns2:p>IL</ns2:p>
          </ns1:table-cell>
          <ns1:table-cell>
            <ns2:p>7724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6.0</ns2:p>
          </ns1:table-cell>
          <ns1:table-cell>
            <ns2:p>Pawtucket</ns2:p>
          </ns1:table-cell>
          <ns1:table-cell>
            <ns2:p>RI</ns2:p>
          </ns1:table-cell>
          <ns1:table-cell>
            <ns2:p>7706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7.0</ns2:p>
          </ns1:table-cell>
          <ns1:table-cell>
            <ns2:p>Rogers</ns2:p>
          </ns1:table-cell>
          <ns1:table-cell>
            <ns2:p>AR</ns2:p>
          </ns1:table-cell>
          <ns1:table-cell>
            <ns2:p>76956</ns2:p>
          </ns1:table-cell>
          <ns1:table-cell>
            <ns2:p>Kinty Jones Plumbing</ns2:p>
          </ns1:table-cell>
          <ns1:table-cell>
            <ns2:p>(479) 925-4186</ns2:p>
          </ns1:table-cell>
          <ns1:table-cell>
            <ns2:p/>
          </ns1:table-cell>
          <ns1:table-cell>
            <ns2:p>https://kintyjonesplumbing.com/</ns2:p>
          </ns1:table-cell>
          <ns1:table-cell>
            <ns2:p>4530 NE Hudson Rd</ns2:p>
          </ns1:table-cell>
          <ns1:table-cell>
            <ns2:p>5.0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8.0</ns2:p>
          </ns1:table-cell>
          <ns1:table-cell>
            <ns2:p>Alameda</ns2:p>
          </ns1:table-cell>
          <ns1:table-cell>
            <ns2:p>CA</ns2:p>
          </ns1:table-cell>
          <ns1:table-cell>
            <ns2:p>7687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499.0</ns2:p>
          </ns1:table-cell>
          <ns1:table-cell>
            <ns2:p>Rocklin</ns2:p>
          </ns1:table-cell>
          <ns1:table-cell>
            <ns2:p>CA</ns2:p>
          </ns1:table-cell>
          <ns1:table-cell>
            <ns2:p>7682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0.0</ns2:p>
          </ns1:table-cell>
          <ns1:table-cell>
            <ns2:p>Caldwell</ns2:p>
          </ns1:table-cell>
          <ns1:table-cell>
            <ns2:p>ID</ns2:p>
          </ns1:table-cell>
          <ns1:table-cell>
            <ns2:p>7662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1.0</ns2:p>
          </ns1:table-cell>
          <ns1:table-cell>
            <ns2:p>Blaine</ns2:p>
          </ns1:table-cell>
          <ns1:table-cell>
            <ns2:p>MN</ns2:p>
          </ns1:table-cell>
          <ns1:table-cell>
            <ns2:p>7660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2.0</ns2:p>
          </ns1:table-cell>
          <ns1:table-cell>
            <ns2:p>Napa</ns2:p>
          </ns1:table-cell>
          <ns1:table-cell>
            <ns2:p>CA</ns2:p>
          </ns1:table-cell>
          <ns1:table-cell>
            <ns2:p>7656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3.0</ns2:p>
          </ns1:table-cell>
          <ns1:table-cell>
            <ns2:p>Gulfport</ns2:p>
          </ns1:table-cell>
          <ns1:table-cell>
            <ns2:p>MS</ns2:p>
          </ns1:table-cell>
          <ns1:table-cell>
            <ns2:p>76506</ns2:p>
          </ns1:table-cell>
          <ns1:table-cell>
            <ns2:p>A Royal Flush Plumbing Company</ns2:p>
          </ns1:table-cell>
          <ns1:table-cell>
            <ns2:p>(228) 867-9944</ns2:p>
          </ns1:table-cell>
          <ns1:table-cell>
            <ns2:p/>
          </ns1:table-cell>
          <ns1:table-cell>
            <ns2:p>https://arfplumbing.com/</ns2:p>
          </ns1:table-cell>
          <ns1:table-cell>
            <ns2:p>12453 Canal Rd</ns2:p>
          </ns1:table-cell>
          <ns1:table-cell>
            <ns2:p>4.7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4.0</ns2:p>
          </ns1:table-cell>
          <ns1:table-cell>
            <ns2:p>Evanston</ns2:p>
          </ns1:table-cell>
          <ns1:table-cell>
            <ns2:p>IL</ns2:p>
          </ns1:table-cell>
          <ns1:table-cell>
            <ns2:p>7638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5.0</ns2:p>
          </ns1:table-cell>
          <ns1:table-cell>
            <ns2:p>New Britain</ns2:p>
          </ns1:table-cell>
          <ns1:table-cell>
            <ns2:p>CT</ns2:p>
          </ns1:table-cell>
          <ns1:table-cell>
            <ns2:p>7628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6.0</ns2:p>
          </ns1:table-cell>
          <ns1:table-cell>
            <ns2:p>Iowa City</ns2:p>
          </ns1:table-cell>
          <ns1:table-cell>
            <ns2:p>IA</ns2:p>
          </ns1:table-cell>
          <ns1:table-cell>
            <ns2:p>7622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7.0</ns2:p>
          </ns1:table-cell>
          <ns1:table-cell>
            <ns2:p>Arlington Heights</ns2:p>
          </ns1:table-cell>
          <ns1:table-cell>
            <ns2:p>IL</ns2:p>
          </ns1:table-cell>
          <ns1:table-cell>
            <ns2:p>7621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8.0</ns2:p>
          </ns1:table-cell>
          <ns1:table-cell>
            <ns2:p>Noblesville</ns2:p>
          </ns1:table-cell>
          <ns1:table-cell>
            <ns2:p>IN</ns2:p>
          </ns1:table-cell>
          <ns1:table-cell>
            <ns2:p>761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08.0</ns2:p>
          </ns1:table-cell>
          <ns1:table-cell>
            <ns2:p>Southfield</ns2:p>
          </ns1:table-cell>
          <ns1:table-cell>
            <ns2:p>MI</ns2:p>
          </ns1:table-cell>
          <ns1:table-cell>
            <ns2:p>761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0.0</ns2:p>
          </ns1:table-cell>
          <ns1:table-cell>
            <ns2:p>Rock Hill</ns2:p>
          </ns1:table-cell>
          <ns1:table-cell>
            <ns2:p>SC</ns2:p>
          </ns1:table-cell>
          <ns1:table-cell>
            <ns2:p>759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1.0</ns2:p>
          </ns1:table-cell>
          <ns1:table-cell>
            <ns2:p>Hammond</ns2:p>
          </ns1:table-cell>
          <ns1:table-cell>
            <ns2:p>IN</ns2:p>
          </ns1:table-cell>
          <ns1:table-cell>
            <ns2:p>757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2.0</ns2:p>
          </ns1:table-cell>
          <ns1:table-cell>
            <ns2:p>Lauderhill</ns2:p>
          </ns1:table-cell>
          <ns1:table-cell>
            <ns2:p>FL</ns2:p>
          </ns1:table-cell>
          <ns1:table-cell>
            <ns2:p>7566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3.0</ns2:p>
          </ns1:table-cell>
          <ns1:table-cell>
            <ns2:p>Scranton</ns2:p>
          </ns1:table-cell>
          <ns1:table-cell>
            <ns2:p>PA</ns2:p>
          </ns1:table-cell>
          <ns1:table-cell>
            <ns2:p>755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4.0</ns2:p>
          </ns1:table-cell>
          <ns1:table-cell>
            <ns2:p>Appleton</ns2:p>
          </ns1:table-cell>
          <ns1:table-cell>
            <ns2:p>WI</ns2:p>
          </ns1:table-cell>
          <ns1:table-cell>
            <ns2:p>7545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5.0</ns2:p>
          </ns1:table-cell>
          <ns1:table-cell>
            <ns2:p>Greenville</ns2:p>
          </ns1:table-cell>
          <ns1:table-cell>
            <ns2:p>SC</ns2:p>
          </ns1:table-cell>
          <ns1:table-cell>
            <ns2:p>753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6.0</ns2:p>
          </ns1:table-cell>
          <ns1:table-cell>
            <ns2:p>Apple Valley</ns2:p>
          </ns1:table-cell>
          <ns1:table-cell>
            <ns2:p>CA</ns2:p>
          </ns1:table-cell>
          <ns1:table-cell>
            <ns2:p>7524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7.0</ns2:p>
          </ns1:table-cell>
          <ns1:table-cell>
            <ns2:p>Lake Elsinore</ns2:p>
          </ns1:table-cell>
          <ns1:table-cell>
            <ns2:p>CA</ns2:p>
          </ns1:table-cell>
          <ns1:table-cell>
            <ns2:p>7506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8.0</ns2:p>
          </ns1:table-cell>
          <ns1:table-cell>
            <ns2:p>St. Cloud</ns2:p>
          </ns1:table-cell>
          <ns1:table-cell>
            <ns2:p>FL</ns2:p>
          </ns1:table-cell>
          <ns1:table-cell>
            <ns2:p>7496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19.0</ns2:p>
          </ns1:table-cell>
          <ns1:table-cell>
            <ns2:p>Johnson City</ns2:p>
          </ns1:table-cell>
          <ns1:table-cell>
            <ns2:p>TN</ns2:p>
          </ns1:table-cell>
          <ns1:table-cell>
            <ns2:p>749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0.0</ns2:p>
          </ns1:table-cell>
          <ns1:table-cell>
            <ns2:p>Bolingbrook</ns2:p>
          </ns1:table-cell>
          <ns1:table-cell>
            <ns2:p>IL</ns2:p>
          </ns1:table-cell>
          <ns1:table-cell>
            <ns2:p>7480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1.0</ns2:p>
          </ns1:table-cell>
          <ns1:table-cell>
            <ns2:p>Bayonne</ns2:p>
          </ns1:table-cell>
          <ns1:table-cell>
            <ns2:p>NJ</ns2:p>
          </ns1:table-cell>
          <ns1:table-cell>
            <ns2:p>747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2.0</ns2:p>
          </ns1:table-cell>
          <ns1:table-cell>
            <ns2:p>Bellflower</ns2:p>
          </ns1:table-cell>
          <ns1:table-cell>
            <ns2:p>CA</ns2:p>
          </ns1:table-cell>
          <ns1:table-cell>
            <ns2:p>747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3.0</ns2:p>
          </ns1:table-cell>
          <ns1:table-cell>
            <ns2:p>Pleasanton</ns2:p>
          </ns1:table-cell>
          <ns1:table-cell>
            <ns2:p>CA</ns2:p>
          </ns1:table-cell>
          <ns1:table-cell>
            <ns2:p>7455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4.0</ns2:p>
          </ns1:table-cell>
          <ns1:table-cell>
            <ns2:p>West Des Moines</ns2:p>
          </ns1:table-cell>
          <ns1:table-cell>
            <ns2:p>IA</ns2:p>
          </ns1:table-cell>
          <ns1:table-cell>
            <ns2:p>7422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5.0</ns2:p>
          </ns1:table-cell>
          <ns1:table-cell>
            <ns2:p>Tamarac</ns2:p>
          </ns1:table-cell>
          <ns1:table-cell>
            <ns2:p>FL</ns2:p>
          </ns1:table-cell>
          <ns1:table-cell>
            <ns2:p>741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6.0</ns2:p>
          </ns1:table-cell>
          <ns1:table-cell>
            <ns2:p>Redlands</ns2:p>
          </ns1:table-cell>
          <ns1:table-cell>
            <ns2:p>CA</ns2:p>
          </ns1:table-cell>
          <ns1:table-cell>
            <ns2:p>7412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7.0</ns2:p>
          </ns1:table-cell>
          <ns1:table-cell>
            <ns2:p>Tulare</ns2:p>
          </ns1:table-cell>
          <ns1:table-cell>
            <ns2:p>CA</ns2:p>
          </ns1:table-cell>
          <ns1:table-cell>
            <ns2:p>739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8.0</ns2:p>
          </ns1:table-cell>
          <ns1:table-cell>
            <ns2:p>Maple Grove</ns2:p>
          </ns1:table-cell>
          <ns1:table-cell>
            <ns2:p>MN</ns2:p>
          </ns1:table-cell>
          <ns1:table-cell>
            <ns2:p>7389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29.0</ns2:p>
          </ns1:table-cell>
          <ns1:table-cell>
            <ns2:p>Wilmington</ns2:p>
          </ns1:table-cell>
          <ns1:table-cell>
            <ns2:p>DE</ns2:p>
          </ns1:table-cell>
          <ns1:table-cell>
            <ns2:p>73512</ns2:p>
          </ns1:table-cell>
          <ns1:table-cell>
            <ns2:p>Benjamin Franklin Plumbing of Wilmington DE</ns2:p>
          </ns1:table-cell>
          <ns1:table-cell>
            <ns2:p>(302) 524-7437</ns2:p>
          </ns1:table-cell>
          <ns1:table-cell>
            <ns2:p/>
          </ns1:table-cell>
          <ns1:table-cell>
            <ns2:p>https://benjaminfranklinplumbing.com/wilmington-de/</ns2:p>
          </ns1:table-cell>
          <ns1:table-cell>
            <ns2:p>410 Meco Dr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0.0</ns2:p>
          </ns1:table-cell>
          <ns1:table-cell>
            <ns2:p>Framingham</ns2:p>
          </ns1:table-cell>
          <ns1:table-cell>
            <ns2:p>MA</ns2:p>
          </ns1:table-cell>
          <ns1:table-cell>
            <ns2:p>7302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1.0</ns2:p>
          </ns1:table-cell>
          <ns1:table-cell>
            <ns2:p>Turlock</ns2:p>
          </ns1:table-cell>
          <ns1:table-cell>
            <ns2:p>CA</ns2:p>
          </ns1:table-cell>
          <ns1:table-cell>
            <ns2:p>7286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2.0</ns2:p>
          </ns1:table-cell>
          <ns1:table-cell>
            <ns2:p>Jacksonville</ns2:p>
          </ns1:table-cell>
          <ns1:table-cell>
            <ns2:p>NC</ns2:p>
          </ns1:table-cell>
          <ns1:table-cell>
            <ns2:p>727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3.0</ns2:p>
          </ns1:table-cell>
          <ns1:table-cell>
            <ns2:p>Kalamazoo</ns2:p>
          </ns1:table-cell>
          <ns1:table-cell>
            <ns2:p>MI</ns2:p>
          </ns1:table-cell>
          <ns1:table-cell>
            <ns2:p>726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4.0</ns2:p>
          </ns1:table-cell>
          <ns1:table-cell>
            <ns2:p>St. Cloud</ns2:p>
          </ns1:table-cell>
          <ns1:table-cell>
            <ns2:p>MN</ns2:p>
          </ns1:table-cell>
          <ns1:table-cell>
            <ns2:p>7264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5.0</ns2:p>
          </ns1:table-cell>
          <ns1:table-cell>
            <ns2:p>St. Charles</ns2:p>
          </ns1:table-cell>
          <ns1:table-cell>
            <ns2:p>MO</ns2:p>
          </ns1:table-cell>
          <ns1:table-cell>
            <ns2:p>72561</ns2:p>
          </ns1:table-cell>
          <ns1:table-cell>
            <ns2:p>Pierson Plumbing Sewer &amp; Drain L.L.C</ns2:p>
          </ns1:table-cell>
          <ns1:table-cell>
            <ns2:p>(314) 691-8066</ns2:p>
          </ns1:table-cell>
          <ns1:table-cell>
            <ns2:p/>
          </ns1:table-cell>
          <ns1:table-cell>
            <ns2:p>http://www.piersonplumbingstl.com/</ns2:p>
          </ns1:table-cell>
          <ns1:table-cell>
            <ns2:p>500 Boone's Lick Rd Suite C Upper</ns2:p>
          </ns1:table-cell>
          <ns1:table-cell>
            <ns2:p>4.8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6.0</ns2:p>
          </ns1:table-cell>
          <ns1:table-cell>
            <ns2:p>Harlingen</ns2:p>
          </ns1:table-cell>
          <ns1:table-cell>
            <ns2:p>TX</ns2:p>
          </ns1:table-cell>
          <ns1:table-cell>
            <ns2:p>7246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7.0</ns2:p>
          </ns1:table-cell>
          <ns1:table-cell>
            <ns2:p>Eau Claire</ns2:p>
          </ns1:table-cell>
          <ns1:table-cell>
            <ns2:p>WI</ns2:p>
          </ns1:table-cell>
          <ns1:table-cell>
            <ns2:p>7246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8.0</ns2:p>
          </ns1:table-cell>
          <ns1:table-cell>
            <ns2:p>Commerce City</ns2:p>
          </ns1:table-cell>
          <ns1:table-cell>
            <ns2:p>CO</ns2:p>
          </ns1:table-cell>
          <ns1:table-cell>
            <ns2:p>7234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39.0</ns2:p>
          </ns1:table-cell>
          <ns1:table-cell>
            <ns2:p>Conway</ns2:p>
          </ns1:table-cell>
          <ns1:table-cell>
            <ns2:p>AR</ns2:p>
          </ns1:table-cell>
          <ns1:table-cell>
            <ns2:p>7232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0.0</ns2:p>
          </ns1:table-cell>
          <ns1:table-cell>
            <ns2:p>Mount Vernon</ns2:p>
          </ns1:table-cell>
          <ns1:table-cell>
            <ns2:p>NY</ns2:p>
          </ns1:table-cell>
          <ns1:table-cell>
            <ns2:p>7230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1.0</ns2:p>
          </ns1:table-cell>
          <ns1:table-cell>
            <ns2:p>East Orange</ns2:p>
          </ns1:table-cell>
          <ns1:table-cell>
            <ns2:p>NJ</ns2:p>
          </ns1:table-cell>
          <ns1:table-cell>
            <ns2:p>7215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2.0</ns2:p>
          </ns1:table-cell>
          <ns1:table-cell>
            <ns2:p>Dothan</ns2:p>
          </ns1:table-cell>
          <ns1:table-cell>
            <ns2:p>AL</ns2:p>
          </ns1:table-cell>
          <ns1:table-cell>
            <ns2:p>7206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3.0</ns2:p>
          </ns1:table-cell>
          <ns1:table-cell>
            <ns2:p>Grand Junction</ns2:p>
          </ns1:table-cell>
          <ns1:table-cell>
            <ns2:p>CO</ns2:p>
          </ns1:table-cell>
          <ns1:table-cell>
            <ns2:p>718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4.0</ns2:p>
          </ns1:table-cell>
          <ns1:table-cell>
            <ns2:p>Idaho Falls</ns2:p>
          </ns1:table-cell>
          <ns1:table-cell>
            <ns2:p>ID</ns2:p>
          </ns1:table-cell>
          <ns1:table-cell>
            <ns2:p>7178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5.0</ns2:p>
          </ns1:table-cell>
          <ns1:table-cell>
            <ns2:p>Ocala</ns2:p>
          </ns1:table-cell>
          <ns1:table-cell>
            <ns2:p>FL</ns2:p>
          </ns1:table-cell>
          <ns1:table-cell>
            <ns2:p>7175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6.0</ns2:p>
          </ns1:table-cell>
          <ns1:table-cell>
            <ns2:p>Dublin</ns2:p>
          </ns1:table-cell>
          <ns1:table-cell>
            <ns2:p>CA</ns2:p>
          </ns1:table-cell>
          <ns1:table-cell>
            <ns2:p>7160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7.0</ns2:p>
          </ns1:table-cell>
          <ns1:table-cell>
            <ns2:p>Camden</ns2:p>
          </ns1:table-cell>
          <ns1:table-cell>
            <ns2:p>NJ</ns2:p>
          </ns1:table-cell>
          <ns1:table-cell>
            <ns2:p>714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8.0</ns2:p>
          </ns1:table-cell>
          <ns1:table-cell>
            <ns2:p>Passaic</ns2:p>
          </ns1:table-cell>
          <ns1:table-cell>
            <ns2:p>NJ</ns2:p>
          </ns1:table-cell>
          <ns1:table-cell>
            <ns2:p>7133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49.0</ns2:p>
          </ns1:table-cell>
          <ns1:table-cell>
            <ns2:p>Lafayette</ns2:p>
          </ns1:table-cell>
          <ns1:table-cell>
            <ns2:p>IN</ns2:p>
          </ns1:table-cell>
          <ns1:table-cell>
            <ns2:p>7123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0.0</ns2:p>
          </ns1:table-cell>
          <ns1:table-cell>
            <ns2:p>Gaithersburg</ns2:p>
          </ns1:table-cell>
          <ns1:table-cell>
            <ns2:p>MD</ns2:p>
          </ns1:table-cell>
          <ns1:table-cell>
            <ns2:p>711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1.0</ns2:p>
          </ns1:table-cell>
          <ns1:table-cell>
            <ns2:p>St. Joseph</ns2:p>
          </ns1:table-cell>
          <ns1:table-cell>
            <ns2:p>MO</ns2:p>
          </ns1:table-cell>
          <ns1:table-cell>
            <ns2:p>710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2.0</ns2:p>
          </ns1:table-cell>
          <ns1:table-cell>
            <ns2:p>Waukesha</ns2:p>
          </ns1:table-cell>
          <ns1:table-cell>
            <ns2:p>WI</ns2:p>
          </ns1:table-cell>
          <ns1:table-cell>
            <ns2:p>7087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3.0</ns2:p>
          </ns1:table-cell>
          <ns1:table-cell>
            <ns2:p>North Richland Hills</ns2:p>
          </ns1:table-cell>
          <ns1:table-cell>
            <ns2:p>TX</ns2:p>
          </ns1:table-cell>
          <ns1:table-cell>
            <ns2:p>708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4.0</ns2:p>
          </ns1:table-cell>
          <ns1:table-cell>
            <ns2:p>Eastvale</ns2:p>
          </ns1:table-cell>
          <ns1:table-cell>
            <ns2:p>CA</ns2:p>
          </ns1:table-cell>
          <ns1:table-cell>
            <ns2:p>7059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5.0</ns2:p>
          </ns1:table-cell>
          <ns1:table-cell>
            <ns2:p>Walnut Creek</ns2:p>
          </ns1:table-cell>
          <ns1:table-cell>
            <ns2:p>CA</ns2:p>
          </ns1:table-cell>
          <ns1:table-cell>
            <ns2:p>700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6.0</ns2:p>
          </ns1:table-cell>
          <ns1:table-cell>
            <ns2:p>Kyle</ns2:p>
          </ns1:table-cell>
          <ns1:table-cell>
            <ns2:p>TX</ns2:p>
          </ns1:table-cell>
          <ns1:table-cell>
            <ns2:p>6991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7.0</ns2:p>
          </ns1:table-cell>
          <ns1:table-cell>
            <ns2:p>Portland</ns2:p>
          </ns1:table-cell>
          <ns1:table-cell>
            <ns2:p>ME</ns2:p>
          </ns1:table-cell>
          <ns1:table-cell>
            <ns2:p>69911</ns2:p>
          </ns1:table-cell>
          <ns1:table-cell>
            <ns2:p>Heritage Home Service</ns2:p>
          </ns1:table-cell>
          <ns1:table-cell>
            <ns2:p>(207) 370-9533</ns2:p>
          </ns1:table-cell>
          <ns1:table-cell>
            <ns2:p/>
          </ns1:table-cell>
          <ns1:table-cell>
            <ns2:p>https://justcallheritage.com/service-area/portland-me/</ns2:p>
          </ns1:table-cell>
          <ns1:table-cell>
            <ns2:p>72 City Line Dr</ns2:p>
          </ns1:table-cell>
          <ns1:table-cell>
            <ns2:p>4.8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8.0</ns2:p>
          </ns1:table-cell>
          <ns1:table-cell>
            <ns2:p>Shawnee</ns2:p>
          </ns1:table-cell>
          <ns1:table-cell>
            <ns2:p>KS</ns2:p>
          </ns1:table-cell>
          <ns1:table-cell>
            <ns2:p>6984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59.0</ns2:p>
          </ns1:table-cell>
          <ns1:table-cell>
            <ns2:p>Delray Beach</ns2:p>
          </ns1:table-cell>
          <ns1:table-cell>
            <ns2:p>FL</ns2:p>
          </ns1:table-cell>
          <ns1:table-cell>
            <ns2:p>6980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0.0</ns2:p>
          </ns1:table-cell>
          <ns1:table-cell>
            <ns2:p>Casa Grande</ns2:p>
          </ns1:table-cell>
          <ns1:table-cell>
            <ns2:p>AZ</ns2:p>
          </ns1:table-cell>
          <ns1:table-cell>
            <ns2:p>6975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1.0</ns2:p>
          </ns1:table-cell>
          <ns1:table-cell>
            <ns2:p>Weston</ns2:p>
          </ns1:table-cell>
          <ns1:table-cell>
            <ns2:p>FL</ns2:p>
          </ns1:table-cell>
          <ns1:table-cell>
            <ns2:p>695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2.0</ns2:p>
          </ns1:table-cell>
          <ns1:table-cell>
            <ns2:p>Yuba City</ns2:p>
          </ns1:table-cell>
          <ns1:table-cell>
            <ns2:p>CA</ns2:p>
          </ns1:table-cell>
          <ns1:table-cell>
            <ns2:p>6948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3.0</ns2:p>
          </ns1:table-cell>
          <ns1:table-cell>
            <ns2:p>Schenectady</ns2:p>
          </ns1:table-cell>
          <ns1:table-cell>
            <ns2:p>NY</ns2:p>
          </ns1:table-cell>
          <ns1:table-cell>
            <ns2:p>694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4.0</ns2:p>
          </ns1:table-cell>
          <ns1:table-cell>
            <ns2:p>Greenwood</ns2:p>
          </ns1:table-cell>
          <ns1:table-cell>
            <ns2:p>IN</ns2:p>
          </ns1:table-cell>
          <ns1:table-cell>
            <ns2:p>6934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5.0</ns2:p>
          </ns1:table-cell>
          <ns1:table-cell>
            <ns2:p>Jackson</ns2:p>
          </ns1:table-cell>
          <ns1:table-cell>
            <ns2:p>TN</ns2:p>
          </ns1:table-cell>
          <ns1:table-cell>
            <ns2:p>6933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6.0</ns2:p>
          </ns1:table-cell>
          <ns1:table-cell>
            <ns2:p>Lodi</ns2:p>
          </ns1:table-cell>
          <ns1:table-cell>
            <ns2:p>CA</ns2:p>
          </ns1:table-cell>
          <ns1:table-cell>
            <ns2:p>691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7.0</ns2:p>
          </ns1:table-cell>
          <ns1:table-cell>
            <ns2:p>Madera</ns2:p>
          </ns1:table-cell>
          <ns1:table-cell>
            <ns2:p>CA</ns2:p>
          </ns1:table-cell>
          <ns1:table-cell>
            <ns2:p>6901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8.0</ns2:p>
          </ns1:table-cell>
          <ns1:table-cell>
            <ns2:p>Canton</ns2:p>
          </ns1:table-cell>
          <ns1:table-cell>
            <ns2:p>OH</ns2:p>
          </ns1:table-cell>
          <ns1:table-cell>
            <ns2:p>690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69.0</ns2:p>
          </ns1:table-cell>
          <ns1:table-cell>
            <ns2:p>Baldwin Park</ns2:p>
          </ns1:table-cell>
          <ns1:table-cell>
            <ns2:p>CA</ns2:p>
          </ns1:table-cell>
          <ns1:table-cell>
            <ns2:p>6888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0.0</ns2:p>
          </ns1:table-cell>
          <ns1:table-cell>
            <ns2:p>Camarillo</ns2:p>
          </ns1:table-cell>
          <ns1:table-cell>
            <ns2:p>CA</ns2:p>
          </ns1:table-cell>
          <ns1:table-cell>
            <ns2:p>6865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1.0</ns2:p>
          </ns1:table-cell>
          <ns1:table-cell>
            <ns2:p>Huntersville</ns2:p>
          </ns1:table-cell>
          <ns1:table-cell>
            <ns2:p>NC</ns2:p>
          </ns1:table-cell>
          <ns1:table-cell>
            <ns2:p>6853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2.0</ns2:p>
          </ns1:table-cell>
          <ns1:table-cell>
            <ns2:p>Haverhill</ns2:p>
          </ns1:table-cell>
          <ns1:table-cell>
            <ns2:p>MA</ns2:p>
          </ns1:table-cell>
          <ns1:table-cell>
            <ns2:p>6836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3.0</ns2:p>
          </ns1:table-cell>
          <ns1:table-cell>
            <ns2:p>Pflugerville</ns2:p>
          </ns1:table-cell>
          <ns1:table-cell>
            <ns2:p>TX</ns2:p>
          </ns1:table-cell>
          <ns1:table-cell>
            <ns2:p>6831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4.0</ns2:p>
          </ns1:table-cell>
          <ns1:table-cell>
            <ns2:p>Ames</ns2:p>
          </ns1:table-cell>
          <ns1:table-cell>
            <ns2:p>IA</ns2:p>
          </ns1:table-cell>
          <ns1:table-cell>
            <ns2:p>682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5.0</ns2:p>
          </ns1:table-cell>
          <ns1:table-cell>
            <ns2:p>Madison</ns2:p>
          </ns1:table-cell>
          <ns1:table-cell>
            <ns2:p>AL</ns2:p>
          </ns1:table-cell>
          <ns1:table-cell>
            <ns2:p>6796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6.0</ns2:p>
          </ns1:table-cell>
          <ns1:table-cell>
            <ns2:p>Rowlett</ns2:p>
          </ns1:table-cell>
          <ns1:table-cell>
            <ns2:p>TX</ns2:p>
          </ns1:table-cell>
          <ns1:table-cell>
            <ns2:p>6789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7.0</ns2:p>
          </ns1:table-cell>
          <ns1:table-cell>
            <ns2:p>Decatur</ns2:p>
          </ns1:table-cell>
          <ns1:table-cell>
            <ns2:p>IL</ns2:p>
          </ns1:table-cell>
          <ns1:table-cell>
            <ns2:p>678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8.0</ns2:p>
          </ns1:table-cell>
          <ns1:table-cell>
            <ns2:p>Palo Alto</ns2:p>
          </ns1:table-cell>
          <ns1:table-cell>
            <ns2:p>CA</ns2:p>
          </ns1:table-cell>
          <ns1:table-cell>
            <ns2:p>6760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79.0</ns2:p>
          </ns1:table-cell>
          <ns1:table-cell>
            <ns2:p>Rockville</ns2:p>
          </ns1:table-cell>
          <ns1:table-cell>
            <ns2:p>MD</ns2:p>
          </ns1:table-cell>
          <ns1:table-cell>
            <ns2:p>6756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0.0</ns2:p>
          </ns1:table-cell>
          <ns1:table-cell>
            <ns2:p>Sanford</ns2:p>
          </ns1:table-cell>
          <ns1:table-cell>
            <ns2:p>FL</ns2:p>
          </ns1:table-cell>
          <ns1:table-cell>
            <ns2:p>674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1.0</ns2:p>
          </ns1:table-cell>
          <ns1:table-cell>
            <ns2:p>Oshkosh</ns2:p>
          </ns1:table-cell>
          <ns1:table-cell>
            <ns2:p>WI</ns2:p>
          </ns1:table-cell>
          <ns1:table-cell>
            <ns2:p>6746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2.0</ns2:p>
          </ns1:table-cell>
          <ns1:table-cell>
            <ns2:p>Novi</ns2:p>
          </ns1:table-cell>
          <ns1:table-cell>
            <ns2:p>MI</ns2:p>
          </ns1:table-cell>
          <ns1:table-cell>
            <ns2:p>673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3.0</ns2:p>
          </ns1:table-cell>
          <ns1:table-cell>
            <ns2:p>Gary</ns2:p>
          </ns1:table-cell>
          <ns1:table-cell>
            <ns2:p>IN</ns2:p>
          </ns1:table-cell>
          <ns1:table-cell>
            <ns2:p>6728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4.0</ns2:p>
          </ns1:table-cell>
          <ns1:table-cell>
            <ns2:p>Redondo Beach</ns2:p>
          </ns1:table-cell>
          <ns1:table-cell>
            <ns2:p>CA</ns2:p>
          </ns1:table-cell>
          <ns1:table-cell>
            <ns2:p>672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5.0</ns2:p>
          </ns1:table-cell>
          <ns1:table-cell>
            <ns2:p>Eagan</ns2:p>
          </ns1:table-cell>
          <ns1:table-cell>
            <ns2:p>MN</ns2:p>
          </ns1:table-cell>
          <ns1:table-cell>
            <ns2:p>6710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6.0</ns2:p>
          </ns1:table-cell>
          <ns1:table-cell>
            <ns2:p>Janesville</ns2:p>
          </ns1:table-cell>
          <ns1:table-cell>
            <ns2:p>WI</ns2:p>
          </ns1:table-cell>
          <ns1:table-cell>
            <ns2:p>6692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7.0</ns2:p>
          </ns1:table-cell>
          <ns1:table-cell>
            <ns2:p>Alpharetta</ns2:p>
          </ns1:table-cell>
          <ns1:table-cell>
            <ns2:p>GA</ns2:p>
          </ns1:table-cell>
          <ns1:table-cell>
            <ns2:p>6692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8.0</ns2:p>
          </ns1:table-cell>
          <ns1:table-cell>
            <ns2:p>Waterloo</ns2:p>
          </ns1:table-cell>
          <ns1:table-cell>
            <ns2:p>IA</ns2:p>
          </ns1:table-cell>
          <ns1:table-cell>
            <ns2:p>669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89.0</ns2:p>
          </ns1:table-cell>
          <ns1:table-cell>
            <ns2:p>Albany</ns2:p>
          </ns1:table-cell>
          <ns1:table-cell>
            <ns2:p>GA</ns2:p>
          </ns1:table-cell>
          <ns1:table-cell>
            <ns2:p>669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0.0</ns2:p>
          </ns1:table-cell>
          <ns1:table-cell>
            <ns2:p>Union City</ns2:p>
          </ns1:table-cell>
          <ns1:table-cell>
            <ns2:p>NJ</ns2:p>
          </ns1:table-cell>
          <ns1:table-cell>
            <ns2:p>6665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1.0</ns2:p>
          </ns1:table-cell>
          <ns1:table-cell>
            <ns2:p>Brentwood</ns2:p>
          </ns1:table-cell>
          <ns1:table-cell>
            <ns2:p>CA</ns2:p>
          </ns1:table-cell>
          <ns1:table-cell>
            <ns2:p>666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2.0</ns2:p>
          </ns1:table-cell>
          <ns1:table-cell>
            <ns2:p>Eagle Mountain</ns2:p>
          </ns1:table-cell>
          <ns1:table-cell>
            <ns2:p>UT</ns2:p>
          </ns1:table-cell>
          <ns1:table-cell>
            <ns2:p>6655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3.0</ns2:p>
          </ns1:table-cell>
          <ns1:table-cell>
            <ns2:p>Skokie</ns2:p>
          </ns1:table-cell>
          <ns1:table-cell>
            <ns2:p>IL</ns2:p>
          </ns1:table-cell>
          <ns1:table-cell>
            <ns2:p>665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4.0</ns2:p>
          </ns1:table-cell>
          <ns1:table-cell>
            <ns2:p>Shoreline</ns2:p>
          </ns1:table-cell>
          <ns1:table-cell>
            <ns2:p>WA</ns2:p>
          </ns1:table-cell>
          <ns1:table-cell>
            <ns2:p>665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5.0</ns2:p>
          </ns1:table-cell>
          <ns1:table-cell>
            <ns2:p>Cheyenne</ns2:p>
          </ns1:table-cell>
          <ns1:table-cell>
            <ns2:p>WY</ns2:p>
          </ns1:table-cell>
          <ns1:table-cell>
            <ns2:p>66507</ns2:p>
          </ns1:table-cell>
          <ns1:table-cell>
            <ns2:p>Aspen Mountain Plumbing</ns2:p>
          </ns1:table-cell>
          <ns1:table-cell>
            <ns2:p>(307) 202-8919</ns2:p>
          </ns1:table-cell>
          <ns1:table-cell>
            <ns2:p/>
          </ns1:table-cell>
          <ns1:table-cell>
            <ns2:p>https://www.aspenmtnplumbing.com/plumbers-cheyenne-wy</ns2:p>
          </ns1:table-cell>
          <ns1:table-cell>
            <ns2:p>2404 E Lincolnway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6.0</ns2:p>
          </ns1:table-cell>
          <ns1:table-cell>
            <ns2:p>Victoria</ns2:p>
          </ns1:table-cell>
          <ns1:table-cell>
            <ns2:p>TX</ns2:p>
          </ns1:table-cell>
          <ns1:table-cell>
            <ns2:p>665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7.0</ns2:p>
          </ns1:table-cell>
          <ns1:table-cell>
            <ns2:p>Port Orange</ns2:p>
          </ns1:table-cell>
          <ns1:table-cell>
            <ns2:p>FL</ns2:p>
          </ns1:table-cell>
          <ns1:table-cell>
            <ns2:p>6639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8.0</ns2:p>
          </ns1:table-cell>
          <ns1:table-cell>
            <ns2:p>Malden</ns2:p>
          </ns1:table-cell>
          <ns1:table-cell>
            <ns2:p>MA</ns2:p>
          </ns1:table-cell>
          <ns1:table-cell>
            <ns2:p>6637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599.0</ns2:p>
          </ns1:table-cell>
          <ns1:table-cell>
            <ns2:p>Westfield</ns2:p>
          </ns1:table-cell>
          <ns1:table-cell>
            <ns2:p>IN</ns2:p>
          </ns1:table-cell>
          <ns1:table-cell>
            <ns2:p>662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0.0</ns2:p>
          </ns1:table-cell>
          <ns1:table-cell>
            <ns2:p>Davis</ns2:p>
          </ns1:table-cell>
          <ns1:table-cell>
            <ns2:p>CA</ns2:p>
          </ns1:table-cell>
          <ns1:table-cell>
            <ns2:p>661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0.0</ns2:p>
          </ns1:table-cell>
          <ns1:table-cell>
            <ns2:p>Sammamish</ns2:p>
          </ns1:table-cell>
          <ns1:table-cell>
            <ns2:p>WA</ns2:p>
          </ns1:table-cell>
          <ns1:table-cell>
            <ns2:p>661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2.0</ns2:p>
          </ns1:table-cell>
          <ns1:table-cell>
            <ns2:p>Parker</ns2:p>
          </ns1:table-cell>
          <ns1:table-cell>
            <ns2:p>CO</ns2:p>
          </ns1:table-cell>
          <ns1:table-cell>
            <ns2:p>6598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3.0</ns2:p>
          </ns1:table-cell>
          <ns1:table-cell>
            <ns2:p>Palatine</ns2:p>
          </ns1:table-cell>
          <ns1:table-cell>
            <ns2:p>IL</ns2:p>
          </ns1:table-cell>
          <ns1:table-cell>
            <ns2:p>658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4.0</ns2:p>
          </ns1:table-cell>
          <ns1:table-cell>
            <ns2:p>Yorba Linda</ns2:p>
          </ns1:table-cell>
          <ns1:table-cell>
            <ns2:p>CA</ns2:p>
          </ns1:table-cell>
          <ns1:table-cell>
            <ns2:p>656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5.0</ns2:p>
          </ns1:table-cell>
          <ns1:table-cell>
            <ns2:p>Apopka</ns2:p>
          </ns1:table-cell>
          <ns1:table-cell>
            <ns2:p>FL</ns2:p>
          </ns1:table-cell>
          <ns1:table-cell>
            <ns2:p>6555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6.0</ns2:p>
          </ns1:table-cell>
          <ns1:table-cell>
            <ns2:p>Marana</ns2:p>
          </ns1:table-cell>
          <ns1:table-cell>
            <ns2:p>AZ</ns2:p>
          </ns1:table-cell>
          <ns1:table-cell>
            <ns2:p>6552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7.0</ns2:p>
          </ns1:table-cell>
          <ns1:table-cell>
            <ns2:p>Muncie</ns2:p>
          </ns1:table-cell>
          <ns1:table-cell>
            <ns2:p>IN</ns2:p>
          </ns1:table-cell>
          <ns1:table-cell>
            <ns2:p>6546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8.0</ns2:p>
          </ns1:table-cell>
          <ns1:table-cell>
            <ns2:p>Lorain</ns2:p>
          </ns1:table-cell>
          <ns1:table-cell>
            <ns2:p>OH</ns2:p>
          </ns1:table-cell>
          <ns1:table-cell>
            <ns2:p>6536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09.0</ns2:p>
          </ns1:table-cell>
          <ns1:table-cell>
            <ns2:p>Union City</ns2:p>
          </ns1:table-cell>
          <ns1:table-cell>
            <ns2:p>CA</ns2:p>
          </ns1:table-cell>
          <ns1:table-cell>
            <ns2:p>6528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0.0</ns2:p>
          </ns1:table-cell>
          <ns1:table-cell>
            <ns2:p>Richland</ns2:p>
          </ns1:table-cell>
          <ns1:table-cell>
            <ns2:p>WA</ns2:p>
          </ns1:table-cell>
          <ns1:table-cell>
            <ns2:p>652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1.0</ns2:p>
          </ns1:table-cell>
          <ns1:table-cell>
            <ns2:p>Burnsville</ns2:p>
          </ns1:table-cell>
          <ns1:table-cell>
            <ns2:p>MN</ns2:p>
          </ns1:table-cell>
          <ns1:table-cell>
            <ns2:p>652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2.0</ns2:p>
          </ns1:table-cell>
          <ns1:table-cell>
            <ns2:p>Kenner</ns2:p>
          </ns1:table-cell>
          <ns1:table-cell>
            <ns2:p>LA</ns2:p>
          </ns1:table-cell>
          <ns1:table-cell>
            <ns2:p>6513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3.0</ns2:p>
          </ns1:table-cell>
          <ns1:table-cell>
            <ns2:p>North Little Rock</ns2:p>
          </ns1:table-cell>
          <ns1:table-cell>
            <ns2:p>AR</ns2:p>
          </ns1:table-cell>
          <ns1:table-cell>
            <ns2:p>651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4.0</ns2:p>
          </ns1:table-cell>
          <ns1:table-cell>
            <ns2:p>Waltham</ns2:p>
          </ns1:table-cell>
          <ns1:table-cell>
            <ns2:p>MA</ns2:p>
          </ns1:table-cell>
          <ns1:table-cell>
            <ns2:p>6503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5.0</ns2:p>
          </ns1:table-cell>
          <ns1:table-cell>
            <ns2:p>South San Francisco</ns2:p>
          </ns1:table-cell>
          <ns1:table-cell>
            <ns2:p>CA</ns2:p>
          </ns1:table-cell>
          <ns1:table-cell>
            <ns2:p>649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6.0</ns2:p>
          </ns1:table-cell>
          <ns1:table-cell>
            <ns2:p>Bellevue</ns2:p>
          </ns1:table-cell>
          <ns1:table-cell>
            <ns2:p>NE</ns2:p>
          </ns1:table-cell>
          <ns1:table-cell>
            <ns2:p>6486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7.0</ns2:p>
          </ns1:table-cell>
          <ns1:table-cell>
            <ns2:p>Hamilton</ns2:p>
          </ns1:table-cell>
          <ns1:table-cell>
            <ns2:p>OH</ns2:p>
          </ns1:table-cell>
          <ns1:table-cell>
            <ns2:p>646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8.0</ns2:p>
          </ns1:table-cell>
          <ns1:table-cell>
            <ns2:p>Fulshear</ns2:p>
          </ns1:table-cell>
          <ns1:table-cell>
            <ns2:p>TX</ns2:p>
          </ns1:table-cell>
          <ns1:table-cell>
            <ns2:p>646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19.0</ns2:p>
          </ns1:table-cell>
          <ns1:table-cell>
            <ns2:p>Celina</ns2:p>
          </ns1:table-cell>
          <ns1:table-cell>
            <ns2:p>TX</ns2:p>
          </ns1:table-cell>
          <ns1:table-cell>
            <ns2:p>644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0.0</ns2:p>
          </ns1:table-cell>
          <ns1:table-cell>
            <ns2:p>Hendersonville</ns2:p>
          </ns1:table-cell>
          <ns1:table-cell>
            <ns2:p>TN</ns2:p>
          </ns1:table-cell>
          <ns1:table-cell>
            <ns2:p>6426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1.0</ns2:p>
          </ns1:table-cell>
          <ns1:table-cell>
            <ns2:p>Coon Rapids</ns2:p>
          </ns1:table-cell>
          <ns1:table-cell>
            <ns2:p>MN</ns2:p>
          </ns1:table-cell>
          <ns1:table-cell>
            <ns2:p>6419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2.0</ns2:p>
          </ns1:table-cell>
          <ns1:table-cell>
            <ns2:p>Laguna Niguel</ns2:p>
          </ns1:table-cell>
          <ns1:table-cell>
            <ns2:p>CA</ns2:p>
          </ns1:table-cell>
          <ns1:table-cell>
            <ns2:p>641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3.0</ns2:p>
          </ns1:table-cell>
          <ns1:table-cell>
            <ns2:p>Millcreek</ns2:p>
          </ns1:table-cell>
          <ns1:table-cell>
            <ns2:p>UT</ns2:p>
          </ns1:table-cell>
          <ns1:table-cell>
            <ns2:p>6392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4.0</ns2:p>
          </ns1:table-cell>
          <ns1:table-cell>
            <ns2:p>Palm Beach Gardens</ns2:p>
          </ns1:table-cell>
          <ns1:table-cell>
            <ns2:p>FL</ns2:p>
          </ns1:table-cell>
          <ns1:table-cell>
            <ns2:p>638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5.0</ns2:p>
          </ns1:table-cell>
          <ns1:table-cell>
            <ns2:p>Wylie</ns2:p>
          </ns1:table-cell>
          <ns1:table-cell>
            <ns2:p>TX</ns2:p>
          </ns1:table-cell>
          <ns1:table-cell>
            <ns2:p>638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6.0</ns2:p>
          </ns1:table-cell>
          <ns1:table-cell>
            <ns2:p>Moore</ns2:p>
          </ns1:table-cell>
          <ns1:table-cell>
            <ns2:p>OK</ns2:p>
          </ns1:table-cell>
          <ns1:table-cell>
            <ns2:p>6360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7.0</ns2:p>
          </ns1:table-cell>
          <ns1:table-cell>
            <ns2:p>Marietta</ns2:p>
          </ns1:table-cell>
          <ns1:table-cell>
            <ns2:p>GA</ns2:p>
          </ns1:table-cell>
          <ns1:table-cell>
            <ns2:p>6357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8.0</ns2:p>
          </ns1:table-cell>
          <ns1:table-cell>
            <ns2:p>Chapel Hill</ns2:p>
          </ns1:table-cell>
          <ns1:table-cell>
            <ns2:p>NC</ns2:p>
          </ns1:table-cell>
          <ns1:table-cell>
            <ns2:p>6356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29.0</ns2:p>
          </ns1:table-cell>
          <ns1:table-cell>
            <ns2:p>Lynwood</ns2:p>
          </ns1:table-cell>
          <ns1:table-cell>
            <ns2:p>CA</ns2:p>
          </ns1:table-cell>
          <ns1:table-cell>
            <ns2:p>635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0.0</ns2:p>
          </ns1:table-cell>
          <ns1:table-cell>
            <ns2:p>Smyrna</ns2:p>
          </ns1:table-cell>
          <ns1:table-cell>
            <ns2:p>TN</ns2:p>
          </ns1:table-cell>
          <ns1:table-cell>
            <ns2:p>6332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1.0</ns2:p>
          </ns1:table-cell>
          <ns1:table-cell>
            <ns2:p>Herriman</ns2:p>
          </ns1:table-cell>
          <ns1:table-cell>
            <ns2:p>UT</ns2:p>
          </ns1:table-cell>
          <ns1:table-cell>
            <ns2:p>6328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2.0</ns2:p>
          </ns1:table-cell>
          <ns1:table-cell>
            <ns2:p>Bossier City</ns2:p>
          </ns1:table-cell>
          <ns1:table-cell>
            <ns2:p>LA</ns2:p>
          </ns1:table-cell>
          <ns1:table-cell>
            <ns2:p>6325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3.0</ns2:p>
          </ns1:table-cell>
          <ns1:table-cell>
            <ns2:p>Porterville</ns2:p>
          </ns1:table-cell>
          <ns1:table-cell>
            <ns2:p>CA</ns2:p>
          </ns1:table-cell>
          <ns1:table-cell>
            <ns2:p>630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4.0</ns2:p>
          </ns1:table-cell>
          <ns1:table-cell>
            <ns2:p>Eden Prairie</ns2:p>
          </ns1:table-cell>
          <ns1:table-cell>
            <ns2:p>MN</ns2:p>
          </ns1:table-cell>
          <ns1:table-cell>
            <ns2:p>630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5.0</ns2:p>
          </ns1:table-cell>
          <ns1:table-cell>
            <ns2:p>Bentonville</ns2:p>
          </ns1:table-cell>
          <ns1:table-cell>
            <ns2:p>AR</ns2:p>
          </ns1:table-cell>
          <ns1:table-cell>
            <ns2:p>63057</ns2:p>
          </ns1:table-cell>
          <ns1:table-cell>
            <ns2:p>Smith Bros. Plumbing</ns2:p>
          </ns1:table-cell>
          <ns1:table-cell>
            <ns2:p>(479) 877-5803</ns2:p>
          </ns1:table-cell>
          <ns1:table-cell>
            <ns2:p/>
          </ns1:table-cell>
          <ns1:table-cell>
            <ns2:p>https://www.callsmith.com/</ns2:p>
          </ns1:table-cell>
          <ns1:table-cell>
            <ns2:p>8816 W McNelly Rd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6.0</ns2:p>
          </ns1:table-cell>
          <ns1:table-cell>
            <ns2:p>Utica</ns2:p>
          </ns1:table-cell>
          <ns1:table-cell>
            <ns2:p>NY</ns2:p>
          </ns1:table-cell>
          <ns1:table-cell>
            <ns2:p>6297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7.0</ns2:p>
          </ns1:table-cell>
          <ns1:table-cell>
            <ns2:p>White Plains</ns2:p>
          </ns1:table-cell>
          <ns1:table-cell>
            <ns2:p>NY</ns2:p>
          </ns1:table-cell>
          <ns1:table-cell>
            <ns2:p>628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8.0</ns2:p>
          </ns1:table-cell>
          <ns1:table-cell>
            <ns2:p>Lakewood</ns2:p>
          </ns1:table-cell>
          <ns1:table-cell>
            <ns2:p>WA</ns2:p>
          </ns1:table-cell>
          <ns1:table-cell>
            <ns2:p>6275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39.0</ns2:p>
          </ns1:table-cell>
          <ns1:table-cell>
            <ns2:p>Little Elm</ns2:p>
          </ns1:table-cell>
          <ns1:table-cell>
            <ns2:p>TX</ns2:p>
          </ns1:table-cell>
          <ns1:table-cell>
            <ns2:p>627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0.0</ns2:p>
          </ns1:table-cell>
          <ns1:table-cell>
            <ns2:p>Vineland</ns2:p>
          </ns1:table-cell>
          <ns1:table-cell>
            <ns2:p>NJ</ns2:p>
          </ns1:table-cell>
          <ns1:table-cell>
            <ns2:p>6270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1.0</ns2:p>
          </ns1:table-cell>
          <ns1:table-cell>
            <ns2:p>Council Bluffs</ns2:p>
          </ns1:table-cell>
          <ns1:table-cell>
            <ns2:p>IA</ns2:p>
          </ns1:table-cell>
          <ns1:table-cell>
            <ns2:p>6268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2.0</ns2:p>
          </ns1:table-cell>
          <ns1:table-cell>
            <ns2:p>Wellington</ns2:p>
          </ns1:table-cell>
          <ns1:table-cell>
            <ns2:p>FL</ns2:p>
          </ns1:table-cell>
          <ns1:table-cell>
            <ns2:p>6266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3.0</ns2:p>
          </ns1:table-cell>
          <ns1:table-cell>
            <ns2:p>Taunton</ns2:p>
          </ns1:table-cell>
          <ns1:table-cell>
            <ns2:p>MA</ns2:p>
          </ns1:table-cell>
          <ns1:table-cell>
            <ns2:p>6252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4.0</ns2:p>
          </ns1:table-cell>
          <ns1:table-cell>
            <ns2:p>Woodland</ns2:p>
          </ns1:table-cell>
          <ns1:table-cell>
            <ns2:p>CA</ns2:p>
          </ns1:table-cell>
          <ns1:table-cell>
            <ns2:p>625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5.0</ns2:p>
          </ns1:table-cell>
          <ns1:table-cell>
            <ns2:p>Jupiter</ns2:p>
          </ns1:table-cell>
          <ns1:table-cell>
            <ns2:p>FL</ns2:p>
          </ns1:table-cell>
          <ns1:table-cell>
            <ns2:p>6235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6.0</ns2:p>
          </ns1:table-cell>
          <ns1:table-cell>
            <ns2:p>Bristol</ns2:p>
          </ns1:table-cell>
          <ns1:table-cell>
            <ns2:p>CT</ns2:p>
          </ns1:table-cell>
          <ns1:table-cell>
            <ns2:p>623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7.0</ns2:p>
          </ns1:table-cell>
          <ns1:table-cell>
            <ns2:p>Winter Haven</ns2:p>
          </ns1:table-cell>
          <ns1:table-cell>
            <ns2:p>FL</ns2:p>
          </ns1:table-cell>
          <ns1:table-cell>
            <ns2:p>623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8.0</ns2:p>
          </ns1:table-cell>
          <ns1:table-cell>
            <ns2:p>Hanford</ns2:p>
          </ns1:table-cell>
          <ns1:table-cell>
            <ns2:p>CA</ns2:p>
          </ns1:table-cell>
          <ns1:table-cell>
            <ns2:p>6222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49.0</ns2:p>
          </ns1:table-cell>
          <ns1:table-cell>
            <ns2:p>San Clemente</ns2:p>
          </ns1:table-cell>
          <ns1:table-cell>
            <ns2:p>CA</ns2:p>
          </ns1:table-cell>
          <ns1:table-cell>
            <ns2:p>6222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0.0</ns2:p>
          </ns1:table-cell>
          <ns1:table-cell>
            <ns2:p>Pontiac</ns2:p>
          </ns1:table-cell>
          <ns1:table-cell>
            <ns2:p>MI</ns2:p>
          </ns1:table-cell>
          <ns1:table-cell>
            <ns2:p>6207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1.0</ns2:p>
          </ns1:table-cell>
          <ns1:table-cell>
            <ns2:p>Santa Cruz</ns2:p>
          </ns1:table-cell>
          <ns1:table-cell>
            <ns2:p>CA</ns2:p>
          </ns1:table-cell>
          <ns1:table-cell>
            <ns2:p>6179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2.0</ns2:p>
          </ns1:table-cell>
          <ns1:table-cell>
            <ns2:p>Kannapolis</ns2:p>
          </ns1:table-cell>
          <ns1:table-cell>
            <ns2:p>NC</ns2:p>
          </ns1:table-cell>
          <ns1:table-cell>
            <ns2:p>617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3.0</ns2:p>
          </ns1:table-cell>
          <ns1:table-cell>
            <ns2:p>Blue Springs</ns2:p>
          </ns1:table-cell>
          <ns1:table-cell>
            <ns2:p>MO</ns2:p>
          </ns1:table-cell>
          <ns1:table-cell>
            <ns2:p>616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4.0</ns2:p>
          </ns1:table-cell>
          <ns1:table-cell>
            <ns2:p>Corvallis</ns2:p>
          </ns1:table-cell>
          <ns1:table-cell>
            <ns2:p>OR</ns2:p>
          </ns1:table-cell>
          <ns1:table-cell>
            <ns2:p>6149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5.0</ns2:p>
          </ns1:table-cell>
          <ns1:table-cell>
            <ns2:p>Burlington</ns2:p>
          </ns1:table-cell>
          <ns1:table-cell>
            <ns2:p>NC</ns2:p>
          </ns1:table-cell>
          <ns1:table-cell>
            <ns2:p>6149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6.0</ns2:p>
          </ns1:table-cell>
          <ns1:table-cell>
            <ns2:p>St. Peters</ns2:p>
          </ns1:table-cell>
          <ns1:table-cell>
            <ns2:p>MO</ns2:p>
          </ns1:table-cell>
          <ns1:table-cell>
            <ns2:p>6147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7.0</ns2:p>
          </ns1:table-cell>
          <ns1:table-cell>
            <ns2:p>Springfield</ns2:p>
          </ns1:table-cell>
          <ns1:table-cell>
            <ns2:p>OR</ns2:p>
          </ns1:table-cell>
          <ns1:table-cell>
            <ns2:p>6143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8.0</ns2:p>
          </ns1:table-cell>
          <ns1:table-cell>
            <ns2:p>Saratoga Springs</ns2:p>
          </ns1:table-cell>
          <ns1:table-cell>
            <ns2:p>UT</ns2:p>
          </ns1:table-cell>
          <ns1:table-cell>
            <ns2:p>6139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59.0</ns2:p>
          </ns1:table-cell>
          <ns1:table-cell>
            <ns2:p>Stonecrest</ns2:p>
          </ns1:table-cell>
          <ns1:table-cell>
            <ns2:p>GA</ns2:p>
          </ns1:table-cell>
          <ns1:table-cell>
            <ns2:p>6133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0.0</ns2:p>
          </ns1:table-cell>
          <ns1:table-cell>
            <ns2:p>Spring Hill</ns2:p>
          </ns1:table-cell>
          <ns1:table-cell>
            <ns2:p>TN</ns2:p>
          </ns1:table-cell>
          <ns1:table-cell>
            <ns2:p>6133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1.0</ns2:p>
          </ns1:table-cell>
          <ns1:table-cell>
            <ns2:p>Taylor</ns2:p>
          </ns1:table-cell>
          <ns1:table-cell>
            <ns2:p>MI</ns2:p>
          </ns1:table-cell>
          <ns1:table-cell>
            <ns2:p>6127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2.0</ns2:p>
          </ns1:table-cell>
          <ns1:table-cell>
            <ns2:p>La Habra</ns2:p>
          </ns1:table-cell>
          <ns1:table-cell>
            <ns2:p>CA</ns2:p>
          </ns1:table-cell>
          <ns1:table-cell>
            <ns2:p>609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3.0</ns2:p>
          </ns1:table-cell>
          <ns1:table-cell>
            <ns2:p>Owensboro</ns2:p>
          </ns1:table-cell>
          <ns1:table-cell>
            <ns2:p>KY</ns2:p>
          </ns1:table-cell>
          <ns1:table-cell>
            <ns2:p>608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4.0</ns2:p>
          </ns1:table-cell>
          <ns1:table-cell>
            <ns2:p>North Miami</ns2:p>
          </ns1:table-cell>
          <ns1:table-cell>
            <ns2:p>FL</ns2:p>
          </ns1:table-cell>
          <ns1:table-cell>
            <ns2:p>608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5.0</ns2:p>
          </ns1:table-cell>
          <ns1:table-cell>
            <ns2:p>Beaumont</ns2:p>
          </ns1:table-cell>
          <ns1:table-cell>
            <ns2:p>CA</ns2:p>
          </ns1:table-cell>
          <ns1:table-cell>
            <ns2:p>6083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6.0</ns2:p>
          </ns1:table-cell>
          <ns1:table-cell>
            <ns2:p>Meriden</ns2:p>
          </ns1:table-cell>
          <ns1:table-cell>
            <ns2:p>CT</ns2:p>
          </ns1:table-cell>
          <ns1:table-cell>
            <ns2:p>608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7.0</ns2:p>
          </ns1:table-cell>
          <ns1:table-cell>
            <ns2:p>Gilroy</ns2:p>
          </ns1:table-cell>
          <ns1:table-cell>
            <ns2:p>CA</ns2:p>
          </ns1:table-cell>
          <ns1:table-cell>
            <ns2:p>6076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8.0</ns2:p>
          </ns1:table-cell>
          <ns1:table-cell>
            <ns2:p>Encinitas</ns2:p>
          </ns1:table-cell>
          <ns1:table-cell>
            <ns2:p>CA</ns2:p>
          </ns1:table-cell>
          <ns1:table-cell>
            <ns2:p>6073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69.0</ns2:p>
          </ns1:table-cell>
          <ns1:table-cell>
            <ns2:p>Montebello</ns2:p>
          </ns1:table-cell>
          <ns1:table-cell>
            <ns2:p>CA</ns2:p>
          </ns1:table-cell>
          <ns1:table-cell>
            <ns2:p>6069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0.0</ns2:p>
          </ns1:table-cell>
          <ns1:table-cell>
            <ns2:p>Dearborn Heights</ns2:p>
          </ns1:table-cell>
          <ns1:table-cell>
            <ns2:p>MI</ns2:p>
          </ns1:table-cell>
          <ns1:table-cell>
            <ns2:p>6066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1.0</ns2:p>
          </ns1:table-cell>
          <ns1:table-cell>
            <ns2:p>Lenexa</ns2:p>
          </ns1:table-cell>
          <ns1:table-cell>
            <ns2:p>KS</ns2:p>
          </ns1:table-cell>
          <ns1:table-cell>
            <ns2:p>6050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2.0</ns2:p>
          </ns1:table-cell>
          <ns1:table-cell>
            <ns2:p>Grand Forks</ns2:p>
          </ns1:table-cell>
          <ns1:table-cell>
            <ns2:p>ND</ns2:p>
          </ns1:table-cell>
          <ns1:table-cell>
            <ns2:p>6036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3.0</ns2:p>
          </ns1:table-cell>
          <ns1:table-cell>
            <ns2:p>Great Falls</ns2:p>
          </ns1:table-cell>
          <ns1:table-cell>
            <ns2:p>MT</ns2:p>
          </ns1:table-cell>
          <ns1:table-cell>
            <ns2:p>602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4.0</ns2:p>
          </ns1:table-cell>
          <ns1:table-cell>
            <ns2:p>Revere</ns2:p>
          </ns1:table-cell>
          <ns1:table-cell>
            <ns2:p>MA</ns2:p>
          </ns1:table-cell>
          <ns1:table-cell>
            <ns2:p>601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5.0</ns2:p>
          </ns1:table-cell>
          <ns1:table-cell>
            <ns2:p>West Allis</ns2:p>
          </ns1:table-cell>
          <ns1:table-cell>
            <ns2:p>WI</ns2:p>
          </ns1:table-cell>
          <ns1:table-cell>
            <ns2:p>601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6.0</ns2:p>
          </ns1:table-cell>
          <ns1:table-cell>
            <ns2:p>Margate</ns2:p>
          </ns1:table-cell>
          <ns1:table-cell>
            <ns2:p>FL</ns2:p>
          </ns1:table-cell>
          <ns1:table-cell>
            <ns2:p>6007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7.0</ns2:p>
          </ns1:table-cell>
          <ns1:table-cell>
            <ns2:p>Euless</ns2:p>
          </ns1:table-cell>
          <ns1:table-cell>
            <ns2:p>TX</ns2:p>
          </ns1:table-cell>
          <ns1:table-cell>
            <ns2:p>600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8.0</ns2:p>
          </ns1:table-cell>
          <ns1:table-cell>
            <ns2:p>Kokomo</ns2:p>
          </ns1:table-cell>
          <ns1:table-cell>
            <ns2:p>IN</ns2:p>
          </ns1:table-cell>
          <ns1:table-cell>
            <ns2:p>5999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79.0</ns2:p>
          </ns1:table-cell>
          <ns1:table-cell>
            <ns2:p>La Mesa</ns2:p>
          </ns1:table-cell>
          <ns1:table-cell>
            <ns2:p>CA</ns2:p>
          </ns1:table-cell>
          <ns1:table-cell>
            <ns2:p>599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0.0</ns2:p>
          </ns1:table-cell>
          <ns1:table-cell>
            <ns2:p>Medford</ns2:p>
          </ns1:table-cell>
          <ns1:table-cell>
            <ns2:p>MA</ns2:p>
          </ns1:table-cell>
          <ns1:table-cell>
            <ns2:p>598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1.0</ns2:p>
          </ns1:table-cell>
          <ns1:table-cell>
            <ns2:p>Hempstead</ns2:p>
          </ns1:table-cell>
          <ns1:table-cell>
            <ns2:p>NY</ns2:p>
          </ns1:table-cell>
          <ns1:table-cell>
            <ns2:p>598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2.0</ns2:p>
          </ns1:table-cell>
          <ns1:table-cell>
            <ns2:p>Weymouth Town</ns2:p>
          </ns1:table-cell>
          <ns1:table-cell>
            <ns2:p>MA</ns2:p>
          </ns1:table-cell>
          <ns1:table-cell>
            <ns2:p>5975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3.0</ns2:p>
          </ns1:table-cell>
          <ns1:table-cell>
            <ns2:p>Texas City</ns2:p>
          </ns1:table-cell>
          <ns1:table-cell>
            <ns2:p>TX</ns2:p>
          </ns1:table-cell>
          <ns1:table-cell>
            <ns2:p>597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4.0</ns2:p>
          </ns1:table-cell>
          <ns1:table-cell>
            <ns2:p>Petaluma</ns2:p>
          </ns1:table-cell>
          <ns1:table-cell>
            <ns2:p>CA</ns2:p>
          </ns1:table-cell>
          <ns1:table-cell>
            <ns2:p>596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5.0</ns2:p>
          </ns1:table-cell>
          <ns1:table-cell>
            <ns2:p>Brookhaven</ns2:p>
          </ns1:table-cell>
          <ns1:table-cell>
            <ns2:p>GA</ns2:p>
          </ns1:table-cell>
          <ns1:table-cell>
            <ns2:p>596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6.0</ns2:p>
          </ns1:table-cell>
          <ns1:table-cell>
            <ns2:p>San Rafael</ns2:p>
          </ns1:table-cell>
          <ns1:table-cell>
            <ns2:p>CA</ns2:p>
          </ns1:table-cell>
          <ns1:table-cell>
            <ns2:p>594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7.0</ns2:p>
          </ns1:table-cell>
          <ns1:table-cell>
            <ns2:p>Lake Havasu City</ns2:p>
          </ns1:table-cell>
          <ns1:table-cell>
            <ns2:p>AZ</ns2:p>
          </ns1:table-cell>
          <ns1:table-cell>
            <ns2:p>593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8.0</ns2:p>
          </ns1:table-cell>
          <ns1:table-cell>
            <ns2:p>Dubuque</ns2:p>
          </ns1:table-cell>
          <ns1:table-cell>
            <ns2:p>IA</ns2:p>
          </ns1:table-cell>
          <ns1:table-cell>
            <ns2:p>5914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89.0</ns2:p>
          </ns1:table-cell>
          <ns1:table-cell>
            <ns2:p>Hoboken</ns2:p>
          </ns1:table-cell>
          <ns1:table-cell>
            <ns2:p>NJ</ns2:p>
          </ns1:table-cell>
          <ns1:table-cell>
            <ns2:p>590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0.0</ns2:p>
          </ns1:table-cell>
          <ns1:table-cell>
            <ns2:p>Pico Rivera</ns2:p>
          </ns1:table-cell>
          <ns1:table-cell>
            <ns2:p>CA</ns2:p>
          </ns1:table-cell>
          <ns1:table-cell>
            <ns2:p>5891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1.0</ns2:p>
          </ns1:table-cell>
          <ns1:table-cell>
            <ns2:p>Lacey</ns2:p>
          </ns1:table-cell>
          <ns1:table-cell>
            <ns2:p>WA</ns2:p>
          </ns1:table-cell>
          <ns1:table-cell>
            <ns2:p>588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2.0</ns2:p>
          </ns1:table-cell>
          <ns1:table-cell>
            <ns2:p>Youngstown</ns2:p>
          </ns1:table-cell>
          <ns1:table-cell>
            <ns2:p>OH</ns2:p>
          </ns1:table-cell>
          <ns1:table-cell>
            <ns2:p>588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3.0</ns2:p>
          </ns1:table-cell>
          <ns1:table-cell>
            <ns2:p>Bozeman</ns2:p>
          </ns1:table-cell>
          <ns1:table-cell>
            <ns2:p>MT</ns2:p>
          </ns1:table-cell>
          <ns1:table-cell>
            <ns2:p>588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4.0</ns2:p>
          </ns1:table-cell>
          <ns1:table-cell>
            <ns2:p>Midwest City</ns2:p>
          </ns1:table-cell>
          <ns1:table-cell>
            <ns2:p>OK</ns2:p>
          </ns1:table-cell>
          <ns1:table-cell>
            <ns2:p>5879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5.0</ns2:p>
          </ns1:table-cell>
          <ns1:table-cell>
            <ns2:p>Des Plaines</ns2:p>
          </ns1:table-cell>
          <ns1:table-cell>
            <ns2:p>IL</ns2:p>
          </ns1:table-cell>
          <ns1:table-cell>
            <ns2:p>5877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6.0</ns2:p>
          </ns1:table-cell>
          <ns1:table-cell>
            <ns2:p>Pocatello</ns2:p>
          </ns1:table-cell>
          <ns1:table-cell>
            <ns2:p>ID</ns2:p>
          </ns1:table-cell>
          <ns1:table-cell>
            <ns2:p>587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6.0</ns2:p>
          </ns1:table-cell>
          <ns1:table-cell>
            <ns2:p>Casper</ns2:p>
          </ns1:table-cell>
          <ns1:table-cell>
            <ns2:p>WY</ns2:p>
          </ns1:table-cell>
          <ns1:table-cell>
            <ns2:p>587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8.0</ns2:p>
          </ns1:table-cell>
          <ns1:table-cell>
            <ns2:p>Terre Haute</ns2:p>
          </ns1:table-cell>
          <ns1:table-cell>
            <ns2:p>IN</ns2:p>
          </ns1:table-cell>
          <ns1:table-cell>
            <ns2:p>5876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699.0</ns2:p>
          </ns1:table-cell>
          <ns1:table-cell>
            <ns2:p>Coconut Creek</ns2:p>
          </ns1:table-cell>
          <ns1:table-cell>
            <ns2:p>FL</ns2:p>
          </ns1:table-cell>
          <ns1:table-cell>
            <ns2:p>5862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0.0</ns2:p>
          </ns1:table-cell>
          <ns1:table-cell>
            <ns2:p>Carson City</ns2:p>
          </ns1:table-cell>
          <ns1:table-cell>
            <ns2:p>NV</ns2:p>
          </ns1:table-cell>
          <ns1:table-cell>
            <ns2:p>5857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1.0</ns2:p>
          </ns1:table-cell>
          <ns1:table-cell>
            <ns2:p>Gardena</ns2:p>
          </ns1:table-cell>
          <ns1:table-cell>
            <ns2:p>CA</ns2:p>
          </ns1:table-cell>
          <ns1:table-cell>
            <ns2:p>5846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2.0</ns2:p>
          </ns1:table-cell>
          <ns1:table-cell>
            <ns2:p>Sarasota</ns2:p>
          </ns1:table-cell>
          <ns1:table-cell>
            <ns2:p>FL</ns2:p>
          </ns1:table-cell>
          <ns1:table-cell>
            <ns2:p>584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3.0</ns2:p>
          </ns1:table-cell>
          <ns1:table-cell>
            <ns2:p>Bowie</ns2:p>
          </ns1:table-cell>
          <ns1:table-cell>
            <ns2:p>MD</ns2:p>
          </ns1:table-cell>
          <ns1:table-cell>
            <ns2:p>583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4.0</ns2:p>
          </ns1:table-cell>
          <ns1:table-cell>
            <ns2:p>Lancaster</ns2:p>
          </ns1:table-cell>
          <ns1:table-cell>
            <ns2:p>PA</ns2:p>
          </ns1:table-cell>
          <ns1:table-cell>
            <ns2:p>5836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5.0</ns2:p>
          </ns1:table-cell>
          <ns1:table-cell>
            <ns2:p>Cupertino</ns2:p>
          </ns1:table-cell>
          <ns1:table-cell>
            <ns2:p>CA</ns2:p>
          </ns1:table-cell>
          <ns1:table-cell>
            <ns2:p>583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6.0</ns2:p>
          </ns1:table-cell>
          <ns1:table-cell>
            <ns2:p>Springfield</ns2:p>
          </ns1:table-cell>
          <ns1:table-cell>
            <ns2:p>OH</ns2:p>
          </ns1:table-cell>
          <ns1:table-cell>
            <ns2:p>582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7.0</ns2:p>
          </ns1:table-cell>
          <ns1:table-cell>
            <ns2:p>Santee</ns2:p>
          </ns1:table-cell>
          <ns1:table-cell>
            <ns2:p>CA</ns2:p>
          </ns1:table-cell>
          <ns1:table-cell>
            <ns2:p>5820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8.0</ns2:p>
          </ns1:table-cell>
          <ns1:table-cell>
            <ns2:p>Coeur d'Alene</ns2:p>
          </ns1:table-cell>
          <ns1:table-cell>
            <ns2:p>ID</ns2:p>
          </ns1:table-cell>
          <ns1:table-cell>
            <ns2:p>5817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09.0</ns2:p>
          </ns1:table-cell>
          <ns1:table-cell>
            <ns2:p>Wake Forest</ns2:p>
          </ns1:table-cell>
          <ns1:table-cell>
            <ns2:p>NC</ns2:p>
          </ns1:table-cell>
          <ns1:table-cell>
            <ns2:p>5814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0.0</ns2:p>
          </ns1:table-cell>
          <ns1:table-cell>
            <ns2:p>Decatur</ns2:p>
          </ns1:table-cell>
          <ns1:table-cell>
            <ns2:p>AL</ns2:p>
          </ns1:table-cell>
          <ns1:table-cell>
            <ns2:p>5805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1.0</ns2:p>
          </ns1:table-cell>
          <ns1:table-cell>
            <ns2:p>Bradenton</ns2:p>
          </ns1:table-cell>
          <ns1:table-cell>
            <ns2:p>FL</ns2:p>
          </ns1:table-cell>
          <ns1:table-cell>
            <ns2:p>580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2.0</ns2:p>
          </ns1:table-cell>
          <ns1:table-cell>
            <ns2:p>Orland Park</ns2:p>
          </ns1:table-cell>
          <ns1:table-cell>
            <ns2:p>IL</ns2:p>
          </ns1:table-cell>
          <ns1:table-cell>
            <ns2:p>5795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3.0</ns2:p>
          </ns1:table-cell>
          <ns1:table-cell>
            <ns2:p>Tigard</ns2:p>
          </ns1:table-cell>
          <ns1:table-cell>
            <ns2:p>OR</ns2:p>
          </ns1:table-cell>
          <ns1:table-cell>
            <ns2:p>5792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4.0</ns2:p>
          </ns1:table-cell>
          <ns1:table-cell>
            <ns2:p>St. Clair Shores</ns2:p>
          </ns1:table-cell>
          <ns1:table-cell>
            <ns2:p>MI</ns2:p>
          </ns1:table-cell>
          <ns1:table-cell>
            <ns2:p>5787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5.0</ns2:p>
          </ns1:table-cell>
          <ns1:table-cell>
            <ns2:p>Southaven</ns2:p>
          </ns1:table-cell>
          <ns1:table-cell>
            <ns2:p>MS</ns2:p>
          </ns1:table-cell>
          <ns1:table-cell>
            <ns2:p>5781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6.0</ns2:p>
          </ns1:table-cell>
          <ns1:table-cell>
            <ns2:p>National City</ns2:p>
          </ns1:table-cell>
          <ns1:table-cell>
            <ns2:p>CA</ns2:p>
          </ns1:table-cell>
          <ns1:table-cell>
            <ns2:p>578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7.0</ns2:p>
          </ns1:table-cell>
          <ns1:table-cell>
            <ns2:p>Bonita Springs</ns2:p>
          </ns1:table-cell>
          <ns1:table-cell>
            <ns2:p>FL</ns2:p>
          </ns1:table-cell>
          <ns1:table-cell>
            <ns2:p>576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8.0</ns2:p>
          </ns1:table-cell>
          <ns1:table-cell>
            <ns2:p>Highland</ns2:p>
          </ns1:table-cell>
          <ns1:table-cell>
            <ns2:p>CA</ns2:p>
          </ns1:table-cell>
          <ns1:table-cell>
            <ns2:p>576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19.0</ns2:p>
          </ns1:table-cell>
          <ns1:table-cell>
            <ns2:p>Royal Oak</ns2:p>
          </ns1:table-cell>
          <ns1:table-cell>
            <ns2:p>MI</ns2:p>
          </ns1:table-cell>
          <ns1:table-cell>
            <ns2:p>575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0.0</ns2:p>
          </ns1:table-cell>
          <ns1:table-cell>
            <ns2:p>Kingsport</ns2:p>
          </ns1:table-cell>
          <ns1:table-cell>
            <ns2:p>TN</ns2:p>
          </ns1:table-cell>
          <ns1:table-cell>
            <ns2:p>5753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1.0</ns2:p>
          </ns1:table-cell>
          <ns1:table-cell>
            <ns2:p>Smyrna</ns2:p>
          </ns1:table-cell>
          <ns1:table-cell>
            <ns2:p>GA</ns2:p>
          </ns1:table-cell>
          <ns1:table-cell>
            <ns2:p>5751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2.0</ns2:p>
          </ns1:table-cell>
          <ns1:table-cell>
            <ns2:p>Taylorsville</ns2:p>
          </ns1:table-cell>
          <ns1:table-cell>
            <ns2:p>UT</ns2:p>
          </ns1:table-cell>
          <ns1:table-cell>
            <ns2:p>574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3.0</ns2:p>
          </ns1:table-cell>
          <ns1:table-cell>
            <ns2:p>Monterey Park</ns2:p>
          </ns1:table-cell>
          <ns1:table-cell>
            <ns2:p>CA</ns2:p>
          </ns1:table-cell>
          <ns1:table-cell>
            <ns2:p>5745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4.0</ns2:p>
          </ns1:table-cell>
          <ns1:table-cell>
            <ns2:p>Kettering</ns2:p>
          </ns1:table-cell>
          <ns1:table-cell>
            <ns2:p>OH</ns2:p>
          </ns1:table-cell>
          <ns1:table-cell>
            <ns2:p>5739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5.0</ns2:p>
          </ns1:table-cell>
          <ns1:table-cell>
            <ns2:p>Lincoln</ns2:p>
          </ns1:table-cell>
          <ns1:table-cell>
            <ns2:p>CA</ns2:p>
          </ns1:table-cell>
          <ns1:table-cell>
            <ns2:p>5736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6.0</ns2:p>
          </ns1:table-cell>
          <ns1:table-cell>
            <ns2:p>Plainfield</ns2:p>
          </ns1:table-cell>
          <ns1:table-cell>
            <ns2:p>NJ</ns2:p>
          </ns1:table-cell>
          <ns1:table-cell>
            <ns2:p>5714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7.0</ns2:p>
          </ns1:table-cell>
          <ns1:table-cell>
            <ns2:p>New Brunswick</ns2:p>
          </ns1:table-cell>
          <ns1:table-cell>
            <ns2:p>NJ</ns2:p>
          </ns1:table-cell>
          <ns1:table-cell>
            <ns2:p>5713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8.0</ns2:p>
          </ns1:table-cell>
          <ns1:table-cell>
            <ns2:p>Burleson</ns2:p>
          </ns1:table-cell>
          <ns1:table-cell>
            <ns2:p>TX</ns2:p>
          </ns1:table-cell>
          <ns1:table-cell>
            <ns2:p>5690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29.0</ns2:p>
          </ns1:table-cell>
          <ns1:table-cell>
            <ns2:p>Albany</ns2:p>
          </ns1:table-cell>
          <ns1:table-cell>
            <ns2:p>OR</ns2:p>
          </ns1:table-cell>
          <ns1:table-cell>
            <ns2:p>5689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0.0</ns2:p>
          </ns1:table-cell>
          <ns1:table-cell>
            <ns2:p>Perth Amboy</ns2:p>
          </ns1:table-cell>
          <ns1:table-cell>
            <ns2:p>NJ</ns2:p>
          </ns1:table-cell>
          <ns1:table-cell>
            <ns2:p>5673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1.0</ns2:p>
          </ns1:table-cell>
          <ns1:table-cell>
            <ns2:p>Olympia</ns2:p>
          </ns1:table-cell>
          <ns1:table-cell>
            <ns2:p>WA</ns2:p>
          </ns1:table-cell>
          <ns1:table-cell>
            <ns2:p>5672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2.0</ns2:p>
          </ns1:table-cell>
          <ns1:table-cell>
            <ns2:p>DeSoto</ns2:p>
          </ns1:table-cell>
          <ns1:table-cell>
            <ns2:p>TX</ns2:p>
          </ns1:table-cell>
          <ns1:table-cell>
            <ns2:p>5668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3.0</ns2:p>
          </ns1:table-cell>
          <ns1:table-cell>
            <ns2:p>Oak Lawn</ns2:p>
          </ns1:table-cell>
          <ns1:table-cell>
            <ns2:p>IL</ns2:p>
          </ns1:table-cell>
          <ns1:table-cell>
            <ns2:p>5645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4.0</ns2:p>
          </ns1:table-cell>
          <ns1:table-cell>
            <ns2:p>Bartlett</ns2:p>
          </ns1:table-cell>
          <ns1:table-cell>
            <ns2:p>TN</ns2:p>
          </ns1:table-cell>
          <ns1:table-cell>
            <ns2:p>5641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5.0</ns2:p>
          </ns1:table-cell>
          <ns1:table-cell>
            <ns2:p>West Sacramento</ns2:p>
          </ns1:table-cell>
          <ns1:table-cell>
            <ns2:p>CA</ns2:p>
          </ns1:table-cell>
          <ns1:table-cell>
            <ns2:p>5621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5.0</ns2:p>
          </ns1:table-cell>
          <ns1:table-cell>
            <ns2:p>Twin Falls</ns2:p>
          </ns1:table-cell>
          <ns1:table-cell>
            <ns2:p>ID</ns2:p>
          </ns1:table-cell>
          <ns1:table-cell>
            <ns2:p>5621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7.0</ns2:p>
          </ns1:table-cell>
          <ns1:table-cell>
            <ns2:p>Valdosta</ns2:p>
          </ns1:table-cell>
          <ns1:table-cell>
            <ns2:p>GA</ns2:p>
          </ns1:table-cell>
          <ns1:table-cell>
            <ns2:p>5618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8.0</ns2:p>
          </ns1:table-cell>
          <ns1:table-cell>
            <ns2:p>Anderson</ns2:p>
          </ns1:table-cell>
          <ns1:table-cell>
            <ns2:p>IN</ns2:p>
          </ns1:table-cell>
          <ns1:table-cell>
            <ns2:p>5615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39.0</ns2:p>
          </ns1:table-cell>
          <ns1:table-cell>
            <ns2:p>San Jacinto</ns2:p>
          </ns1:table-cell>
          <ns1:table-cell>
            <ns2:p>CA</ns2:p>
          </ns1:table-cell>
          <ns1:table-cell>
            <ns2:p>560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0.0</ns2:p>
          </ns1:table-cell>
          <ns1:table-cell>
            <ns2:p>Peabody</ns2:p>
          </ns1:table-cell>
          <ns1:table-cell>
            <ns2:p>MA</ns2:p>
          </ns1:table-cell>
          <ns1:table-cell>
            <ns2:p>5595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1.0</ns2:p>
          </ns1:table-cell>
          <ns1:table-cell>
            <ns2:p>Mooresville</ns2:p>
          </ns1:table-cell>
          <ns1:table-cell>
            <ns2:p>NC</ns2:p>
          </ns1:table-cell>
          <ns1:table-cell>
            <ns2:p>5584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2.0</ns2:p>
          </ns1:table-cell>
          <ns1:table-cell>
            <ns2:p>Port Arthur</ns2:p>
          </ns1:table-cell>
          <ns1:table-cell>
            <ns2:p>TX</ns2:p>
          </ns1:table-cell>
          <ns1:table-cell>
            <ns2:p>5580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3.0</ns2:p>
          </ns1:table-cell>
          <ns1:table-cell>
            <ns2:p>Logan</ns2:p>
          </ns1:table-cell>
          <ns1:table-cell>
            <ns2:p>UT</ns2:p>
          </ns1:table-cell>
          <ns1:table-cell>
            <ns2:p>5557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4.0</ns2:p>
          </ns1:table-cell>
          <ns1:table-cell>
            <ns2:p>Fountain Valley</ns2:p>
          </ns1:table-cell>
          <ns1:table-cell>
            <ns2:p>CA</ns2:p>
          </ns1:table-cell>
          <ns1:table-cell>
            <ns2:p>5550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5.0</ns2:p>
          </ns1:table-cell>
          <ns1:table-cell>
            <ns2:p>Mount Prospect</ns2:p>
          </ns1:table-cell>
          <ns1:table-cell>
            <ns2:p>IL</ns2:p>
          </ns1:table-cell>
          <ns1:table-cell>
            <ns2:p>5539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6.0</ns2:p>
          </ns1:table-cell>
          <ns1:table-cell>
            <ns2:p>West Haven</ns2:p>
          </ns1:table-cell>
          <ns1:table-cell>
            <ns2:p>CT</ns2:p>
          </ns1:table-cell>
          <ns1:table-cell>
            <ns2:p>5535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7.0</ns2:p>
          </ns1:table-cell>
          <ns1:table-cell>
            <ns2:p>Chicopee</ns2:p>
          </ns1:table-cell>
          <ns1:table-cell>
            <ns2:p>MA</ns2:p>
          </ns1:table-cell>
          <ns1:table-cell>
            <ns2:p>553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8.0</ns2:p>
          </ns1:table-cell>
          <ns1:table-cell>
            <ns2:p>Apple Valley</ns2:p>
          </ns1:table-cell>
          <ns1:table-cell>
            <ns2:p>MN</ns2:p>
          </ns1:table-cell>
          <ns1:table-cell>
            <ns2:p>5524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49.0</ns2:p>
          </ns1:table-cell>
          <ns1:table-cell>
            <ns2:p>Tinley Park</ns2:p>
          </ns1:table-cell>
          <ns1:table-cell>
            <ns2:p>IL</ns2:p>
          </ns1:table-cell>
          <ns1:table-cell>
            <ns2:p>5514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0.0</ns2:p>
          </ns1:table-cell>
          <ns1:table-cell>
            <ns2:p>Rocky Mount</ns2:p>
          </ns1:table-cell>
          <ns1:table-cell>
            <ns2:p>NC</ns2:p>
          </ns1:table-cell>
          <ns1:table-cell>
            <ns2:p>551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1.0</ns2:p>
          </ns1:table-cell>
          <ns1:table-cell>
            <ns2:p>Berwyn</ns2:p>
          </ns1:table-cell>
          <ns1:table-cell>
            <ns2:p>IL</ns2:p>
          </ns1:table-cell>
          <ns1:table-cell>
            <ns2:p>550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2.0</ns2:p>
          </ns1:table-cell>
          <ns1:table-cell>
            <ns2:p>Yucaipa</ns2:p>
          </ns1:table-cell>
          <ns1:table-cell>
            <ns2:p>CA</ns2:p>
          </ns1:table-cell>
          <ns1:table-cell>
            <ns2:p>5495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3.0</ns2:p>
          </ns1:table-cell>
          <ns1:table-cell>
            <ns2:p>Placentia</ns2:p>
          </ns1:table-cell>
          <ns1:table-cell>
            <ns2:p>CA</ns2:p>
          </ns1:table-cell>
          <ns1:table-cell>
            <ns2:p>5491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4.0</ns2:p>
          </ns1:table-cell>
          <ns1:table-cell>
            <ns2:p>Kentwood</ns2:p>
          </ns1:table-cell>
          <ns1:table-cell>
            <ns2:p>MI</ns2:p>
          </ns1:table-cell>
          <ns1:table-cell>
            <ns2:p>5477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5.0</ns2:p>
          </ns1:table-cell>
          <ns1:table-cell>
            <ns2:p>Manhattan</ns2:p>
          </ns1:table-cell>
          <ns1:table-cell>
            <ns2:p>KS</ns2:p>
          </ns1:table-cell>
          <ns1:table-cell>
            <ns2:p>5467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6.0</ns2:p>
          </ns1:table-cell>
          <ns1:table-cell>
            <ns2:p>Gallatin</ns2:p>
          </ns1:table-cell>
          <ns1:table-cell>
            <ns2:p>TN</ns2:p>
          </ns1:table-cell>
          <ns1:table-cell>
            <ns2:p>5459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7.0</ns2:p>
          </ns1:table-cell>
          <ns1:table-cell>
            <ns2:p>Methuen</ns2:p>
          </ns1:table-cell>
          <ns1:table-cell>
            <ns2:p>MA</ns2:p>
          </ns1:table-cell>
          <ns1:table-cell>
            <ns2:p>545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8.0</ns2:p>
          </ns1:table-cell>
          <ns1:table-cell>
            <ns2:p>Edina</ns2:p>
          </ns1:table-cell>
          <ns1:table-cell>
            <ns2:p>MN</ns2:p>
          </ns1:table-cell>
          <ns1:table-cell>
            <ns2:p>5435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59.0</ns2:p>
          </ns1:table-cell>
          <ns1:table-cell>
            <ns2:p>Jeffersonville</ns2:p>
          </ns1:table-cell>
          <ns1:table-cell>
            <ns2:p>IN</ns2:p>
          </ns1:table-cell>
          <ns1:table-cell>
            <ns2:p>541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0.0</ns2:p>
          </ns1:table-cell>
          <ns1:table-cell>
            <ns2:p>Arcadia</ns2:p>
          </ns1:table-cell>
          <ns1:table-cell>
            <ns2:p>CA</ns2:p>
          </ns1:table-cell>
          <ns1:table-cell>
            <ns2:p>5411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1.0</ns2:p>
          </ns1:table-cell>
          <ns1:table-cell>
            <ns2:p>Elkhart</ns2:p>
          </ns1:table-cell>
          <ns1:table-cell>
            <ns2:p>IN</ns2:p>
          </ns1:table-cell>
          <ns1:table-cell>
            <ns2:p>540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2.0</ns2:p>
          </ns1:table-cell>
          <ns1:table-cell>
            <ns2:p>Wheaton</ns2:p>
          </ns1:table-cell>
          <ns1:table-cell>
            <ns2:p>IL</ns2:p>
          </ns1:table-cell>
          <ns1:table-cell>
            <ns2:p>5406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3.0</ns2:p>
          </ns1:table-cell>
          <ns1:table-cell>
            <ns2:p>Rockwall</ns2:p>
          </ns1:table-cell>
          <ns1:table-cell>
            <ns2:p>TX</ns2:p>
          </ns1:table-cell>
          <ns1:table-cell>
            <ns2:p>5398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4.0</ns2:p>
          </ns1:table-cell>
          <ns1:table-cell>
            <ns2:p>Minnetonka</ns2:p>
          </ns1:table-cell>
          <ns1:table-cell>
            <ns2:p>MN</ns2:p>
          </ns1:table-cell>
          <ns1:table-cell>
            <ns2:p>5396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5.0</ns2:p>
          </ns1:table-cell>
          <ns1:table-cell>
            <ns2:p>Grand Island</ns2:p>
          </ns1:table-cell>
          <ns1:table-cell>
            <ns2:p>NE</ns2:p>
          </ns1:table-cell>
          <ns1:table-cell>
            <ns2:p>539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6.0</ns2:p>
          </ns1:table-cell>
          <ns1:table-cell>
            <ns2:p>Joplin</ns2:p>
          </ns1:table-cell>
          <ns1:table-cell>
            <ns2:p>MO</ns2:p>
          </ns1:table-cell>
          <ns1:table-cell>
            <ns2:p>53930</ns2:p>
          </ns1:table-cell>
          <ns1:table-cell>
            <ns2:p>Next Generation Gaylen Plumbing</ns2:p>
          </ns1:table-cell>
          <ns1:table-cell>
            <ns2:p>(417) 781-5136</ns2:p>
          </ns1:table-cell>
          <ns1:table-cell>
            <ns2:p/>
          </ns1:table-cell>
          <ns1:table-cell>
            <ns2:p>http://www.nextgenerationgaylen.com/</ns2:p>
          </ns1:table-cell>
          <ns1:table-cell>
            <ns2:p>2030 S Main St</ns2:p>
          </ns1:table-cell>
          <ns1:table-cell>
            <ns2:p>4.6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7.0</ns2:p>
          </ns1:table-cell>
          <ns1:table-cell>
            <ns2:p>Pensacola</ns2:p>
          </ns1:table-cell>
          <ns1:table-cell>
            <ns2:p>FL</ns2:p>
          </ns1:table-cell>
          <ns1:table-cell>
            <ns2:p>5381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8.0</ns2:p>
          </ns1:table-cell>
          <ns1:table-cell>
            <ns2:p>Galveston</ns2:p>
          </ns1:table-cell>
          <ns1:table-cell>
            <ns2:p>TX</ns2:p>
          </ns1:table-cell>
          <ns1:table-cell>
            <ns2:p>5363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69.0</ns2:p>
          </ns1:table-cell>
          <ns1:table-cell>
            <ns2:p>Elyria</ns2:p>
          </ns1:table-cell>
          <ns1:table-cell>
            <ns2:p>OH</ns2:p>
          </ns1:table-cell>
          <ns1:table-cell>
            <ns2:p>536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0.0</ns2:p>
          </ns1:table-cell>
          <ns1:table-cell>
            <ns2:p>Milford</ns2:p>
          </ns1:table-cell>
          <ns1:table-cell>
            <ns2:p>CT</ns2:p>
          </ns1:table-cell>
          <ns1:table-cell>
            <ns2:p>5360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1.0</ns2:p>
          </ns1:table-cell>
          <ns1:table-cell>
            <ns2:p>Everett</ns2:p>
          </ns1:table-cell>
          <ns1:table-cell>
            <ns2:p>MA</ns2:p>
          </ns1:table-cell>
          <ns1:table-cell>
            <ns2:p>5357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2.0</ns2:p>
          </ns1:table-cell>
          <ns1:table-cell>
            <ns2:p>Lebanon</ns2:p>
          </ns1:table-cell>
          <ns1:table-cell>
            <ns2:p>TN</ns2:p>
          </ns1:table-cell>
          <ns1:table-cell>
            <ns2:p>534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3.0</ns2:p>
          </ns1:table-cell>
          <ns1:table-cell>
            <ns2:p>Colton</ns2:p>
          </ns1:table-cell>
          <ns1:table-cell>
            <ns2:p>CA</ns2:p>
          </ns1:table-cell>
          <ns1:table-cell>
            <ns2:p>5338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4.0</ns2:p>
          </ns1:table-cell>
          <ns1:table-cell>
            <ns2:p>Murray</ns2:p>
          </ns1:table-cell>
          <ns1:table-cell>
            <ns2:p>UT</ns2:p>
          </ns1:table-cell>
          <ns1:table-cell>
            <ns2:p>5329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5.0</ns2:p>
          </ns1:table-cell>
          <ns1:table-cell>
            <ns2:p>Normal</ns2:p>
          </ns1:table-cell>
          <ns1:table-cell>
            <ns2:p>IL</ns2:p>
          </ns1:table-cell>
          <ns1:table-cell>
            <ns2:p>532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6.0</ns2:p>
          </ns1:table-cell>
          <ns1:table-cell>
            <ns2:p>Palm Desert</ns2:p>
          </ns1:table-cell>
          <ns1:table-cell>
            <ns2:p>CA</ns2:p>
          </ns1:table-cell>
          <ns1:table-cell>
            <ns2:p>5325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7.0</ns2:p>
          </ns1:table-cell>
          <ns1:table-cell>
            <ns2:p>West New York</ns2:p>
          </ns1:table-cell>
          <ns1:table-cell>
            <ns2:p>NJ</ns2:p>
          </ns1:table-cell>
          <ns1:table-cell>
            <ns2:p>531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8.0</ns2:p>
          </ns1:table-cell>
          <ns1:table-cell>
            <ns2:p>Summerville</ns2:p>
          </ns1:table-cell>
          <ns1:table-cell>
            <ns2:p>SC</ns2:p>
          </ns1:table-cell>
          <ns1:table-cell>
            <ns2:p>5317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79.0</ns2:p>
          </ns1:table-cell>
          <ns1:table-cell>
            <ns2:p>Oak Park</ns2:p>
          </ns1:table-cell>
          <ns1:table-cell>
            <ns2:p>IL</ns2:p>
          </ns1:table-cell>
          <ns1:table-cell>
            <ns2:p>5282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0.0</ns2:p>
          </ns1:table-cell>
          <ns1:table-cell>
            <ns2:p>Clermont</ns2:p>
          </ns1:table-cell>
          <ns1:table-cell>
            <ns2:p>FL</ns2:p>
          </ns1:table-cell>
          <ns1:table-cell>
            <ns2:p>528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1.0</ns2:p>
          </ns1:table-cell>
          <ns1:table-cell>
            <ns2:p>Columbus</ns2:p>
          </ns1:table-cell>
          <ns1:table-cell>
            <ns2:p>IN</ns2:p>
          </ns1:table-cell>
          <ns1:table-cell>
            <ns2:p>5265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2.0</ns2:p>
          </ns1:table-cell>
          <ns1:table-cell>
            <ns2:p>Prescott Valley</ns2:p>
          </ns1:table-cell>
          <ns1:table-cell>
            <ns2:p>AZ</ns2:p>
          </ns1:table-cell>
          <ns1:table-cell>
            <ns2:p>5242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3.0</ns2:p>
          </ns1:table-cell>
          <ns1:table-cell>
            <ns2:p>Sherman</ns2:p>
          </ns1:table-cell>
          <ns1:table-cell>
            <ns2:p>TX</ns2:p>
          </ns1:table-cell>
          <ns1:table-cell>
            <ns2:p>5241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4.0</ns2:p>
          </ns1:table-cell>
          <ns1:table-cell>
            <ns2:p>Cathedral City</ns2:p>
          </ns1:table-cell>
          <ns1:table-cell>
            <ns2:p>CA</ns2:p>
          </ns1:table-cell>
          <ns1:table-cell>
            <ns2:p>523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5.0</ns2:p>
          </ns1:table-cell>
          <ns1:table-cell>
            <ns2:p>Delano</ns2:p>
          </ns1:table-cell>
          <ns1:table-cell>
            <ns2:p>CA</ns2:p>
          </ns1:table-cell>
          <ns1:table-cell>
            <ns2:p>5233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6.0</ns2:p>
          </ns1:table-cell>
          <ns1:table-cell>
            <ns2:p>Pinellas Park</ns2:p>
          </ns1:table-cell>
          <ns1:table-cell>
            <ns2:p>FL</ns2:p>
          </ns1:table-cell>
          <ns1:table-cell>
            <ns2:p>5229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7.0</ns2:p>
          </ns1:table-cell>
          <ns1:table-cell>
            <ns2:p>Bothell</ns2:p>
          </ns1:table-cell>
          <ns1:table-cell>
            <ns2:p>WA</ns2:p>
          </ns1:table-cell>
          <ns1:table-cell>
            <ns2:p>5219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8.0</ns2:p>
          </ns1:table-cell>
          <ns1:table-cell>
            <ns2:p>Middletown</ns2:p>
          </ns1:table-cell>
          <ns1:table-cell>
            <ns2:p>OH</ns2:p>
          </ns1:table-cell>
          <ns1:table-cell>
            <ns2:p>5214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89.0</ns2:p>
          </ns1:table-cell>
          <ns1:table-cell>
            <ns2:p>Battle Creek</ns2:p>
          </ns1:table-cell>
          <ns1:table-cell>
            <ns2:p>MI</ns2:p>
          </ns1:table-cell>
          <ns1:table-cell>
            <ns2:p>5202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0.0</ns2:p>
          </ns1:table-cell>
          <ns1:table-cell>
            <ns2:p>Goose Creek</ns2:p>
          </ns1:table-cell>
          <ns1:table-cell>
            <ns2:p>SC</ns2:p>
          </ns1:table-cell>
          <ns1:table-cell>
            <ns2:p>5201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1.0</ns2:p>
          </ns1:table-cell>
          <ns1:table-cell>
            <ns2:p>Novato</ns2:p>
          </ns1:table-cell>
          <ns1:table-cell>
            <ns2:p>CA</ns2:p>
          </ns1:table-cell>
          <ns1:table-cell>
            <ns2:p>5194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2.0</ns2:p>
          </ns1:table-cell>
          <ns1:table-cell>
            <ns2:p>Ocoee</ns2:p>
          </ns1:table-cell>
          <ns1:table-cell>
            <ns2:p>FL</ns2:p>
          </ns1:table-cell>
          <ns1:table-cell>
            <ns2:p>5193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3.0</ns2:p>
          </ns1:table-cell>
          <ns1:table-cell>
            <ns2:p>Collierville</ns2:p>
          </ns1:table-cell>
          <ns1:table-cell>
            <ns2:p>TN</ns2:p>
          </ns1:table-cell>
          <ns1:table-cell>
            <ns2:p>5190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4.0</ns2:p>
          </ns1:table-cell>
          <ns1:table-cell>
            <ns2:p>Diamond Bar</ns2:p>
          </ns1:table-cell>
          <ns1:table-cell>
            <ns2:p>CA</ns2:p>
          </ns1:table-cell>
          <ns1:table-cell>
            <ns2:p>518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5.0</ns2:p>
          </ns1:table-cell>
          <ns1:table-cell>
            <ns2:p>Burien</ns2:p>
          </ns1:table-cell>
          <ns1:table-cell>
            <ns2:p>WA</ns2:p>
          </ns1:table-cell>
          <ns1:table-cell>
            <ns2:p>5185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6.0</ns2:p>
          </ns1:table-cell>
          <ns1:table-cell>
            <ns2:p>Dunwoody</ns2:p>
          </ns1:table-cell>
          <ns1:table-cell>
            <ns2:p>GA</ns2:p>
          </ns1:table-cell>
          <ns1:table-cell>
            <ns2:p>5179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7.0</ns2:p>
          </ns1:table-cell>
          <ns1:table-cell>
            <ns2:p>Fort Pierce</ns2:p>
          </ns1:table-cell>
          <ns1:table-cell>
            <ns2:p>FL</ns2:p>
          </ns1:table-cell>
          <ns1:table-cell>
            <ns2:p>5173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8.0</ns2:p>
          </ns1:table-cell>
          <ns1:table-cell>
            <ns2:p>Huntington Park</ns2:p>
          </ns1:table-cell>
          <ns1:table-cell>
            <ns2:p>CA</ns2:p>
          </ns1:table-cell>
          <ns1:table-cell>
            <ns2:p>5154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799.0</ns2:p>
          </ns1:table-cell>
          <ns1:table-cell>
            <ns2:p>Newark</ns2:p>
          </ns1:table-cell>
          <ns1:table-cell>
            <ns2:p>OH</ns2:p>
          </ns1:table-cell>
          <ns1:table-cell>
            <ns2:p>5147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0.0</ns2:p>
          </ns1:table-cell>
          <ns1:table-cell>
            <ns2:p>Mishawaka</ns2:p>
          </ns1:table-cell>
          <ns1:table-cell>
            <ns2:p>IN</ns2:p>
          </ns1:table-cell>
          <ns1:table-cell>
            <ns2:p>5122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1.0</ns2:p>
          </ns1:table-cell>
          <ns1:table-cell>
            <ns2:p>Cleveland</ns2:p>
          </ns1:table-cell>
          <ns1:table-cell>
            <ns2:p>TN</ns2:p>
          </ns1:table-cell>
          <ns1:table-cell>
            <ns2:p>5117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2.0</ns2:p>
          </ns1:table-cell>
          <ns1:table-cell>
            <ns2:p>Florissant</ns2:p>
          </ns1:table-cell>
          <ns1:table-cell>
            <ns2:p>MO</ns2:p>
          </ns1:table-cell>
          <ns1:table-cell>
            <ns2:p>5112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3.0</ns2:p>
          </ns1:table-cell>
          <ns1:table-cell>
            <ns2:p>Cuyahoga Falls</ns2:p>
          </ns1:table-cell>
          <ns1:table-cell>
            <ns2:p>OH</ns2:p>
          </ns1:table-cell>
          <ns1:table-cell>
            <ns2:p>5097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4.0</ns2:p>
          </ns1:table-cell>
          <ns1:table-cell>
            <ns2:p>Troy</ns2:p>
          </ns1:table-cell>
          <ns1:table-cell>
            <ns2:p>NY</ns2:p>
          </ns1:table-cell>
          <ns1:table-cell>
            <ns2:p>5091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5.0</ns2:p>
          </ns1:table-cell>
          <ns1:table-cell>
            <ns2:p>Hoffman Estates</ns2:p>
          </ns1:table-cell>
          <ns1:table-cell>
            <ns2:p>IL</ns2:p>
          </ns1:table-cell>
          <ns1:table-cell>
            <ns2:p>5085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6.0</ns2:p>
          </ns1:table-cell>
          <ns1:table-cell>
            <ns2:p>Harrisonburg</ns2:p>
          </ns1:table-cell>
          <ns1:table-cell>
            <ns2:p>VA</ns2:p>
          </ns1:table-cell>
          <ns1:table-cell>
            <ns2:p>50839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7.0</ns2:p>
          </ns1:table-cell>
          <ns1:table-cell>
            <ns2:p>La Crosse</ns2:p>
          </ns1:table-cell>
          <ns1:table-cell>
            <ns2:p>WI</ns2:p>
          </ns1:table-cell>
          <ns1:table-cell>
            <ns2:p>5078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8.0</ns2:p>
          </ns1:table-cell>
          <ns1:table-cell>
            <ns2:p>Paramount</ns2:p>
          </ns1:table-cell>
          <ns1:table-cell>
            <ns2:p>CA</ns2:p>
          </ns1:table-cell>
          <ns1:table-cell>
            <ns2:p>5075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09.0</ns2:p>
          </ns1:table-cell>
          <ns1:table-cell>
            <ns2:p>Watsonville</ns2:p>
          </ns1:table-cell>
          <ns1:table-cell>
            <ns2:p>CA</ns2:p>
          </ns1:table-cell>
          <ns1:table-cell>
            <ns2:p>5071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0.0</ns2:p>
          </ns1:table-cell>
          <ns1:table-cell>
            <ns2:p>Grapevine</ns2:p>
          </ns1:table-cell>
          <ns1:table-cell>
            <ns2:p>TX</ns2:p>
          </ns1:table-cell>
          <ns1:table-cell>
            <ns2:p>50714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1.0</ns2:p>
          </ns1:table-cell>
          <ns1:table-cell>
            <ns2:p>Draper</ns2:p>
          </ns1:table-cell>
          <ns1:table-cell>
            <ns2:p>UT</ns2:p>
          </ns1:table-cell>
          <ns1:table-cell>
            <ns2:p>5065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2.0</ns2:p>
          </ns1:table-cell>
          <ns1:table-cell>
            <ns2:p>San Luis Obispo</ns2:p>
          </ns1:table-cell>
          <ns1:table-cell>
            <ns2:p>CA</ns2:p>
          </ns1:table-cell>
          <ns1:table-cell>
            <ns2:p>5063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3.0</ns2:p>
          </ns1:table-cell>
          <ns1:table-cell>
            <ns2:p>Harrisburg</ns2:p>
          </ns1:table-cell>
          <ns1:table-cell>
            <ns2:p>PA</ns2:p>
          </ns1:table-cell>
          <ns1:table-cell>
            <ns2:p>5052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4.0</ns2:p>
          </ns1:table-cell>
          <ns1:table-cell>
            <ns2:p>Lawrence</ns2:p>
          </ns1:table-cell>
          <ns1:table-cell>
            <ns2:p>IN</ns2:p>
          </ns1:table-cell>
          <ns1:table-cell>
            <ns2:p>5042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5.0</ns2:p>
          </ns1:table-cell>
          <ns1:table-cell>
            <ns2:p>Downers Grove</ns2:p>
          </ns1:table-cell>
          <ns1:table-cell>
            <ns2:p>IL</ns2:p>
          </ns1:table-cell>
          <ns1:table-cell>
            <ns2:p>50365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6.0</ns2:p>
          </ns1:table-cell>
          <ns1:table-cell>
            <ns2:p>Enid</ns2:p>
          </ns1:table-cell>
          <ns1:table-cell>
            <ns2:p>OK</ns2:p>
          </ns1:table-cell>
          <ns1:table-cell>
            <ns2:p>5029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7.0</ns2:p>
          </ns1:table-cell>
          <ns1:table-cell>
            <ns2:p>Holly Springs</ns2:p>
          </ns1:table-cell>
          <ns1:table-cell>
            <ns2:p>NC</ns2:p>
          </ns1:table-cell>
          <ns1:table-cell>
            <ns2:p>50288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8.0</ns2:p>
          </ns1:table-cell>
          <ns1:table-cell>
            <ns2:p>Barnstable Town</ns2:p>
          </ns1:table-cell>
          <ns1:table-cell>
            <ns2:p>MA</ns2:p>
          </ns1:table-cell>
          <ns1:table-cell>
            <ns2:p>50101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19.0</ns2:p>
          </ns1:table-cell>
          <ns1:table-cell>
            <ns2:p>Waxahachie</ns2:p>
          </ns1:table-cell>
          <ns1:table-cell>
            <ns2:p>TX</ns2:p>
          </ns1:table-cell>
          <ns1:table-cell>
            <ns2:p>5009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20.0</ns2:p>
          </ns1:table-cell>
          <ns1:table-cell>
            <ns2:p>Columbia</ns2:p>
          </ns1:table-cell>
          <ns1:table-cell>
            <ns2:p>TN</ns2:p>
          </ns1:table-cell>
          <ns1:table-cell>
            <ns2:p>50072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21.0</ns2:p>
          </ns1:table-cell>
          <ns1:table-cell>
            <ns2:p>Stillwater</ns2:p>
          </ns1:table-cell>
          <ns1:table-cell>
            <ns2:p>OK</ns2:p>
          </ns1:table-cell>
          <ns1:table-cell>
            <ns2:p>50046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22.0</ns2:p>
          </ns1:table-cell>
          <ns1:table-cell>
            <ns2:p>Plainfield</ns2:p>
          </ns1:table-cell>
          <ns1:table-cell>
            <ns2:p>IL</ns2:p>
          </ns1:table-cell>
          <ns1:table-cell>
            <ns2:p>50043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>823.0</ns2:p>
          </ns1:table-cell>
          <ns1:table-cell>
            <ns2:p>St. Louis Park</ns2:p>
          </ns1:table-cell>
          <ns1:table-cell>
            <ns2:p>MN</ns2:p>
          </ns1:table-cell>
          <ns1:table-cell>
            <ns2:p>5002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/>
          </ns1:table-cell>
          <ns1:table-cell>
            <ns2:p>Huntington</ns2:p>
          </ns1:table-cell>
          <ns1:table-cell>
            <ns2:p>WV</ns2:p>
          </ns1:table-cell>
          <ns1:table-cell>
            <ns2:p>45877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/>
          </ns1:table-cell>
          <ns1:table-cell>
            <ns2:p>Burlington</ns2:p>
          </ns1:table-cell>
          <ns1:table-cell>
            <ns2:p>VT</ns2:p>
          </ns1:table-cell>
          <ns1:table-cell>
            <ns2:p>450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/>
          </ns1:table-cell>
          <ns1:table-cell>
            <ns2:p>South Burlington</ns2:p>
          </ns1:table-cell>
          <ns1:table-cell>
            <ns2:p>VT</ns2:p>
          </ns1:table-cell>
          <ns1:table-cell>
            <ns2:p>450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/>
          </ns1:table-cell>
          <ns1:table-cell>
            <ns2:p>Charleston</ns2:p>
          </ns1:table-cell>
          <ns1:table-cell>
            <ns2:p>WV</ns2:p>
          </ns1:table-cell>
          <ns1:table-cell>
            <ns2:p>45000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  <ns1:table-row>
          <ns1:table-cell>
            <ns2:p/>
          </ns1:table-cell>
          <ns1:table-cell>
            <ns2:p>Saint Paul</ns2:p>
          </ns1:table-cell>
          <ns1:table-cell>
            <ns2:p>MN</ns2:p>
          </ns1:table-cell>
          <ns1:table-cell>
            <ns2:p/>
          </ns1:table-cell>
          <ns1:table-cell>
            <ns2:p>Kelly Plumbing &amp; Heating</ns2:p>
          </ns1:table-cell>
          <ns1:table-cell>
            <ns2:p>(651) 645-5401</ns2:p>
          </ns1:table-cell>
          <ns1:table-cell>
            <ns2:p/>
          </ns1:table-cell>
          <ns1:table-cell>
            <ns2:p>kellyplumbinginc.com</ns2:p>
          </ns1:table-cell>
          <ns1:table-cell>
            <ns2:p>Saint Paul, MN</ns2:p>
          </ns1:table-cell>
          <ns1:table-cell>
            <ns2:p>4.7+/5</ns2:p>
          </ns1:table-cell>
          <ns1:table-cell>
            <ns2:p>YES (1973)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Saint Louis</ns2:p>
          </ns1:table-cell>
          <ns1:table-cell>
            <ns2:p>MO</ns2:p>
          </ns1:table-cell>
          <ns1:table-cell>
            <ns2:p/>
          </ns1:table-cell>
          <ns1:table-cell>
            <ns2:p>Tony LaMartina Plumbing</ns2:p>
          </ns1:table-cell>
          <ns1:table-cell>
            <ns2:p>(314) 965-9377</ns2:p>
          </ns1:table-cell>
          <ns1:table-cell>
            <ns2:p>pl_a_055-300x200@2x.jpeg</ns2:p>
          </ns1:table-cell>
          <ns1:table-cell>
            <ns2:p>tonylamartinaplumbing.com</ns2:p>
          </ns1:table-cell>
          <ns1:table-cell>
            <ns2:p>Saint Louis, MO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Lexington</ns2:p>
          </ns1:table-cell>
          <ns1:table-cell>
            <ns2:p>KY</ns2:p>
          </ns1:table-cell>
          <ns1:table-cell>
            <ns2:p/>
          </ns1:table-cell>
          <ns1:table-cell>
            <ns2:p>Dauenhauer Plumbing</ns2:p>
          </ns1:table-cell>
          <ns1:table-cell>
            <ns2:p>(859) 559-0625</ns2:p>
          </ns1:table-cell>
          <ns1:table-cell>
            <ns2:p/>
          </ns1:table-cell>
          <ns1:table-cell>
            <ns2:p>dauenhauerplumbing.com</ns2:p>
          </ns1:table-cell>
          <ns1:table-cell>
            <ns2:p>Lexington, KY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Saint Petersburg</ns2:p>
          </ns1:table-cell>
          <ns1:table-cell>
            <ns2:p>FL</ns2:p>
          </ns1:table-cell>
          <ns1:table-cell>
            <ns2:p/>
          </ns1:table-cell>
          <ns1:table-cell>
            <ns2:p>St Pete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Saint Petersburg, FL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Arlington</ns2:p>
          </ns1:table-cell>
          <ns1:table-cell>
            <ns2:p>VA</ns2:p>
          </ns1:table-cell>
          <ns1:table-cell>
            <ns2:p/>
          </ns1:table-cell>
          <ns1:table-cell>
            <ns2:p>Chandler's Plumbing &amp; Heating</ns2:p>
          </ns1:table-cell>
          <ns1:table-cell>
            <ns2:p>(703) 536-4750</ns2:p>
          </ns1:table-cell>
          <ns1:table-cell>
            <ns2:p/>
          </ns1:table-cell>
          <ns1:table-cell>
            <ns2:p>chandlersplumbing.com</ns2:p>
          </ns1:table-cell>
          <ns1:table-cell>
            <ns2:p>Arlington, V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Lexington</ns2:p>
          </ns1:table-cell>
          <ns1:table-cell>
            <ns2:p>KY</ns2:p>
          </ns1:table-cell>
          <ns1:table-cell>
            <ns2:p/>
          </ns1:table-cell>
          <ns1:table-cell>
            <ns2:p>Dauenhauer Plumbing</ns2:p>
          </ns1:table-cell>
          <ns1:table-cell>
            <ns2:p>(859) 559-0625</ns2:p>
          </ns1:table-cell>
          <ns1:table-cell>
            <ns2:p/>
          </ns1:table-cell>
          <ns1:table-cell>
            <ns2:p>dauenhauerplumbing.com</ns2:p>
          </ns1:table-cell>
          <ns1:table-cell>
            <ns2:p>Lexington, KY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Godot Springs</ns2:p>
          </ns1:table-cell>
          <ns1:table-cell>
            <ns2:p>CO</ns2:p>
          </ns1:table-cell>
          <ns1:table-cell>
            <ns2:p/>
          </ns1:table-cell>
          <ns1:table-cell>
            <ns2:p>Godot Springs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Godot Springs, CO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Arlington</ns2:p>
          </ns1:table-cell>
          <ns1:table-cell>
            <ns2:p>VA</ns2:p>
          </ns1:table-cell>
          <ns1:table-cell>
            <ns2:p/>
          </ns1:table-cell>
          <ns1:table-cell>
            <ns2:p>Chandler's Plumbing &amp; Heating</ns2:p>
          </ns1:table-cell>
          <ns1:table-cell>
            <ns2:p>(703) 536-4750</ns2:p>
          </ns1:table-cell>
          <ns1:table-cell>
            <ns2:p/>
          </ns1:table-cell>
          <ns1:table-cell>
            <ns2:p>chandlersplumbing.com</ns2:p>
          </ns1:table-cell>
          <ns1:table-cell>
            <ns2:p>Arlington, VA</ns2:p>
          </ns1:table-cell>
          <ns1:table-cell>
            <ns2:p>4.6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Port St Lucie</ns2:p>
          </ns1:table-cell>
          <ns1:table-cell>
            <ns2:p>FL</ns2:p>
          </ns1:table-cell>
          <ns1:table-cell>
            <ns2:p/>
          </ns1:table-cell>
          <ns1:table-cell>
            <ns2:p>Port St Lucie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Port St. Lucie, FL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Saint Paul</ns2:p>
          </ns1:table-cell>
          <ns1:table-cell>
            <ns2:p>MN</ns2:p>
          </ns1:table-cell>
          <ns1:table-cell>
            <ns2:p/>
          </ns1:table-cell>
          <ns1:table-cell>
            <ns2:p>St Paul Plumbing</ns2:p>
          </ns1:table-cell>
          <ns1:table-cell>
            <ns2:p/>
          </ns1:table-cell>
          <ns1:table-cell>
            <ns2:p/>
          </ns1:table-cell>
          <ns1:table-cell>
            <ns2:p/>
          </ns1:table-cell>
          <ns1:table-cell>
            <ns2:p>Saint Paul, MN</ns2:p>
          </ns1:table-cell>
          <ns1:table-cell>
            <ns2:p>4.7+/5</ns2:p>
          </ns1:table-cell>
          <ns1:table-cell>
            <ns2:p>YES</ns2:p>
          </ns1:table-cell>
          <ns1:table-cell>
            <ns2:p/>
          </ns1:table-cell>
          <ns1:table-cell>
            <ns2:p>Google</ns2:p>
          </ns1:table-cell>
        </ns1:table-row>
        <ns1:table-row>
          <ns1:table-cell>
            <ns2:p/>
          </ns1:table-cell>
          <ns1:table-cell>
            <ns2:p>Boise</ns2:p>
          </ns1:table-cell>
          <ns1:table-cell>
            <ns2:p>ID</ns2:p>
          </ns1:table-cell>
          <ns1:table-cell>
            <ns2:p/>
          </ns1:table-cell>
          <ns1:table-cell>
            <ns2:p>Boise Family Plumbing LLC</ns2:p>
          </ns1:table-cell>
          <ns1:table-cell>
            <ns2:p>(208) 949-3307</ns2:p>
          </ns1:table-cell>
          <ns1:table-cell>
            <ns2:p/>
          </ns1:table-cell>
          <ns1:table-cell>
            <ns2:p>boisefamilyplumbing.com</ns2:p>
          </ns1:table-cell>
          <ns1:table-cell>
            <ns2:p>210 E 37th St #3, Boise, ID</ns2:p>
          </ns1:table-cell>
          <ns1:table-cell>
            <ns2:p>4.9</ns2:p>
          </ns1:table-cell>
          <ns1:table-cell>
            <ns2:p/>
          </ns1:table-cell>
          <ns1:table-cell>
            <ns2:p/>
          </ns1:table-cell>
          <ns1:table-cell>
            <ns2:p/>
          </ns1:table-cell>
        </ns1:table-row>
      </ns1:table>
    </ns0:spreadsheet>
  </ns0:body>
</ns0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