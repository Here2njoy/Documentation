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agoodplumber.com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advantageplumbingrooter.com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jimwagnerplumbing.com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texasqualityplumbing.com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lawsonfamilyplumbing.com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goodmanplumbers.com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chamblissplumbing.com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plumbersandiegoonline.com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bakerbrothersplumbing.com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larrystinson.com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austinsgreatestplumbing.com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sanjoseplumbinginc.com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wyattworksplumbing.com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bryantsplumbingandwaterheaters.com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ballardplumbing.com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southernplumbingworks.com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applewoodfixit.com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vegasvalley.com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vaughanplumbing.com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serviceplusplumbing.com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lyonsplumbing.com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jjsplumbing.com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tlcnm.com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jobeandsonsplumbing.com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allsacramento.com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headsplumbing.com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stinenichols.com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goettl.com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williamparrishplumbing.com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miamidadeplumbing.com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thefamilyplumber.com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cisnerosbrothersplumbing.com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williamsplumbing.com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olinplumbing.com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auroraplumbing.com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familyfriends.com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robinsonfamilyplumbinghvac.com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allensplumbinghi.com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barkerandsonsplumbing.com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choiceplumbingorlando.com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tonysplumbing.com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ffheatingplumbing.com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irvineplumbing.com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dwainmccainplumbing.com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doitrightplumbers.com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halpinplumbing.com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owensplumbingcompany.com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brownbrothers.com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https://business.google.com/v/m-a-plumbing-heating/0322610284500796106/8434/_?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travisandsonsplumbing.com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bobthe.com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ahattersley.com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southtexas.com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firstchoice.com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reevesfamily.com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dcfamilyplumbing.com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deanplumbing.com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eatonfamily.com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hernandezplumbing.com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shawplumbing.com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trinityplumbingla.com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thompsonfamily.com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familytiesair.com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herksplumbing.com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mcphersonbros.com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http://siouxfalls-plumbing.com/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jpplumbingandsewer.com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woodsplumbing.com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whitesplumbing.com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robertsrepair.com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devinneyplumbing.com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jandjplumbing.com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morrisseyfamily.com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blairsplumbingrepair.com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michelsplumbing.com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parmleyplumbing.com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https://juniorsplumbingmo.com/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https://plumbeasy.com/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https://www.franklinplumbingsc.com/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http://msplumbingsolutions.com/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https://www.legacyplumbingfm.com/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https://brianwearplumbing.com/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http://rimrockplumbing.com/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http://www.dillonplumbing.com/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https://www.paultheplumbernh.com/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https://www.tlcplumbing.com/rio-rancho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https://www.plumbingfayettevillear.com/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https://www.afphpro.com/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https://aplusplumbingofnwa.com/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jamesplumbingandheating.com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https://www.loyalplumbing.com/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https://plumbtechmt.com/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https://www.timberridgephnd.com/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https://kintyjonesplumbing.com/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https://arfplumbing.com/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https://benjaminfranklinplumbing.com/wilmington-de/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http://www.piersonplumbingstl.com/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https://justcallheritage.com/service-area/portland-me/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https://www.aspenmtnplumbing.com/plumbers-cheyenne-wy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https://www.callsmith.com/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http://www.nextgenerationgaylen.com/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kellyplumbinginc.com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tonylamartinaplumbing.com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dauenhauerplumbing.com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chandlersplumbing.com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dauenhauerplumbing.com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chandlersplumbing.com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boisefamilyplumbing.com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