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table="urn:oasis:names:tc:opendocument:xmlns:table:1.0" xmlns:text="urn:oasis:names:tc:opendocument:xmlns:text:1.0" xmlns:xlink="http://www.w3.org/1999/xlink" office:version="1.2">
  <office:automatic-styles>
    <style:style style:name="InternetLink" style:family="text">
      <style:text-properties fo:color="#0563C1" fo:underline="single" fo:underline-color="#0563C1"/>
    </style:style>
    <style:style style:name="VisitedInternetLink" style:family="text">
      <style:text-properties fo:color="#800080" fo:underline="single"/>
    </style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