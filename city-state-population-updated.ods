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>Ricky Heath Plumbing, Heating, &amp; Cooling</text:p>
          </table:table-cell>
          <table:table-cell>
            <text:p>(478) 312-6655</text:p>
          </table:table-cell>
          <table:table-cell>
            <text:p/>
          </table:table-cell>
          <table:table-cell>
            <text:p><text:a xlink:href="https://rickyheathplumbing.com" xlink:type="simple" xlink:actuate="onRequest" office:target-frame="_blank" text:style-name="InternetLink">https://rickyheathplumbing.com</text:a></text:p>
          </table:table-cell>
          <table:table-cell>
            <text:p>505 Hillcrest Industrial Blvd, Macon, GA 312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>Wave Plumbing &amp; Heating-Hayward Plumber</text:p>
          </table:table-cell>
          <table:table-cell>
            <text:p>(510) 513-2215</text:p>
          </table:table-cell>
          <table:table-cell>
            <text:p/>
          </table:table-cell>
          <table:table-cell>
            <text:p><text:a xlink:href="https://www.waveplumbing-heating.com/" xlink:type="simple" xlink:actuate="onRequest" office:target-frame="_blank" text:style-name="InternetLink">https://www.waveplumbing-heating.com/</text:a></text:p>
          </table:table-cell>
          <table:table-cell>
            <text:p>2416 W Tennyson Rd #258, Haywar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>Ocean Plumbing and Air</text:p>
          </table:table-cell>
          <table:table-cell>
            <text:p>(786) 977-5407</text:p>
          </table:table-cell>
          <table:table-cell>
            <text:p/>
          </table:table-cell>
          <table:table-cell>
            <text:p><text:a xlink:href="https://oceanplumbingandair.com/hollywood-plumber-and-ac-repair/" xlink:type="simple" xlink:actuate="onRequest" office:target-frame="_blank" text:style-name="InternetLink">https://oceanplumbingandair.com/hollywood-plumber-and-ac-repair/</text:a></text:p>
          </table:table-cell>
          <table:table-cell>
            <text:p>3220 Stirling Rd, Hollywood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>Pierce Plumbing</text:p>
          </table:table-cell>
          <table:table-cell>
            <text:p>(951) 765-9411</text:p>
          </table:table-cell>
          <table:table-cell>
            <text:p/>
          </table:table-cell>
          <table:table-cell>
            <text:p><text:a xlink:href="https://pierceplumbing.net" xlink:type="simple" xlink:actuate="onRequest" office:target-frame="_blank" text:style-name="InternetLink">https://pierceplumbing.net</text:a></text:p>
          </table:table-cell>
          <table:table-cell>
            <text:p>700 W Florida Ave, Hemet, CA 92543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>Mr. Drippy Plumbing</text:p>
          </table:table-cell>
          <table:table-cell>
            <text:p>(205) 946-0337</text:p>
          </table:table-cell>
          <table:table-cell>
            <text:p/>
          </table:table-cell>
          <table:table-cell>
            <text:p><text:a xlink:href="https://mrdrippyplumbing.com" xlink:type="simple" xlink:actuate="onRequest" office:target-frame="_blank" text:style-name="InternetLink">https://mrdrippyplumbing.com</text:a></text:p>
          </table:table-cell>
          <table:table-cell>
            <text:p>3411 Lorna Ln, Hoover, AL 3521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>PlumbSmart Plumbing &amp; Drains</text:p>
          </table:table-cell>
          <table:table-cell>
            <text:p>(828) 974-6147</text:p>
          </table:table-cell>
          <table:table-cell>
            <text:p/>
          </table:table-cell>
          <table:table-cell>
            <text:p><text:a xlink:href="https://callplumbsmart.com" xlink:type="simple" xlink:actuate="onRequest" office:target-frame="_blank" text:style-name="InternetLink">https://callplumbsmart.com</text:a></text:p>
          </table:table-cell>
          <table:table-cell>
            <text:p>1 Sunny Ridge Dr, Asheville, NC 28804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>Kennedy Plumbing &amp; Heating</text:p>
          </table:table-cell>
          <table:table-cell>
            <text:p>(248) 474-0309</text:p>
          </table:table-cell>
          <table:table-cell>
            <text:p/>
          </table:table-cell>
          <table:table-cell>
            <text:p><text:a xlink:href="https://kennedyplumbingheating.com" xlink:type="simple" xlink:actuate="onRequest" office:target-frame="_blank" text:style-name="InternetLink">https://kennedyplumbingheating.com</text:a></text:p>
          </table:table-cell>
          <table:table-cell>
            <text:p>30284 7 Mile, Livonia, MI 4815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>Plumbing Utah</text:p>
          </table:table-cell>
          <table:table-cell>
            <text:p>(801) 601-1298</text:p>
          </table:table-cell>
          <table:table-cell>
            <text:p/>
          </table:table-cell>
          <table:table-cell>
            <text:p><text:a xlink:href="https://plumbingutah.com" xlink:type="simple" xlink:actuate="onRequest" office:target-frame="_blank" text:style-name="InternetLink">https://plumbingutah.com</text:a></text:p>
          </table:table-cell>
          <table:table-cell>
            <text:p>8789 Highland Dr #260, Sandy, UT 8409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>Larry &amp; Sons Plumbing, Heating, Cooling, Drain &amp; Electrical</text:p>
          </table:table-cell>
          <table:table-cell>
            <text:p>(240) 232-8985</text:p>
          </table:table-cell>
          <table:table-cell>
            <text:p/>
          </table:table-cell>
          <table:table-cell>
            <text:p><text:a xlink:href="https://larryandsons.com" xlink:type="simple" xlink:actuate="onRequest" office:target-frame="_blank" text:style-name="InternetLink">https://larryandsons.com</text:a></text:p>
          </table:table-cell>
          <table:table-cell>
            <text:p>5744 Industry Ln Ste N, Frederick, MD 21704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>Plumbing Installs</text:p>
          </table:table-cell>
          <table:table-cell>
            <text:p>(714) 455-9346</text:p>
          </table:table-cell>
          <table:table-cell>
            <text:p/>
          </table:table-cell>
          <table:table-cell>
            <text:p><text:a xlink:href="http://www.plumbinginstalls.com/" xlink:type="simple" xlink:actuate="onRequest" office:target-frame="_blank" text:style-name="InternetLink">http://www.plumbinginstalls.com/</text:a></text:p>
          </table:table-cell>
          <table:table-cell>
            <text:p>6291 Iroquois Rd, Westminster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>Paul C. Scott &amp; Sons Plumbing, Inc.</text:p>
          </table:table-cell>
          <table:table-cell>
            <text:p>(248) 547-9334</text:p>
          </table:table-cell>
          <table:table-cell>
            <text:p/>
          </table:table-cell>
          <table:table-cell>
            <text:p><text:a xlink:href="http://www.paulscottplumbing.com/" xlink:type="simple" xlink:actuate="onRequest" office:target-frame="_blank" text:style-name="InternetLink">http://www.paulscottplumbing.com/</text:a></text:p>
          </table:table-cell>
          <table:table-cell>
            <text:p>2722 Elliott Ave, Troy, MI</text:p>
          </table:table-cell>
          <table:table-cell>
            <text:p>4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>Daytona Plumbing</text:p>
          </table:table-cell>
          <table:table-cell>
            <text:p>(386) 253-7674</text:p>
          </table:table-cell>
          <table:table-cell>
            <text:p/>
          </table:table-cell>
          <table:table-cell>
            <text:p><text:a xlink:href="http://www.daytonaplumb.com/" xlink:type="simple" xlink:actuate="onRequest" office:target-frame="_blank" text:style-name="InternetLink">http://www.daytonaplumb.com/</text:a></text:p>
          </table:table-cell>
          <table:table-cell>
            <text:p>500 Walker St, Daytona Beach, FL</text:p>
          </table:table-cell>
          <table:table-cell>
            <text:p>4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>William J. Riley Plumbing &amp; Heating Co Inc</text:p>
          </table:table-cell>
          <table:table-cell>
            <text:p>(401) 738-1688</text:p>
          </table:table-cell>
          <table:table-cell>
            <text:p/>
          </table:table-cell>
          <table:table-cell>
            <text:p><text:a xlink:href="https://www.rileyplumbing.com/" xlink:type="simple" xlink:actuate="onRequest" office:target-frame="_blank" text:style-name="InternetLink">https://www.rileyplumbing.com/</text:a></text:p>
          </table:table-cell>
          <table:table-cell>
            <text:p>15 New England Way, Warwick, RI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>Jones Family Plumbing &amp; HVAC</text:p>
          </table:table-cell>
          <table:table-cell>
            <text:p>(720) 500-6890</text:p>
          </table:table-cell>
          <table:table-cell>
            <text:p/>
          </table:table-cell>
          <table:table-cell>
            <text:p><text:a xlink:href="https://jonesplumbinghvac.site/castle-rock" xlink:type="simple" xlink:actuate="onRequest" office:target-frame="_blank" text:style-name="InternetLink">https://jonesplumbinghvac.site/castle-rock</text:a></text:p>
          </table:table-cell>
          <table:table-cell>
            <text:p>2278 Manatt Ct, Castle Rock, CO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>Sabastian and Sons Plumbing Service LLC</text:p>
          </table:table-cell>
          <table:table-cell>
            <text:p>(763) 657-9821</text:p>
          </table:table-cell>
          <table:table-cell>
            <text:p/>
          </table:table-cell>
          <table:table-cell>
            <text:p><text:a xlink:href="https://snsplumbing.net/" xlink:type="simple" xlink:actuate="onRequest" office:target-frame="_blank" text:style-name="InternetLink">https://snsplumbing.net/</text:a></text:p>
          </table:table-cell>
          <table:table-cell>
            <text:p>3300 County Rd 10 Ste 500i, Brooklyn Park, MN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>Barnett Plumbing &amp; Water Heaters</text:p>
          </table:table-cell>
          <table:table-cell>
            <text:p>(925) 872-0805</text:p>
          </table:table-cell>
          <table:table-cell>
            <text:p/>
          </table:table-cell>
          <table:table-cell>
            <text:p><text:a xlink:href="https://barnettplumbing.com/" xlink:type="simple" xlink:actuate="onRequest" office:target-frame="_blank" text:style-name="InternetLink">https://barnettplumbing.com/</text:a></text:p>
          </table:table-cell>
          <table:table-cell>
            <text:p>780 E Airway Blvd, Livermor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>Pro Plumber Upland CA Company</text:p>
          </table:table-cell>
          <table:table-cell>
            <text:p>(909) 303-1480</text:p>
          </table:table-cell>
          <table:table-cell>
            <text:p/>
          </table:table-cell>
          <table:table-cell>
            <text:p><text:a xlink:href="https://www.proplumberuplandcacompany.com/" xlink:type="simple" xlink:actuate="onRequest" office:target-frame="_blank" text:style-name="InternetLink">https://www.proplumberuplandcacompany.com/</text:a></text:p>
          </table:table-cell>
          <table:table-cell>
            <text:p>1104 W 9th St, Upland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>The Honest Plumber - Flint</text:p>
          </table:table-cell>
          <table:table-cell>
            <text:p>(810) 830-5472</text:p>
          </table:table-cell>
          <table:table-cell>
            <text:p/>
          </table:table-cell>
          <table:table-cell>
            <text:p><text:a xlink:href="https://honest-pipes-now.lovable.app/" xlink:type="simple" xlink:actuate="onRequest" office:target-frame="_blank" text:style-name="InternetLink">https://honest-pipes-now.lovable.app/</text:a></text:p>
          </table:table-cell>
          <table:table-cell>
            <text:p>503 S Saginaw St, Flint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