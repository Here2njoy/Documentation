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Top_20_1000_20_US_20_Citi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Top 1000 US Citie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6373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ntact Phone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mily Run Owner</text:p>
          </table:table-cell>
          <table:table-cell table:style-name="Default" office:value-type="string" calcext:value-type="string">
            <text:p>Company Webpage</text:p>
          </table:table-cell>
          <table:table-cell office:value-type="string" calcext:value-type="string">
            <text:p>Largest Social Platform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 Good Plumber Inc.</text:p>
          </table:table-cell>
          <table:table-cell office:value-type="string" calcext:value-type="string">
            <text:p>(718) 648-6838</text:p>
          </table:table-cell>
          <table:table-cell office:value-type="string" calcext:value-type="string">
            <text:p>info@agoodplumber.com</text:p>
          </table:table-cell>
          <table:table-cell office:value-type="string" calcext:value-type="string">
            <text:p>2114 E 27th St, Brooklyn, NY 11229</text:p>
          </table:table-cell>
          <table:table-cell office:value-type="string" calcext:value-type="string">
            <text:p>4.7/5 (Angi)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agoodplumber.com&quot;;&quot;agoodplumber.com&quot;)" office:value-type="string" office:string-value="agoodplumber.com" calcext:value-type="string">
            <text:p>agoodplumber.com</text:p>
          </table:table-cell>
          <table:table-cell office:value-type="string" calcext:value-type="string">
            <text:p>LinkedIn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dvantage Plumbing &amp; Rooter</text:p>
          </table:table-cell>
          <table:table-cell office:value-type="string" calcext:value-type="string">
            <text:p>(626) 956-3708</text:p>
          </table:table-cell>
          <table:table-cell/>
          <table:table-cell office:value-type="string" calcext:value-type="string">
            <text:p>2361 Barton Lane, Montrose, CA 91020</text:p>
          </table:table-cell>
          <table:table-cell office:value-type="string" calcext:value-type="string">
            <text:p>5.0/5</text:p>
          </table:table-cell>
          <table:table-cell/>
          <table:table-cell office:value-type="string" calcext:value-type="string">
            <text:p>YES (27 yrs)</text:p>
          </table:table-cell>
          <table:table-cell table:formula="of:=HYPERLINK(&quot;https://advantageplumbingrooter.com&quot;;&quot;advantageplumbingrooter.com&quot;)" office:value-type="string" office:string-value="advantageplumbingrooter.com" calcext:value-type="string">
            <text:p>advantageplumbingrooter.com</text:p>
          </table:table-cell>
          <table:table-cell office:value-type="string" calcext:value-type="string">
            <text:p>Facebook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im Wagner Plumbing Inc.</text:p>
          </table:table-cell>
          <table:table-cell office:value-type="string" calcext:value-type="string">
            <text:p>(630) 454-1510</text:p>
          </table:table-cell>
          <table:table-cell/>
          <table:table-cell office:value-type="string" calcext:value-type="string">
            <text:p>West Chicago, IL</text:p>
          </table:table-cell>
          <table:table-cell office:value-type="string" calcext:value-type="string">
            <text:p>4.8/5 (1000+ reviews)</text:p>
          </table:table-cell>
          <table:table-cell/>
          <table:table-cell office:value-type="string" calcext:value-type="string">
            <text:p>YES (3rd gen)</text:p>
          </table:table-cell>
          <table:table-cell table:formula="of:=HYPERLINK(&quot;https://jimwagnerplumbing.com&quot;;&quot;jimwagnerplumbing.com&quot;)" office:value-type="string" office:string-value="jimwagnerplumbing.com" calcext:value-type="string">
            <text:p>jimwagner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 Quality Plumbing</text:p>
          </table:table-cell>
          <table:table-cell office:value-type="string" calcext:value-type="string">
            <text:p>(713) 385-0349</text:p>
          </table:table-cell>
          <table:table-cell/>
          <table:table-cell office:value-type="string" calcext:value-type="string">
            <text:p>Houston, TX</text:p>
          </table:table-cell>
          <table:table-cell office:value-type="string" calcext:value-type="string">
            <text:p>4.9/5 (Best Pick)</text:p>
          </table:table-cell>
          <table:table-cell/>
          <table:table-cell office:value-type="string" calcext:value-type="string">
            <text:p>YES (2007)</text:p>
          </table:table-cell>
          <table:table-cell table:formula="of:=HYPERLINK(&quot;https://texasqualityplumbing.com&quot;;&quot;texasqualityplumbing.com&quot;)" office:value-type="string" office:string-value="texasqualityplumbing.com" calcext:value-type="string">
            <text:p>texasqualit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Lawson Family Plumbing</text:p>
          </table:table-cell>
          <table:table-cell office:value-type="string" calcext:value-type="string">
            <text:p>(602) 413-5790</text:p>
          </table:table-cell>
          <table:table-cell/>
          <table:table-cell office:value-type="string" calcext:value-type="string">
            <text:p>1497 E Baseline Rd, Gilbert, AZ 85233</text:p>
          </table:table-cell>
          <table:table-cell office:value-type="string" calcext:value-type="string">
            <text:p>4.9/5 (1,547 reviews)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lawsonfamilyplumbing.com&quot;;&quot;lawsonfamilyplumbing.com&quot;)" office:value-type="string" office:string-value="lawsonfamilyplumbing.com" calcext:value-type="string">
            <text:p>lawsonfamil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oodman Plumbing</text:p>
          </table:table-cell>
          <table:table-cell office:value-type="string" calcext:value-type="string">
            <text:p>(215) 364-7775</text:p>
          </table:table-cell>
          <table:table-cell/>
          <table:table-cell office:value-type="string" calcext:value-type="string">
            <text:p>Philadelphia &amp; Feasterville-Trevose, P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 (60+ yrs, 2nd gen)</text:p>
          </table:table-cell>
          <table:table-cell table:formula="of:=HYPERLINK(&quot;https://goodmanplumbers.com&quot;;&quot;goodmanplumbers.com&quot;)" office:value-type="string" office:string-value="goodmanplumbers.com" calcext:value-type="string">
            <text:p>goodmanplumb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hambliss Plumbing</text:p>
          </table:table-cell>
          <table:table-cell office:value-type="string" calcext:value-type="string">
            <text:p>(210) 797-7471</text:p>
          </table:table-cell>
          <table:table-cell/>
          <table:table-cell office:value-type="string" calcext:value-type="string">
            <text:p>San Antonio, TX</text:p>
          </table:table-cell>
          <table:table-cell office:value-type="string" calcext:value-type="string">
            <text:p>5.0/5 (1,400+ reviews)</text:p>
          </table:table-cell>
          <table:table-cell/>
          <table:table-cell office:value-type="string" calcext:value-type="string">
            <text:p>YES (1991)</text:p>
          </table:table-cell>
          <table:table-cell table:formula="of:=HYPERLINK(&quot;https://chamblissplumbing.com&quot;;&quot;chamblissplumbing.com&quot;)" office:value-type="string" office:string-value="chamblissplumbing.com" calcext:value-type="string">
            <text:p>chamblis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merican Plumbing Co</text:p>
          </table:table-cell>
          <table:table-cell office:value-type="string" calcext:value-type="string">
            <text:p>(619) 723-1114</text:p>
          </table:table-cell>
          <table:table-cell office:value-type="string" calcext:value-type="string">
            <text:p>info@plumbersandiegoonline.com</text:p>
          </table:table-cell>
          <table:table-cell office:value-type="string" calcext:value-type="string">
            <text:p>San Diego, CA</text:p>
          </table:table-cell>
          <table:table-cell office:value-type="string" calcext:value-type="string">
            <text:p>5.0/5 (40+ years)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plumbersandiegoonline.com&quot;;&quot;plumbersandiegoonline.com&quot;)" office:value-type="string" office:string-value="plumbersandiegoonline.com" calcext:value-type="string">
            <text:p>plumbersandiegoonline.com</text:p>
          </table:table-cell>
          <table:table-cell office:value-type="string" calcext:value-type="string">
            <text:p>Google/Yelp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aker Brothers Plumbing</text:p>
          </table:table-cell>
          <table:table-cell office:value-type="string" calcext:value-type="string">
            <text:p>(214) 324-8811</text:p>
          </table:table-cell>
          <table:table-cell/>
          <table:table-cell office:value-type="string" calcext:value-type="string">
            <text:p>Dallas/DFW, TX</text:p>
          </table:table-cell>
          <table:table-cell office:value-type="string" calcext:value-type="string">
            <text:p>4.9/5 (24,000+ reviews)</text:p>
          </table:table-cell>
          <table:table-cell/>
          <table:table-cell office:value-type="string" calcext:value-type="string">
            <text:p>YES (80+ yrs)</text:p>
          </table:table-cell>
          <table:table-cell table:formula="of:=HYPERLINK(&quot;https://bakerbrothersplumbing.com&quot;;&quot;bakerbrothersplumbing.com&quot;)" office:value-type="string" office:string-value="bakerbrothersplumbing.com" calcext:value-type="string">
            <text:p>bakerbrother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Jose Plumbing Inc.</text:p>
          </table:table-cell>
          <table:table-cell office:value-type="string" calcext:value-type="string">
            <text:p>(408) 296-1820</text:p>
          </table:table-cell>
          <table:table-cell/>
          <table:table-cell office:value-type="string" calcext:value-type="string">
            <text:p>San Jose, CA</text:p>
          </table:table-cell>
          <table:table-cell office:value-type="string" calcext:value-type="string">
            <text:p>4.8/5</text:p>
          </table:table-cell>
          <table:table-cell/>
          <table:table-cell office:value-type="string" calcext:value-type="string">
            <text:p>YES (30+ yrs)</text:p>
          </table:table-cell>
          <table:table-cell table:formula="of:=HYPERLINK(&quot;https://sanjoseplumbinginc.com&quot;;&quot;sanjoseplumbinginc.com&quot;)" office:value-type="string" office:string-value="sanjoseplumbinginc.com" calcext:value-type="string">
            <text:p>sanjoseplumbinginc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ustin's Best Plumbing</text:p>
          </table:table-cell>
          <table:table-cell office:value-type="string" calcext:value-type="string">
            <text:p>(512) 377-9919</text:p>
          </table:table-cell>
          <table:table-cell/>
          <table:table-cell office:value-type="string" calcext:value-type="string">
            <text:p>Austin, TX</text:p>
          </table:table-cell>
          <table:table-cell office:value-type="string" calcext:value-type="string">
            <text:p>4.8/5+</text:p>
          </table:table-cell>
          <table:table-cell/>
          <table:table-cell office:value-type="string" calcext:value-type="string">
            <text:p>YES (1978)</text:p>
          </table:table-cell>
          <table:table-cell table:formula="of:=HYPERLINK(&quot;https://austinsgreatestplumbing.com&quot;;&quot;austinsgreatestplumbing.com&quot;)" office:value-type="string" office:string-value="austinsgreatestplumbing.com" calcext:value-type="string">
            <text:p>austinsgreatestplumbing.com</text:p>
          </table:table-cell>
          <table:table-cell office:value-type="string" calcext:value-type="string">
            <text:p>Nextdoor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pplewood Plumbing</text:p>
          </table:table-cell>
          <table:table-cell office:value-type="string" calcext:value-type="string">
            <text:p>(303) 444-1633</text:p>
          </table:table-cell>
          <table:table-cell/>
          <table:table-cell office:value-type="string" calcext:value-type="string">
            <text:p>Denver/Boulder, CO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 (1973)</text:p>
          </table:table-cell>
          <table:table-cell table:formula="of:=HYPERLINK(&quot;https://applewoodfixit.com&quot;;&quot;applewoodfixit.com&quot;)" office:value-type="string" office:string-value="applewoodfixit.com" calcext:value-type="string">
            <text:p>applewoodfixit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allard Plumbing</text:p>
          </table:table-cell>
          <table:table-cell table:number-columns-repeated="2"/>
          <table:table-cell office:value-type="string" calcext:value-type="string">
            <text:p>Seattle, W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 (family)</text:p>
          </table:table-cell>
          <table:table-cell table:formula="of:=HYPERLINK(&quot;https://ballardplumbing.com&quot;;&quot;ballardplumbing.com&quot;)" office:value-type="string" office:string-value="ballardplumbing.com" calcext:value-type="string">
            <text:p>ballard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aughan Plumbing &amp; Heating</text:p>
          </table:table-cell>
          <table:table-cell office:value-type="string" calcext:value-type="string">
            <text:p>(781) 686-5049</text:p>
          </table:table-cell>
          <table:table-cell office:value-type="string" calcext:value-type="string">
            <text:p>accounts@vaughanplumbing.com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 (100+ yrs)</text:p>
          </table:table-cell>
          <table:table-cell table:formula="of:=HYPERLINK(&quot;https://vaughanplumbing.com&quot;;&quot;vaughanplumbing.com&quot;)" office:value-type="string" office:string-value="vaughanplumbing.com" calcext:value-type="string">
            <text:p>vaughan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ervice Plus Plumbing</text:p>
          </table:table-cell>
          <table:table-cell office:value-type="string" calcext:value-type="string">
            <text:p>(503) 927-4482</text:p>
          </table:table-cell>
          <table:table-cell/>
          <table:table-cell office:value-type="string" calcext:value-type="string">
            <text:p>Portland, OR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Family</text:p>
          </table:table-cell>
          <table:table-cell table:formula="of:=HYPERLINK(&quot;https://serviceplusplumbing.com&quot;;&quot;serviceplusplumbing.com&quot;)" office:value-type="string" office:string-value="serviceplusplumbing.com" calcext:value-type="string">
            <text:p>serviceplu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outhern Plumbing Works</text:p>
          </table:table-cell>
          <table:table-cell office:value-type="string" calcext:value-type="string">
            <text:p>(615) 205-7656</text:p>
          </table:table-cell>
          <table:table-cell office:value-type="string" calcext:value-type="string">
            <text:p>jonathan@loftyrankings.com</text:p>
          </table:table-cell>
          <table:table-cell office:value-type="string" calcext:value-type="string">
            <text:p>Nashville, TN</text:p>
          </table:table-cell>
          <table:table-cell office:value-type="string" calcext:value-type="string">
            <text:p>4.8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outhernplumbingworks.com&quot;;&quot;southernplumbingworks.com&quot;)" office:value-type="string" office:string-value="southernplumbingworks.com" calcext:value-type="string">
            <text:p>southernplumbingwork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yattWorks Plumbing Charlotte</text:p>
          </table:table-cell>
          <table:table-cell office:value-type="string" calcext:value-type="string">
            <text:p>(704) 825-5000</text:p>
          </table:table-cell>
          <table:table-cell/>
          <table:table-cell office:value-type="string" calcext:value-type="string">
            <text:p>Charlotte, NC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 (family)</text:p>
          </table:table-cell>
          <table:table-cell table:formula="of:=HYPERLINK(&quot;https://wyattworksplumbing.com&quot;;&quot;wyattworksplumbing.com&quot;)" office:value-type="string" office:string-value="wyattworksplumbing.com" calcext:value-type="string">
            <text:p>wyattwork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iami Dade Plumbing</text:p>
          </table:table-cell>
          <table:table-cell office:value-type="string" calcext:value-type="string">
            <text:p>(786) 756-3185</text:p>
          </table:table-cell>
          <table:table-cell/>
          <table:table-cell office:value-type="string" calcext:value-type="string">
            <text:p>Miami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iamidadeplumbing.com&quot;;&quot;miamidadeplumbing.com&quot;)" office:value-type="string" office:string-value="miamidadeplumbing.com" calcext:value-type="string">
            <text:p>miamidade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ead's Plumbing Sales &amp; Service</text:p>
          </table:table-cell>
          <table:table-cell office:value-type="string" calcext:value-type="string">
            <text:p>(404) 696-3175</text:p>
          </table:table-cell>
          <table:table-cell/>
          <table:table-cell office:value-type="string" calcext:value-type="string">
            <text:p>Atlanta, GA</text:p>
          </table:table-cell>
          <table:table-cell office:value-type="string" calcext:value-type="string">
            <text:p>4.8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adsplumbing.com&quot;;&quot;headsplumbing.com&quot;)" office:value-type="string" office:string-value="headsplumbing.com" calcext:value-type="string">
            <text:p>head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alpin Plumbing Inc</text:p>
          </table:table-cell>
          <table:table-cell office:value-type="string" calcext:value-type="string">
            <text:p>(513) 790-6985</text:p>
          </table:table-cell>
          <table:table-cell/>
          <table:table-cell office:value-type="string" calcext:value-type="string">
            <text:p>Cincinnati, OH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Family</text:p>
          </table:table-cell>
          <table:table-cell table:formula="of:=HYPERLINK(&quot;https://halpinplumbing.com&quot;;&quot;halpinplumbing.com&quot;)" office:value-type="string" office:string-value="halpinplumbing.com" calcext:value-type="string">
            <text:p>halpin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ine-Nichols Plumbing</text:p>
          </table:table-cell>
          <table:table-cell office:value-type="string" calcext:value-type="string">
            <text:p>(816) 348-3481</text:p>
          </table:table-cell>
          <table:table-cell/>
          <table:table-cell office:value-type="string" calcext:value-type="string">
            <text:p>Kansas City, MO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tinenichols.com&quot;;&quot;stinenichols.com&quot;)" office:value-type="string" office:string-value="stinenichols.com" calcext:value-type="string">
            <text:p>stinenichol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rayson Plumbing</text:p>
          </table:table-cell>
          <table:table-cell table:number-columns-repeated="2"/>
          <table:table-cell office:value-type="string" calcext:value-type="string">
            <text:p>Omaha, NE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 (family)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lovis Plumbing</text:p>
          </table:table-cell>
          <table:table-cell table:number-columns-repeated="2"/>
          <table:table-cell office:value-type="string" calcext:value-type="string">
            <text:p>Fresno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clovisplumbing.com&quot;;&quot;clovisplumbing.com&quot;)" office:value-type="string" office:string-value="clovisplumbing.com" calcext:value-type="string">
            <text:p>clovi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oettl Plumbing</text:p>
          </table:table-cell>
          <table:table-cell table:number-columns-repeated="2"/>
          <table:table-cell office:value-type="string" calcext:value-type="string">
            <text:p>Mesa, AZ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 (family)</text:p>
          </table:table-cell>
          <table:table-cell table:formula="of:=HYPERLINK(&quot;https://goettl.com&quot;;&quot;goettl.com&quot;)" office:value-type="string" office:string-value="goettl.com" calcext:value-type="string">
            <text:p>goettl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mily Plumbing Heating &amp; Refrigeration</text:p>
          </table:table-cell>
          <table:table-cell office:value-type="string" calcext:value-type="string">
            <text:p>(505) 803-3170</text:p>
          </table:table-cell>
          <table:table-cell/>
          <table:table-cell office:value-type="string" calcext:value-type="string">
            <text:p>Albuquerque, NM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plumbing.com&quot;;&quot;familyplumbing.com&quot;)" office:value-type="string" office:string-value="familyplumbing.com" calcext:value-type="string">
            <text:p>famil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Jobe &amp; Sons Plumbing</text:p>
          </table:table-cell>
          <table:table-cell office:value-type="string" calcext:value-type="string">
            <text:p>(520) 850-4552</text:p>
          </table:table-cell>
          <table:table-cell office:value-type="string" calcext:value-type="string">
            <text:p>impallari@gmail.com</text:p>
          </table:table-cell>
          <table:table-cell office:value-type="string" calcext:value-type="string">
            <text:p>Tucson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jobeandsonsplumbing.com&quot;;&quot;jobeandsonsplumbing.com&quot;)" office:value-type="string" office:string-value="jobeandsonsplumbing.com" calcext:value-type="string">
            <text:p>jobe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e Family Plumber</text:p>
          </table:table-cell>
          <table:table-cell office:value-type="string" calcext:value-type="string">
            <text:p>(562) 459-6445</text:p>
          </table:table-cell>
          <table:table-cell office:value-type="string" calcext:value-type="string">
            <text:p>info@thefamilyplumber.com</text:p>
          </table:table-cell>
          <table:table-cell office:value-type="string" calcext:value-type="string">
            <text:p>Long Beach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hefamilyplumber.com&quot;;&quot;thefamilyplumber.com&quot;)" office:value-type="string" office:string-value="thefamilyplumber.com" calcext:value-type="string">
            <text:p>thefamilyplumbe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mstrong Plumbing Inc</text:p>
          </table:table-cell>
          <table:table-cell office:value-type="string" calcext:value-type="string">
            <text:p>(916) 461-8744</text:p>
          </table:table-cell>
          <table:table-cell/>
          <table:table-cell office:value-type="string" calcext:value-type="string">
            <text:p>Sacramento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armstrongplumbing.com&quot;;&quot;armstrongplumbing.com&quot;)" office:value-type="string" office:string-value="armstrongplumbing.com" calcext:value-type="string">
            <text:p>armstrong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illiam Parrish Plumbing</text:p>
          </table:table-cell>
          <table:table-cell office:value-type="string" calcext:value-type="string">
            <text:p>(919) 343-0783</text:p>
          </table:table-cell>
          <table:table-cell/>
          <table:table-cell office:value-type="string" calcext:value-type="string">
            <text:p>Raleigh, NC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illiamparrishplumbing.com&quot;;&quot;williamparrishplumbing.com&quot;)" office:value-type="string" office:string-value="williamparrishplumbing.com" calcext:value-type="string">
            <text:p>williamparrish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lin Plumbing Inc.</text:p>
          </table:table-cell>
          <table:table-cell office:value-type="string" calcext:value-type="string">
            <text:p>(813) 443-5820</text:p>
          </table:table-cell>
          <table:table-cell office:value-type="string" calcext:value-type="string">
            <text:p>info@olinplumbinginc.com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4.8+/5</text:p>
          </table:table-cell>
          <table:table-cell/>
          <table:table-cell office:value-type="string" calcext:value-type="string">
            <text:p>YES (family)</text:p>
          </table:table-cell>
          <table:table-cell table:formula="of:=HYPERLINK(&quot;https://olinplumbing.com&quot;;&quot;olinplumbing.com&quot;)" office:value-type="string" office:string-value="olinplumbing.com" calcext:value-type="string">
            <text:p>olin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mith's Plumbing Services</text:p>
          </table:table-cell>
          <table:table-cell office:value-type="string" calcext:value-type="string">
            <text:p>(901) 660-2009</text:p>
          </table:table-cell>
          <table:table-cell/>
          <table:table-cell office:value-type="string" calcext:value-type="string">
            <text:p>Memphis, TN</text:p>
          </table:table-cell>
          <table:table-cell office:value-type="string" calcext:value-type="string">
            <text:p>4.8+/5</text:p>
          </table:table-cell>
          <table:table-cell/>
          <table:table-cell office:value-type="string" calcext:value-type="string">
            <text:p>YES (2011)</text:p>
          </table:table-cell>
          <table:table-cell table:formula="of:=HYPERLINK(&quot;https://smithsplumbingservice.com&quot;;&quot;smithsplumbingservice.com&quot;)" office:value-type="string" office:string-value="smithsplumbingservice.com" calcext:value-type="string">
            <text:p>smithsplumbingservice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ryant &amp; Sons Plumbing</text:p>
          </table:table-cell>
          <table:table-cell office:value-type="string" calcext:value-type="string">
            <text:p>(812) 284-2109</text:p>
          </table:table-cell>
          <table:table-cell/>
          <table:table-cell office:value-type="string" calcext:value-type="string">
            <text:p>Louisville, KY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 (40+ yrs)</text:p>
          </table:table-cell>
          <table:table-cell table:formula="of:=HYPERLINK(&quot;https://bryantsplumbingandwaterheaters.com&quot;;&quot;bryantsplumbingandwaterheaters.com&quot;)" office:value-type="string" office:string-value="bryantsplumbingandwaterheaters.com" calcext:value-type="string">
            <text:p>bryantsplumbingandwaterheat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Lyons Plumbing</text:p>
          </table:table-cell>
          <table:table-cell office:value-type="string" calcext:value-type="string">
            <text:p>(301) 253-4090</text:p>
          </table:table-cell>
          <table:table-cell/>
          <table:table-cell office:value-type="string" calcext:value-type="string">
            <text:p>Baltimore, MD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 (1959)</text:p>
          </table:table-cell>
          <table:table-cell table:formula="of:=HYPERLINK(&quot;https://lyonsplumbing.com&quot;;&quot;lyonsplumbing.com&quot;)" office:value-type="string" office:string-value="lyonsplumbing.com" calcext:value-type="string">
            <text:p>ly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J J's Plumbing Repair</text:p>
          </table:table-cell>
          <table:table-cell office:value-type="string" calcext:value-type="string">
            <text:p>(262) 377-7161</text:p>
          </table:table-cell>
          <table:table-cell/>
          <table:table-cell office:value-type="string" calcext:value-type="string">
            <text:p>Milwaukee, WI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 (1985)</text:p>
          </table:table-cell>
          <table:table-cell table:formula="of:=HYPERLINK(&quot;https://jjsplumbing.com&quot;;&quot;jjsplumbing.com&quot;)" office:value-type="string" office:string-value="jjsplumbing.com" calcext:value-type="string">
            <text:p>jj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mily Plumbing Heating &amp; Refrigeration</text:p>
          </table:table-cell>
          <table:table-cell office:value-type="string" calcext:value-type="string">
            <text:p>(505) 803-3170</text:p>
          </table:table-cell>
          <table:table-cell/>
          <table:table-cell office:value-type="string" calcext:value-type="string">
            <text:p>Albuquerque, NM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plumbing.com&quot;;&quot;familyplumbing.com&quot;)" office:value-type="string" office:string-value="familyplumbing.com" calcext:value-type="string">
            <text:p>famil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Jobe &amp; Sons Plumbing</text:p>
          </table:table-cell>
          <table:table-cell office:value-type="string" calcext:value-type="string">
            <text:p>(520) 850-4552</text:p>
          </table:table-cell>
          <table:table-cell office:value-type="string" calcext:value-type="string">
            <text:p>impallari@gmail.com</text:p>
          </table:table-cell>
          <table:table-cell office:value-type="string" calcext:value-type="string">
            <text:p>Tucson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jobeandsonsplumbing.com&quot;;&quot;jobeandsonsplumbing.com&quot;)" office:value-type="string" office:string-value="jobeandsonsplumbing.com" calcext:value-type="string">
            <text:p>jobe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lovis Plumbing</text:p>
          </table:table-cell>
          <table:table-cell table:number-columns-repeated="2"/>
          <table:table-cell office:value-type="string" calcext:value-type="string">
            <text:p>Fresno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elly Plumbing &amp; Heating</text:p>
          </table:table-cell>
          <table:table-cell office:value-type="string" calcext:value-type="string">
            <text:p>(651) 645-5401</text:p>
          </table:table-cell>
          <table:table-cell/>
          <table:table-cell office:value-type="string" calcext:value-type="string">
            <text:p>Saint Paul, MN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 (1973)</text:p>
          </table:table-cell>
          <table:table-cell table:formula="of:=HYPERLINK(&quot;https://kellyplumbinginc.com&quot;;&quot;kellyplumbinginc.com&quot;)" office:value-type="string" office:string-value="kellyplumbinginc.com" calcext:value-type="string">
            <text:p>kellyplumbinginc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Friends Plumbing Service</text:p>
          </table:table-cell>
          <table:table-cell office:value-type="string" calcext:value-type="string">
            <text:p>(817) 819-1471</text:p>
          </table:table-cell>
          <table:table-cell office:value-type="string" calcext:value-type="string">
            <text:p>e7d54b729aaf49ea8b2f80dae22860aa@sentry.zipify.com</text:p>
          </table:table-cell>
          <table:table-cell office:value-type="string" calcext:value-type="string">
            <text:p>Arlington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friends.com&quot;;&quot;familyfriends.com&quot;)" office:value-type="string" office:string-value="familyfriends.com" calcext:value-type="string">
            <text:p>familyfriend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el's Plumbing, LLC.</text:p>
          </table:table-cell>
          <table:table-cell office:value-type="string" calcext:value-type="string">
            <text:p>(504) 445-7222</text:p>
          </table:table-cell>
          <table:table-cell/>
          <table:table-cell office:value-type="string" calcext:value-type="string">
            <text:p>New Orleans, L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 (1966)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lano Plumbing Pros</text:p>
          </table:table-cell>
          <table:table-cell table:number-columns-repeated="2"/>
          <table:table-cell office:value-type="string" calcext:value-type="string">
            <text:p>Plano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Jackson Plumbing Services</text:p>
          </table:table-cell>
          <table:table-cell table:number-columns-repeated="2"/>
          <table:table-cell office:value-type="string" calcext:value-type="string">
            <text:p>Jackson, MS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ony's Plumbing, Heating &amp; Air</text:p>
          </table:table-cell>
          <table:table-cell office:value-type="string" calcext:value-type="string">
            <text:p>(209) 337-3788</text:p>
          </table:table-cell>
          <table:table-cell/>
          <table:table-cell office:value-type="string" calcext:value-type="string">
            <text:p>Stockton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onysplumbing.com&quot;;&quot;tonysplumbing.com&quot;)" office:value-type="string" office:string-value="tonysplumbing.com" calcext:value-type="string">
            <text:p>tony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ny LaMartina Plumbing</text:p>
          </table:table-cell>
          <table:table-cell office:value-type="string" calcext:value-type="string">
            <text:p>(314) 965-9377</text:p>
          </table:table-cell>
          <table:table-cell office:value-type="string" calcext:value-type="string">
            <text:p>pl_a_055-300x200@2x.jpeg</text:p>
          </table:table-cell>
          <table:table-cell office:value-type="string" calcext:value-type="string">
            <text:p>Saint Louis, MO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onylamartinaplumbing.com&quot;;&quot;tonylamartinaplumbing.com&quot;)" office:value-type="string" office:string-value="tonylamartinaplumbing.com" calcext:value-type="string">
            <text:p>tonylamartina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mpbell Family Plumbing &amp; Electric</text:p>
          </table:table-cell>
          <table:table-cell office:value-type="string" calcext:value-type="string">
            <text:p>(951) 363-2666</text:p>
          </table:table-cell>
          <table:table-cell/>
          <table:table-cell office:value-type="string" calcext:value-type="string">
            <text:p>Riverside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wain McCain Plumbing</text:p>
          </table:table-cell>
          <table:table-cell office:value-type="string" calcext:value-type="string">
            <text:p>(361) 241-6000</text:p>
          </table:table-cell>
          <table:table-cell office:value-type="string" calcext:value-type="string">
            <text:p>mccainplumbing@sbcglobal.net</text:p>
          </table:table-cell>
          <table:table-cell office:value-type="string" calcext:value-type="string">
            <text:p>Corpus Christi, TX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wainmccainplumbing.com&quot;;&quot;dwainmccainplumbing.com&quot;)" office:value-type="string" office:string-value="dwainmccainplumbing.com" calcext:value-type="string">
            <text:p>dwainmccain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Dauenhauer Plumbing</text:p>
          </table:table-cell>
          <table:table-cell office:value-type="string" calcext:value-type="string">
            <text:p>(859) 559-0625</text:p>
          </table:table-cell>
          <table:table-cell/>
          <table:table-cell office:value-type="string" calcext:value-type="string">
            <text:p>Lexington, KY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auenhauerplumbing.com&quot;;&quot;dauenhauerplumbing.com&quot;)" office:value-type="string" office:string-value="dauenhauerplumbing.com" calcext:value-type="string">
            <text:p>dauenhauer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Robinson Family Plumbing &amp; HVAC</text:p>
          </table:table-cell>
          <table:table-cell office:value-type="string" calcext:value-type="string">
            <text:p>(725) 234-3100</text:p>
          </table:table-cell>
          <table:table-cell/>
          <table:table-cell office:value-type="string" calcext:value-type="string">
            <text:p>Henderson, NV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obinsonfamilyplumbinghvac.com&quot;;&quot;robinsonfamilyplumbinghvac.com&quot;)" office:value-type="string" office:string-value="robinsonfamilyplumbinghvac.com" calcext:value-type="string">
            <text:p>robinsonfamilyplumbinghvac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ker and Sons Plumbing &amp; Rooter</text:p>
          </table:table-cell>
          <table:table-cell office:value-type="string" calcext:value-type="string">
            <text:p>(714) 667-7800</text:p>
          </table:table-cell>
          <table:table-cell/>
          <table:table-cell office:value-type="string" calcext:value-type="string">
            <text:p>Anaheim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arkerandsonsplumbing.com&quot;;&quot;barkerandsonsplumbing.com&quot;)" office:value-type="string" office:string-value="barkerandsonsplumbing.com" calcext:value-type="string">
            <text:p>barker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nchorage Plumbing</text:p>
          </table:table-cell>
          <table:table-cell office:value-type="string" calcext:value-type="string">
            <text:p>(907) 349-6620</text:p>
          </table:table-cell>
          <table:table-cell/>
          <table:table-cell office:value-type="string" calcext:value-type="string">
            <text:p>Anchorage, AK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ancph.com&quot;;&quot;ancph.com&quot;)" office:value-type="string" office:string-value="ancph.com" calcext:value-type="string">
            <text:p>ancph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 It Right Plumbers</text:p>
          </table:table-cell>
          <table:table-cell office:value-type="string" calcext:value-type="string">
            <text:p>(657) 229-2993</text:p>
          </table:table-cell>
          <table:table-cell office:value-type="string" calcext:value-type="string">
            <text:p>leads@doitrightplumbers.com</text:p>
          </table:table-cell>
          <table:table-cell office:value-type="string" calcext:value-type="string">
            <text:p>Santa 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oitrightplumbers.com&quot;;&quot;doitrightplumbers.com&quot;)" office:value-type="string" office:string-value="doitrightplumbers.com" calcext:value-type="string">
            <text:p>doitrightplumb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aint Petersbur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 Pete Plumbing</text:p>
          </table:table-cell>
          <table:table-cell table:number-columns-repeated="2"/>
          <table:table-cell office:value-type="string" calcext:value-type="string">
            <text:p>Saint Petersburg, FL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Plumbing &amp; Rooter Services</text:p>
          </table:table-cell>
          <table:table-cell office:value-type="string" calcext:value-type="string">
            <text:p>(949) 648-6645</text:p>
          </table:table-cell>
          <table:table-cell/>
          <table:table-cell office:value-type="string" calcext:value-type="string">
            <text:p>Irvine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plumbing.com&quot;;&quot;familyplumbing.com&quot;)" office:value-type="string" office:string-value="familyplumbing.com" calcext:value-type="string">
            <text:p>famil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hoice Plumbing Orlando</text:p>
          </table:table-cell>
          <table:table-cell office:value-type="string" calcext:value-type="string">
            <text:p>(407) 422-7443</text:p>
          </table:table-cell>
          <table:table-cell/>
          <table:table-cell office:value-type="string" calcext:value-type="string">
            <text:p>Orlando, FL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choiceplumbingorlando.com&quot;;&quot;choiceplumbingorlando.com&quot;)" office:value-type="string" office:string-value="choiceplumbingorlando.com" calcext:value-type="string">
            <text:p>choiceplumbingorlando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Chula Vis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b the Plumber of Chula Vista</text:p>
          </table:table-cell>
          <table:table-cell office:value-type="string" calcext:value-type="string">
            <text:p>(619) 990-7960</text:p>
          </table:table-cell>
          <table:table-cell/>
          <table:table-cell office:value-type="string" calcext:value-type="string">
            <text:p>Chula Vist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obthe.com&quot;;&quot;bobthe.com&quot;)" office:value-type="string" office:string-value="bobthe.com" calcext:value-type="string">
            <text:p>bobthe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Ties Plumbing &amp; Construction</text:p>
          </table:table-cell>
          <table:table-cell office:value-type="string" calcext:value-type="string">
            <text:p>(972) 824-8833</text:p>
          </table:table-cell>
          <table:table-cell/>
          <table:table-cell office:value-type="string" calcext:value-type="string">
            <text:p>Garland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lendale Plumbing</text:p>
          </table:table-cell>
          <table:table-cell table:number-columns-repeated="2"/>
          <table:table-cell office:value-type="string" calcext:value-type="string">
            <text:p>Glendale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avis &amp; Sons Plumbing &amp; Rooter</text:p>
          </table:table-cell>
          <table:table-cell office:value-type="string" calcext:value-type="string">
            <text:p>(480) 568-2309</text:p>
          </table:table-cell>
          <table:table-cell/>
          <table:table-cell office:value-type="string" calcext:value-type="string">
            <text:p>Gilbert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ravisandsonsplumbing.com&quot;;&quot;travisandsonsplumbing.com&quot;)" office:value-type="string" office:string-value="travisandsonsplumbing.com" calcext:value-type="string">
            <text:p>travis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ansou's Plumbing &amp; Septic</text:p>
          </table:table-cell>
          <table:table-cell office:value-type="string" calcext:value-type="string">
            <text:p>(336) 276-1263</text:p>
          </table:table-cell>
          <table:table-cell/>
          <table:table-cell office:value-type="string" calcext:value-type="string">
            <text:p>Winston-Sale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aton Family Plumbing</text:p>
          </table:table-cell>
          <table:table-cell office:value-type="string" calcext:value-type="string">
            <text:p>(757) 913-9100</text:p>
          </table:table-cell>
          <table:table-cell/>
          <table:table-cell office:value-type="string" calcext:value-type="string">
            <text:p>Norfolk, V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eatonfamily.com&quot;;&quot;eatonfamily.com&quot;)" office:value-type="string" office:string-value="eatonfamily.com" calcext:value-type="string">
            <text:p>eaton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ared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outh Texas Plumbing Contractors</text:p>
          </table:table-cell>
          <table:table-cell office:value-type="string" calcext:value-type="string">
            <text:p>(956) 333-6935</text:p>
          </table:table-cell>
          <table:table-cell/>
          <table:table-cell office:value-type="string" calcext:value-type="string">
            <text:p>Laredo, TX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outhtexas.com&quot;;&quot;southtexas.com&quot;)" office:value-type="string" office:string-value="southtexas.com" calcext:value-type="string">
            <text:p>southtexa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-1 Plumbing</text:p>
          </table:table-cell>
          <table:table-cell office:value-type="string" calcext:value-type="string">
            <text:p>(806) 796-0206</text:p>
          </table:table-cell>
          <table:table-cell/>
          <table:table-cell office:value-type="string" calcext:value-type="string">
            <text:p>Lubbock, TX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 (1976)</text:p>
          </table:table-cell>
          <table:table-cell table:formula="of:=HYPERLINK(&quot;https://lubbocka1plumbing.com&quot;;&quot;lubbocka1plumbing.com&quot;)" office:value-type="string" office:string-value="lubbocka1plumbing.com" calcext:value-type="string">
            <text:p>lubbocka1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owe Brothers Plumbing LLC</text:p>
          </table:table-cell>
          <table:table-cell office:value-type="string" calcext:value-type="string">
            <text:p>(608) 257-2884</text:p>
          </table:table-cell>
          <table:table-cell/>
          <table:table-cell office:value-type="string" calcext:value-type="string">
            <text:p>Madison, WI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oy Dossey Plumbing</text:p>
          </table:table-cell>
          <table:table-cell office:value-type="string" calcext:value-type="string">
            <text:p>(480) 963-3302</text:p>
          </table:table-cell>
          <table:table-cell/>
          <table:table-cell office:value-type="string" calcext:value-type="string">
            <text:p>Chandler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Irvin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eves Family Plumbing</text:p>
          </table:table-cell>
          <table:table-cell office:value-type="string" calcext:value-type="string">
            <text:p>(972) 247-3763</text:p>
          </table:table-cell>
          <table:table-cell/>
          <table:table-cell office:value-type="string" calcext:value-type="string">
            <text:p>Irving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eevesfamily.com&quot;;&quot;reevesfamily.com&quot;)" office:value-type="string" office:string-value="reevesfamily.com" calcext:value-type="string">
            <text:p>reeves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DC Family Plumbing</text:p>
          </table:table-cell>
          <table:table-cell office:value-type="string" calcext:value-type="string">
            <text:p>(480) 300-4791</text:p>
          </table:table-cell>
          <table:table-cell/>
          <table:table-cell office:value-type="string" calcext:value-type="string">
            <text:p>Scottsdale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cfamilyplumbing.com&quot;;&quot;dcfamilyplumbing.com&quot;)" office:value-type="string" office:string-value="dcfamilyplumbing.com" calcext:value-type="string">
            <text:p>dcfamil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aton Family Plumbing</text:p>
          </table:table-cell>
          <table:table-cell office:value-type="string" calcext:value-type="string">
            <text:p>(757) 913-9100</text:p>
          </table:table-cell>
          <table:table-cell/>
          <table:table-cell office:value-type="string" calcext:value-type="string">
            <text:p>Norfolk, V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eatonfamily.com&quot;;&quot;eatonfamily.com&quot;)" office:value-type="string" office:string-value="eatonfamily.com" calcext:value-type="string">
            <text:p>eaton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Ties Plumbing &amp; Construction</text:p>
          </table:table-cell>
          <table:table-cell office:value-type="string" calcext:value-type="string">
            <text:p>(972) 824-8833</text:p>
          </table:table-cell>
          <table:table-cell/>
          <table:table-cell office:value-type="string" calcext:value-type="string">
            <text:p>Garland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lendale Plumbing Pro</text:p>
          </table:table-cell>
          <table:table-cell table:number-columns-repeated="2"/>
          <table:table-cell office:value-type="string" calcext:value-type="string">
            <text:p>Glendale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avis &amp; Sons Plumbing &amp; Rooter</text:p>
          </table:table-cell>
          <table:table-cell office:value-type="string" calcext:value-type="string">
            <text:p>(480) 568-2309</text:p>
          </table:table-cell>
          <table:table-cell/>
          <table:table-cell office:value-type="string" calcext:value-type="string">
            <text:p>Gilbert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ravisandsonsplumbing.com&quot;;&quot;travisandsonsplumbing.com&quot;)" office:value-type="string" office:string-value="travisandsonsplumbing.com" calcext:value-type="string">
            <text:p>travis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ansou's Plumbing &amp; Septic</text:p>
          </table:table-cell>
          <table:table-cell office:value-type="string" calcext:value-type="string">
            <text:p>(336) 276-1263</text:p>
          </table:table-cell>
          <table:table-cell/>
          <table:table-cell office:value-type="string" calcext:value-type="string">
            <text:p>Winston-Sale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ernandez Plumbing Co.</text:p>
          </table:table-cell>
          <table:table-cell office:value-type="string" calcext:value-type="string">
            <text:p>(305) 428-3782</text:p>
          </table:table-cell>
          <table:table-cell/>
          <table:table-cell office:value-type="string" calcext:value-type="string">
            <text:p>Hialeah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nandezplumbing.com&quot;;&quot;hernandezplumbing.com&quot;)" office:value-type="string" office:string-value="hernandezplumbing.com" calcext:value-type="string">
            <text:p>hernandez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k's Plumbing</text:p>
          </table:table-cell>
          <table:table-cell office:value-type="string" calcext:value-type="string">
            <text:p>(209) 496-1388</text:p>
          </table:table-cell>
          <table:table-cell/>
          <table:table-cell office:value-type="string" calcext:value-type="string">
            <text:p>Modest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ksplumbing.com&quot;;&quot;herksplumbing.com&quot;)" office:value-type="string" office:string-value="herksplumbing.com" calcext:value-type="string">
            <text:p>herk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Ties Air, Plumbing, &amp; Drain</text:p>
          </table:table-cell>
          <table:table-cell office:value-type="string" calcext:value-type="string">
            <text:p>(909) 332-2558</text:p>
          </table:table-cell>
          <table:table-cell/>
          <table:table-cell office:value-type="string" calcext:value-type="string">
            <text:p>Font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tiesair.com&quot;;&quot;familytiesair.com&quot;)" office:value-type="string" office:string-value="familytiesair.com" calcext:value-type="string">
            <text:p>familyties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Pherson Bros Plumbing</text:p>
          </table:table-cell>
          <table:table-cell office:value-type="string" calcext:value-type="string">
            <text:p>(833) 627-2767</text:p>
          </table:table-cell>
          <table:table-cell/>
          <table:table-cell office:value-type="string" calcext:value-type="string">
            <text:p>Moreno Valley, C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cphersonbros.com&quot;;&quot;mcphersonbros.com&quot;)" office:value-type="string" office:string-value="mcphersonbros.com" calcext:value-type="string">
            <text:p>mcphersonbro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rown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obert's Repair Plumbing</text:p>
          </table:table-cell>
          <table:table-cell office:value-type="string" calcext:value-type="string">
            <text:p>(956) 203-9993</text:p>
          </table:table-cell>
          <table:table-cell/>
          <table:table-cell office:value-type="string" calcext:value-type="string">
            <text:p>Brownsville, TX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obertsrepair.com&quot;;&quot;robertsrepair.com&quot;)" office:value-type="string" office:string-value="robertsrepair.com" calcext:value-type="string">
            <text:p>roberts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oods Plumbing Service LLC</text:p>
          </table:table-cell>
          <table:table-cell office:value-type="string" calcext:value-type="string">
            <text:p>(910) 920-3908</text:p>
          </table:table-cell>
          <table:table-cell/>
          <table:table-cell office:value-type="string" calcext:value-type="string">
            <text:p>Fayetteville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oodsplumbing.com&quot;;&quot;woodsplumbing.com&quot;)" office:value-type="string" office:string-value="woodsplumbing.com" calcext:value-type="string">
            <text:p>wood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Vinney Plumbing, Inc.</text:p>
          </table:table-cell>
          <table:table-cell office:value-type="string" calcext:value-type="string">
            <text:p>(714) 375-0126</text:p>
          </table:table-cell>
          <table:table-cell/>
          <table:table-cell office:value-type="string" calcext:value-type="string">
            <text:p>Huntington Beach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evinneyplumbing.com&quot;;&quot;devinneyplumbing.com&quot;)" office:value-type="string" office:string-value="devinneyplumbing.com" calcext:value-type="string">
            <text:p>devinne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rand Prair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and Prairie Plumbing</text:p>
          </table:table-cell>
          <table:table-cell table:number-columns-repeated="2"/>
          <table:table-cell office:value-type="string" calcext:value-type="string">
            <text:p>Grand Prairie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ewport New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lair's Plumbing Repair &amp; Drains</text:p>
          </table:table-cell>
          <table:table-cell office:value-type="string" calcext:value-type="string">
            <text:p>(757) 719-1236</text:p>
          </table:table-cell>
          <table:table-cell/>
          <table:table-cell office:value-type="string" calcext:value-type="string">
            <text:p>Newport News, V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lairsplumbingrepair.com&quot;;&quot;blairsplumbingrepair.com&quot;)" office:value-type="string" office:string-value="blairsplumbingrepair.com" calcext:value-type="string">
            <text:p>blairsplumbing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's Plumbing Inc</text:p>
          </table:table-cell>
          <table:table-cell office:value-type="string" calcext:value-type="string">
            <text:p>(850) 576-3510</text:p>
          </table:table-cell>
          <table:table-cell/>
          <table:table-cell office:value-type="string" calcext:value-type="string">
            <text:p>Tallahassee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hitesplumbing.com&quot;;&quot;whitesplumbing.com&quot;)" office:value-type="string" office:string-value="whitesplumbing.com" calcext:value-type="string">
            <text:p>white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anta Clari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tthew's Plumbing Inc</text:p>
          </table:table-cell>
          <table:table-cell office:value-type="string" calcext:value-type="string">
            <text:p>(661) 299-6707</text:p>
          </table:table-cell>
          <table:table-cell/>
          <table:table-cell office:value-type="string" calcext:value-type="string">
            <text:p>Santa Clarita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own Brothers Plumbing &amp; Heating</text:p>
          </table:table-cell>
          <table:table-cell office:value-type="string" calcext:value-type="string">
            <text:p>(919) 220-2554</text:p>
          </table:table-cell>
          <table:table-cell/>
          <table:table-cell office:value-type="string" calcext:value-type="string">
            <text:p>Durha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rownbrothers.com&quot;;&quot;brownbrothers.com&quot;)" office:value-type="string" office:string-value="brownbrothers.com" calcext:value-type="string">
            <text:p>brownbroth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lano Plumbing</text:p>
          </table:table-cell>
          <table:table-cell table:number-columns-repeated="2"/>
          <table:table-cell office:value-type="string" calcext:value-type="string">
            <text:p>Plano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bby L. Greene Plumbing</text:p>
          </table:table-cell>
          <table:table-cell office:value-type="string" calcext:value-type="string">
            <text:p>(318) 929-6574</text:p>
          </table:table-cell>
          <table:table-cell/>
          <table:table-cell office:value-type="string" calcext:value-type="string">
            <text:p>Shreveport, L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Ties Plumbing &amp; Construction</text:p>
          </table:table-cell>
          <table:table-cell office:value-type="string" calcext:value-type="string">
            <text:p>(972) 824-8833</text:p>
          </table:table-cell>
          <table:table-cell/>
          <table:table-cell office:value-type="string" calcext:value-type="string">
            <text:p>Garland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haw Plumbing Heating &amp; Air Conditioning</text:p>
          </table:table-cell>
          <table:table-cell office:value-type="string" calcext:value-type="string">
            <text:p>(509) 642-6166</text:p>
          </table:table-cell>
          <table:table-cell/>
          <table:table-cell office:value-type="string" calcext:value-type="string">
            <text:p>Spokane, W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hawplumbing.com&quot;;&quot;shawplumbing.com&quot;)" office:value-type="string" office:string-value="shawplumbing.com" calcext:value-type="string">
            <text:p>shaw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k's Plumbing</text:p>
          </table:table-cell>
          <table:table-cell office:value-type="string" calcext:value-type="string">
            <text:p>(209) 496-1388</text:p>
          </table:table-cell>
          <table:table-cell/>
          <table:table-cell office:value-type="string" calcext:value-type="string">
            <text:p>Modest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ksplumbing.com&quot;;&quot;herksplumbing.com&quot;)" office:value-type="string" office:string-value="herksplumbing.com" calcext:value-type="string">
            <text:p>herk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Ties Air, Plumbing, &amp; Drain</text:p>
          </table:table-cell>
          <table:table-cell office:value-type="string" calcext:value-type="string">
            <text:p>(909) 332-2558</text:p>
          </table:table-cell>
          <table:table-cell/>
          <table:table-cell office:value-type="string" calcext:value-type="string">
            <text:p>Font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tiesair.com&quot;;&quot;familytiesair.com&quot;)" office:value-type="string" office:string-value="familytiesair.com" calcext:value-type="string">
            <text:p>familyties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ompson Family Plumbing &amp; Drain</text:p>
          </table:table-cell>
          <table:table-cell office:value-type="string" calcext:value-type="string">
            <text:p>(909) 332-2838</text:p>
          </table:table-cell>
          <table:table-cell/>
          <table:table-cell office:value-type="string" calcext:value-type="string">
            <text:p>San Bernardino, C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hompsonfamily.com&quot;;&quot;thompsonfamily.com&quot;)" office:value-type="string" office:string-value="thompsonfamily.com" calcext:value-type="string">
            <text:p>thompson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ean Plumbing Company Inc.</text:p>
          </table:table-cell>
          <table:table-cell office:value-type="string" calcext:value-type="string">
            <text:p>(256) 883-6130</text:p>
          </table:table-cell>
          <table:table-cell/>
          <table:table-cell office:value-type="string" calcext:value-type="string">
            <text:p>Huntsville, A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eanplumbing.com&quot;;&quot;deanplumbing.com&quot;)" office:value-type="string" office:string-value="deanplumbing.com" calcext:value-type="string">
            <text:p>dean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aton Family Plumbing</text:p>
          </table:table-cell>
          <table:table-cell office:value-type="string" calcext:value-type="string">
            <text:p>(757) 913-9100</text:p>
          </table:table-cell>
          <table:table-cell/>
          <table:table-cell office:value-type="string" calcext:value-type="string">
            <text:p>Norfolk, V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eatonfamily.com&quot;;&quot;eatonfamily.com&quot;)" office:value-type="string" office:string-value="eatonfamily.com" calcext:value-type="string">
            <text:p>eaton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rinity Plumbing</text:p>
          </table:table-cell>
          <table:table-cell office:value-type="string" calcext:value-type="string">
            <text:p>(225) 501-5554</text:p>
          </table:table-cell>
          <table:table-cell/>
          <table:table-cell office:value-type="string" calcext:value-type="string">
            <text:p>Baton Rouge, L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rinityplumbingla.com&quot;;&quot;trinityplumbingla.com&quot;)" office:value-type="string" office:string-value="trinityplumbingla.com" calcext:value-type="string">
            <text:p>trinityplumbingla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Port St. Luci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irst Choice Plus Plumbing &amp; Air</text:p>
          </table:table-cell>
          <table:table-cell office:value-type="string" calcext:value-type="string">
            <text:p>(772) 275-3760</text:p>
          </table:table-cell>
          <table:table-cell/>
          <table:table-cell office:value-type="string" calcext:value-type="string">
            <text:p>Port St. Lucie, FL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irstchoice.com&quot;;&quot;firstchoice.com&quot;)" office:value-type="string" office:string-value="firstchoice.com" calcext:value-type="string">
            <text:p>firstchoice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Ocean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rmley Plumbing</text:p>
          </table:table-cell>
          <table:table-cell office:value-type="string" calcext:value-type="string">
            <text:p>(858) 229-3341</text:p>
          </table:table-cell>
          <table:table-cell/>
          <table:table-cell office:value-type="string" calcext:value-type="string">
            <text:p>Oceanside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parmleyplumbing.com&quot;;&quot;parmleyplumbing.com&quot;)" office:value-type="string" office:string-value="parmleyplumbing.com" calcext:value-type="string">
            <text:p>parmle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Plumbing &amp; Rooter Services</text:p>
          </table:table-cell>
          <table:table-cell office:value-type="string" calcext:value-type="string">
            <text:p>(949) 648-6645</text:p>
          </table:table-cell>
          <table:table-cell/>
          <table:table-cell office:value-type="string" calcext:value-type="string">
            <text:p>Irvine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plumbing.com&quot;;&quot;familyplumbing.com&quot;)" office:value-type="string" office:string-value="familyplumbing.com" calcext:value-type="string">
            <text:p>famil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armine P. Aumenta &amp; Sons Plumbing</text:p>
          </table:table-cell>
          <table:table-cell office:value-type="string" calcext:value-type="string">
            <text:p>(201) 451-8008</text:p>
          </table:table-cell>
          <table:table-cell/>
          <table:table-cell office:value-type="string" calcext:value-type="string">
            <text:p>Jersey City, NJ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urora Plumbing Company</text:p>
          </table:table-cell>
          <table:table-cell office:value-type="string" calcext:value-type="string">
            <text:p>(303) 366-5828</text:p>
          </table:table-cell>
          <table:table-cell/>
          <table:table-cell office:value-type="string" calcext:value-type="string">
            <text:p>Aurora, CO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auroraplumbing.com&quot;;&quot;auroraplumbing.com&quot;)" office:value-type="string" office:string-value="auroraplumbing.com" calcext:value-type="string">
            <text:p>aurora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J&amp;J Plumbing, Heating, Cooling, &amp; Electric</text:p>
          </table:table-cell>
          <table:table-cell office:value-type="string" calcext:value-type="string">
            <text:p>(330) 967-0147</text:p>
          </table:table-cell>
          <table:table-cell/>
          <table:table-cell office:value-type="string" calcext:value-type="string">
            <text:p>Akron, OH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jandjplumbing.com&quot;;&quot;jandjplumbing.com&quot;)" office:value-type="string" office:string-value="jandjplumbing.com" calcext:value-type="string">
            <text:p>jandj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Ties Air, Plumbing, &amp; Drain</text:p>
          </table:table-cell>
          <table:table-cell office:value-type="string" calcext:value-type="string">
            <text:p>(909) 332-2558</text:p>
          </table:table-cell>
          <table:table-cell/>
          <table:table-cell office:value-type="string" calcext:value-type="string">
            <text:p>Font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tiesair.com&quot;;&quot;familytiesair.com&quot;)" office:value-type="string" office:string-value="familytiesair.com" calcext:value-type="string">
            <text:p>familyties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k's Plumbing</text:p>
          </table:table-cell>
          <table:table-cell office:value-type="string" calcext:value-type="string">
            <text:p>(209) 496-1388</text:p>
          </table:table-cell>
          <table:table-cell/>
          <table:table-cell office:value-type="string" calcext:value-type="string">
            <text:p>Modest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ksplumbing.com&quot;;&quot;herksplumbing.com&quot;)" office:value-type="string" office:string-value="herksplumbing.com" calcext:value-type="string">
            <text:p>herk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rrissey Family Plumbing</text:p>
          </table:table-cell>
          <table:table-cell office:value-type="string" calcext:value-type="string">
            <text:p>(818) 915-6630</text:p>
          </table:table-cell>
          <table:table-cell/>
          <table:table-cell office:value-type="string" calcext:value-type="string">
            <text:p>Glendale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orrisseyfamily.com&quot;;&quot;morrisseyfamily.com&quot;)" office:value-type="string" office:string-value="morrisseyfamily.com" calcext:value-type="string">
            <text:p>morrissey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Pherson Bros Plumbing</text:p>
          </table:table-cell>
          <table:table-cell office:value-type="string" calcext:value-type="string">
            <text:p>(833) 627-2767</text:p>
          </table:table-cell>
          <table:table-cell/>
          <table:table-cell office:value-type="string" calcext:value-type="string">
            <text:p>Moreno Valley, C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cphersonbros.com&quot;;&quot;mcphersonbros.com&quot;)" office:value-type="string" office:string-value="mcphersonbros.com" calcext:value-type="string">
            <text:p>mcphersonbro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Oxna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linas and Sons Rooter</text:p>
          </table:table-cell>
          <table:table-cell office:value-type="string" calcext:value-type="string">
            <text:p>(805) 486-7030</text:p>
          </table:table-cell>
          <table:table-cell/>
          <table:table-cell office:value-type="string" calcext:value-type="string">
            <text:p>Oxnard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bby L. Greene Plumbing</text:p>
          </table:table-cell>
          <table:table-cell office:value-type="string" calcext:value-type="string">
            <text:p>(318) 929-6574</text:p>
          </table:table-cell>
          <table:table-cell/>
          <table:table-cell office:value-type="string" calcext:value-type="string">
            <text:p>Shreveport, L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Yonker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JP Plumbing and Sewer</text:p>
          </table:table-cell>
          <table:table-cell office:value-type="string" calcext:value-type="string">
            <text:p>(914) 527-2773</text:p>
          </table:table-cell>
          <table:table-cell/>
          <table:table-cell office:value-type="string" calcext:value-type="string">
            <text:p>Yonkers, NY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jpplumbingandsewer.com&quot;;&quot;jpplumbingandsewer.com&quot;)" office:value-type="string" office:string-value="jpplumbingandsewer.com" calcext:value-type="string">
            <text:p>jpplumbingandsewe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isneros Brothers Plumbing</text:p>
          </table:table-cell>
          <table:table-cell office:value-type="string" calcext:value-type="string">
            <text:p>(661) 768-0616</text:p>
          </table:table-cell>
          <table:table-cell/>
          <table:table-cell office:value-type="string" calcext:value-type="string">
            <text:p>Bakersfield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cisnerosbrothersplumbing.com&quot;;&quot;cisnerosbrothersplumbing.com&quot;)" office:value-type="string" office:string-value="cisnerosbrothersplumbing.com" calcext:value-type="string">
            <text:p>cisnerosbrother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chels Plumbing Inc</text:p>
          </table:table-cell>
          <table:table-cell office:value-type="string" calcext:value-type="string">
            <text:p>(630) 801-9700</text:p>
          </table:table-cell>
          <table:table-cell/>
          <table:table-cell office:value-type="string" calcext:value-type="string">
            <text:p>Aurora, I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ichelsplumbing.com&quot;;&quot;michelsplumbing.com&quot;)" office:value-type="string" office:string-value="michelsplumbing.com" calcext:value-type="string">
            <text:p>michel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ker and Sons Plumbing &amp; Rooter</text:p>
          </table:table-cell>
          <table:table-cell office:value-type="string" calcext:value-type="string">
            <text:p>(714) 667-7800</text:p>
          </table:table-cell>
          <table:table-cell/>
          <table:table-cell office:value-type="string" calcext:value-type="string">
            <text:p>Anaheim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arkerandsonsplumbing.com&quot;;&quot;barkerandsonsplumbing.com&quot;)" office:value-type="string" office:string-value="barkerandsonsplumbing.com" calcext:value-type="string">
            <text:p>barker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ndler's Plumbing &amp; Heating</text:p>
          </table:table-cell>
          <table:table-cell office:value-type="string" calcext:value-type="string">
            <text:p>(703) 536-4750</text:p>
          </table:table-cell>
          <table:table-cell/>
          <table:table-cell office:value-type="string" calcext:value-type="string">
            <text:p>Arlington, V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chandlersplumbing.com&quot;;&quot;chandlersplumbing.com&quot;)" office:value-type="string" office:string-value="chandlersplumbing.com" calcext:value-type="string">
            <text:p>chandler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ony's Plumbing, Heating &amp; Air</text:p>
          </table:table-cell>
          <table:table-cell office:value-type="string" calcext:value-type="string">
            <text:p>(209) 337-3788</text:p>
          </table:table-cell>
          <table:table-cell/>
          <table:table-cell office:value-type="string" calcext:value-type="string">
            <text:p>Stockton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onysplumbing.com&quot;;&quot;tonysplumbing.com&quot;)" office:value-type="string" office:string-value="tonysplumbing.com" calcext:value-type="string">
            <text:p>tony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wain McCain Plumbing</text:p>
          </table:table-cell>
          <table:table-cell office:value-type="string" calcext:value-type="string">
            <text:p>(361) 241-6000</text:p>
          </table:table-cell>
          <table:table-cell office:value-type="string" calcext:value-type="string">
            <text:p>mccainplumbing@sbcglobal.net</text:p>
          </table:table-cell>
          <table:table-cell office:value-type="string" calcext:value-type="string">
            <text:p>Corpus Christi, TX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wainmccainplumbing.com&quot;;&quot;dwainmccainplumbing.com&quot;)" office:value-type="string" office:string-value="dwainmccainplumbing.com" calcext:value-type="string">
            <text:p>dwainmccain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Dauenhauer Plumbing</text:p>
          </table:table-cell>
          <table:table-cell office:value-type="string" calcext:value-type="string">
            <text:p>(859) 559-0625</text:p>
          </table:table-cell>
          <table:table-cell/>
          <table:table-cell office:value-type="string" calcext:value-type="string">
            <text:p>Lexington, KY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auenhauerplumbing.com&quot;;&quot;dauenhauerplumbing.com&quot;)" office:value-type="string" office:string-value="dauenhauerplumbing.com" calcext:value-type="string">
            <text:p>dauenhauer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Robinson Family Plumbing &amp; HVAC</text:p>
          </table:table-cell>
          <table:table-cell office:value-type="string" calcext:value-type="string">
            <text:p>(725) 234-3100</text:p>
          </table:table-cell>
          <table:table-cell/>
          <table:table-cell office:value-type="string" calcext:value-type="string">
            <text:p>Henderson, NV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obinsonfamilyplumbinghvac.com&quot;;&quot;robinsonfamilyplumbinghvac.com&quot;)" office:value-type="string" office:string-value="robinsonfamilyplumbinghvac.com" calcext:value-type="string">
            <text:p>robinsonfamilyplumbinghvac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nchorage Plumbing Pro</text:p>
          </table:table-cell>
          <table:table-cell table:number-columns-repeated="2"/>
          <table:table-cell office:value-type="string" calcext:value-type="string">
            <text:p>Anchorage, AK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Jackson Plumbing Pro</text:p>
          </table:table-cell>
          <table:table-cell table:number-columns-repeated="2"/>
          <table:table-cell office:value-type="string" calcext:value-type="string">
            <text:p>Jackson, MS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lano Plumbing Services</text:p>
          </table:table-cell>
          <table:table-cell table:number-columns-repeated="2"/>
          <table:table-cell office:value-type="string" calcext:value-type="string">
            <text:p>Plano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oy Dossey Plumbing</text:p>
          </table:table-cell>
          <table:table-cell office:value-type="string" calcext:value-type="string">
            <text:p>(480) 963-3302</text:p>
          </table:table-cell>
          <table:table-cell/>
          <table:table-cell office:value-type="string" calcext:value-type="string">
            <text:p>Chandler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ared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outh Texas Plumbing Contractors</text:p>
          </table:table-cell>
          <table:table-cell office:value-type="string" calcext:value-type="string">
            <text:p>(956) 333-6935</text:p>
          </table:table-cell>
          <table:table-cell/>
          <table:table-cell office:value-type="string" calcext:value-type="string">
            <text:p>Laredo, TX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outhtexas.com&quot;;&quot;southtexas.com&quot;)" office:value-type="string" office:string-value="southtexas.com" calcext:value-type="string">
            <text:p>southtexa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Ties Plumbing &amp; Construction</text:p>
          </table:table-cell>
          <table:table-cell office:value-type="string" calcext:value-type="string">
            <text:p>(972) 824-8833</text:p>
          </table:table-cell>
          <table:table-cell/>
          <table:table-cell office:value-type="string" calcext:value-type="string">
            <text:p>Garland, TX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 (20+ yrs)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 Family Plumbing</text:p>
          </table:table-cell>
          <table:table-cell office:value-type="string" calcext:value-type="string">
            <text:p>(602) 922-0103</text:p>
          </table:table-cell>
          <table:table-cell/>
          <table:table-cell office:value-type="string" calcext:value-type="string">
            <text:p>Glendale, AZ</text:p>
          </table:table-cell>
          <table:table-cell office:value-type="string" calcext:value-type="string">
            <text:p>4.8+/5</text:p>
          </table:table-cell>
          <table:table-cell/>
          <table:table-cell office:value-type="string" calcext:value-type="string">
            <text:p>YES (20+ yrs)</text:p>
          </table:table-cell>
          <table:table-cell table:formula="of:=HYPERLINK(&quot;https://azfamilyplumbing.com&quot;;&quot;azfamilyplumbing.com&quot;)" office:value-type="string" office:string-value="azfamilyplumbing.com" calcext:value-type="string">
            <text:p>azfamil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Irvin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eves Family Plumbing</text:p>
          </table:table-cell>
          <table:table-cell office:value-type="string" calcext:value-type="string">
            <text:p>(972) 247-3763</text:p>
          </table:table-cell>
          <table:table-cell office:value-type="string" calcext:value-type="string">
            <text:p>service@plumbersirvingtx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eevesfamily.com&quot;;&quot;reevesfamily.com&quot;)" office:value-type="string" office:string-value="reevesfamily.com" calcext:value-type="string">
            <text:p>reeves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odot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dot Springs Plumbing</text:p>
          </table:table-cell>
          <table:table-cell table:number-columns-repeated="2"/>
          <table:table-cell office:value-type="string" calcext:value-type="string">
            <text:p>Godot Springs, CO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anta Clari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tthew's Plumbing Inc</text:p>
          </table:table-cell>
          <table:table-cell office:value-type="string" calcext:value-type="string">
            <text:p>(661) 299-6707</text:p>
          </table:table-cell>
          <table:table-cell/>
          <table:table-cell office:value-type="string" calcext:value-type="string">
            <text:p>Santa Clarit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own Brothers Plumbing &amp; Heating</text:p>
          </table:table-cell>
          <table:table-cell office:value-type="string" calcext:value-type="string">
            <text:p>(919) 220-2554</text:p>
          </table:table-cell>
          <table:table-cell/>
          <table:table-cell office:value-type="string" calcext:value-type="string">
            <text:p>Durha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rownbrothers.com&quot;;&quot;brownbrothers.com&quot;)" office:value-type="string" office:string-value="brownbrothers.com" calcext:value-type="string">
            <text:p>brownbroth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 Hattersley &amp; Sons Inc</text:p>
          </table:table-cell>
          <table:table-cell office:value-type="string" calcext:value-type="string">
            <text:p>(260) 483-6473</text:p>
          </table:table-cell>
          <table:table-cell/>
          <table:table-cell office:value-type="string" calcext:value-type="string">
            <text:p>Fort Wayne, IN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ahattersley.com&quot;;&quot;ahattersley.com&quot;)" office:value-type="string" office:string-value="ahattersley.com" calcext:value-type="string">
            <text:p>ahattersle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bby L. Greene Plumbing</text:p>
          </table:table-cell>
          <table:table-cell office:value-type="string" calcext:value-type="string">
            <text:p>(318) 929-6574</text:p>
          </table:table-cell>
          <table:table-cell/>
          <table:table-cell office:value-type="string" calcext:value-type="string">
            <text:p>Shreveport, L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Yonker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JP Plumbing and Sewer</text:p>
          </table:table-cell>
          <table:table-cell office:value-type="string" calcext:value-type="string">
            <text:p>(914) 527-2773</text:p>
          </table:table-cell>
          <table:table-cell/>
          <table:table-cell office:value-type="string" calcext:value-type="string">
            <text:p>Yonkers, NY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jpplumbingandsewer.com&quot;;&quot;jpplumbingandsewer.com&quot;)" office:value-type="string" office:string-value="jpplumbingandsewer.com" calcext:value-type="string">
            <text:p>jpplumbingandsewe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isneros Brothers Plumbing</text:p>
          </table:table-cell>
          <table:table-cell office:value-type="string" calcext:value-type="string">
            <text:p>(661) 768-0616</text:p>
          </table:table-cell>
          <table:table-cell/>
          <table:table-cell office:value-type="string" calcext:value-type="string">
            <text:p>Bakersfield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cisnerosbrothersplumbing.com&quot;;&quot;cisnerosbrothersplumbing.com&quot;)" office:value-type="string" office:string-value="cisnerosbrothersplumbing.com" calcext:value-type="string">
            <text:p>cisnerosbrother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chels Plumbing Inc</text:p>
          </table:table-cell>
          <table:table-cell office:value-type="string" calcext:value-type="string">
            <text:p>(630) 801-9700</text:p>
          </table:table-cell>
          <table:table-cell/>
          <table:table-cell office:value-type="string" calcext:value-type="string">
            <text:p>Aurora, I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ichelsplumbing.com&quot;;&quot;michelsplumbing.com&quot;)" office:value-type="string" office:string-value="michelsplumbing.com" calcext:value-type="string">
            <text:p>michel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ker and Sons Plumbing &amp; Rooter</text:p>
          </table:table-cell>
          <table:table-cell office:value-type="string" calcext:value-type="string">
            <text:p>(714) 667-7800</text:p>
          </table:table-cell>
          <table:table-cell/>
          <table:table-cell office:value-type="string" calcext:value-type="string">
            <text:p>Anaheim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arkerandsonsplumbing.com&quot;;&quot;barkerandsonsplumbing.com&quot;)" office:value-type="string" office:string-value="barkerandsonsplumbing.com" calcext:value-type="string">
            <text:p>barker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ndler's Plumbing &amp; Heating</text:p>
          </table:table-cell>
          <table:table-cell office:value-type="string" calcext:value-type="string">
            <text:p>(703) 536-4750</text:p>
          </table:table-cell>
          <table:table-cell/>
          <table:table-cell office:value-type="string" calcext:value-type="string">
            <text:p>Arlington, V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chandlersplumbing.com&quot;;&quot;chandlersplumbing.com&quot;)" office:value-type="string" office:string-value="chandlersplumbing.com" calcext:value-type="string">
            <text:p>chandler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ean Plumbing Company Inc.</text:p>
          </table:table-cell>
          <table:table-cell office:value-type="string" calcext:value-type="string">
            <text:p>(256) 883-6130</text:p>
          </table:table-cell>
          <table:table-cell/>
          <table:table-cell office:value-type="string" calcext:value-type="string">
            <text:p>Huntsville, A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eanplumbing.com&quot;;&quot;deanplumbing.com&quot;)" office:value-type="string" office:string-value="deanplumbing.com" calcext:value-type="string">
            <text:p>dean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rinity Plumbing</text:p>
          </table:table-cell>
          <table:table-cell office:value-type="string" calcext:value-type="string">
            <text:p>(225) 501-5554</text:p>
          </table:table-cell>
          <table:table-cell/>
          <table:table-cell office:value-type="string" calcext:value-type="string">
            <text:p>Baton Rouge, L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rinityplumbingla.com&quot;;&quot;trinityplumbingla.com&quot;)" office:value-type="string" office:string-value="trinityplumbingla.com" calcext:value-type="string">
            <text:p>trinityplumbingla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ort St Luci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rt St Lucie Plumbing</text:p>
          </table:table-cell>
          <table:table-cell table:number-columns-repeated="2"/>
          <table:table-cell office:value-type="string" calcext:value-type="string">
            <text:p>Port St. Lucie, FL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Ocean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rmley Plumbing</text:p>
          </table:table-cell>
          <table:table-cell office:value-type="string" calcext:value-type="string">
            <text:p>(858) 229-3341</text:p>
          </table:table-cell>
          <table:table-cell/>
          <table:table-cell office:value-type="string" calcext:value-type="string">
            <text:p>Oceanside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parmleyplumbing.com&quot;;&quot;parmleyplumbing.com&quot;)" office:value-type="string" office:string-value="parmleyplumbing.com" calcext:value-type="string">
            <text:p>parmle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armine P. Aumenta &amp; Sons Plumbing</text:p>
          </table:table-cell>
          <table:table-cell office:value-type="string" calcext:value-type="string">
            <text:p>(201) 451-8008</text:p>
          </table:table-cell>
          <table:table-cell/>
          <table:table-cell office:value-type="string" calcext:value-type="string">
            <text:p>Jersey City, NJ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urora Plumbing Company</text:p>
          </table:table-cell>
          <table:table-cell office:value-type="string" calcext:value-type="string">
            <text:p>(303) 366-5828</text:p>
          </table:table-cell>
          <table:table-cell/>
          <table:table-cell office:value-type="string" calcext:value-type="string">
            <text:p>Aurora, CO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auroraplumbing.com&quot;;&quot;auroraplumbing.com&quot;)" office:value-type="string" office:string-value="auroraplumbing.com" calcext:value-type="string">
            <text:p>aurora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J&amp;J Plumbing, Heating, Cooling, &amp; Electric</text:p>
          </table:table-cell>
          <table:table-cell office:value-type="string" calcext:value-type="string">
            <text:p>(330) 967-0147</text:p>
          </table:table-cell>
          <table:table-cell/>
          <table:table-cell office:value-type="string" calcext:value-type="string">
            <text:p>Akron, OH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jandjplumbing.com&quot;;&quot;jandjplumbing.com&quot;)" office:value-type="string" office:string-value="jandjplumbing.com" calcext:value-type="string">
            <text:p>jandj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Ties Air, Plumbing, &amp; Drain</text:p>
          </table:table-cell>
          <table:table-cell office:value-type="string" calcext:value-type="string">
            <text:p>(909) 332-2558</text:p>
          </table:table-cell>
          <table:table-cell/>
          <table:table-cell office:value-type="string" calcext:value-type="string">
            <text:p>Font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tiesair.com&quot;;&quot;familytiesair.com&quot;)" office:value-type="string" office:string-value="familytiesair.com" calcext:value-type="string">
            <text:p>familyties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k's Plumbing</text:p>
          </table:table-cell>
          <table:table-cell office:value-type="string" calcext:value-type="string">
            <text:p>(209) 496-1388</text:p>
          </table:table-cell>
          <table:table-cell/>
          <table:table-cell office:value-type="string" calcext:value-type="string">
            <text:p>Modest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ksplumbing.com&quot;;&quot;herksplumbing.com&quot;)" office:value-type="string" office:string-value="herksplumbing.com" calcext:value-type="string">
            <text:p>herk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rrissey Family Plumbing</text:p>
          </table:table-cell>
          <table:table-cell office:value-type="string" calcext:value-type="string">
            <text:p>(818) 915-6630</text:p>
          </table:table-cell>
          <table:table-cell/>
          <table:table-cell office:value-type="string" calcext:value-type="string">
            <text:p>Glendale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orrisseyfamily.com&quot;;&quot;morrisseyfamily.com&quot;)" office:value-type="string" office:string-value="morrisseyfamily.com" calcext:value-type="string">
            <text:p>morrissey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Pherson Bros Plumbing</text:p>
          </table:table-cell>
          <table:table-cell office:value-type="string" calcext:value-type="string">
            <text:p>(833) 627-2767</text:p>
          </table:table-cell>
          <table:table-cell/>
          <table:table-cell office:value-type="string" calcext:value-type="string">
            <text:p>Moreno Valley, C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cphersonbros.com&quot;;&quot;mcphersonbros.com&quot;)" office:value-type="string" office:string-value="mcphersonbros.com" calcext:value-type="string">
            <text:p>mcphersonbro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Oxna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linas and Sons Rooter</text:p>
          </table:table-cell>
          <table:table-cell office:value-type="string" calcext:value-type="string">
            <text:p>(805) 486-7030</text:p>
          </table:table-cell>
          <table:table-cell/>
          <table:table-cell office:value-type="string" calcext:value-type="string">
            <text:p>Oxnard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Yonker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JP Plumbing and Sewer</text:p>
          </table:table-cell>
          <table:table-cell office:value-type="string" calcext:value-type="string">
            <text:p>(914) 527-2773</text:p>
          </table:table-cell>
          <table:table-cell/>
          <table:table-cell office:value-type="string" calcext:value-type="string">
            <text:p>Yonkers, NY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jpplumbingandsewer.com&quot;;&quot;jpplumbingandsewer.com&quot;)" office:value-type="string" office:string-value="jpplumbingandsewer.com" calcext:value-type="string">
            <text:p>jpplumbingandsewe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isneros Brothers Plumbing</text:p>
          </table:table-cell>
          <table:table-cell office:value-type="string" calcext:value-type="string">
            <text:p>(661) 768-0616</text:p>
          </table:table-cell>
          <table:table-cell/>
          <table:table-cell office:value-type="string" calcext:value-type="string">
            <text:p>Bakersfield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cisnerosbrothersplumbing.com&quot;;&quot;cisnerosbrothersplumbing.com&quot;)" office:value-type="string" office:string-value="cisnerosbrothersplumbing.com" calcext:value-type="string">
            <text:p>cisnerosbrother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Vinney Plumbing, Inc.</text:p>
          </table:table-cell>
          <table:table-cell office:value-type="string" calcext:value-type="string">
            <text:p>(714) 375-0126</text:p>
          </table:table-cell>
          <table:table-cell/>
          <table:table-cell office:value-type="string" calcext:value-type="string">
            <text:p>Huntington Beach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evinneyplumbing.com&quot;;&quot;devinneyplumbing.com&quot;)" office:value-type="string" office:string-value="devinneyplumbing.com" calcext:value-type="string">
            <text:p>devinne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rand Prair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and Prairie Plumbing</text:p>
          </table:table-cell>
          <table:table-cell table:number-columns-repeated="2"/>
          <table:table-cell office:value-type="string" calcext:value-type="string">
            <text:p>Grand Prairie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ewport New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lair's Plumbing Repair &amp; Drains</text:p>
          </table:table-cell>
          <table:table-cell office:value-type="string" calcext:value-type="string">
            <text:p>(757) 719-1236</text:p>
          </table:table-cell>
          <table:table-cell/>
          <table:table-cell office:value-type="string" calcext:value-type="string">
            <text:p>Newport News, V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lairsplumbingrepair.com&quot;;&quot;blairsplumbingrepair.com&quot;)" office:value-type="string" office:string-value="blairsplumbingrepair.com" calcext:value-type="string">
            <text:p>blairsplumbing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's Plumbing Inc</text:p>
          </table:table-cell>
          <table:table-cell office:value-type="string" calcext:value-type="string">
            <text:p>(850) 576-3510</text:p>
          </table:table-cell>
          <table:table-cell/>
          <table:table-cell office:value-type="string" calcext:value-type="string">
            <text:p>Tallahassee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hitesplumbing.com&quot;;&quot;whitesplumbing.com&quot;)" office:value-type="string" office:string-value="whitesplumbing.com" calcext:value-type="string">
            <text:p>white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anta Clari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tthew's Plumbing Inc</text:p>
          </table:table-cell>
          <table:table-cell office:value-type="string" calcext:value-type="string">
            <text:p>(661) 299-6707</text:p>
          </table:table-cell>
          <table:table-cell/>
          <table:table-cell office:value-type="string" calcext:value-type="string">
            <text:p>Santa Clarita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own Brothers Plumbing &amp; Heating</text:p>
          </table:table-cell>
          <table:table-cell office:value-type="string" calcext:value-type="string">
            <text:p>(919) 220-2554</text:p>
          </table:table-cell>
          <table:table-cell/>
          <table:table-cell office:value-type="string" calcext:value-type="string">
            <text:p>Durha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rownbrothers.com&quot;;&quot;brownbrothers.com&quot;)" office:value-type="string" office:string-value="brownbrothers.com" calcext:value-type="string">
            <text:p>brownbroth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lano Plumbing</text:p>
          </table:table-cell>
          <table:table-cell table:number-columns-repeated="2"/>
          <table:table-cell office:value-type="string" calcext:value-type="string">
            <text:p>Plano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bby L. Greene Plumbing</text:p>
          </table:table-cell>
          <table:table-cell office:value-type="string" calcext:value-type="string">
            <text:p>(318) 929-6574</text:p>
          </table:table-cell>
          <table:table-cell/>
          <table:table-cell office:value-type="string" calcext:value-type="string">
            <text:p>Shreveport, L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haw Plumbing Heating &amp; Air Conditioning</text:p>
          </table:table-cell>
          <table:table-cell office:value-type="string" calcext:value-type="string">
            <text:p>(509) 642-6166</text:p>
          </table:table-cell>
          <table:table-cell/>
          <table:table-cell office:value-type="string" calcext:value-type="string">
            <text:p>Spokane, W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hawplumbing.com&quot;;&quot;shawplumbing.com&quot;)" office:value-type="string" office:string-value="shawplumbing.com" calcext:value-type="string">
            <text:p>shaw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t Paul Plumbing</text:p>
          </table:table-cell>
          <table:table-cell table:number-columns-repeated="2"/>
          <table:table-cell office:value-type="string" calcext:value-type="string">
            <text:p>Saint Paul, MN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Ties Plumbing &amp; Construction</text:p>
          </table:table-cell>
          <table:table-cell office:value-type="string" calcext:value-type="string">
            <text:p>(972) 824-8833</text:p>
          </table:table-cell>
          <table:table-cell/>
          <table:table-cell office:value-type="string" calcext:value-type="string">
            <text:p>Garland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lendale Plumbing</text:p>
          </table:table-cell>
          <table:table-cell table:number-columns-repeated="2"/>
          <table:table-cell office:value-type="string" calcext:value-type="string">
            <text:p>Glendale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avis &amp; Sons Plumbing &amp; Rooter</text:p>
          </table:table-cell>
          <table:table-cell office:value-type="string" calcext:value-type="string">
            <text:p>(480) 568-2309</text:p>
          </table:table-cell>
          <table:table-cell/>
          <table:table-cell office:value-type="string" calcext:value-type="string">
            <text:p>Gilbert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ravisandsonsplumbing.com&quot;;&quot;travisandsonsplumbing.com&quot;)" office:value-type="string" office:string-value="travisandsonsplumbing.com" calcext:value-type="string">
            <text:p>travis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ansou's Plumbing &amp; Septic</text:p>
          </table:table-cell>
          <table:table-cell office:value-type="string" calcext:value-type="string">
            <text:p>(336) 276-1263</text:p>
          </table:table-cell>
          <table:table-cell/>
          <table:table-cell office:value-type="string" calcext:value-type="string">
            <text:p>Winston-Sale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ernandez Plumbing Co.</text:p>
          </table:table-cell>
          <table:table-cell office:value-type="string" calcext:value-type="string">
            <text:p>(305) 428-3782</text:p>
          </table:table-cell>
          <table:table-cell/>
          <table:table-cell office:value-type="string" calcext:value-type="string">
            <text:p>Hialeah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nandezplumbing.com&quot;;&quot;hernandezplumbing.com&quot;)" office:value-type="string" office:string-value="hernandezplumbing.com" calcext:value-type="string">
            <text:p>hernandez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k's Plumbing</text:p>
          </table:table-cell>
          <table:table-cell office:value-type="string" calcext:value-type="string">
            <text:p>(209) 496-1388</text:p>
          </table:table-cell>
          <table:table-cell/>
          <table:table-cell office:value-type="string" calcext:value-type="string">
            <text:p>Modest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ksplumbing.com&quot;;&quot;herksplumbing.com&quot;)" office:value-type="string" office:string-value="herksplumbing.com" calcext:value-type="string">
            <text:p>herk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Ties Air, Plumbing, &amp; Drain</text:p>
          </table:table-cell>
          <table:table-cell office:value-type="string" calcext:value-type="string">
            <text:p>(909) 332-2558</text:p>
          </table:table-cell>
          <table:table-cell/>
          <table:table-cell office:value-type="string" calcext:value-type="string">
            <text:p>Font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tiesair.com&quot;;&quot;familytiesair.com&quot;)" office:value-type="string" office:string-value="familytiesair.com" calcext:value-type="string">
            <text:p>familyties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Pherson Bros Plumbing</text:p>
          </table:table-cell>
          <table:table-cell office:value-type="string" calcext:value-type="string">
            <text:p>(833) 627-2767</text:p>
          </table:table-cell>
          <table:table-cell/>
          <table:table-cell office:value-type="string" calcext:value-type="string">
            <text:p>Moreno Valley, C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cphersonbros.com&quot;;&quot;mcphersonbros.com&quot;)" office:value-type="string" office:string-value="mcphersonbros.com" calcext:value-type="string">
            <text:p>mcphersonbro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rown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obert's Repair Plumbing</text:p>
          </table:table-cell>
          <table:table-cell office:value-type="string" calcext:value-type="string">
            <text:p>(956) 203-9993</text:p>
          </table:table-cell>
          <table:table-cell/>
          <table:table-cell office:value-type="string" calcext:value-type="string">
            <text:p>Brownsville, TX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obertsrepair.com&quot;;&quot;robertsrepair.com&quot;)" office:value-type="string" office:string-value="robertsrepair.com" calcext:value-type="string">
            <text:p>roberts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oods Plumbing Service LLC</text:p>
          </table:table-cell>
          <table:table-cell office:value-type="string" calcext:value-type="string">
            <text:p>(910) 920-3908</text:p>
          </table:table-cell>
          <table:table-cell/>
          <table:table-cell office:value-type="string" calcext:value-type="string">
            <text:p>Fayetteville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oodsplumbing.com&quot;;&quot;woodsplumbing.com&quot;)" office:value-type="string" office:string-value="woodsplumbing.com" calcext:value-type="string">
            <text:p>wood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Vinney Plumbing, Inc.</text:p>
          </table:table-cell>
          <table:table-cell office:value-type="string" calcext:value-type="string">
            <text:p>(714) 375-0126</text:p>
          </table:table-cell>
          <table:table-cell/>
          <table:table-cell office:value-type="string" calcext:value-type="string">
            <text:p>Huntington Beach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evinneyplumbing.com&quot;;&quot;devinneyplumbing.com&quot;)" office:value-type="string" office:string-value="devinneyplumbing.com" calcext:value-type="string">
            <text:p>devinne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rand Prair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and Prairie Plumbing</text:p>
          </table:table-cell>
          <table:table-cell table:number-columns-repeated="2"/>
          <table:table-cell office:value-type="string" calcext:value-type="string">
            <text:p>Grand Prairie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ewport New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lair's Plumbing Repair &amp; Drains</text:p>
          </table:table-cell>
          <table:table-cell office:value-type="string" calcext:value-type="string">
            <text:p>(757) 719-1236</text:p>
          </table:table-cell>
          <table:table-cell/>
          <table:table-cell office:value-type="string" calcext:value-type="string">
            <text:p>Newport News, V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lairsplumbingrepair.com&quot;;&quot;blairsplumbingrepair.com&quot;)" office:value-type="string" office:string-value="blairsplumbingrepair.com" calcext:value-type="string">
            <text:p>blairsplumbing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's Plumbing Inc</text:p>
          </table:table-cell>
          <table:table-cell office:value-type="string" calcext:value-type="string">
            <text:p>(850) 576-3510</text:p>
          </table:table-cell>
          <table:table-cell/>
          <table:table-cell office:value-type="string" calcext:value-type="string">
            <text:p>Tallahassee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hitesplumbing.com&quot;;&quot;whitesplumbing.com&quot;)" office:value-type="string" office:string-value="whitesplumbing.com" calcext:value-type="string">
            <text:p>white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anta Clari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tthew's Plumbing Inc</text:p>
          </table:table-cell>
          <table:table-cell office:value-type="string" calcext:value-type="string">
            <text:p>(661) 299-6707</text:p>
          </table:table-cell>
          <table:table-cell/>
          <table:table-cell office:value-type="string" calcext:value-type="string">
            <text:p>Santa Clarita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own Brothers Plumbing &amp; Heating</text:p>
          </table:table-cell>
          <table:table-cell office:value-type="string" calcext:value-type="string">
            <text:p>(919) 220-2554</text:p>
          </table:table-cell>
          <table:table-cell/>
          <table:table-cell office:value-type="string" calcext:value-type="string">
            <text:p>Durha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rownbrothers.com&quot;;&quot;brownbrothers.com&quot;)" office:value-type="string" office:string-value="brownbrothers.com" calcext:value-type="string">
            <text:p>brownbroth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lano Plumbing</text:p>
          </table:table-cell>
          <table:table-cell table:number-columns-repeated="2"/>
          <table:table-cell office:value-type="string" calcext:value-type="string">
            <text:p>Plano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bby L. Greene Plumbing</text:p>
          </table:table-cell>
          <table:table-cell office:value-type="string" calcext:value-type="string">
            <text:p>(318) 929-6574</text:p>
          </table:table-cell>
          <table:table-cell/>
          <table:table-cell office:value-type="string" calcext:value-type="string">
            <text:p>Shreveport, L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haw Plumbing Heating &amp; Air Conditioning</text:p>
          </table:table-cell>
          <table:table-cell office:value-type="string" calcext:value-type="string">
            <text:p>(509) 642-6166</text:p>
          </table:table-cell>
          <table:table-cell/>
          <table:table-cell office:value-type="string" calcext:value-type="string">
            <text:p>Spokane, W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hawplumbing.com&quot;;&quot;shawplumbing.com&quot;)" office:value-type="string" office:string-value="shawplumbing.com" calcext:value-type="string">
            <text:p>shaw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Ties Plumbing &amp; Construction</text:p>
          </table:table-cell>
          <table:table-cell office:value-type="string" calcext:value-type="string">
            <text:p>(972) 824-8833</text:p>
          </table:table-cell>
          <table:table-cell/>
          <table:table-cell office:value-type="string" calcext:value-type="string">
            <text:p>Garland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lendale Plumbing</text:p>
          </table:table-cell>
          <table:table-cell table:number-columns-repeated="2"/>
          <table:table-cell office:value-type="string" calcext:value-type="string">
            <text:p>Glendale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avis &amp; Sons Plumbing &amp; Rooter</text:p>
          </table:table-cell>
          <table:table-cell office:value-type="string" calcext:value-type="string">
            <text:p>(480) 568-2309</text:p>
          </table:table-cell>
          <table:table-cell/>
          <table:table-cell office:value-type="string" calcext:value-type="string">
            <text:p>Gilbert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ravisandsonsplumbing.com&quot;;&quot;travisandsonsplumbing.com&quot;)" office:value-type="string" office:string-value="travisandsonsplumbing.com" calcext:value-type="string">
            <text:p>travis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ansou's Plumbing &amp; Septic</text:p>
          </table:table-cell>
          <table:table-cell office:value-type="string" calcext:value-type="string">
            <text:p>(336) 276-1263</text:p>
          </table:table-cell>
          <table:table-cell/>
          <table:table-cell office:value-type="string" calcext:value-type="string">
            <text:p>Winston-Sale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ernandez Plumbing Co.</text:p>
          </table:table-cell>
          <table:table-cell office:value-type="string" calcext:value-type="string">
            <text:p>(305) 428-3782</text:p>
          </table:table-cell>
          <table:table-cell/>
          <table:table-cell office:value-type="string" calcext:value-type="string">
            <text:p>Hialeah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nandezplumbing.com&quot;;&quot;hernandezplumbing.com&quot;)" office:value-type="string" office:string-value="hernandezplumbing.com" calcext:value-type="string">
            <text:p>hernandez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k's Plumbing</text:p>
          </table:table-cell>
          <table:table-cell office:value-type="string" calcext:value-type="string">
            <text:p>(209) 496-1388</text:p>
          </table:table-cell>
          <table:table-cell/>
          <table:table-cell office:value-type="string" calcext:value-type="string">
            <text:p>Modest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ksplumbing.com&quot;;&quot;herksplumbing.com&quot;)" office:value-type="string" office:string-value="herksplumbing.com" calcext:value-type="string">
            <text:p>herk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Ties Air, Plumbing, &amp; Drain</text:p>
          </table:table-cell>
          <table:table-cell office:value-type="string" calcext:value-type="string">
            <text:p>(909) 332-2558</text:p>
          </table:table-cell>
          <table:table-cell/>
          <table:table-cell office:value-type="string" calcext:value-type="string">
            <text:p>Font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tiesair.com&quot;;&quot;familytiesair.com&quot;)" office:value-type="string" office:string-value="familytiesair.com" calcext:value-type="string">
            <text:p>familyties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Pherson Bros Plumbing</text:p>
          </table:table-cell>
          <table:table-cell office:value-type="string" calcext:value-type="string">
            <text:p>(833) 627-2767</text:p>
          </table:table-cell>
          <table:table-cell/>
          <table:table-cell office:value-type="string" calcext:value-type="string">
            <text:p>Moreno Valley, C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cphersonbros.com&quot;;&quot;mcphersonbros.com&quot;)" office:value-type="string" office:string-value="mcphersonbros.com" calcext:value-type="string">
            <text:p>mcphersonbro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rown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obert's Repair Plumbing</text:p>
          </table:table-cell>
          <table:table-cell office:value-type="string" calcext:value-type="string">
            <text:p>(956) 203-9993</text:p>
          </table:table-cell>
          <table:table-cell/>
          <table:table-cell office:value-type="string" calcext:value-type="string">
            <text:p>Brownsville, TX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obertsrepair.com&quot;;&quot;robertsrepair.com&quot;)" office:value-type="string" office:string-value="robertsrepair.com" calcext:value-type="string">
            <text:p>roberts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oods Plumbing Service LLC</text:p>
          </table:table-cell>
          <table:table-cell office:value-type="string" calcext:value-type="string">
            <text:p>(910) 920-3908</text:p>
          </table:table-cell>
          <table:table-cell/>
          <table:table-cell office:value-type="string" calcext:value-type="string">
            <text:p>Fayetteville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oodsplumbing.com&quot;;&quot;woodsplumbing.com&quot;)" office:value-type="string" office:string-value="woodsplumbing.com" calcext:value-type="string">
            <text:p>wood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Vinney Plumbing, Inc.</text:p>
          </table:table-cell>
          <table:table-cell office:value-type="string" calcext:value-type="string">
            <text:p>(714) 375-0126</text:p>
          </table:table-cell>
          <table:table-cell/>
          <table:table-cell office:value-type="string" calcext:value-type="string">
            <text:p>Huntington Beach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evinneyplumbing.com&quot;;&quot;devinneyplumbing.com&quot;)" office:value-type="string" office:string-value="devinneyplumbing.com" calcext:value-type="string">
            <text:p>devinne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rand Prair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and Prairie Plumbing</text:p>
          </table:table-cell>
          <table:table-cell table:number-columns-repeated="2"/>
          <table:table-cell office:value-type="string" calcext:value-type="string">
            <text:p>Grand Prairie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ewport New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lair's Plumbing Repair &amp; Drains</text:p>
          </table:table-cell>
          <table:table-cell office:value-type="string" calcext:value-type="string">
            <text:p>(757) 719-1236</text:p>
          </table:table-cell>
          <table:table-cell/>
          <table:table-cell office:value-type="string" calcext:value-type="string">
            <text:p>Newport News, V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lairsplumbingrepair.com&quot;;&quot;blairsplumbingrepair.com&quot;)" office:value-type="string" office:string-value="blairsplumbingrepair.com" calcext:value-type="string">
            <text:p>blairsplumbing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's Plumbing Inc</text:p>
          </table:table-cell>
          <table:table-cell office:value-type="string" calcext:value-type="string">
            <text:p>(850) 576-3510</text:p>
          </table:table-cell>
          <table:table-cell/>
          <table:table-cell office:value-type="string" calcext:value-type="string">
            <text:p>Tallahassee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hitesplumbing.com&quot;;&quot;whitesplumbing.com&quot;)" office:value-type="string" office:string-value="whitesplumbing.com" calcext:value-type="string">
            <text:p>white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anta Clari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tthew's Plumbing Inc</text:p>
          </table:table-cell>
          <table:table-cell office:value-type="string" calcext:value-type="string">
            <text:p>(661) 299-6707</text:p>
          </table:table-cell>
          <table:table-cell/>
          <table:table-cell office:value-type="string" calcext:value-type="string">
            <text:p>Santa Clarita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own Brothers Plumbing &amp; Heating</text:p>
          </table:table-cell>
          <table:table-cell office:value-type="string" calcext:value-type="string">
            <text:p>(919) 220-2554</text:p>
          </table:table-cell>
          <table:table-cell/>
          <table:table-cell office:value-type="string" calcext:value-type="string">
            <text:p>Durha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rownbrothers.com&quot;;&quot;brownbrothers.com&quot;)" office:value-type="string" office:string-value="brownbrothers.com" calcext:value-type="string">
            <text:p>brownbroth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lano Plumbing</text:p>
          </table:table-cell>
          <table:table-cell table:number-columns-repeated="2"/>
          <table:table-cell office:value-type="string" calcext:value-type="string">
            <text:p>Plano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bby L. Greene Plumbing</text:p>
          </table:table-cell>
          <table:table-cell office:value-type="string" calcext:value-type="string">
            <text:p>(318) 929-6574</text:p>
          </table:table-cell>
          <table:table-cell/>
          <table:table-cell office:value-type="string" calcext:value-type="string">
            <text:p>Shreveport, L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haw Plumbing Heating &amp; Air Conditioning</text:p>
          </table:table-cell>
          <table:table-cell office:value-type="string" calcext:value-type="string">
            <text:p>(509) 642-6166</text:p>
          </table:table-cell>
          <table:table-cell/>
          <table:table-cell office:value-type="string" calcext:value-type="string">
            <text:p>Spokane, W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hawplumbing.com&quot;;&quot;shawplumbing.com&quot;)" office:value-type="string" office:string-value="shawplumbing.com" calcext:value-type="string">
            <text:p>shaw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chaal Plumbing, Heating and Cooling</text:p>
          </table:table-cell>
          <table:table-cell office:value-type="string" calcext:value-type="string">
            <text:p>(515) 207-2272</text:p>
          </table:table-cell>
          <table:table-cell/>
          <table:table-cell office:value-type="string" calcext:value-type="string">
            <text:p>Des Moines, I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emphis Plumbing</text:p>
          </table:table-cell>
          <table:table-cell table:number-columns-repeated="2"/>
          <table:table-cell office:value-type="string" calcext:value-type="string">
            <text:p>Memphis, TN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Ties Plumbing &amp; Construction</text:p>
          </table:table-cell>
          <table:table-cell office:value-type="string" calcext:value-type="string">
            <text:p>(972) 824-8833</text:p>
          </table:table-cell>
          <table:table-cell/>
          <table:table-cell office:value-type="string" calcext:value-type="string">
            <text:p>Garland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lendale Plumbing</text:p>
          </table:table-cell>
          <table:table-cell table:number-columns-repeated="2"/>
          <table:table-cell office:value-type="string" calcext:value-type="string">
            <text:p>Glendale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avis &amp; Sons Plumbing &amp; Rooter</text:p>
          </table:table-cell>
          <table:table-cell office:value-type="string" calcext:value-type="string">
            <text:p>(480) 568-2309</text:p>
          </table:table-cell>
          <table:table-cell/>
          <table:table-cell office:value-type="string" calcext:value-type="string">
            <text:p>Gilbert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ravisandsonsplumbing.com&quot;;&quot;travisandsonsplumbing.com&quot;)" office:value-type="string" office:string-value="travisandsonsplumbing.com" calcext:value-type="string">
            <text:p>travis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ansou's Plumbing &amp; Septic</text:p>
          </table:table-cell>
          <table:table-cell office:value-type="string" calcext:value-type="string">
            <text:p>(336) 276-1263</text:p>
          </table:table-cell>
          <table:table-cell/>
          <table:table-cell office:value-type="string" calcext:value-type="string">
            <text:p>Winston-Salem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ernandez Plumbing Co.</text:p>
          </table:table-cell>
          <table:table-cell office:value-type="string" calcext:value-type="string">
            <text:p>(305) 428-3782</text:p>
          </table:table-cell>
          <table:table-cell/>
          <table:table-cell office:value-type="string" calcext:value-type="string">
            <text:p>Hialeah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nandezplumbing.com&quot;;&quot;hernandezplumbing.com&quot;)" office:value-type="string" office:string-value="hernandezplumbing.com" calcext:value-type="string">
            <text:p>hernandez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k's Plumbing</text:p>
          </table:table-cell>
          <table:table-cell office:value-type="string" calcext:value-type="string">
            <text:p>(209) 496-1388</text:p>
          </table:table-cell>
          <table:table-cell/>
          <table:table-cell office:value-type="string" calcext:value-type="string">
            <text:p>Modest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herksplumbing.com&quot;;&quot;herksplumbing.com&quot;)" office:value-type="string" office:string-value="herksplumbing.com" calcext:value-type="string">
            <text:p>herk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mily Ties Air, Plumbing, &amp; Drain</text:p>
          </table:table-cell>
          <table:table-cell office:value-type="string" calcext:value-type="string">
            <text:p>(909) 332-2558</text:p>
          </table:table-cell>
          <table:table-cell/>
          <table:table-cell office:value-type="string" calcext:value-type="string">
            <text:p>Font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tiesair.com&quot;;&quot;familytiesair.com&quot;)" office:value-type="string" office:string-value="familytiesair.com" calcext:value-type="string">
            <text:p>familyties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Pherson Bros Plumbing</text:p>
          </table:table-cell>
          <table:table-cell office:value-type="string" calcext:value-type="string">
            <text:p>(833) 627-2767</text:p>
          </table:table-cell>
          <table:table-cell/>
          <table:table-cell office:value-type="string" calcext:value-type="string">
            <text:p>Moreno Valley, C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cphersonbros.com&quot;;&quot;mcphersonbros.com&quot;)" office:value-type="string" office:string-value="mcphersonbros.com" calcext:value-type="string">
            <text:p>mcphersonbro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rown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obert's Repair Plumbing</text:p>
          </table:table-cell>
          <table:table-cell office:value-type="string" calcext:value-type="string">
            <text:p>(956) 203-9993</text:p>
          </table:table-cell>
          <table:table-cell/>
          <table:table-cell office:value-type="string" calcext:value-type="string">
            <text:p>Brownsville, TX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obertsrepair.com&quot;;&quot;robertsrepair.com&quot;)" office:value-type="string" office:string-value="robertsrepair.com" calcext:value-type="string">
            <text:p>roberts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oods Plumbing Service LLC</text:p>
          </table:table-cell>
          <table:table-cell office:value-type="string" calcext:value-type="string">
            <text:p>(910) 920-3908</text:p>
          </table:table-cell>
          <table:table-cell/>
          <table:table-cell office:value-type="string" calcext:value-type="string">
            <text:p>Fayetteville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oodsplumbing.com&quot;;&quot;woodsplumbing.com&quot;)" office:value-type="string" office:string-value="woodsplumbing.com" calcext:value-type="string">
            <text:p>wood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Vinney Plumbing, Inc.</text:p>
          </table:table-cell>
          <table:table-cell office:value-type="string" calcext:value-type="string">
            <text:p>(714) 375-0126</text:p>
          </table:table-cell>
          <table:table-cell/>
          <table:table-cell office:value-type="string" calcext:value-type="string">
            <text:p>Huntington Beach, CA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evinneyplumbing.com&quot;;&quot;devinneyplumbing.com&quot;)" office:value-type="string" office:string-value="devinneyplumbing.com" calcext:value-type="string">
            <text:p>devinne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rand Prair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and Prairie Plumbing</text:p>
          </table:table-cell>
          <table:table-cell table:number-columns-repeated="2"/>
          <table:table-cell office:value-type="string" calcext:value-type="string">
            <text:p>Grand Prairie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Newport New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lair's Plumbing Repair &amp; Drains</text:p>
          </table:table-cell>
          <table:table-cell office:value-type="string" calcext:value-type="string">
            <text:p>(757) 719-1236</text:p>
          </table:table-cell>
          <table:table-cell/>
          <table:table-cell office:value-type="string" calcext:value-type="string">
            <text:p>Newport News, VA</text:p>
          </table:table-cell>
          <table:table-cell office:value-type="string" calcext:value-type="string">
            <text:p>4.5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lairsplumbingrepair.com&quot;;&quot;blairsplumbingrepair.com&quot;)" office:value-type="string" office:string-value="blairsplumbingrepair.com" calcext:value-type="string">
            <text:p>blairsplumbingrepai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owe Brothers Plumbing LLC</text:p>
          </table:table-cell>
          <table:table-cell office:value-type="string" calcext:value-type="string">
            <text:p>(608) 257-2884</text:p>
          </table:table-cell>
          <table:table-cell/>
          <table:table-cell office:value-type="string" calcext:value-type="string">
            <text:p>Madison, WI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oy Dossey Plumbing</text:p>
          </table:table-cell>
          <table:table-cell office:value-type="string" calcext:value-type="string">
            <text:p>(480) 963-3302</text:p>
          </table:table-cell>
          <table:table-cell/>
          <table:table-cell office:value-type="string" calcext:value-type="string">
            <text:p>Chandler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Irvin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eves Family Plumbing</text:p>
          </table:table-cell>
          <table:table-cell office:value-type="string" calcext:value-type="string">
            <text:p>(972) 247-3763</text:p>
          </table:table-cell>
          <table:table-cell/>
          <table:table-cell office:value-type="string" calcext:value-type="string">
            <text:p>Irving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reevesfamily.com&quot;;&quot;reevesfamily.com&quot;)" office:value-type="string" office:string-value="reevesfamily.com" calcext:value-type="string">
            <text:p>reevesfamil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DC Family Plumbing</text:p>
          </table:table-cell>
          <table:table-cell office:value-type="string" calcext:value-type="string">
            <text:p>(480) 300-4791</text:p>
          </table:table-cell>
          <table:table-cell/>
          <table:table-cell office:value-type="string" calcext:value-type="string">
            <text:p>Scottsdale, AZ</text:p>
          </table:table-cell>
          <table:table-cell office:value-type="string" calcext:value-type="string">
            <text:p>4.7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cfamilyplumbing.com&quot;;&quot;dcfamilyplumbing.com&quot;)" office:value-type="string" office:string-value="dcfamilyplumbing.com" calcext:value-type="string">
            <text:p>dcfamily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Lov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oveland Plumbing</text:p>
          </table:table-cell>
          <table:table-cell table:number-columns-repeated="2"/>
          <table:table-cell office:value-type="string" calcext:value-type="string">
            <text:p>Loveland, CO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wens Plumbing Company LLC</text:p>
          </table:table-cell>
          <table:table-cell office:value-type="string" calcext:value-type="string">
            <text:p>(336) 908-8478</text:p>
          </table:table-cell>
          <table:table-cell/>
          <table:table-cell office:value-type="string" calcext:value-type="string">
            <text:p>Greensboro, NC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owensplumbingcompany.com&quot;;&quot;owensplumbingcompany.com&quot;)" office:value-type="string" office:string-value="owensplumbingcompany.com" calcext:value-type="string">
            <text:p>owensplumbingcompan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rvine Plumbing</text:p>
          </table:table-cell>
          <table:table-cell office:value-type="string" calcext:value-type="string">
            <text:p>(949) 850-4471</text:p>
          </table:table-cell>
          <table:table-cell/>
          <table:table-cell office:value-type="string" calcext:value-type="string">
            <text:p>Irvine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irvineplumbing.com&quot;;&quot;irvineplumbing.com&quot;)" office:value-type="string" office:string-value="irvineplumbing.com" calcext:value-type="string">
            <text:p>irvine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 It Right Plumbers</text:p>
          </table:table-cell>
          <table:table-cell office:value-type="string" calcext:value-type="string">
            <text:p>(657) 229-2993</text:p>
          </table:table-cell>
          <table:table-cell office:value-type="string" calcext:value-type="string">
            <text:p>leads@doitrightplumbers.com</text:p>
          </table:table-cell>
          <table:table-cell office:value-type="string" calcext:value-type="string">
            <text:p>Santa An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doitrightplumbers.com&quot;;&quot;doitrightplumbers.com&quot;)" office:value-type="string" office:string-value="doitrightplumbers.com" calcext:value-type="string">
            <text:p>doitrightplumber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e Family Plumber</text:p>
          </table:table-cell>
          <table:table-cell office:value-type="string" calcext:value-type="string">
            <text:p>(562) 459-6445</text:p>
          </table:table-cell>
          <table:table-cell office:value-type="string" calcext:value-type="string">
            <text:p>info@thefamilyplumber.com</text:p>
          </table:table-cell>
          <table:table-cell office:value-type="string" calcext:value-type="string">
            <text:p>Long Beach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hefamilyplumber.com&quot;;&quot;thefamilyplumber.com&quot;)" office:value-type="string" office:string-value="thefamilyplumber.com" calcext:value-type="string">
            <text:p>thefamilyplumber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Vegas Valley Plumbing</text:p>
          </table:table-cell>
          <table:table-cell office:value-type="string" calcext:value-type="string">
            <text:p>(702) 766-8827</text:p>
          </table:table-cell>
          <table:table-cell/>
          <table:table-cell office:value-type="string" calcext:value-type="string">
            <text:p>Las Vegas, NV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vegasvalley.com&quot;;&quot;vegasvalley.com&quot;)" office:value-type="string" office:string-value="vegasvalley.com" calcext:value-type="string">
            <text:p>vegasvalley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sno Plumbing</text:p>
          </table:table-cell>
          <table:table-cell table:number-columns-repeated="2"/>
          <table:table-cell office:value-type="string" calcext:value-type="string">
            <text:p>Fresn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cramento Plumbing</text:p>
          </table:table-cell>
          <table:table-cell office:value-type="string" calcext:value-type="string">
            <text:p>(916) 606-6331</text:p>
          </table:table-cell>
          <table:table-cell/>
          <table:table-cell office:value-type="string" calcext:value-type="string">
            <text:p>Sacramento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allsacramento.com&quot;;&quot;allsacramento.com&quot;)" office:value-type="string" office:string-value="allsacramento.com" calcext:value-type="string">
            <text:p>allsacramento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ine-Nichols Plumbing</text:p>
          </table:table-cell>
          <table:table-cell office:value-type="string" calcext:value-type="string">
            <text:p>(816) 348-3481</text:p>
          </table:table-cell>
          <table:table-cell/>
          <table:table-cell office:value-type="string" calcext:value-type="string">
            <text:p>Kansas City, MO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tinenichols.com&quot;;&quot;stinenichols.com&quot;)" office:value-type="string" office:string-value="stinenichols.com" calcext:value-type="string">
            <text:p>stinenichol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iami Dade Plumbing</text:p>
          </table:table-cell>
          <table:table-cell office:value-type="string" calcext:value-type="string">
            <text:p>(786) 756-3185</text:p>
          </table:table-cell>
          <table:table-cell/>
          <table:table-cell office:value-type="string" calcext:value-type="string">
            <text:p>Miami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miamidadeplumbing.com&quot;;&quot;miamidadeplumbing.com&quot;)" office:value-type="string" office:string-value="miamidadeplumbing.com" calcext:value-type="string">
            <text:p>miamidade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illiams Plumbing &amp; Drain Service</text:p>
          </table:table-cell>
          <table:table-cell office:value-type="string" calcext:value-type="string">
            <text:p>(918) 505-7332</text:p>
          </table:table-cell>
          <table:table-cell/>
          <table:table-cell office:value-type="string" calcext:value-type="string">
            <text:p>Tulsa, OK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williamsplumbing.com&quot;;&quot;williamsplumbing.com&quot;)" office:value-type="string" office:string-value="williamsplumbing.com" calcext:value-type="string">
            <text:p>william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zule and Sons Plumbing</text:p>
          </table:table-cell>
          <table:table-cell office:value-type="string" calcext:value-type="string">
            <text:p>(510) 534-5480</text:p>
          </table:table-cell>
          <table:table-cell/>
          <table:table-cell office:value-type="string" calcext:value-type="string">
            <text:p>Oakland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Friends Plumbing Service</text:p>
          </table:table-cell>
          <table:table-cell office:value-type="string" calcext:value-type="string">
            <text:p>(817) 819-1471</text:p>
          </table:table-cell>
          <table:table-cell office:value-type="string" calcext:value-type="string">
            <text:p>e7d54b729aaf49ea8b2f80dae22860aa@sentry.zipify.com</text:p>
          </table:table-cell>
          <table:table-cell office:value-type="string" calcext:value-type="string">
            <text:p>Arlington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familyfriends.com&quot;;&quot;familyfriends.com&quot;)" office:value-type="string" office:string-value="familyfriends.com" calcext:value-type="string">
            <text:p>familyfriend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el's Plumbing, LLC.</text:p>
          </table:table-cell>
          <table:table-cell office:value-type="string" calcext:value-type="string">
            <text:p>(504) 445-7222</text:p>
          </table:table-cell>
          <table:table-cell/>
          <table:table-cell office:value-type="string" calcext:value-type="string">
            <text:p>New Orleans, L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isneros Brothers Plumbing</text:p>
          </table:table-cell>
          <table:table-cell office:value-type="string" calcext:value-type="string">
            <text:p>(661) 768-0616</text:p>
          </table:table-cell>
          <table:table-cell/>
          <table:table-cell office:value-type="string" calcext:value-type="string">
            <text:p>Bakersfield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cisnerosbrothersplumbing.com&quot;;&quot;cisnerosbrothersplumbing.com&quot;)" office:value-type="string" office:string-value="cisnerosbrothersplumbing.com" calcext:value-type="string">
            <text:p>cisnerosbrother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lin Plumbing Inc.</text:p>
          </table:table-cell>
          <table:table-cell office:value-type="string" calcext:value-type="string">
            <text:p>(813) 443-5820</text:p>
          </table:table-cell>
          <table:table-cell office:value-type="string" calcext:value-type="string">
            <text:p>info@olinplumbinginc.com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olinplumbing.com&quot;;&quot;olinplumbing.com&quot;)" office:value-type="string" office:string-value="olinplumbing.com" calcext:value-type="string">
            <text:p>olin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ker and Sons Plumbing &amp; Rooter</text:p>
          </table:table-cell>
          <table:table-cell office:value-type="string" calcext:value-type="string">
            <text:p>(714) 667-7800</text:p>
          </table:table-cell>
          <table:table-cell/>
          <table:table-cell office:value-type="string" calcext:value-type="string">
            <text:p>Anaheim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arkerandsonsplumbing.com&quot;;&quot;barkerandsonsplumbing.com&quot;)" office:value-type="string" office:string-value="barkerandsonsplumbing.com" calcext:value-type="string">
            <text:p>barker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Allens Plumbing</text:p>
          </table:table-cell>
          <table:table-cell office:value-type="string" calcext:value-type="string">
            <text:p>(808) 599-5511</text:p>
          </table:table-cell>
          <table:table-cell/>
          <table:table-cell office:value-type="string" calcext:value-type="string">
            <text:p>Honolulu, HI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allensplumbinghi.com&quot;;&quot;allensplumbinghi.com&quot;)" office:value-type="string" office:string-value="allensplumbinghi.com" calcext:value-type="string">
            <text:p>allensplumbinghi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Chula Vis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b the Plumber of Chula Vista</text:p>
          </table:table-cell>
          <table:table-cell office:value-type="string" calcext:value-type="string">
            <text:p>(619) 990-7960</text:p>
          </table:table-cell>
          <table:table-cell/>
          <table:table-cell office:value-type="string" calcext:value-type="string">
            <text:p>Chula Vista, CA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bobthe.com&quot;;&quot;bobthe.com&quot;)" office:value-type="string" office:string-value="bobthe.com" calcext:value-type="string">
            <text:p>bobthe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arry Stinson Plumbing &amp; Water Heater Repair</text:p>
          </table:table-cell>
          <table:table-cell office:value-type="string" calcext:value-type="string">
            <text:p>(817) 508-2631</text:p>
          </table:table-cell>
          <table:table-cell/>
          <table:table-cell office:value-type="string" calcext:value-type="string">
            <text:p>Fort Worth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larrystinson.com&quot;;&quot;larrystinson.com&quot;)" office:value-type="string" office:string-value="larrystinson.com" calcext:value-type="string">
            <text:p>larrystinson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mily Ties Plumbing &amp; Construction</text:p>
          </table:table-cell>
          <table:table-cell office:value-type="string" calcext:value-type="string">
            <text:p>(972) 824-8833</text:p>
          </table:table-cell>
          <table:table-cell/>
          <table:table-cell office:value-type="string" calcext:value-type="string">
            <text:p>Garland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lendale Plumbing AZ</text:p>
          </table:table-cell>
          <table:table-cell table:number-columns-repeated="2"/>
          <table:table-cell office:value-type="string" calcext:value-type="string">
            <text:p>Glendale, AZ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avis &amp; Sons Plumbing &amp; Rooter</text:p>
          </table:table-cell>
          <table:table-cell office:value-type="string" calcext:value-type="string">
            <text:p>(480) 568-2309</text:p>
          </table:table-cell>
          <table:table-cell/>
          <table:table-cell office:value-type="string" calcext:value-type="string">
            <text:p>Gilbert, AZ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travisandsonsplumbing.com&quot;;&quot;travisandsonsplumbing.com&quot;)" office:value-type="string" office:string-value="travisandsonsplumbing.com" calcext:value-type="string">
            <text:p>travisandsonsplumbing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Lared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outh Texas Plumbing Contractors</text:p>
          </table:table-cell>
          <table:table-cell office:value-type="string" calcext:value-type="string">
            <text:p>(956) 333-6935</text:p>
          </table:table-cell>
          <table:table-cell/>
          <table:table-cell office:value-type="string" calcext:value-type="string">
            <text:p>Laredo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formula="of:=HYPERLINK(&quot;https://southtexas.com&quot;;&quot;southtexas.com&quot;)" office:value-type="string" office:string-value="southtexas.com" calcext:value-type="string">
            <text:p>southtexas.com</text:p>
          </table:table-cell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ubbock Plumbing TX</text:p>
          </table:table-cell>
          <table:table-cell table:number-columns-repeated="2"/>
          <table:table-cell office:value-type="string" calcext:value-type="string">
            <text:p>Lubbock, TX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owe Brothers Plumbing LLC</text:p>
          </table:table-cell>
          <table:table-cell office:value-type="string" calcext:value-type="string">
            <text:p>(608) 257-2884</text:p>
          </table:table-cell>
          <table:table-cell/>
          <table:table-cell office:value-type="string" calcext:value-type="string">
            <text:p>Madison, WI</text:p>
          </table:table-cell>
          <table:table-cell office:value-type="string" calcext:value-type="string">
            <text:p>4.6+/5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Google</text:p>
          </table:table-cell>
          <table:table-cell table:style-name="Default" table:number-columns-repeated="16373"/>
        </table:table-row>
        <table:table-row table:style-name="ro2">
          <table:table-cell office:value-type="string" calcext:value-type="string">
            <text:p>Benton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mith Bros. Plumbing</text:p>
          </table:table-cell>
          <table:table-cell office:value-type="string" calcext:value-type="string">
            <text:p>(479) 877-5803</text:p>
          </table:table-cell>
          <table:table-cell/>
          <table:table-cell office:value-type="string" calcext:value-type="string">
            <text:p>8816 W McNelly Rd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www.callsmith.com/&quot;;&quot;https://www.callsmith.com/&quot;)" office:value-type="string" office:string-value="https://www.callsmith.com/" calcext:value-type="string">
            <text:p>https://www.callsmith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yetteville Plumbing Services</text:p>
          </table:table-cell>
          <table:table-cell office:value-type="string" calcext:value-type="string">
            <text:p>(479) 888-5522</text:p>
          </table:table-cell>
          <table:table-cell/>
          <table:table-cell office:value-type="string" calcext:value-type="string">
            <text:p>34 E Center St #4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s://www.plumbingfayettevillear.com/&quot;;&quot;https://www.plumbingfayettevillear.com/&quot;)" office:value-type="string" office:string-value="https://www.plumbingfayettevillear.com/" calcext:value-type="string">
            <text:p>https://www.plumbingfayettevillear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inty Jones Plumbing</text:p>
          </table:table-cell>
          <table:table-cell office:value-type="string" calcext:value-type="string">
            <text:p>(479) 925-4186</text:p>
          </table:table-cell>
          <table:table-cell/>
          <table:table-cell office:value-type="string" calcext:value-type="string">
            <text:p>4530 NE Hudson Rd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s://kintyjonesplumbing.com/&quot;;&quot;https://kintyjonesplumbing.com/&quot;)" office:value-type="string" office:string-value="https://kintyjonesplumbing.com/" calcext:value-type="string">
            <text:p>https://kintyjones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pringda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 Plus Plumbing of NWA</text:p>
          </table:table-cell>
          <table:table-cell office:value-type="string" calcext:value-type="string">
            <text:p>(479) 408-4845</text:p>
          </table:table-cell>
          <table:table-cell/>
          <table:table-cell office:value-type="string" calcext:value-type="string">
            <text:p>284 Ranalli Ave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aplusplumbingofnwa.com/&quot;;&quot;https://aplusplumbingofnwa.com/&quot;)" office:value-type="string" office:string-value="https://aplusplumbingofnwa.com/" calcext:value-type="string">
            <text:p>https://aplusplumbingofnwa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enjamin Franklin Plumbing of Wilmington DE</text:p>
          </table:table-cell>
          <table:table-cell office:value-type="string" calcext:value-type="string">
            <text:p>(302) 524-7437</text:p>
          </table:table-cell>
          <table:table-cell/>
          <table:table-cell office:value-type="string" calcext:value-type="string">
            <text:p>410 Meco Dr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benjaminfranklinplumbing.com/wilmington-de/&quot;;&quot;https://benjaminfranklinplumbing.com/wilmington-de/&quot;)" office:value-type="string" office:string-value="https://benjaminfranklinplumbing.com/wilmington-de/" calcext:value-type="string">
            <text:p>https://benjaminfranklinplumbing.com/wilmington-de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oise Family Plumbing LLC</text:p>
          </table:table-cell>
          <table:table-cell office:value-type="string" calcext:value-type="string">
            <text:p>(208) 949-3307</text:p>
          </table:table-cell>
          <table:table-cell/>
          <table:table-cell office:value-type="string" calcext:value-type="string">
            <text:p>210 E 37th St #3, Boise, ID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boisefamilyplumbing.com&quot;;&quot;boisefamilyplumbing.com&quot;)" office:value-type="string" office:string-value="boisefamilyplumbing.com" calcext:value-type="string">
            <text:p>boisefamilyplumbing.com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Namp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llon Plumbing</text:p>
          </table:table-cell>
          <table:table-cell office:value-type="string" calcext:value-type="string">
            <text:p>(208) 466-3707</text:p>
          </table:table-cell>
          <table:table-cell/>
          <table:table-cell office:value-type="string" calcext:value-type="string">
            <text:p>605 E Hawaii Ave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://www.dillonplumbing.com/&quot;;&quot;http://www.dillonplumbing.com/&quot;)" office:value-type="string" office:string-value="http://www.dillonplumbing.com/" calcext:value-type="string">
            <text:p>http://www.dillon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Heritage Home Service</text:p>
          </table:table-cell>
          <table:table-cell office:value-type="string" calcext:value-type="string">
            <text:p>(207) 370-9533</text:p>
          </table:table-cell>
          <table:table-cell/>
          <table:table-cell office:value-type="string" calcext:value-type="string">
            <text:p>72 City Line Dr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style-name="ce2" table:formula="of:=HYPERLINK(&quot;https://justcallheritage.com/service-area/portland-me/&quot;;&quot;https://justcallheritage.com/service-area/portland-me/&quot;)" office:value-type="string" office:string-value="https://justcallheritage.com/service-area/portland-me/" calcext:value-type="string">
            <text:p>https://justcallheritage.com/service-area/portland-me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rian Wear Plumbing &amp; Restoration</text:p>
          </table:table-cell>
          <table:table-cell office:value-type="string" calcext:value-type="string">
            <text:p>(573) 864-4463</text:p>
          </table:table-cell>
          <table:table-cell/>
          <table:table-cell office:value-type="string" calcext:value-type="string">
            <text:p>2501 Rangeline St Suite B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brianwearplumbing.com/&quot;;&quot;https://brianwearplumbing.com/&quot;)" office:value-type="string" office:string-value="https://brianwearplumbing.com/" calcext:value-type="string">
            <text:p>https://brianwear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Jopli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ext Generation Gaylen Plumbing</text:p>
          </table:table-cell>
          <table:table-cell office:value-type="string" calcext:value-type="string">
            <text:p>(417) 781-5136</text:p>
          </table:table-cell>
          <table:table-cell/>
          <table:table-cell office:value-type="string" calcext:value-type="string">
            <text:p>2030 S Main St</text:p>
          </table:table-cell>
          <table:table-cell office:value-type="string" calcext:value-type="string">
            <text:p>4.6</text:p>
          </table:table-cell>
          <table:table-cell table:number-columns-repeated="2"/>
          <table:table-cell table:style-name="ce2" table:formula="of:=HYPERLINK(&quot;http://www.nextgenerationgaylen.com/&quot;;&quot;http://www.nextgenerationgaylen.com/&quot;)" office:value-type="string" office:string-value="http://www.nextgenerationgaylen.com/" calcext:value-type="string">
            <text:p>http://www.nextgenerationgaylen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unior's Plumbing LLC</text:p>
          </table:table-cell>
          <table:table-cell office:value-type="string" calcext:value-type="string">
            <text:p>(417) 655-0536</text:p>
          </table:table-cell>
          <table:table-cell/>
          <table:table-cell office:value-type="string" calcext:value-type="string">
            <text:p>7325 E Division St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juniorsplumbingmo.com/&quot;;&quot;https://juniorsplumbingmo.com/&quot;)" office:value-type="string" office:string-value="https://juniorsplumbingmo.com/" calcext:value-type="string">
            <text:p>https://juniorsplumbingmo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t. Char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ierson Plumbing Sewer &amp; Drain L.L.C</text:p>
          </table:table-cell>
          <table:table-cell office:value-type="string" calcext:value-type="string">
            <text:p>(314) 691-8066</text:p>
          </table:table-cell>
          <table:table-cell/>
          <table:table-cell office:value-type="string" calcext:value-type="string">
            <text:p>500 Boone's Lick Rd Suite C Upper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style-name="ce2" table:formula="of:=HYPERLINK(&quot;http://www.piersonplumbingstl.com/&quot;;&quot;http://www.piersonplumbingstl.com/&quot;)" office:value-type="string" office:string-value="http://www.piersonplumbingstl.com/" calcext:value-type="string">
            <text:p>http://www.piersonplumbingstl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Gulfpor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 Royal Flush Plumbing Company</text:p>
          </table:table-cell>
          <table:table-cell office:value-type="string" calcext:value-type="string">
            <text:p>(228) 867-9944</text:p>
          </table:table-cell>
          <table:table-cell/>
          <table:table-cell office:value-type="string" calcext:value-type="string">
            <text:p>12453 Canal Rd</text:p>
          </table:table-cell>
          <table:table-cell office:value-type="string" calcext:value-type="string">
            <text:p>4.7</text:p>
          </table:table-cell>
          <table:table-cell table:number-columns-repeated="2"/>
          <table:table-cell table:style-name="ce2" table:formula="of:=HYPERLINK(&quot;https://arfplumbing.com/&quot;;&quot;https://arfplumbing.com/&quot;)" office:value-type="string" office:string-value="https://arfplumbing.com/" calcext:value-type="string">
            <text:p>https://arf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 Plumbing Solutions - Formerly Reid Plumbing</text:p>
          </table:table-cell>
          <table:table-cell office:value-type="string" calcext:value-type="string">
            <text:p>(601) 850-1828</text:p>
          </table:table-cell>
          <table:table-cell/>
          <table:table-cell office:value-type="string" calcext:value-type="string">
            <text:p>1775 Lelia Dr A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://msplumbingsolutions.com/&quot;;&quot;http://msplumbingsolutions.com/&quot;)" office:value-type="string" office:string-value="http://msplumbingsolutions.com/" calcext:value-type="string">
            <text:p>http://msplumbingsolutions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imrock Plumbing</text:p>
          </table:table-cell>
          <table:table-cell office:value-type="string" calcext:value-type="string">
            <text:p>(406) 855-7131</text:p>
          </table:table-cell>
          <table:table-cell/>
          <table:table-cell office:value-type="string" calcext:value-type="string">
            <text:p>3419 Central Ave Suite C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://rimrockplumbing.com/&quot;;&quot;http://rimrockplumbing.com/&quot;)" office:value-type="string" office:string-value="http://rimrockplumbing.com/" calcext:value-type="string">
            <text:p>http://rimrock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lumb-Tech Plumbing, Heating &amp; Drain Missoula</text:p>
          </table:table-cell>
          <table:table-cell office:value-type="string" calcext:value-type="string">
            <text:p>(406) 233-0662</text:p>
          </table:table-cell>
          <table:table-cell/>
          <table:table-cell office:value-type="string" calcext:value-type="string">
            <text:p>1530 Livingston Ave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plumbtechmt.com/&quot;;&quot;https://plumbtechmt.com/&quot;)" office:value-type="string" office:string-value="https://plumbtechmt.com/" calcext:value-type="string">
            <text:p>https://plumbtechmt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Bismarck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imber Ridge Plumbing &amp; Heating</text:p>
          </table:table-cell>
          <table:table-cell office:value-type="string" calcext:value-type="string">
            <text:p>(701) 289-3106</text:p>
          </table:table-cell>
          <table:table-cell/>
          <table:table-cell office:value-type="string" calcext:value-type="string">
            <text:p>1512 Basin Ave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s://www.timberridgephnd.com/&quot;;&quot;https://www.timberridgephnd.com/&quot;)" office:value-type="string" office:string-value="https://www.timberridgephnd.com/" calcext:value-type="string">
            <text:p>https://www.timberridgephnd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Fargo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EGACY PLUMBING &amp; HEATING</text:p>
          </table:table-cell>
          <table:table-cell office:value-type="string" calcext:value-type="string">
            <text:p>(701) 306-3375</text:p>
          </table:table-cell>
          <table:table-cell/>
          <table:table-cell office:value-type="string" calcext:value-type="string">
            <text:p>3522 4th Ave S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s://www.legacyplumbingfm.com/&quot;;&quot;https://www.legacyplumbingfm.com/&quot;)" office:value-type="string" office:string-value="https://www.legacyplumbingfm.com/" calcext:value-type="string">
            <text:p>https://www.legacyplumbingfm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aul The Plumber - Manchester</text:p>
          </table:table-cell>
          <table:table-cell office:value-type="string" calcext:value-type="string">
            <text:p>(603) 437-7039</text:p>
          </table:table-cell>
          <table:table-cell/>
          <table:table-cell office:value-type="string" calcext:value-type="string">
            <text:p>1087 Elm St Suite 406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style-name="ce2" table:formula="of:=HYPERLINK(&quot;https://www.paultheplumbernh.com/&quot;;&quot;https://www.paultheplumbernh.com/&quot;)" office:value-type="string" office:string-value="https://www.paultheplumbernh.com/" calcext:value-type="string">
            <text:p>https://www.paultheplumbernh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Nashua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agundes Plumbing Heating AC</text:p>
          </table:table-cell>
          <table:table-cell office:value-type="string" calcext:value-type="string">
            <text:p>(603) 605-1919</text:p>
          </table:table-cell>
          <table:table-cell/>
          <table:table-cell office:value-type="string" calcext:value-type="string">
            <text:p>230 Amherst St Unit 103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www.afphpro.com/&quot;;&quot;https://www.afphpro.com/&quot;)" office:value-type="string" office:string-value="https://www.afphpro.com/" calcext:value-type="string">
            <text:p>https://www.afphpro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M&amp;A Plumbing &amp; Heating</text:p>
          </table:table-cell>
          <table:table-cell office:value-type="string" calcext:value-type="string">
            <text:p>(551) 208-8366</text:p>
          </table:table-cell>
          <table:table-cell/>
          <table:table-cell office:value-type="string" calcext:value-type="string">
            <text:p>257 Dwight St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business.google.com/v/m-a-plumbing-heating/0322610284500796106/8434/_?&quot;;&quot;https://business.google.com/v/m-a-plumbing-heating/0322610284500796106/8434/_?&quot;)" office:value-type="string" office:string-value="https://business.google.com/v/m-a-plumbing-heating/0322610284500796106/8434/_?" calcext:value-type="string">
            <text:p>https://business.google.com/v/m-a-plumbing-heating/0322610284500796106/8434/_?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riends &amp; Family Plumbing and Heating</text:p>
          </table:table-cell>
          <table:table-cell office:value-type="string" calcext:value-type="string">
            <text:p>(973) 955-6903</text:p>
          </table:table-cell>
          <table:table-cell/>
          <table:table-cell office:value-type="string" calcext:value-type="string">
            <text:p>28 Samuel Ave, Newark, NJ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s://ffheatingplumbing.com&quot;;&quot;ffheatingplumbing.com&quot;)" office:value-type="string" office:string-value="ffheatingplumbing.com" calcext:value-type="string">
            <text:p>ffheatingplumbing.com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LC Plumbing Heating Cooling Electrical</text:p>
          </table:table-cell>
          <table:table-cell office:value-type="string" calcext:value-type="string">
            <text:p>(505) 761-9644</text:p>
          </table:table-cell>
          <table:table-cell/>
          <table:table-cell office:value-type="string" calcext:value-type="string">
            <text:p>5000 Edith Blvd NE, Albuquerque, NM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style-name="ce2" table:formula="of:=HYPERLINK(&quot;https://tlcnm.com&quot;;&quot;tlcnm.com&quot;)" office:value-type="string" office:string-value="tlcnm.com" calcext:value-type="string">
            <text:p>tlcnm.com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Rio Ranch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LC Plumbing Heating Cooling Electrical</text:p>
          </table:table-cell>
          <table:table-cell office:value-type="string" calcext:value-type="string">
            <text:p>(505) 891-2962</text:p>
          </table:table-cell>
          <table:table-cell/>
          <table:table-cell office:value-type="string" calcext:value-type="string">
            <text:p>506 Frontage Rd NE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s://www.tlcplumbing.com/rio-rancho&quot;;&quot;https://www.tlcplumbing.com/rio-rancho&quot;)" office:value-type="string" office:string-value="https://www.tlcplumbing.com/rio-rancho" calcext:value-type="string">
            <text:p>https://www.tlcplumbing.com/rio-rancho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James Plumbing and Heating</text:p>
          </table:table-cell>
          <table:table-cell office:value-type="string" calcext:value-type="string">
            <text:p>(505) 473-7148</text:p>
          </table:table-cell>
          <table:table-cell/>
          <table:table-cell office:value-type="string" calcext:value-type="string">
            <text:p>1159 Coriander Rd, Santa Fe, NM</text:p>
          </table:table-cell>
          <table:table-cell office:value-type="string" calcext:value-type="string">
            <text:p>4.8</text:p>
          </table:table-cell>
          <table:table-cell table:number-columns-repeated="2"/>
          <table:table-cell table:style-name="ce2" table:formula="of:=HYPERLINK(&quot;https://jamesplumbingandheating.com&quot;;&quot;jamesplumbingandheating.com&quot;)" office:value-type="string" office:string-value="jamesplumbingandheating.com" calcext:value-type="string">
            <text:p>jamesplumbingandheating.com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lumb Easy</text:p>
          </table:table-cell>
          <table:table-cell office:value-type="string" calcext:value-type="string">
            <text:p>(843) 270-3983</text:p>
          </table:table-cell>
          <table:table-cell/>
          <table:table-cell office:value-type="string" calcext:value-type="string">
            <text:p>1212 Wappoo Rd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ce2" table:formula="of:=HYPERLINK(&quot;https://plumbeasy.com/&quot;;&quot;https://plumbeasy.com/&quot;)" office:value-type="string" office:string-value="https://plumbeasy.com/" calcext:value-type="string">
            <text:p>https://plumbeasy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ranklin Plumbing &amp; Drain Cleaning</text:p>
          </table:table-cell>
          <table:table-cell office:value-type="string" calcext:value-type="string">
            <text:p>(803) 515-7753</text:p>
          </table:table-cell>
          <table:table-cell/>
          <table:table-cell office:value-type="string" calcext:value-type="string">
            <text:p>3004 Millwood Ave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www.franklinplumbingsc.com/&quot;;&quot;https://www.franklinplumbingsc.com/&quot;)" office:value-type="string" office:string-value="https://www.franklinplumbingsc.com/" calcext:value-type="string">
            <text:p>https://www.franklinplumbingsc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Rapid Cit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yal Plumbing Heating and Cooling</text:p>
          </table:table-cell>
          <table:table-cell office:value-type="string" calcext:value-type="string">
            <text:p>(605) 315-3683</text:p>
          </table:table-cell>
          <table:table-cell/>
          <table:table-cell office:value-type="string" calcext:value-type="string">
            <text:p>814 E Omaha St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www.loyalplumbing.com/&quot;;&quot;https://www.loyalplumbing.com/&quot;)" office:value-type="string" office:string-value="https://www.loyalplumbing.com/" calcext:value-type="string">
            <text:p>https://www.loyal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oux Falls Plumbing LLC.</text:p>
          </table:table-cell>
          <table:table-cell office:value-type="string" calcext:value-type="string">
            <text:p>(605) 800-6537</text:p>
          </table:table-cell>
          <table:table-cell/>
          <table:table-cell office:value-type="string" calcext:value-type="string">
            <text:p>1508 E 32nd St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://siouxfalls-plumbing.com/&quot;;&quot;http://siouxfalls-plumbing.com/&quot;)" office:value-type="string" office:string-value="http://siouxfalls-plumbing.com/" calcext:value-type="string">
            <text:p>http://siouxfalls-plumbing.com/</text:p>
          </table:table-cell>
          <table:table-cell/>
          <table:table-cell table:style-name="Default" table:number-columns-repeated="16373"/>
        </table:table-row>
        <table:table-row table:style-name="ro2">
          <table:table-cell office:value-type="string" calcext:value-type="string">
            <text:p>Cheyenn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Aspen Mountain Plumbing</text:p>
          </table:table-cell>
          <table:table-cell office:value-type="string" calcext:value-type="string">
            <text:p>(307) 202-8919</text:p>
          </table:table-cell>
          <table:table-cell/>
          <table:table-cell office:value-type="string" calcext:value-type="string">
            <text:p>2404 E Lincolnway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style-name="ce2" table:formula="of:=HYPERLINK(&quot;https://www.aspenmtnplumbing.com/plumbers-cheyenne-wy&quot;;&quot;https://www.aspenmtnplumbing.com/plumbers-cheyenne-wy&quot;)" office:value-type="string" office:string-value="https://www.aspenmtnplumbing.com/plumbers-cheyenne-wy" calcext:value-type="string">
            <text:p>https://www.aspenmtnplumbing.com/plumbers-cheyenne-wy</text:p>
          </table:table-cell>
          <table:table-cell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 loext:blank-width-char=")1">-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p_20_1000_20_US_20_Cities" style:display-name="PageStyle_Top 1000 US C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10T15:38:57.638398400</dc:date>
    <meta:editing-duration>PT49M3S</meta:editing-duration>
    <meta:editing-cycles>1</meta:editing-cycles>
    <meta:document-statistic meta:table-count="1" meta:cell-count="2288" meta:object-count="0"/>
    <meta:generator>LibreOffice/26.2.4.2$Windows_X86_64 LibreOffice_project/0229ac93fcf0d7cbc6376066c6f35021cef002dc</meta:generator>
  </office:meta>
</office:document-meta>
</file>