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f274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rotation-align="none"/>
      <style:text-properties fo:color="#c0392b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Family Run Owner</text:p>
          </table:table-cell>
          <table:table-cell table:style-name="ce1" office:value-type="string" calcext:value-type="string">
            <text:p>Company Webpage</text:p>
          </table:table-cell>
          <table:table-cell table:style-name="ce1" office:value-type="string" calcext:value-type="string">
            <text:p>Largest Social Platfor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 Phone</text:p>
          </table:table-cell>
          <table:table-cell table:style-name="ce1" office:value-type="string" calcext:value-type="string">
            <text:p>Contact Email</text:p>
          </table:table-cell>
        </table:table-row>
        <table:table-row table:style-name="ro2">
          <table:table-cell office:value-type="string" calcext:value-type="string">
            <text:p>Clovi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tesi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lsbad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vingto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unic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bb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rtland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iprock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rmingto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lc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s Piedra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m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spanol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iste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rrillo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drid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n Pedr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rnalill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ndoval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rrale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o Ranch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e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corr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til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emad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Zuni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up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Kinley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ownpoint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oreau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nt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la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ber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gun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om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luewater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oreau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witt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selor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geezi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weelduu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vaj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jo Calient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jo Sarc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asc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ud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lard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xo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cha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ñasc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lma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r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eveland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pell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trou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ringer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o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marro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agle Nest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o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est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asc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gel Fir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 River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ogrand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nni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itá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rizoz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ron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ch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llard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zan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ilili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scabos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jiqu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rreo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holl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stanci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riarty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Mcintosh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nley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co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riet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suqu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mb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joaqu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n Idelfons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n Jua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nta Clar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hkay Owingeh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spañol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lard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cald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misal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jo Sarc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yot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anale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te Park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lack Lak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peton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cate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av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yado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hilmont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ldy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mejo Park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rma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 Moines</text:p>
          </table:table-cell>
          <table:table-cell office:value-type="string" calcext:value-type="string">
            <text:p>N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anson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oplin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e Girardeau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fferson City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rksville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nnibal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. Charles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lla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dalia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ensburg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st Plains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plar Bluff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keston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ennett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w Madrid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uthersville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dwell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rtageville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ceola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den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xico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ance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ble Hill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edericktown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rmington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onton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dia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nne Terre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loge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vins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stus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ystal City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tosi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det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lot Knob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lackwell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adington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t River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k Hills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zark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shington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zzah</text:p>
          </table:table-cell>
          <table:table-cell office:value-type="string" calcext:value-type="string">
            <text:p>M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la Vista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tonville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ureka Springs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ringdale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kadelphia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 Dorado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mden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gnolia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ne Bluff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ticello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ossett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mburg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ke Village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mas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Gehee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chnor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rmott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udora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 Witt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kdale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illett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inkley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zen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oke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lisle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bot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dsonia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kell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rrilton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kins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ussellville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rdanelle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ell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berry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aca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oneville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cliff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ark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zark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unt Ida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ngley</text:p>
          </table:table-cell>
          <table:table-cell office:value-type="string" calcext:value-type="string">
            <text:p>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teau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lihin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ra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ler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ok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gate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high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ey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uar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onewal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ngt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ntiesville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Alester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rebs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t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skahom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ta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ow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lburto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rtshorne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gler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into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ndrix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owder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ore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ns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a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hlequah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nit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yor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in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oos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ol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outeau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on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else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remore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wat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aware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ir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lwel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stville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tts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lber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enwoo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skogee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t Gibso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aggs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goner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weta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kel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ntiesville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eager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>
            <text:p>--- MISSING STATES (Largest &amp; 2nd Largest) -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ver</text:p>
          </table:table-cell>
          <table:table-cell office:value-type="string" calcext:value-type="string">
            <text:p>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mpa</text:p>
          </table:table-cell>
          <table:table-cell office:value-type="string" calcext:value-type="string">
            <text:p>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wiston</text:p>
          </table:table-cell>
          <table:table-cell office:value-type="string" calcext:value-type="string">
            <text:p>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fport</text:p>
          </table:table-cell>
          <table:table-cell office:value-type="string" calcext:value-type="string">
            <text:p>M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smarck</text:p>
          </table:table-cell>
          <table:table-cell office:value-type="string" calcext:value-type="string">
            <text:p>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rgo</text:p>
          </table:table-cell>
          <table:table-cell office:value-type="string" calcext:value-type="string">
            <text:p>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string" calcext:value-type="string">
            <text:p>N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shua</text:p>
          </table:table-cell>
          <table:table-cell office:value-type="string" calcext:value-type="string">
            <text:p>N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wark</text:p>
          </table:table-cell>
          <table:table-cell office:value-type="string" calcext:value-type="string">
            <text:p>NJ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oux Falls</text:p>
          </table:table-cell>
          <table:table-cell office:value-type="string" calcext:value-type="string">
            <text:p>S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pid City</text:p>
          </table:table-cell>
          <table:table-cell office:value-type="string" calcext:value-type="string">
            <text:p>S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rlington</text:p>
          </table:table-cell>
          <table:table-cell office:value-type="string" calcext:value-type="string">
            <text:p>V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utland</text:p>
          </table:table-cell>
          <table:table-cell office:value-type="string" calcext:value-type="string">
            <text:p>V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rleston</text:p>
          </table:table-cell>
          <table:table-cell office:value-type="string" calcext:value-type="string">
            <text:p>WV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ntington</text:p>
          </table:table-cell>
          <table:table-cell office:value-type="string" calcext:value-type="string">
            <text:p>WV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eyenne</text:p>
          </table:table-cell>
          <table:table-cell office:value-type="string" calcext:value-type="string">
            <text:p>W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4:34:54.268600600</meta:creation-date>
    <dc:date>2026-06-10T14:36:58.161778900</dc:date>
    <meta:editing-duration>PT2M3S</meta:editing-duration>
    <meta:editing-cycles>1</meta:editing-cycles>
    <meta:generator>LibreOffice/26.2.4.2$Windows_X86_64 LibreOffice_project/0229ac93fcf0d7cbc6376066c6f35021cef002dc</meta:generator>
    <meta:document-statistic meta:table-count="1" meta:cell-count="16957" meta:object-count="0"/>
  </office:meta>
</office:document-meta>
</file>